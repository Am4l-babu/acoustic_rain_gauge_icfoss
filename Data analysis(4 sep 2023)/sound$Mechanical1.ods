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472in"/>
    </style:style>
    <style:style style:name="co4" style:family="table-column">
      <style:table-column-properties fo:break-before="auto" style:column-width="1.0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bottom"/>
      <style:paragraph-properties fo:text-align="end" fo:margin-left="0in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bottom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8709in" svg:height="3.8646in" svg:x="0in" svg:y="7.5087in">
            <draw:object draw:notify-on-update-of-ranges="Sheet1.A2:Sheet1.A60 Sheet1.B1:Sheet1.B1 Sheet1.B2:Sheet1.B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8512in" svg:y="7.5374in">
            <draw:object draw:notify-on-update-of-ranges="Sheet1.E2:Sheet1.E60 Sheet1.F1:Sheet1.F1 Sheet1.F2:Sheet1.F6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5.7524in" svg:y="0.5724in">
            <draw:object draw:notify-on-update-of-ranges="Sheet1.C1:Sheet1.C1 Sheet1.C2:Sheet1.C11 Sheet1.D1:Sheet1.D1 Sheet1.D2:Sheet1.D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5"/>
        <table:table-column table:style-name="co2" table:default-cell-style-name="Default"/>
        <table:table-column table:style-name="co1" table:default-cell-style-name="ce5"/>
        <table:table-column table:style-name="co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ound</text:p>
          </table:table-cell>
          <table:table-cell table:style-name="ce3" office:value-type="string" calcext:value-type="string">
            <text:p>TIME</text:p>
          </table:table-cell>
          <table:table-cell office:value-type="string" calcext:value-type="string">
            <text:p>mechanical 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CHANICAL</text:p>
          </table:table-cell>
        </table:table-row>
        <table:table-row table:style-name="ro1">
          <table:table-cell table:style-name="ce1" office:value-type="string" calcext:value-type="string">
            <text:p>2023-09-02 19:55:09</text:p>
          </table:table-cell>
          <table:table-cell office:value-type="float" office:value="131" calcext:value-type="float">
            <text:p>131</text:p>
          </table:table-cell>
          <table:table-cell table:style-name="ce4" office:value-type="string" calcext:value-type="string">
            <text:p>2023-09-02 19:55:06</text:p>
          </table:table-cell>
          <table:table-cell office:value-type="float" office:value="0.2" calcext:value-type="float">
            <text:p>0.2</text:p>
          </table:table-cell>
          <table:table-cell table:style-name="ce6" office:value-type="string" calcext:value-type="string">
            <text:p>2023-09-02 19:55:0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2023-09-02 19:55:21</text:p>
          </table:table-cell>
          <table:table-cell office:value-type="float" office:value="94" calcext:value-type="float">
            <text:p>94</text:p>
          </table:table-cell>
          <table:table-cell table:style-name="ce4" office:value-type="string" calcext:value-type="string">
            <text:p>2023-09-02 19:56:06</text:p>
          </table:table-cell>
          <table:table-cell office:value-type="float" office:value="0.2" calcext:value-type="float">
            <text:p>0.2</text:p>
          </table:table-cell>
          <table:table-cell table:style-name="ce6" office:value-type="string" calcext:value-type="string">
            <text:p>2023-09-02 19:55:2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2023-09-02 19:55:33</text:p>
          </table:table-cell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2023-09-02 19:57:06</text:p>
          </table:table-cell>
          <table:table-cell office:value-type="float" office:value="0.2" calcext:value-type="float">
            <text:p>0.2</text:p>
          </table:table-cell>
          <table:table-cell table:style-name="ce6" office:value-type="string" calcext:value-type="string">
            <text:p>2023-09-02 19:55:3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2023-09-02 19:55:57</text:p>
          </table:table-cell>
          <table:table-cell office:value-type="float" office:value="79" calcext:value-type="float">
            <text:p>79</text:p>
          </table:table-cell>
          <table:table-cell table:style-name="ce4" office:value-type="string" calcext:value-type="string">
            <text:p>2023-09-02 19:58:06</text:p>
          </table:table-cell>
          <table:table-cell office:value-type="float" office:value="0.8" calcext:value-type="float">
            <text:p>0.8</text:p>
          </table:table-cell>
          <table:table-cell table:style-name="ce6" office:value-type="string" calcext:value-type="string">
            <text:p>2023-09-02 19:55:5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2023-09-02 19:56:33</text:p>
          </table:table-cell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2023-09-02 20:01:06</text:p>
          </table:table-cell>
          <table:table-cell office:value-type="float" office:value="0.6" calcext:value-type="float">
            <text:p>0.6</text:p>
          </table:table-cell>
          <table:table-cell table:style-name="ce6" office:value-type="string" calcext:value-type="string">
            <text:p>2023-09-02 19:56:3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2023-09-02 19:56:46</text:p>
          </table:table-cell>
          <table:table-cell office:value-type="float" office:value="80" calcext:value-type="float">
            <text:p>80</text:p>
          </table:table-cell>
          <table:table-cell table:style-name="ce4" office:value-type="string" calcext:value-type="string">
            <text:p>2023-09-02 20:03:06</text:p>
          </table:table-cell>
          <table:table-cell office:value-type="float" office:value="0.2" calcext:value-type="float">
            <text:p>0.2</text:p>
          </table:table-cell>
          <table:table-cell table:style-name="ce6" office:value-type="string" calcext:value-type="string">
            <text:p>2023-09-02 19:56:4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2023-09-02 19:57:22</text:p>
          </table:table-cell>
          <table:table-cell office:value-type="float" office:value="114" calcext:value-type="float">
            <text:p>114</text:p>
          </table:table-cell>
          <table:table-cell table:style-name="ce4" office:value-type="string" calcext:value-type="string">
            <text:p>2023-09-02 20:05:06</text:p>
          </table:table-cell>
          <table:table-cell office:value-type="float" office:value="0.2" calcext:value-type="float">
            <text:p>0.2</text:p>
          </table:table-cell>
          <table:table-cell table:style-name="ce6" office:value-type="string" calcext:value-type="string">
            <text:p>2023-09-02 19:57:2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2023-09-02 19:57:58</text:p>
          </table:table-cell>
          <table:table-cell office:value-type="float" office:value="104" calcext:value-type="float">
            <text:p>104</text:p>
          </table:table-cell>
          <table:table-cell table:style-name="ce4" office:value-type="string" calcext:value-type="string">
            <text:p>2023-09-02 20:06:06</text:p>
          </table:table-cell>
          <table:table-cell office:value-type="float" office:value="0.2" calcext:value-type="float">
            <text:p>0.2</text:p>
          </table:table-cell>
          <table:table-cell table:style-name="ce6" office:value-type="string" calcext:value-type="string">
            <text:p>2023-09-02 19:57:5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2023-09-02 19:58:10</text:p>
          </table:table-cell>
          <table:table-cell office:value-type="float" office:value="126" calcext:value-type="float">
            <text:p>126</text:p>
          </table:table-cell>
          <table:table-cell table:style-name="ce4" office:value-type="string" calcext:value-type="string">
            <text:p>2023-09-02 20:08:06</text:p>
          </table:table-cell>
          <table:table-cell office:value-type="float" office:value="0.2" calcext:value-type="float">
            <text:p>0.2</text:p>
          </table:table-cell>
          <table:table-cell table:style-name="ce6" office:value-type="string" calcext:value-type="string">
            <text:p>2023-09-02 19:58:1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style-name="ce1" office:value-type="string" calcext:value-type="string">
            <text:p>2023-09-02 19:58:22</text:p>
          </table:table-cell>
          <table:table-cell office:value-type="float" office:value="80" calcext:value-type="float">
            <text:p>80</text:p>
          </table:table-cell>
          <table:table-cell table:style-name="ce4" office:value-type="string" calcext:value-type="string">
            <text:p>2023-09-02 20:09:06</text:p>
          </table:table-cell>
          <table:table-cell office:value-type="float" office:value="0.2" calcext:value-type="float">
            <text:p>0.2</text:p>
          </table:table-cell>
          <table:table-cell table:style-name="ce6" office:value-type="string" calcext:value-type="string">
            <text:p>2023-09-02 19:58:2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style-name="ce1" office:value-type="string" calcext:value-type="string">
            <text:p>2023-09-02 19:58:34</text:p>
          </table:table-cell>
          <table:table-cell office:value-type="float" office:value="200" calcext:value-type="float">
            <text:p>200</text:p>
          </table:table-cell>
          <table:table-cell table:style-name="Default"/>
          <table:table-cell/>
          <table:table-cell table:style-name="ce6" office:value-type="string" calcext:value-type="string">
            <text:p>2023-09-02 19:58:3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style-name="ce1" office:value-type="string" calcext:value-type="string">
            <text:p>2023-09-02 19:58:59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style-name="ce6" office:value-type="string" calcext:value-type="string">
            <text:p>2023-09-02 19:58:5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style-name="ce1" office:value-type="string" calcext:value-type="string">
            <text:p>2023-09-02 19:59:03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style-name="ce6" office:value-type="string" calcext:value-type="string">
            <text:p>2023-09-02 19:59:0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style-name="ce1" office:value-type="string" calcext:value-type="string">
            <text:p>2023-09-02 19:59:39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table:style-name="ce6" office:value-type="string" calcext:value-type="string">
            <text:p>2023-09-02 19:59:3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style-name="ce1" office:value-type="string" calcext:value-type="string">
            <text:p>2023-09-02 19:59:51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style-name="ce6" office:value-type="string" calcext:value-type="string">
            <text:p>2023-09-02 19:59:5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style-name="ce1" office:value-type="string" calcext:value-type="string">
            <text:p>2023-09-02 20:00:04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style-name="ce6" office:value-type="string" calcext:value-type="string">
            <text:p>2023-09-02 20:00:0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style-name="ce1" office:value-type="string" calcext:value-type="string">
            <text:p>2023-09-02 20:00:16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table:style-name="ce6" office:value-type="string" calcext:value-type="string">
            <text:p>2023-09-02 20:00:1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style-name="ce1" office:value-type="string" calcext:value-type="string">
            <text:p>2023-09-02 20:00:28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style-name="ce6" office:value-type="string" calcext:value-type="string">
            <text:p>2023-09-02 20:00:2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style-name="ce1" office:value-type="string" calcext:value-type="string">
            <text:p>2023-09-02 20:00:4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ce6" office:value-type="string" calcext:value-type="string">
            <text:p>2023-09-02 20:00:4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style-name="ce1" office:value-type="string" calcext:value-type="string">
            <text:p>2023-09-02 20:00:52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ce6" office:value-type="string" calcext:value-type="string">
            <text:p>2023-09-02 20:00:5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style-name="ce1" office:value-type="string" calcext:value-type="string">
            <text:p>2023-09-02 20:01:04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style-name="ce6" office:value-type="string" calcext:value-type="string">
            <text:p>2023-09-02 20:01:0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style-name="ce1" office:value-type="string" calcext:value-type="string">
            <text:p>2023-09-02 20:01:16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table:style-name="ce6" office:value-type="string" calcext:value-type="string">
            <text:p>2023-09-02 20:01:1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style-name="ce1" office:value-type="string" calcext:value-type="string">
            <text:p>2023-09-02 20:01:2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table:style-name="ce6" office:value-type="string" calcext:value-type="string">
            <text:p>2023-09-02 20:01:2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style-name="ce1" office:value-type="string" calcext:value-type="string">
            <text:p>2023-09-02 20:01:40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style-name="ce6" office:value-type="string" calcext:value-type="string">
            <text:p>2023-09-02 20:01:4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style-name="ce1" office:value-type="string" calcext:value-type="string">
            <text:p>2023-09-02 20:01:52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style-name="ce6" office:value-type="string" calcext:value-type="string">
            <text:p>2023-09-02 20:01:5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style-name="ce1" office:value-type="string" calcext:value-type="string">
            <text:p>2023-09-02 20:02:05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style-name="ce6" office:value-type="string" calcext:value-type="string">
            <text:p>2023-09-02 20:02:0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style-name="ce1" office:value-type="string" calcext:value-type="string">
            <text:p>2023-09-02 20:02:17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style-name="ce6" office:value-type="string" calcext:value-type="string">
            <text:p>2023-09-02 20:02:1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style-name="ce1" office:value-type="string" calcext:value-type="string">
            <text:p>2023-09-02 20:02:29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table:style-name="ce6" office:value-type="string" calcext:value-type="string">
            <text:p>2023-09-02 20:02:2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style-name="ce1" office:value-type="string" calcext:value-type="string">
            <text:p>2023-09-02 20:02:41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ce6" office:value-type="string" calcext:value-type="string">
            <text:p>2023-09-02 20:02:4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style-name="ce1" office:value-type="string" calcext:value-type="string">
            <text:p>2023-09-02 20:02:53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style-name="ce6" office:value-type="string" calcext:value-type="string">
            <text:p>2023-09-02 20:02:5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style-name="ce1" office:value-type="string" calcext:value-type="string">
            <text:p>2023-09-02 20:03:17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style-name="ce6" office:value-type="string" calcext:value-type="string">
            <text:p>2023-09-02 20:03:1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2023-09-02 20:03:29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table:style-name="ce6" office:value-type="string" calcext:value-type="string">
            <text:p>2023-09-02 20:03:2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style-name="ce1" office:value-type="string" calcext:value-type="string">
            <text:p>2023-09-02 20:03:41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style-name="ce6" office:value-type="string" calcext:value-type="string">
            <text:p>2023-09-02 20:03:4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style-name="ce1" office:value-type="string" calcext:value-type="string">
            <text:p>2023-09-02 20:03:54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table:style-name="ce6" office:value-type="string" calcext:value-type="string">
            <text:p>2023-09-02 20:03:5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style-name="ce1" office:value-type="string" calcext:value-type="string">
            <text:p>2023-09-02 20:04:1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style-name="ce6" office:value-type="string" calcext:value-type="string">
            <text:p>2023-09-02 20:04:1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2023-09-02 20:04:54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table:style-name="ce6" office:value-type="string" calcext:value-type="string">
            <text:p>2023-09-02 20:04:5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2023-09-02 20:04:58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table:style-name="ce6" office:value-type="string" calcext:value-type="string">
            <text:p>2023-09-02 20:04:5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2023-09-02 20:05:35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style-name="ce6" office:value-type="string" calcext:value-type="string">
            <text:p>2023-09-02 20:05:3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2023-09-02 20:05:47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style-name="ce6" office:value-type="string" calcext:value-type="string">
            <text:p>2023-09-02 20:05:4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2023-09-02 20:05:59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ce6" office:value-type="string" calcext:value-type="string">
            <text:p>2023-09-02 20:05:5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2023-09-02 20:06:11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style-name="ce6" office:value-type="string" calcext:value-type="string">
            <text:p>2023-09-02 20:06:1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2023-09-02 20:06:23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style-name="ce6" office:value-type="string" calcext:value-type="string">
            <text:p>2023-09-02 20:06:2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2023-09-02 20:06:35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table:style-name="ce6" office:value-type="string" calcext:value-type="string">
            <text:p>2023-09-02 20:06:3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2023-09-02 20:06:47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style-name="ce6" office:value-type="string" calcext:value-type="string">
            <text:p>2023-09-02 20:06:4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2023-09-02 20:07:00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style-name="ce6" office:value-type="string" calcext:value-type="string">
            <text:p>2023-09-02 20:07:0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2023-09-02 20:07:12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ce6" office:value-type="string" calcext:value-type="string">
            <text:p>2023-09-02 20:07:1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2023-09-02 20:07:36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style-name="ce6" office:value-type="string" calcext:value-type="string">
            <text:p>2023-09-02 20:07:3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2023-09-02 20:07:48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table:style-name="ce6" office:value-type="string" calcext:value-type="string">
            <text:p>2023-09-02 20:07:4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2023-09-02 20:08:00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table:style-name="ce6" office:value-type="string" calcext:value-type="string">
            <text:p>2023-09-02 20:08:0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2023-09-02 20:08:12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ce6" office:value-type="string" calcext:value-type="string">
            <text:p>2023-09-02 20:08:1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2023-09-02 20:08:24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ce6" office:value-type="string" calcext:value-type="string">
            <text:p>2023-09-02 20:08:2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2023-09-02 20:08:36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table:style-name="ce6" office:value-type="string" calcext:value-type="string">
            <text:p>2023-09-02 20:08:3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2023-09-02 20:08:48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style-name="ce6" office:value-type="string" calcext:value-type="string">
            <text:p>2023-09-02 20:08:4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2023-09-02 20:09: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ce6" office:value-type="string" calcext:value-type="string">
            <text:p>2023-09-02 20:09:0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2023-09-02 20:09:13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style-name="ce6" office:value-type="string" calcext:value-type="string">
            <text:p>2023-09-02 20:09:1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2023-09-02 20:09:25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style-name="ce6" office:value-type="string" calcext:value-type="string">
            <text:p>2023-09-02 20:09:2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2023-09-02 20:09:37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style-name="ce6" office:value-type="string" calcext:value-type="string">
            <text:p>2023-09-02 20:09:3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2023-09-02 20:09:49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style-name="ce6" office:value-type="string" calcext:value-type="string">
            <text:p>2023-09-02 20:09:4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2023-09-02 19:55:10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style-name="ce6" office:value-type="string" calcext:value-type="string">
            <text:p>2023-09-02 19:55:10</text:p>
          </table:table-cell>
          <table:table-cell office:value-type="float" office:value="0.2" calcext:value-type="float">
            <text:p>0.2</text:p>
          </table:table-cell>
        </table:table-row>
        <table:table-row table:style-name="ro1" table:number-rows-repeated="104851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15:12:28.773558214</meta:creation-date>
    <dc:date>2023-09-08T14:44:13.823862378</dc:date>
    <meta:editing-duration>PT2H57M36S</meta:editing-duration>
    <meta:editing-cycles>3</meta:editing-cycles>
    <meta:generator>LibreOffice/7.3.7.2$Linux_X86_64 LibreOffice_project/30$Build-2</meta:generator>
    <meta:document-statistic meta:table-count="1" meta:cell-count="26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453cm" svg:height="9.817cm" xlink:href=".." xlink:type="simple" chart:class="chart:line" chart:style-name="ch1">
        <chart:title svg:x="7.201cm" svg:y="0.332cm" chart:style-name="ch2">
          <text:p>SOUND DATA</text:p>
        </chart:title>
        <chart:subtitle svg:x="6.38cm" svg:y="1.307cm" chart:style-name="ch3">
          <text:p>sound using measurement</text:p>
        </chart:subtitle>
        <chart:legend chart:legend-position="end" svg:x="15.13cm" svg:y="4.609cm" style:legend-expansion="high" chart:style-name="ch4"/>
        <chart:plot-area chart:style-name="ch5" table:cell-range-address="Sheet1.A1:Sheet1.B60" chart:data-source-has-labels="both" svg:x="1.36cm" svg:y="2.186cm" svg:width="13.421cm" svg:height="6.454cm">
          <chart:coordinate-region svg:x="3.71cm" svg:y="2.385cm" svg:width="11.071cm" svg:height="3.517cm"/>
          <chart:axis chart:dimension="x" chart:name="primary-x" chart:style-name="ch6" chartooo:axis-type="auto">
            <chartooo:date-scale/>
            <chart:title svg:x="7.642cm" svg:y="8.836cm" chart:style-name="ch7">
              <text:p>TIME</text:p>
            </chart:title>
            <chart:categories table:cell-range-address="Sheet1.A2:Sheet1.A60"/>
          </chart:axis>
          <chart:axis chart:dimension="y" chart:name="primary-y" chart:style-name="ch6">
            <chart:title svg:x="0.451cm" svg:y="6.158cm" chart:style-name="ch8">
              <text:p>AMOUNT</text:p>
            </chart:title>
            <chart:grid chart:style-name="ch9" chart:class="major"/>
          </chart:axis>
          <chart:series chart:style-name="ch10" chart:values-cell-range-address="Sheet1.B2:Sheet1.B60" chart:label-cell-address="Sheet1.B1:Sheet1.B1" chart:class="chart:line"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und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3-09-02 19:55:09</text:p>
                <draw:g>
                  <svg:desc>Sheet1.A2:Sheet1.A60</svg:desc>
                </draw:g>
              </table:table-cell>
              <table:table-cell office:value-type="float" office:value="131">
                <text:p>131</text:p>
                <draw:g>
                  <svg:desc>Sheet1.B2:Sheet1.B60</svg:desc>
                </draw:g>
              </table:table-cell>
            </table:table-row>
            <table:table-row>
              <table:table-cell office:value-type="string">
                <text:p>2023-09-02 19:55:2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23-09-02 19:55:3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23-09-02 19:55:5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23-09-02 19:56:3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23-09-02 19:56:4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23-09-02 19:57:2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23-09-02 19:57:5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23-09-02 19:58:1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23-09-02 19:58:2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23-09-02 19:58:3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23-09-02 19:58:5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23-09-02 19:59:0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23-09-02 19:59:3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023-09-02 19:59:5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23-09-02 20:00:0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23-09-02 20:00:1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23-09-02 20:00:2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023-09-02 20:00:4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23-09-02 20:00:5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23-09-02 20:01:0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23-09-02 20:01:1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23-09-02 20:01:2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23-09-02 20:01: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23-09-02 20:01:5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23-09-02 20:02:0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23-09-02 20:02:1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23-09-02 20:02:2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23-09-02 20:02:4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23-09-02 20:02:5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23-09-02 20:03:1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23-09-02 20:03:2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023-09-02 20:03:4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23-09-02 20:03:5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23-09-02 20:04:1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23-09-02 20:04:5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23-09-02 20:04:5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23-09-02 20:05:3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23-09-02 20:05:4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23-09-02 20:05:5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23-09-02 20:06:1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23-09-02 20:06:2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23-09-02 20:06:3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23-09-02 20:06:4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23-09-02 20:07:0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23-09-02 20:07:1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23-09-02 20:07:3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23-09-02 20:07:4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23-09-02 20:08:0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023-09-02 20:08:1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23-09-02 20:08:2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23-09-02 20:08:3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23-09-02 20:08:4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23-09-02 20:09:0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23-09-02 20:09:1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023-09-02 20:09: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23-09-02 20:09:3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23-09-02 20:09:4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23-09-02 19:55:10</text:p>
              </table:table-cell>
              <table:table-cell office:value-type="float" office:value="132">
                <text:p>1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75cm" svg:y="0.316cm" chart:style-name="ch2">
          <text:p>MECHANICAL</text:p>
        </chart:title>
        <chart:subtitle svg:x="5.773cm" svg:y="1.275cm" chart:style-name="ch3">
          <text:p>Tipping bucket raingauge</text:p>
        </chart:subtitle>
        <chart:legend chart:legend-position="end" svg:x="12.407cm" svg:y="4.201cm" style:legend-expansion="high" chart:style-name="ch4"/>
        <chart:plot-area chart:style-name="ch5" table:cell-range-address="Sheet1.E1:Sheet1.F60" chart:data-source-has-labels="both" svg:x="1.331cm" svg:y="2.138cm" svg:width="10.756cm" svg:height="5.701cm">
          <chart:coordinate-region svg:x="3.681cm" svg:y="2.138cm" svg:width="8.406cm" svg:height="2.963cm"/>
          <chart:axis chart:dimension="x" chart:name="primary-x" chart:style-name="ch6" chartooo:axis-type="auto">
            <chartooo:date-scale/>
            <chart:title svg:x="6.295cm" svg:y="8.019cm" chart:style-name="ch7">
              <text:p>Time</text:p>
            </chart:title>
            <chart:categories table:cell-range-address="Sheet1.E2:Sheet1.E60"/>
          </chart:axis>
          <chart:axis chart:dimension="y" chart:name="primary-y" chart:style-name="ch6">
            <chart:title svg:x="0.451cm" svg:y="5.601cm" chart:style-name="ch8">
              <text:p>Amount</text:p>
            </chart:title>
            <chart:grid chart:style-name="ch9" chart:class="major"/>
          </chart:axis>
          <chart:series chart:style-name="ch10" chart:values-cell-range-address="Sheet1.F2:Sheet1.F60" chart:label-cell-address="Sheet1.F1:Sheet1.F1" chart:class="chart:line"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CHANICAL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3-09-02 19:55:09</text:p>
                <draw:g>
                  <svg:desc>Sheet1.E2:Sheet1.E60</svg:desc>
                </draw:g>
              </table:table-cell>
              <table:table-cell office:value-type="float" office:value="0.2">
                <text:p>0.2</text:p>
                <draw:g>
                  <svg:desc>Sheet1.F2:Sheet1.F60</svg:desc>
                </draw:g>
              </table:table-cell>
            </table:table-row>
            <table:table-row>
              <table:table-cell office:value-type="string">
                <text:p>2023-09-02 19:55:2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19:55: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19:55:5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19:56: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19:56:4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19:57:2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19:57:5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19:58:1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3-09-02 19:58:2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3-09-02 19:58:3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3-09-02 19:58:5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3-09-02 19:59:0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3-09-02 19:59:3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3-09-02 19:59:5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3-09-02 20:00:0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3-09-02 20:00:1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3-09-02 20:00:2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3-09-02 20:00:4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3-09-02 20:00:5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3-09-02 20:01:0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023-09-02 20:01:1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023-09-02 20:01:2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023-09-02 20:01:4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023-09-02 20:01:5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023-09-02 20:02:0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023-09-02 20:02:1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023-09-02 20:02:2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023-09-02 20:02:4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023-09-02 20:02:5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023-09-02 20:03:1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3:2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023-09-02 20:03:4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023-09-02 20:03:5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023-09-02 20:04:1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4: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4:5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5: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5:4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5:5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6:1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6:2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6: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6:4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7: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7:1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7:3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7:4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8: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8:1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8:2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8:3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8:4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9:0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9:1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9: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9:3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9:4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19:55:10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28cm" svg:y="0.316cm" chart:style-name="ch2">
          <text:p>orginal rain mechanical</text:p>
        </chart:title>
        <chart:subtitle svg:x="5.998cm" svg:y="1.275cm" chart:style-name="ch3">
          <text:p>mechanical rain gauge</text:p>
        </chart:subtitle>
        <chart:legend chart:legend-position="end" svg:x="12.804cm" svg:y="4.201cm" style:legend-expansion="high" chart:style-name="ch4"/>
        <chart:plot-area chart:style-name="ch5" table:cell-range-address="Sheet1.C1:Sheet1.D11" chart:data-source-has-labels="both" svg:x="1.331cm" svg:y="2.138cm" svg:width="11.153cm" svg:height="5.701cm">
          <chart:coordinate-region svg:x="3.681cm" svg:y="2.138cm" svg:width="8.663cm" svg:height="2.963cm"/>
          <chart:axis chart:dimension="x" chart:name="primary-x" chart:style-name="ch6" chartooo:axis-type="auto">
            <chartooo:date-scale/>
            <chart:title svg:x="6.545cm" svg:y="8.019cm" chart:style-name="ch7">
              <text:p>time</text:p>
            </chart:title>
            <chart:categories table:cell-range-address="Sheet1.C2:Sheet1.C11"/>
          </chart:axis>
          <chart:axis chart:dimension="y" chart:name="primary-y" chart:style-name="ch6">
            <chart:title svg:x="0.451cm" svg:y="5.76cm" chart:style-name="ch8">
              <text:p>amplitude</text:p>
            </chart:title>
            <chart:grid chart:style-name="ch9" chart:class="major"/>
          </chart:axis>
          <chart:series chart:style-name="ch10" chart:values-cell-range-address="Sheet1.D2:Sheet1.D11" chart:label-cell-address="Sheet1.D1:Sheet1.D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chanical 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3-09-02 19:55:06</text:p>
                <draw:g>
                  <svg:desc>Sheet1.C2:Sheet1.C11</svg:desc>
                </draw:g>
              </table:table-cell>
              <table:table-cell office:value-type="float" office:value="0.2">
                <text:p>0.2</text:p>
                <draw:g>
                  <svg:desc>Sheet1.D2:Sheet1.D11</svg:desc>
                </draw:g>
              </table:table-cell>
            </table:table-row>
            <table:table-row>
              <table:table-cell office:value-type="string">
                <text:p>2023-09-02 19:56:0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19:57:0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19:58:0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3-09-02 20:01:0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023-09-02 20:03:0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5:0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6:0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8:0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9-02 20:09:06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