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" style:family="table-cell" style:parent-style-name="Default" style:data-style-name="N37"/>
    <style:style style:name="ce5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cm"/>
      <style:text-properties style:font-name="DejaVu Sans" fo:font-size="8pt" fo:font-style="italic" style:font-size-asian="8pt" style:font-style-asian="italic" style:font-size-complex="8pt" style:font-style-complex="italic"/>
    </style:style>
    <style:style style:name="ce2" style:family="table-cell" style:parent-style-name="Default" style:data-style-name="N61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" fo:font-size="8pt" fo:font-style="italic" style:font-size-asian="8pt" style:font-style-asian="italic" style:font-size-complex="8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test_data_4th_nov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3" office:value-type="string" calcext:value-type="string">
            <text:p>Date</text:p>
          </table:table-cell>
          <table:table-cell table:style-name="ce5" office:value-type="string" calcext:value-type="string">
            <text:p>Time</text:p>
          </table:table-cell>
          <table:table-cell table:style-name="ce7" office:value-type="string" calcext:value-type="string">
            <text:p>Sound</text:p>
          </table:table-cell>
          <table:table-cell table:style-name="ce7" office:value-type="string" calcext:value-type="string">
            <text:p>Loudness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06M30S" calcext:value-type="time">
            <text:p>14:06:30</text:p>
          </table:table-cell>
          <table:table-cell office:value-type="float" office:value="50" calcext:value-type="float">
            <text:p>5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07M06S" calcext:value-type="time">
            <text:p>14:07:06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08M06S" calcext:value-type="time">
            <text:p>14:08:06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09M06S" calcext:value-type="time">
            <text:p>14:09:0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10M06S" calcext:value-type="time">
            <text:p>14:10:06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11M06S" calcext:value-type="time">
            <text:p>14:11:06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12M06S" calcext:value-type="time">
            <text:p>14:12:06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13M06S" calcext:value-type="time">
            <text:p>14:13:06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14M06S" calcext:value-type="time">
            <text:p>14:14:06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15M06S" calcext:value-type="time">
            <text:p>14:15:0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16M07S" calcext:value-type="time">
            <text:p>14:16:07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17M07S" calcext:value-type="time">
            <text:p>14:17:07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18M07S" calcext:value-type="time">
            <text:p>14:18:07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19M07S" calcext:value-type="time">
            <text:p>14:19:07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20M07S" calcext:value-type="time">
            <text:p>14:20:07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21M07S" calcext:value-type="time">
            <text:p>14:21:07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22M07S" calcext:value-type="time">
            <text:p>14:22:0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23M07S" calcext:value-type="time">
            <text:p>14:23:07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24M07S" calcext:value-type="time">
            <text:p>14:24:07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25M08S" calcext:value-type="time">
            <text:p>14:25:08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26M08S" calcext:value-type="time">
            <text:p>14:26:08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27M08S" calcext:value-type="time">
            <text:p>14:27:08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28M08S" calcext:value-type="time">
            <text:p>14:28:08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29M08S" calcext:value-type="time">
            <text:p>14:29:08</text:p>
          </table:table-cell>
          <table:table-cell office:value-type="float" office:value="57" calcext:value-type="float">
            <text:p>5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30M08S" calcext:value-type="time">
            <text:p>14:30:08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31M08S" calcext:value-type="time">
            <text:p>14:31:08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32M08S" calcext:value-type="time">
            <text:p>14:32:08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33M09S" calcext:value-type="time">
            <text:p>14:33:09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34M09S" calcext:value-type="time">
            <text:p>14:34:09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35M09S" calcext:value-type="time">
            <text:p>14:35:09</text:p>
          </table:table-cell>
          <table:table-cell office:value-type="float" office:value="109" calcext:value-type="float">
            <text:p>10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36M09S" calcext:value-type="time">
            <text:p>14:36:09</text:p>
          </table:table-cell>
          <table:table-cell office:value-type="float" office:value="139" calcext:value-type="float">
            <text:p>13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37M09S" calcext:value-type="time">
            <text:p>14:37:09</text:p>
          </table:table-cell>
          <table:table-cell office:value-type="float" office:value="134" calcext:value-type="float">
            <text:p>13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38M09S" calcext:value-type="time">
            <text:p>14:38:09</text:p>
          </table:table-cell>
          <table:table-cell office:value-type="float" office:value="166" calcext:value-type="float">
            <text:p>16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39M09S" calcext:value-type="time">
            <text:p>14:39:09</text:p>
          </table:table-cell>
          <table:table-cell office:value-type="float" office:value="156" calcext:value-type="float">
            <text:p>15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40M10S" calcext:value-type="time">
            <text:p>14:40:10</text:p>
          </table:table-cell>
          <table:table-cell office:value-type="float" office:value="188" calcext:value-type="float">
            <text:p>18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41M10S" calcext:value-type="time">
            <text:p>14:41:10</text:p>
          </table:table-cell>
          <table:table-cell office:value-type="float" office:value="181" calcext:value-type="float">
            <text:p>18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42M10S" calcext:value-type="time">
            <text:p>14:42:10</text:p>
          </table:table-cell>
          <table:table-cell office:value-type="float" office:value="211" calcext:value-type="float">
            <text:p>2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43M10S" calcext:value-type="time">
            <text:p>14:43:10</text:p>
          </table:table-cell>
          <table:table-cell office:value-type="float" office:value="206" calcext:value-type="float">
            <text:p>20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44M10S" calcext:value-type="time">
            <text:p>14:44:10</text:p>
          </table:table-cell>
          <table:table-cell office:value-type="float" office:value="243" calcext:value-type="float">
            <text:p>24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45M10S" calcext:value-type="time">
            <text:p>14:45:10</text:p>
          </table:table-cell>
          <table:table-cell office:value-type="float" office:value="219" calcext:value-type="float">
            <text:p>21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46M10S" calcext:value-type="time">
            <text:p>14:46:10</text:p>
          </table:table-cell>
          <table:table-cell office:value-type="float" office:value="205" calcext:value-type="float">
            <text:p>20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47M10S" calcext:value-type="time">
            <text:p>14:47:10</text:p>
          </table:table-cell>
          <table:table-cell office:value-type="float" office:value="218" calcext:value-type="float">
            <text:p>21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48M11S" calcext:value-type="time">
            <text:p>14:48:11</text:p>
          </table:table-cell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49M11S" calcext:value-type="time">
            <text:p>14:49:11</text:p>
          </table:table-cell>
          <table:table-cell office:value-type="float" office:value="261" calcext:value-type="float">
            <text:p>26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50M11S" calcext:value-type="time">
            <text:p>14:50:11</text:p>
          </table:table-cell>
          <table:table-cell office:value-type="float" office:value="217" calcext:value-type="float">
            <text:p>21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51M11S" calcext:value-type="time">
            <text:p>14:51:11</text:p>
          </table:table-cell>
          <table:table-cell office:value-type="float" office:value="231" calcext:value-type="float">
            <text:p>23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52M11S" calcext:value-type="time">
            <text:p>14:52:11</text:p>
          </table:table-cell>
          <table:table-cell office:value-type="float" office:value="243" calcext:value-type="float">
            <text:p>24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53M11S" calcext:value-type="time">
            <text:p>14:53:11</text:p>
          </table:table-cell>
          <table:table-cell office:value-type="float" office:value="229" calcext:value-type="float">
            <text:p>22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54M11S" calcext:value-type="time">
            <text:p>14:54:11</text:p>
          </table:table-cell>
          <table:table-cell office:value-type="float" office:value="252" calcext:value-type="float">
            <text:p>25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55M12S" calcext:value-type="time">
            <text:p>14:55:12</text:p>
          </table:table-cell>
          <table:table-cell office:value-type="float" office:value="250" calcext:value-type="float">
            <text:p>2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56M12S" calcext:value-type="time">
            <text:p>14:56:12</text:p>
          </table:table-cell>
          <table:table-cell office:value-type="float" office:value="272" calcext:value-type="float">
            <text:p>27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57M12S" calcext:value-type="time">
            <text:p>14:57:12</text:p>
          </table:table-cell>
          <table:table-cell office:value-type="float" office:value="249" calcext:value-type="float">
            <text:p>24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58M12S" calcext:value-type="time">
            <text:p>14:58:12</text:p>
          </table:table-cell>
          <table:table-cell office:value-type="float" office:value="229" calcext:value-type="float">
            <text:p>22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4H59M12S" calcext:value-type="time">
            <text:p>14:59:12</text:p>
          </table:table-cell>
          <table:table-cell office:value-type="float" office:value="265" calcext:value-type="float">
            <text:p>26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00M12S" calcext:value-type="time">
            <text:p>15:00:12</text:p>
          </table:table-cell>
          <table:table-cell office:value-type="float" office:value="231" calcext:value-type="float">
            <text:p>23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01M12S" calcext:value-type="time">
            <text:p>15:01:12</text:p>
          </table:table-cell>
          <table:table-cell office:value-type="float" office:value="266" calcext:value-type="float">
            <text:p>26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02M13S" calcext:value-type="time">
            <text:p>15:02:13</text:p>
          </table:table-cell>
          <table:table-cell office:value-type="float" office:value="254" calcext:value-type="float">
            <text:p>25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03M13S" calcext:value-type="time">
            <text:p>15:03:13</text:p>
          </table:table-cell>
          <table:table-cell office:value-type="float" office:value="271" calcext:value-type="float">
            <text:p>27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04M13S" calcext:value-type="time">
            <text:p>15:04:13</text:p>
          </table:table-cell>
          <table:table-cell office:value-type="float" office:value="264" calcext:value-type="float">
            <text:p>26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05M13S" calcext:value-type="time">
            <text:p>15:05:13</text:p>
          </table:table-cell>
          <table:table-cell office:value-type="float" office:value="231" calcext:value-type="float">
            <text:p>23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06M13S" calcext:value-type="time">
            <text:p>15:06:13</text:p>
          </table:table-cell>
          <table:table-cell office:value-type="float" office:value="267" calcext:value-type="float">
            <text:p>26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07M13S" calcext:value-type="time">
            <text:p>15:07:13</text:p>
          </table:table-cell>
          <table:table-cell office:value-type="float" office:value="282" calcext:value-type="float">
            <text:p>28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08M13S" calcext:value-type="time">
            <text:p>15:08:13</text:p>
          </table:table-cell>
          <table:table-cell office:value-type="float" office:value="231" calcext:value-type="float">
            <text:p>23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09M14S" calcext:value-type="time">
            <text:p>15:09:14</text:p>
          </table:table-cell>
          <table:table-cell office:value-type="float" office:value="252" calcext:value-type="float">
            <text:p>25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10M14S" calcext:value-type="time">
            <text:p>15:10:14</text:p>
          </table:table-cell>
          <table:table-cell office:value-type="float" office:value="248" calcext:value-type="float">
            <text:p>24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11M14S" calcext:value-type="time">
            <text:p>15:11:14</text:p>
          </table:table-cell>
          <table:table-cell office:value-type="float" office:value="296" calcext:value-type="float">
            <text:p>29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12M14S" calcext:value-type="time">
            <text:p>15:12:14</text:p>
          </table:table-cell>
          <table:table-cell office:value-type="float" office:value="229" calcext:value-type="float">
            <text:p>22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13M14S" calcext:value-type="time">
            <text:p>15:13:14</text:p>
          </table:table-cell>
          <table:table-cell office:value-type="float" office:value="272" calcext:value-type="float">
            <text:p>27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14M14S" calcext:value-type="time">
            <text:p>15:14:14</text:p>
          </table:table-cell>
          <table:table-cell office:value-type="float" office:value="268" calcext:value-type="float">
            <text:p>26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15M15S" calcext:value-type="time">
            <text:p>15:15:15</text:p>
          </table:table-cell>
          <table:table-cell office:value-type="float" office:value="253" calcext:value-type="float">
            <text:p>25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16M15S" calcext:value-type="time">
            <text:p>15:16:15</text:p>
          </table:table-cell>
          <table:table-cell office:value-type="float" office:value="233" calcext:value-type="float">
            <text:p>2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17M15S" calcext:value-type="time">
            <text:p>15:17:15</text:p>
          </table:table-cell>
          <table:table-cell office:value-type="float" office:value="246" calcext:value-type="float">
            <text:p>2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18M15S" calcext:value-type="time">
            <text:p>15:18:15</text:p>
          </table:table-cell>
          <table:table-cell office:value-type="float" office:value="226" calcext:value-type="float">
            <text:p>22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19M15S" calcext:value-type="time">
            <text:p>15:19:15</text:p>
          </table:table-cell>
          <table:table-cell office:value-type="float" office:value="244" calcext:value-type="float">
            <text:p>24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20M15S" calcext:value-type="time">
            <text:p>15:20:15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21M15S" calcext:value-type="time">
            <text:p>15:21:15</text:p>
          </table:table-cell>
          <table:table-cell office:value-type="float" office:value="242" calcext:value-type="float">
            <text:p>24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22M16S" calcext:value-type="time">
            <text:p>15:22:16</text:p>
          </table:table-cell>
          <table:table-cell office:value-type="float" office:value="221" calcext:value-type="float">
            <text:p>22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23M16S" calcext:value-type="time">
            <text:p>15:23:16</text:p>
          </table:table-cell>
          <table:table-cell office:value-type="float" office:value="232" calcext:value-type="float">
            <text:p>23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24M16S" calcext:value-type="time">
            <text:p>15:24:16</text:p>
          </table:table-cell>
          <table:table-cell office:value-type="float" office:value="222" calcext:value-type="float">
            <text:p>2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25M16S" calcext:value-type="time">
            <text:p>15:25:16</text:p>
          </table:table-cell>
          <table:table-cell office:value-type="float" office:value="213" calcext:value-type="float">
            <text:p>21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26M16S" calcext:value-type="time">
            <text:p>15:26:16</text:p>
          </table:table-cell>
          <table:table-cell office:value-type="float" office:value="273" calcext:value-type="float">
            <text:p>27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27M17S" calcext:value-type="time">
            <text:p>15:27:17</text:p>
          </table:table-cell>
          <table:table-cell office:value-type="float" office:value="226" calcext:value-type="float">
            <text:p>22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28M17S" calcext:value-type="time">
            <text:p>15:28:17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29M17S" calcext:value-type="time">
            <text:p>15:29:17</text:p>
          </table:table-cell>
          <table:table-cell office:value-type="float" office:value="264" calcext:value-type="float">
            <text:p>26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30M17S" calcext:value-type="time">
            <text:p>15:30:17</text:p>
          </table:table-cell>
          <table:table-cell office:value-type="float" office:value="245" calcext:value-type="float">
            <text:p>24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31M17S" calcext:value-type="time">
            <text:p>15:31:17</text:p>
          </table:table-cell>
          <table:table-cell office:value-type="float" office:value="210" calcext:value-type="float">
            <text:p>21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32M17S" calcext:value-type="time">
            <text:p>15:32:17</text:p>
          </table:table-cell>
          <table:table-cell office:value-type="float" office:value="250" calcext:value-type="float">
            <text:p>25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33M18S" calcext:value-type="time">
            <text:p>15:33:18</text:p>
          </table:table-cell>
          <table:table-cell office:value-type="float" office:value="208" calcext:value-type="float">
            <text:p>20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34M18S" calcext:value-type="time">
            <text:p>15:34:18</text:p>
          </table:table-cell>
          <table:table-cell office:value-type="float" office:value="221" calcext:value-type="float">
            <text:p>22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35M18S" calcext:value-type="time">
            <text:p>15:35:18</text:p>
          </table:table-cell>
          <table:table-cell office:value-type="float" office:value="209" calcext:value-type="float">
            <text:p>20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36M18S" calcext:value-type="time">
            <text:p>15:36:18</text:p>
          </table:table-cell>
          <table:table-cell office:value-type="float" office:value="277" calcext:value-type="float">
            <text:p>27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37M18S" calcext:value-type="time">
            <text:p>15:37:18</text:p>
          </table:table-cell>
          <table:table-cell office:value-type="float" office:value="227" calcext:value-type="float">
            <text:p>22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38M18S" calcext:value-type="time">
            <text:p>15:38:18</text:p>
          </table:table-cell>
          <table:table-cell office:value-type="float" office:value="259" calcext:value-type="float">
            <text:p>25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39M19S" calcext:value-type="time">
            <text:p>15:39:19</text:p>
          </table:table-cell>
          <table:table-cell office:value-type="float" office:value="203" calcext:value-type="float">
            <text:p>20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40M19S" calcext:value-type="time">
            <text:p>15:40:19</text:p>
          </table:table-cell>
          <table:table-cell office:value-type="float" office:value="207" calcext:value-type="float">
            <text:p>20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41M19S" calcext:value-type="time">
            <text:p>15:41:19</text:p>
          </table:table-cell>
          <table:table-cell office:value-type="float" office:value="216" calcext:value-type="float">
            <text:p>21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42M19S" calcext:value-type="time">
            <text:p>15:42:19</text:p>
          </table:table-cell>
          <table:table-cell office:value-type="float" office:value="267" calcext:value-type="float">
            <text:p>26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43M19S" calcext:value-type="time">
            <text:p>15:43:19</text:p>
          </table:table-cell>
          <table:table-cell office:value-type="float" office:value="213" calcext:value-type="float">
            <text:p>21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44M19S" calcext:value-type="time">
            <text:p>15:44:19</text:p>
          </table:table-cell>
          <table:table-cell office:value-type="float" office:value="221" calcext:value-type="float">
            <text:p>22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45M20S" calcext:value-type="time">
            <text:p>15:45:20</text:p>
          </table:table-cell>
          <table:table-cell office:value-type="float" office:value="263" calcext:value-type="float">
            <text:p>26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46M20S" calcext:value-type="time">
            <text:p>15:46:20</text:p>
          </table:table-cell>
          <table:table-cell office:value-type="float" office:value="210" calcext:value-type="float">
            <text:p>21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47M20S" calcext:value-type="time">
            <text:p>15:47:20</text:p>
          </table:table-cell>
          <table:table-cell office:value-type="float" office:value="223" calcext:value-type="float">
            <text:p>22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48M20S" calcext:value-type="time">
            <text:p>15:48:20</text:p>
          </table:table-cell>
          <table:table-cell office:value-type="float" office:value="251" calcext:value-type="float">
            <text:p>25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49M20S" calcext:value-type="time">
            <text:p>15:49:20</text:p>
          </table:table-cell>
          <table:table-cell office:value-type="float" office:value="248" calcext:value-type="float">
            <text:p>24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50M21S" calcext:value-type="time">
            <text:p>15:50:21</text:p>
          </table:table-cell>
          <table:table-cell office:value-type="float" office:value="217" calcext:value-type="float">
            <text:p>21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51M21S" calcext:value-type="time">
            <text:p>15:51:21</text:p>
          </table:table-cell>
          <table:table-cell office:value-type="float" office:value="230" calcext:value-type="float">
            <text:p>23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52M21S" calcext:value-type="time">
            <text:p>15:52:21</text:p>
          </table:table-cell>
          <table:table-cell office:value-type="float" office:value="228" calcext:value-type="float">
            <text:p>22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53M21S" calcext:value-type="time">
            <text:p>15:53:21</text:p>
          </table:table-cell>
          <table:table-cell office:value-type="float" office:value="264" calcext:value-type="float">
            <text:p>2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54M21S" calcext:value-type="time">
            <text:p>15:54:21</text:p>
          </table:table-cell>
          <table:table-cell office:value-type="float" office:value="243" calcext:value-type="float">
            <text:p>24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55M21S" calcext:value-type="time">
            <text:p>15:55:21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56M22S" calcext:value-type="time">
            <text:p>15:56:22</text:p>
          </table:table-cell>
          <table:table-cell office:value-type="float" office:value="228" calcext:value-type="float">
            <text:p>22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57M22S" calcext:value-type="time">
            <text:p>15:57:22</text:p>
          </table:table-cell>
          <table:table-cell office:value-type="float" office:value="208" calcext:value-type="float">
            <text:p>20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58M22S" calcext:value-type="time">
            <text:p>15:58:22</text:p>
          </table:table-cell>
          <table:table-cell office:value-type="float" office:value="206" calcext:value-type="float">
            <text:p>20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5H59M22S" calcext:value-type="time">
            <text:p>15:59:22</text:p>
          </table:table-cell>
          <table:table-cell office:value-type="float" office:value="210" calcext:value-type="float">
            <text:p>2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00M22S" calcext:value-type="time">
            <text:p>16:00:22</text:p>
          </table:table-cell>
          <table:table-cell office:value-type="float" office:value="238" calcext:value-type="float">
            <text:p>23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01M23S" calcext:value-type="time">
            <text:p>16:01:23</text:p>
          </table:table-cell>
          <table:table-cell office:value-type="float" office:value="249" calcext:value-type="float">
            <text:p>24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02M23S" calcext:value-type="time">
            <text:p>16:02:23</text:p>
          </table:table-cell>
          <table:table-cell office:value-type="float" office:value="242" calcext:value-type="float">
            <text:p>24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03M23S" calcext:value-type="time">
            <text:p>16:03:23</text:p>
          </table:table-cell>
          <table:table-cell office:value-type="float" office:value="202" calcext:value-type="float">
            <text:p>20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04M23S" calcext:value-type="time">
            <text:p>16:04:23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05M23S" calcext:value-type="time">
            <text:p>16:05:23</text:p>
          </table:table-cell>
          <table:table-cell office:value-type="float" office:value="227" calcext:value-type="float">
            <text:p>22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06M24S" calcext:value-type="time">
            <text:p>16:06:24</text:p>
          </table:table-cell>
          <table:table-cell office:value-type="float" office:value="225" calcext:value-type="float">
            <text:p>22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07M24S" calcext:value-type="time">
            <text:p>16:07:24</text:p>
          </table:table-cell>
          <table:table-cell office:value-type="float" office:value="206" calcext:value-type="float">
            <text:p>20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08M24S" calcext:value-type="time">
            <text:p>16:08:24</text:p>
          </table:table-cell>
          <table:table-cell office:value-type="float" office:value="266" calcext:value-type="float">
            <text:p>26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09M24S" calcext:value-type="time">
            <text:p>16:09:24</text:p>
          </table:table-cell>
          <table:table-cell office:value-type="float" office:value="294" calcext:value-type="float">
            <text:p>29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10M24S" calcext:value-type="time">
            <text:p>16:10:24</text:p>
          </table:table-cell>
          <table:table-cell office:value-type="float" office:value="273" calcext:value-type="float">
            <text:p>27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11M25S" calcext:value-type="time">
            <text:p>16:11:25</text:p>
          </table:table-cell>
          <table:table-cell office:value-type="float" office:value="247" calcext:value-type="float">
            <text:p>24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12M25S" calcext:value-type="time">
            <text:p>16:12:25</text:p>
          </table:table-cell>
          <table:table-cell office:value-type="float" office:value="254" calcext:value-type="float">
            <text:p>25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13M25S" calcext:value-type="time">
            <text:p>16:13:25</text:p>
          </table:table-cell>
          <table:table-cell office:value-type="float" office:value="221" calcext:value-type="float">
            <text:p>22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14M25S" calcext:value-type="time">
            <text:p>16:14:25</text:p>
          </table:table-cell>
          <table:table-cell office:value-type="float" office:value="212" calcext:value-type="float">
            <text:p>21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15M25S" calcext:value-type="time">
            <text:p>16:15:25</text:p>
          </table:table-cell>
          <table:table-cell office:value-type="float" office:value="244" calcext:value-type="float">
            <text:p>24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16M26S" calcext:value-type="time">
            <text:p>16:16:26</text:p>
          </table:table-cell>
          <table:table-cell office:value-type="float" office:value="219" calcext:value-type="float">
            <text:p>21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17M26S" calcext:value-type="time">
            <text:p>16:17:26</text:p>
          </table:table-cell>
          <table:table-cell office:value-type="float" office:value="197" calcext:value-type="float">
            <text:p>19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18M26S" calcext:value-type="time">
            <text:p>16:18:26</text:p>
          </table:table-cell>
          <table:table-cell office:value-type="float" office:value="240" calcext:value-type="float">
            <text:p>24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19M26S" calcext:value-type="time">
            <text:p>16:19:26</text:p>
          </table:table-cell>
          <table:table-cell office:value-type="float" office:value="207" calcext:value-type="float">
            <text:p>2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20M26S" calcext:value-type="time">
            <text:p>16:20:26</text:p>
          </table:table-cell>
          <table:table-cell office:value-type="float" office:value="284" calcext:value-type="float">
            <text:p>28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21M27S" calcext:value-type="time">
            <text:p>16:21:27</text:p>
          </table:table-cell>
          <table:table-cell office:value-type="float" office:value="202" calcext:value-type="float">
            <text:p>20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22M27S" calcext:value-type="time">
            <text:p>16:22:27</text:p>
          </table:table-cell>
          <table:table-cell office:value-type="float" office:value="207" calcext:value-type="float">
            <text:p>20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23M27S" calcext:value-type="time">
            <text:p>16:23:27</text:p>
          </table:table-cell>
          <table:table-cell office:value-type="float" office:value="192" calcext:value-type="float">
            <text:p>19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24M27S" calcext:value-type="time">
            <text:p>16:24:27</text:p>
          </table:table-cell>
          <table:table-cell office:value-type="float" office:value="234" calcext:value-type="float">
            <text:p>23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25M28S" calcext:value-type="time">
            <text:p>16:25:28</text:p>
          </table:table-cell>
          <table:table-cell office:value-type="float" office:value="227" calcext:value-type="float">
            <text:p>22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26M28S" calcext:value-type="time">
            <text:p>16:26:28</text:p>
          </table:table-cell>
          <table:table-cell office:value-type="float" office:value="243" calcext:value-type="float">
            <text:p>24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27M28S" calcext:value-type="time">
            <text:p>16:27:28</text:p>
          </table:table-cell>
          <table:table-cell office:value-type="float" office:value="236" calcext:value-type="float">
            <text:p>23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28M28S" calcext:value-type="time">
            <text:p>16:28:28</text:p>
          </table:table-cell>
          <table:table-cell office:value-type="float" office:value="263" calcext:value-type="float">
            <text:p>26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29M28S" calcext:value-type="time">
            <text:p>16:29:28</text:p>
          </table:table-cell>
          <table:table-cell office:value-type="float" office:value="206" calcext:value-type="float">
            <text:p>20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30M29S" calcext:value-type="time">
            <text:p>16:30:29</text:p>
          </table:table-cell>
          <table:table-cell office:value-type="float" office:value="251" calcext:value-type="float">
            <text:p>25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31M29S" calcext:value-type="time">
            <text:p>16:31:29</text:p>
          </table:table-cell>
          <table:table-cell office:value-type="float" office:value="208" calcext:value-type="float">
            <text:p>20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32M29S" calcext:value-type="time">
            <text:p>16:32:29</text:p>
          </table:table-cell>
          <table:table-cell office:value-type="float" office:value="226" calcext:value-type="float">
            <text:p>22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33M29S" calcext:value-type="time">
            <text:p>16:33:29</text:p>
          </table:table-cell>
          <table:table-cell office:value-type="float" office:value="217" calcext:value-type="float">
            <text:p>21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34M29S" calcext:value-type="time">
            <text:p>16:34:29</text:p>
          </table:table-cell>
          <table:table-cell office:value-type="float" office:value="193" calcext:value-type="float">
            <text:p>19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35M30S" calcext:value-type="time">
            <text:p>16:35:30</text:p>
          </table:table-cell>
          <table:table-cell office:value-type="float" office:value="196" calcext:value-type="float">
            <text:p>19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36M30S" calcext:value-type="time">
            <text:p>16:36:30</text:p>
          </table:table-cell>
          <table:table-cell office:value-type="float" office:value="234" calcext:value-type="float">
            <text:p>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37M30S" calcext:value-type="time">
            <text:p>16:37:30</text:p>
          </table:table-cell>
          <table:table-cell office:value-type="float" office:value="242" calcext:value-type="float">
            <text:p>24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38M30S" calcext:value-type="time">
            <text:p>16:38:30</text:p>
          </table:table-cell>
          <table:table-cell office:value-type="float" office:value="248" calcext:value-type="float">
            <text:p>24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39M31S" calcext:value-type="time">
            <text:p>16:39:31</text:p>
          </table:table-cell>
          <table:table-cell office:value-type="float" office:value="212" calcext:value-type="float">
            <text:p>21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40M31S" calcext:value-type="time">
            <text:p>16:40:31</text:p>
          </table:table-cell>
          <table:table-cell office:value-type="float" office:value="206" calcext:value-type="float">
            <text:p>2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41M31S" calcext:value-type="time">
            <text:p>16:41:31</text:p>
          </table:table-cell>
          <table:table-cell office:value-type="float" office:value="207" calcext:value-type="float">
            <text:p>20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42M31S" calcext:value-type="time">
            <text:p>16:42:31</text:p>
          </table:table-cell>
          <table:table-cell office:value-type="float" office:value="274" calcext:value-type="float">
            <text:p>27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43M31S" calcext:value-type="time">
            <text:p>16:43:31</text:p>
          </table:table-cell>
          <table:table-cell office:value-type="float" office:value="259" calcext:value-type="float">
            <text:p>25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44M32S" calcext:value-type="time">
            <text:p>16:44:32</text:p>
          </table:table-cell>
          <table:table-cell office:value-type="float" office:value="253" calcext:value-type="float">
            <text:p>25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45M32S" calcext:value-type="time">
            <text:p>16:45:32</text:p>
          </table:table-cell>
          <table:table-cell office:value-type="float" office:value="257" calcext:value-type="float">
            <text:p>25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46M32S" calcext:value-type="time">
            <text:p>16:46:32</text:p>
          </table:table-cell>
          <table:table-cell office:value-type="float" office:value="288" calcext:value-type="float">
            <text:p>28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47M32S" calcext:value-type="time">
            <text:p>16:47:32</text:p>
          </table:table-cell>
          <table:table-cell office:value-type="float" office:value="268" calcext:value-type="float">
            <text:p>26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48M33S" calcext:value-type="time">
            <text:p>16:48:33</text:p>
          </table:table-cell>
          <table:table-cell office:value-type="float" office:value="236" calcext:value-type="float">
            <text:p>23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49M33S" calcext:value-type="time">
            <text:p>16:49:33</text:p>
          </table:table-cell>
          <table:table-cell office:value-type="float" office:value="197" calcext:value-type="float">
            <text:p>19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50M33S" calcext:value-type="time">
            <text:p>16:50:33</text:p>
          </table:table-cell>
          <table:table-cell office:value-type="float" office:value="194" calcext:value-type="float">
            <text:p>19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51M33S" calcext:value-type="time">
            <text:p>16:51:33</text:p>
          </table:table-cell>
          <table:table-cell office:value-type="float" office:value="235" calcext:value-type="float">
            <text:p>23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52M34S" calcext:value-type="time">
            <text:p>16:52:34</text:p>
          </table:table-cell>
          <table:table-cell office:value-type="float" office:value="169" calcext:value-type="float">
            <text:p>16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53M34S" calcext:value-type="time">
            <text:p>16:53:34</text:p>
          </table:table-cell>
          <table:table-cell office:value-type="float" office:value="12" calcext:value-type="float">
            <text:p>1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54M34S" calcext:value-type="time">
            <text:p>16:54:34</text:p>
          </table:table-cell>
          <table:table-cell office:value-type="float" office:value="84" calcext:value-type="float">
            <text:p>8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55M34S" calcext:value-type="time">
            <text:p>16:55:34</text:p>
          </table:table-cell>
          <table:table-cell office:value-type="float" office:value="103" calcext:value-type="float">
            <text:p>10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56M34S" calcext:value-type="time">
            <text:p>16:56:34</text:p>
          </table:table-cell>
          <table:table-cell office:value-type="float" office:value="99" calcext:value-type="float">
            <text:p>9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57M35S" calcext:value-type="time">
            <text:p>16:57:35</text:p>
          </table:table-cell>
          <table:table-cell office:value-type="float" office:value="170" calcext:value-type="float">
            <text:p>17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58M35S" calcext:value-type="time">
            <text:p>16:58:35</text:p>
          </table:table-cell>
          <table:table-cell office:value-type="float" office:value="86" calcext:value-type="float">
            <text:p>8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6H59M35S" calcext:value-type="time">
            <text:p>16:59:35</text:p>
          </table:table-cell>
          <table:table-cell office:value-type="float" office:value="123" calcext:value-type="float">
            <text:p>12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00M35S" calcext:value-type="time">
            <text:p>17:00:35</text:p>
          </table:table-cell>
          <table:table-cell office:value-type="float" office:value="125" calcext:value-type="float">
            <text:p>12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01M36S" calcext:value-type="time">
            <text:p>17:01:36</text:p>
          </table:table-cell>
          <table:table-cell office:value-type="float" office:value="156" calcext:value-type="float">
            <text:p>15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02M36S" calcext:value-type="time">
            <text:p>17:02:36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03M36S" calcext:value-type="time">
            <text:p>17:03:36</text:p>
          </table:table-cell>
          <table:table-cell office:value-type="float" office:value="152" calcext:value-type="float">
            <text:p>15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04M36S" calcext:value-type="time">
            <text:p>17:04:36</text:p>
          </table:table-cell>
          <table:table-cell office:value-type="float" office:value="249" calcext:value-type="float">
            <text:p>2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05M37S" calcext:value-type="time">
            <text:p>17:05:37</text:p>
          </table:table-cell>
          <table:table-cell office:value-type="float" office:value="172" calcext:value-type="float">
            <text:p>17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06M37S" calcext:value-type="time">
            <text:p>17:06:37</text:p>
          </table:table-cell>
          <table:table-cell office:value-type="float" office:value="164" calcext:value-type="float">
            <text:p>16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07M37S" calcext:value-type="time">
            <text:p>17:07:37</text:p>
          </table:table-cell>
          <table:table-cell office:value-type="float" office:value="212" calcext:value-type="float">
            <text:p>21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08M37S" calcext:value-type="time">
            <text:p>17:08:37</text:p>
          </table:table-cell>
          <table:table-cell office:value-type="float" office:value="178" calcext:value-type="float">
            <text:p>17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09M38S" calcext:value-type="time">
            <text:p>17:09:38</text:p>
          </table:table-cell>
          <table:table-cell office:value-type="float" office:value="201" calcext:value-type="float">
            <text:p>20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10M38S" calcext:value-type="time">
            <text:p>17:10:38</text:p>
          </table:table-cell>
          <table:table-cell office:value-type="float" office:value="145" calcext:value-type="float">
            <text:p>14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11M38S" calcext:value-type="time">
            <text:p>17:11:38</text:p>
          </table:table-cell>
          <table:table-cell office:value-type="float" office:value="163" calcext:value-type="float">
            <text:p>16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12M38S" calcext:value-type="time">
            <text:p>17:12:38</text:p>
          </table:table-cell>
          <table:table-cell office:value-type="float" office:value="202" calcext:value-type="float">
            <text:p>20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13M39S" calcext:value-type="time">
            <text:p>17:13:39</text:p>
          </table:table-cell>
          <table:table-cell office:value-type="float" office:value="179" calcext:value-type="float">
            <text:p>17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14M39S" calcext:value-type="time">
            <text:p>17:14:39</text:p>
          </table:table-cell>
          <table:table-cell office:value-type="float" office:value="178" calcext:value-type="float">
            <text:p>17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15M39S" calcext:value-type="time">
            <text:p>17:15:39</text:p>
          </table:table-cell>
          <table:table-cell office:value-type="float" office:value="212" calcext:value-type="float">
            <text:p>21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16M39S" calcext:value-type="time">
            <text:p>17:16:39</text:p>
          </table:table-cell>
          <table:table-cell office:value-type="float" office:value="237" calcext:value-type="float">
            <text:p>23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17M40S" calcext:value-type="time">
            <text:p>17:17:40</text:p>
          </table:table-cell>
          <table:table-cell office:value-type="float" office:value="192" calcext:value-type="float">
            <text:p>19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18M40S" calcext:value-type="time">
            <text:p>17:18:40</text:p>
          </table:table-cell>
          <table:table-cell office:value-type="float" office:value="206" calcext:value-type="float">
            <text:p>20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19M40S" calcext:value-type="time">
            <text:p>17:19:40</text:p>
          </table:table-cell>
          <table:table-cell office:value-type="float" office:value="231" calcext:value-type="float">
            <text:p>23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20M40S" calcext:value-type="time">
            <text:p>17:20:40</text:p>
          </table:table-cell>
          <table:table-cell office:value-type="float" office:value="219" calcext:value-type="float">
            <text:p>21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21M41S" calcext:value-type="time">
            <text:p>17:21:41</text:p>
          </table:table-cell>
          <table:table-cell office:value-type="float" office:value="242" calcext:value-type="float">
            <text:p>24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22M41S" calcext:value-type="time">
            <text:p>17:22:41</text:p>
          </table:table-cell>
          <table:table-cell office:value-type="float" office:value="243" calcext:value-type="float">
            <text:p>24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23M41S" calcext:value-type="time">
            <text:p>17:23:41</text:p>
          </table:table-cell>
          <table:table-cell office:value-type="float" office:value="233" calcext:value-type="float">
            <text:p>23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24M41S" calcext:value-type="time">
            <text:p>17:24:41</text:p>
          </table:table-cell>
          <table:table-cell office:value-type="float" office:value="294" calcext:value-type="float">
            <text:p>29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25M42S" calcext:value-type="time">
            <text:p>17:25:42</text:p>
          </table:table-cell>
          <table:table-cell office:value-type="float" office:value="278" calcext:value-type="float">
            <text:p>27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26M42S" calcext:value-type="time">
            <text:p>17:26:42</text:p>
          </table:table-cell>
          <table:table-cell office:value-type="float" office:value="208" calcext:value-type="float">
            <text:p>20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27M42S" calcext:value-type="time">
            <text:p>17:27:42</text:p>
          </table:table-cell>
          <table:table-cell office:value-type="float" office:value="189" calcext:value-type="float">
            <text:p>18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28M42S" calcext:value-type="time">
            <text:p>17:28:42</text:p>
          </table:table-cell>
          <table:table-cell office:value-type="float" office:value="277" calcext:value-type="float">
            <text:p>27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29M43S" calcext:value-type="time">
            <text:p>17:29:43</text:p>
          </table:table-cell>
          <table:table-cell office:value-type="float" office:value="215" calcext:value-type="float">
            <text:p>21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30M43S" calcext:value-type="time">
            <text:p>17:30:43</text:p>
          </table:table-cell>
          <table:table-cell office:value-type="float" office:value="259" calcext:value-type="float">
            <text:p>25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31M43S" calcext:value-type="time">
            <text:p>17:31:43</text:p>
          </table:table-cell>
          <table:table-cell office:value-type="float" office:value="261" calcext:value-type="float">
            <text:p>26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32M43S" calcext:value-type="time">
            <text:p>17:32:43</text:p>
          </table:table-cell>
          <table:table-cell office:value-type="float" office:value="277" calcext:value-type="float">
            <text:p>27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33M44S" calcext:value-type="time">
            <text:p>17:33:44</text:p>
          </table:table-cell>
          <table:table-cell office:value-type="float" office:value="261" calcext:value-type="float">
            <text:p>26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34M44S" calcext:value-type="time">
            <text:p>17:34:44</text:p>
          </table:table-cell>
          <table:table-cell office:value-type="float" office:value="216" calcext:value-type="float">
            <text:p>21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35M44S" calcext:value-type="time">
            <text:p>17:35:44</text:p>
          </table:table-cell>
          <table:table-cell office:value-type="float" office:value="257" calcext:value-type="float">
            <text:p>25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36M45S" calcext:value-type="time">
            <text:p>17:36:45</text:p>
          </table:table-cell>
          <table:table-cell office:value-type="float" office:value="227" calcext:value-type="float">
            <text:p>22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37M45S" calcext:value-type="time">
            <text:p>17:37:45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38M45S" calcext:value-type="time">
            <text:p>17:38:45</text:p>
          </table:table-cell>
          <table:table-cell office:value-type="float" office:value="104" calcext:value-type="float">
            <text:p>10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39M45S" calcext:value-type="time">
            <text:p>17:39:45</text:p>
          </table:table-cell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40M46S" calcext:value-type="time">
            <text:p>17:40:46</text:p>
          </table:table-cell>
          <table:table-cell office:value-type="float" office:value="51" calcext:value-type="float">
            <text:p>5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41M46S" calcext:value-type="time">
            <text:p>17:41:46</text:p>
          </table:table-cell>
          <table:table-cell office:value-type="float" office:value="47" calcext:value-type="float">
            <text:p>4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42M46S" calcext:value-type="time">
            <text:p>17:42:46</text:p>
          </table:table-cell>
          <table:table-cell office:value-type="float" office:value="87" calcext:value-type="float">
            <text:p>8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43M46S" calcext:value-type="time">
            <text:p>17:43:46</text:p>
          </table:table-cell>
          <table:table-cell office:value-type="float" office:value="67" calcext:value-type="float">
            <text:p>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44M47S" calcext:value-type="time">
            <text:p>17:44:47</text:p>
          </table:table-cell>
          <table:table-cell office:value-type="float" office:value="161" calcext:value-type="float">
            <text:p>16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45M47S" calcext:value-type="time">
            <text:p>17:45:47</text:p>
          </table:table-cell>
          <table:table-cell office:value-type="float" office:value="117" calcext:value-type="float">
            <text:p>11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46M47S" calcext:value-type="time">
            <text:p>17:46:47</text:p>
          </table:table-cell>
          <table:table-cell office:value-type="float" office:value="117" calcext:value-type="float">
            <text:p>11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47M48S" calcext:value-type="time">
            <text:p>17:47:48</text:p>
          </table:table-cell>
          <table:table-cell office:value-type="float" office:value="166" calcext:value-type="float">
            <text:p>16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48M48S" calcext:value-type="time">
            <text:p>17:48:48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49M48S" calcext:value-type="time">
            <text:p>17:49:48</text:p>
          </table:table-cell>
          <table:table-cell office:value-type="float" office:value="192" calcext:value-type="float">
            <text:p>19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50M48S" calcext:value-type="time">
            <text:p>17:50:48</text:p>
          </table:table-cell>
          <table:table-cell office:value-type="float" office:value="190" calcext:value-type="float">
            <text:p>19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51M49S" calcext:value-type="time">
            <text:p>17:51:49</text:p>
          </table:table-cell>
          <table:table-cell office:value-type="float" office:value="181" calcext:value-type="float">
            <text:p>18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52M49S" calcext:value-type="time">
            <text:p>17:52:49</text:p>
          </table:table-cell>
          <table:table-cell office:value-type="float" office:value="151" calcext:value-type="float">
            <text:p>15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53M49S" calcext:value-type="time">
            <text:p>17:53:49</text:p>
          </table:table-cell>
          <table:table-cell office:value-type="float" office:value="210" calcext:value-type="float">
            <text:p>21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54M50S" calcext:value-type="time">
            <text:p>17:54:50</text:p>
          </table:table-cell>
          <table:table-cell office:value-type="float" office:value="211" calcext:value-type="float">
            <text:p>21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55M50S" calcext:value-type="time">
            <text:p>17:55:50</text:p>
          </table:table-cell>
          <table:table-cell office:value-type="float" office:value="191" calcext:value-type="float">
            <text:p>19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56M50S" calcext:value-type="time">
            <text:p>17:56:50</text:p>
          </table:table-cell>
          <table:table-cell office:value-type="float" office:value="254" calcext:value-type="float">
            <text:p>25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57M50S" calcext:value-type="time">
            <text:p>17:57:50</text:p>
          </table:table-cell>
          <table:table-cell office:value-type="float" office:value="245" calcext:value-type="float">
            <text:p>24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58M51S" calcext:value-type="time">
            <text:p>17:58:5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7H59M51S" calcext:value-type="time">
            <text:p>17:59:51</text:p>
          </table:table-cell>
          <table:table-cell office:value-type="float" office:value="255" calcext:value-type="float">
            <text:p>25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00M51S" calcext:value-type="time">
            <text:p>18:00:51</text:p>
          </table:table-cell>
          <table:table-cell office:value-type="float" office:value="272" calcext:value-type="float">
            <text:p>27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01M52S" calcext:value-type="time">
            <text:p>18:01:52</text:p>
          </table:table-cell>
          <table:table-cell office:value-type="float" office:value="267" calcext:value-type="float">
            <text:p>26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02M52S" calcext:value-type="time">
            <text:p>18:02:52</text:p>
          </table:table-cell>
          <table:table-cell office:value-type="float" office:value="345" calcext:value-type="float">
            <text:p>34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03M52S" calcext:value-type="time">
            <text:p>18:03:52</text:p>
          </table:table-cell>
          <table:table-cell office:value-type="float" office:value="284" calcext:value-type="float">
            <text:p>28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04M52S" calcext:value-type="time">
            <text:p>18:04:52</text:p>
          </table:table-cell>
          <table:table-cell office:value-type="float" office:value="313" calcext:value-type="float">
            <text:p>31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05M53S" calcext:value-type="time">
            <text:p>18:05:53</text:p>
          </table:table-cell>
          <table:table-cell office:value-type="float" office:value="289" calcext:value-type="float">
            <text:p>28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06M53S" calcext:value-type="time">
            <text:p>18:06:53</text:p>
          </table:table-cell>
          <table:table-cell office:value-type="float" office:value="362" calcext:value-type="float">
            <text:p>36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07M53S" calcext:value-type="time">
            <text:p>18:07:53</text:p>
          </table:table-cell>
          <table:table-cell office:value-type="float" office:value="325" calcext:value-type="float">
            <text:p>3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08M54S" calcext:value-type="time">
            <text:p>18:08:54</text:p>
          </table:table-cell>
          <table:table-cell office:value-type="float" office:value="410" calcext:value-type="float">
            <text:p>41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09M54S" calcext:value-type="time">
            <text:p>18:09:54</text:p>
          </table:table-cell>
          <table:table-cell office:value-type="float" office:value="420" calcext:value-type="float">
            <text:p>42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10M54S" calcext:value-type="time">
            <text:p>18:10:54</text:p>
          </table:table-cell>
          <table:table-cell office:value-type="float" office:value="366" calcext:value-type="float">
            <text:p>36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11M54S" calcext:value-type="time">
            <text:p>18:11:54</text:p>
          </table:table-cell>
          <table:table-cell office:value-type="float" office:value="418" calcext:value-type="float">
            <text:p>41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12M55S" calcext:value-type="time">
            <text:p>18:12:55</text:p>
          </table:table-cell>
          <table:table-cell office:value-type="float" office:value="377" calcext:value-type="float">
            <text:p>37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13M55S" calcext:value-type="time">
            <text:p>18:13:55</text:p>
          </table:table-cell>
          <table:table-cell office:value-type="float" office:value="359" calcext:value-type="float">
            <text:p>359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14M55S" calcext:value-type="time">
            <text:p>18:14:55</text:p>
          </table:table-cell>
          <table:table-cell office:value-type="float" office:value="430" calcext:value-type="float">
            <text:p>43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15M56S" calcext:value-type="time">
            <text:p>18:15:56</text:p>
          </table:table-cell>
          <table:table-cell office:value-type="float" office:value="418" calcext:value-type="float">
            <text:p>41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16M56S" calcext:value-type="time">
            <text:p>18:16:56</text:p>
          </table:table-cell>
          <table:table-cell office:value-type="float" office:value="418" calcext:value-type="float">
            <text:p>41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17M56S" calcext:value-type="time">
            <text:p>18:17:56</text:p>
          </table:table-cell>
          <table:table-cell office:value-type="float" office:value="424" calcext:value-type="float">
            <text:p>42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18M57S" calcext:value-type="time">
            <text:p>18:18:57</text:p>
          </table:table-cell>
          <table:table-cell office:value-type="float" office:value="409" calcext:value-type="float">
            <text:p>40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19M57S" calcext:value-type="time">
            <text:p>18:19:57</text:p>
          </table:table-cell>
          <table:table-cell office:value-type="float" office:value="431" calcext:value-type="float">
            <text:p>4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20M57S" calcext:value-type="time">
            <text:p>18:20:57</text:p>
          </table:table-cell>
          <table:table-cell office:value-type="float" office:value="434" calcext:value-type="float">
            <text:p>43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21M57S" calcext:value-type="time">
            <text:p>18:21:57</text:p>
          </table:table-cell>
          <table:table-cell office:value-type="float" office:value="443" calcext:value-type="float">
            <text:p>44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22M58S" calcext:value-type="time">
            <text:p>18:22:58</text:p>
          </table:table-cell>
          <table:table-cell office:value-type="float" office:value="449" calcext:value-type="float">
            <text:p>44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23M58S" calcext:value-type="time">
            <text:p>18:23:58</text:p>
          </table:table-cell>
          <table:table-cell office:value-type="float" office:value="464" calcext:value-type="float">
            <text:p>46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24M58S" calcext:value-type="time">
            <text:p>18:24:58</text:p>
          </table:table-cell>
          <table:table-cell office:value-type="float" office:value="446" calcext:value-type="float">
            <text:p>44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25M59S" calcext:value-type="time">
            <text:p>18:25:59</text:p>
          </table:table-cell>
          <table:table-cell office:value-type="float" office:value="426" calcext:value-type="float">
            <text:p>42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26M59S" calcext:value-type="time">
            <text:p>18:26:59</text:p>
          </table:table-cell>
          <table:table-cell office:value-type="float" office:value="464" calcext:value-type="float">
            <text:p>46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27M59S" calcext:value-type="time">
            <text:p>18:27:59</text:p>
          </table:table-cell>
          <table:table-cell office:value-type="float" office:value="454" calcext:value-type="float">
            <text:p>45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29M00S" calcext:value-type="time">
            <text:p>18:29:00</text:p>
          </table:table-cell>
          <table:table-cell office:value-type="float" office:value="451" calcext:value-type="float">
            <text:p>45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30M00S" calcext:value-type="time">
            <text:p>18:30:00</text:p>
          </table:table-cell>
          <table:table-cell office:value-type="float" office:value="424" calcext:value-type="float">
            <text:p>42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31M00S" calcext:value-type="time">
            <text:p>18:31:00</text:p>
          </table:table-cell>
          <table:table-cell office:value-type="float" office:value="476" calcext:value-type="float">
            <text:p>47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32M00S" calcext:value-type="time">
            <text:p>18:32:00</text:p>
          </table:table-cell>
          <table:table-cell office:value-type="float" office:value="474" calcext:value-type="float">
            <text:p>47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33M01S" calcext:value-type="time">
            <text:p>18:33:01</text:p>
          </table:table-cell>
          <table:table-cell office:value-type="float" office:value="457" calcext:value-type="float">
            <text:p>45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34M01S" calcext:value-type="time">
            <text:p>18:34:01</text:p>
          </table:table-cell>
          <table:table-cell office:value-type="float" office:value="425" calcext:value-type="float">
            <text:p>42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35M01S" calcext:value-type="time">
            <text:p>18:35:01</text:p>
          </table:table-cell>
          <table:table-cell office:value-type="float" office:value="434" calcext:value-type="float">
            <text:p>43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36M02S" calcext:value-type="time">
            <text:p>18:36:02</text:p>
          </table:table-cell>
          <table:table-cell office:value-type="float" office:value="424" calcext:value-type="float">
            <text:p>4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37M02S" calcext:value-type="time">
            <text:p>18:37:02</text:p>
          </table:table-cell>
          <table:table-cell office:value-type="float" office:value="427" calcext:value-type="float">
            <text:p>42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38M02S" calcext:value-type="time">
            <text:p>18:38:02</text:p>
          </table:table-cell>
          <table:table-cell office:value-type="float" office:value="449" calcext:value-type="float">
            <text:p>44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39M03S" calcext:value-type="time">
            <text:p>18:39:03</text:p>
          </table:table-cell>
          <table:table-cell office:value-type="float" office:value="460" calcext:value-type="float">
            <text:p>46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40M03S" calcext:value-type="time">
            <text:p>18:40:03</text:p>
          </table:table-cell>
          <table:table-cell office:value-type="float" office:value="452" calcext:value-type="float">
            <text:p>45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41M03S" calcext:value-type="time">
            <text:p>18:41:03</text:p>
          </table:table-cell>
          <table:table-cell office:value-type="float" office:value="504" calcext:value-type="float">
            <text:p>50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42M04S" calcext:value-type="time">
            <text:p>18:42:04</text:p>
          </table:table-cell>
          <table:table-cell office:value-type="float" office:value="461" calcext:value-type="float">
            <text:p>46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43M04S" calcext:value-type="time">
            <text:p>18:43:04</text:p>
          </table:table-cell>
          <table:table-cell office:value-type="float" office:value="419" calcext:value-type="float">
            <text:p>41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44M04S" calcext:value-type="time">
            <text:p>18:44:04</text:p>
          </table:table-cell>
          <table:table-cell office:value-type="float" office:value="427" calcext:value-type="float">
            <text:p>42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45M05S" calcext:value-type="time">
            <text:p>18:45:05</text:p>
          </table:table-cell>
          <table:table-cell office:value-type="float" office:value="431" calcext:value-type="float">
            <text:p>43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46M05S" calcext:value-type="time">
            <text:p>18:46:05</text:p>
          </table:table-cell>
          <table:table-cell office:value-type="float" office:value="433" calcext:value-type="float">
            <text:p>43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47M05S" calcext:value-type="time">
            <text:p>18:47:05</text:p>
          </table:table-cell>
          <table:table-cell office:value-type="float" office:value="410" calcext:value-type="float">
            <text:p>41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48M06S" calcext:value-type="time">
            <text:p>18:48:06</text:p>
          </table:table-cell>
          <table:table-cell office:value-type="float" office:value="417" calcext:value-type="float">
            <text:p>41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49M06S" calcext:value-type="time">
            <text:p>18:49:06</text:p>
          </table:table-cell>
          <table:table-cell office:value-type="float" office:value="460" calcext:value-type="float">
            <text:p>46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50M06S" calcext:value-type="time">
            <text:p>18:50:06</text:p>
          </table:table-cell>
          <table:table-cell office:value-type="float" office:value="386" calcext:value-type="float">
            <text:p>38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51M07S" calcext:value-type="time">
            <text:p>18:51:07</text:p>
          </table:table-cell>
          <table:table-cell office:value-type="float" office:value="401" calcext:value-type="float">
            <text:p>4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52M07S" calcext:value-type="time">
            <text:p>18:52:07</text:p>
          </table:table-cell>
          <table:table-cell office:value-type="float" office:value="406" calcext:value-type="float">
            <text:p>40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53M07S" calcext:value-type="time">
            <text:p>18:53:07</text:p>
          </table:table-cell>
          <table:table-cell office:value-type="float" office:value="400" calcext:value-type="float">
            <text:p>40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54M08S" calcext:value-type="time">
            <text:p>18:54:08</text:p>
          </table:table-cell>
          <table:table-cell office:value-type="float" office:value="441" calcext:value-type="float">
            <text:p>44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55M08S" calcext:value-type="time">
            <text:p>18:55:08</text:p>
          </table:table-cell>
          <table:table-cell office:value-type="float" office:value="447" calcext:value-type="float">
            <text:p>44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56M08S" calcext:value-type="time">
            <text:p>18:56:08</text:p>
          </table:table-cell>
          <table:table-cell office:value-type="float" office:value="415" calcext:value-type="float">
            <text:p>41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57M09S" calcext:value-type="time">
            <text:p>18:57:09</text:p>
          </table:table-cell>
          <table:table-cell office:value-type="float" office:value="422" calcext:value-type="float">
            <text:p>42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58M09S" calcext:value-type="time">
            <text:p>18:58:09</text:p>
          </table:table-cell>
          <table:table-cell office:value-type="float" office:value="428" calcext:value-type="float">
            <text:p>42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8H59M09S" calcext:value-type="time">
            <text:p>18:59:09</text:p>
          </table:table-cell>
          <table:table-cell office:value-type="float" office:value="432" calcext:value-type="float">
            <text:p>43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00M10S" calcext:value-type="time">
            <text:p>19:00:10</text:p>
          </table:table-cell>
          <table:table-cell office:value-type="float" office:value="425" calcext:value-type="float">
            <text:p>42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01M10S" calcext:value-type="time">
            <text:p>19:01:10</text:p>
          </table:table-cell>
          <table:table-cell office:value-type="float" office:value="412" calcext:value-type="float">
            <text:p>41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02M10S" calcext:value-type="time">
            <text:p>19:02:10</text:p>
          </table:table-cell>
          <table:table-cell office:value-type="float" office:value="370" calcext:value-type="float">
            <text:p>37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03M11S" calcext:value-type="time">
            <text:p>19:03:11</text:p>
          </table:table-cell>
          <table:table-cell office:value-type="float" office:value="395" calcext:value-type="float">
            <text:p>39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04M11S" calcext:value-type="time">
            <text:p>19:04:11</text:p>
          </table:table-cell>
          <table:table-cell office:value-type="float" office:value="365" calcext:value-type="float">
            <text:p>36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05M11S" calcext:value-type="time">
            <text:p>19:05:11</text:p>
          </table:table-cell>
          <table:table-cell office:value-type="float" office:value="388" calcext:value-type="float">
            <text:p>38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06M12S" calcext:value-type="time">
            <text:p>19:06:12</text:p>
          </table:table-cell>
          <table:table-cell office:value-type="float" office:value="373" calcext:value-type="float">
            <text:p>37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07M12S" calcext:value-type="time">
            <text:p>19:07:12</text:p>
          </table:table-cell>
          <table:table-cell office:value-type="float" office:value="394" calcext:value-type="float">
            <text:p>39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08M12S" calcext:value-type="time">
            <text:p>19:08:12</text:p>
          </table:table-cell>
          <table:table-cell office:value-type="float" office:value="448" calcext:value-type="float">
            <text:p>44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09M13S" calcext:value-type="time">
            <text:p>19:09:13</text:p>
          </table:table-cell>
          <table:table-cell office:value-type="float" office:value="407" calcext:value-type="float">
            <text:p>40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10M13S" calcext:value-type="time">
            <text:p>19:10:13</text:p>
          </table:table-cell>
          <table:table-cell office:value-type="float" office:value="423" calcext:value-type="float">
            <text:p>42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11M13S" calcext:value-type="time">
            <text:p>19:11:13</text:p>
          </table:table-cell>
          <table:table-cell office:value-type="float" office:value="419" calcext:value-type="float">
            <text:p>41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12M14S" calcext:value-type="time">
            <text:p>19:12:14</text:p>
          </table:table-cell>
          <table:table-cell office:value-type="float" office:value="438" calcext:value-type="float">
            <text:p>43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13M14S" calcext:value-type="time">
            <text:p>19:13:14</text:p>
          </table:table-cell>
          <table:table-cell office:value-type="float" office:value="412" calcext:value-type="float">
            <text:p>41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14M14S" calcext:value-type="time">
            <text:p>19:14:14</text:p>
          </table:table-cell>
          <table:table-cell office:value-type="float" office:value="411" calcext:value-type="float">
            <text:p>41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15M15S" calcext:value-type="time">
            <text:p>19:15:15</text:p>
          </table:table-cell>
          <table:table-cell office:value-type="float" office:value="405" calcext:value-type="float">
            <text:p>40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16M15S" calcext:value-type="time">
            <text:p>19:16:15</text:p>
          </table:table-cell>
          <table:table-cell office:value-type="float" office:value="425" calcext:value-type="float">
            <text:p>42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17M15S" calcext:value-type="time">
            <text:p>19:17:15</text:p>
          </table:table-cell>
          <table:table-cell office:value-type="float" office:value="391" calcext:value-type="float">
            <text:p>39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18M16S" calcext:value-type="time">
            <text:p>19:18:16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19M16S" calcext:value-type="time">
            <text:p>19:19:16</text:p>
          </table:table-cell>
          <table:table-cell office:value-type="float" office:value="139" calcext:value-type="float">
            <text:p>13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20M16S" calcext:value-type="time">
            <text:p>19:20:16</text:p>
          </table:table-cell>
          <table:table-cell office:value-type="float" office:value="278" calcext:value-type="float">
            <text:p>27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21M17S" calcext:value-type="time">
            <text:p>19:21:17</text:p>
          </table:table-cell>
          <table:table-cell office:value-type="float" office:value="159" calcext:value-type="float">
            <text:p>15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22M17S" calcext:value-type="time">
            <text:p>19:22:17</text:p>
          </table:table-cell>
          <table:table-cell office:value-type="float" office:value="177" calcext:value-type="float">
            <text:p>17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23M17S" calcext:value-type="time">
            <text:p>19:23:17</text:p>
          </table:table-cell>
          <table:table-cell office:value-type="float" office:value="274" calcext:value-type="float">
            <text:p>27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24M18S" calcext:value-type="time">
            <text:p>19:24:18</text:p>
          </table:table-cell>
          <table:table-cell office:value-type="float" office:value="271" calcext:value-type="float">
            <text:p>27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25M18S" calcext:value-type="time">
            <text:p>19:25:18</text:p>
          </table:table-cell>
          <table:table-cell office:value-type="float" office:value="313" calcext:value-type="float">
            <text:p>31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26M18S" calcext:value-type="time">
            <text:p>19:26:18</text:p>
          </table:table-cell>
          <table:table-cell office:value-type="float" office:value="359" calcext:value-type="float">
            <text:p>35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27M19S" calcext:value-type="time">
            <text:p>19:27:19</text:p>
          </table:table-cell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28M19S" calcext:value-type="time">
            <text:p>19:28:19</text:p>
          </table:table-cell>
          <table:table-cell office:value-type="float" office:value="338" calcext:value-type="float">
            <text:p>33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29M20S" calcext:value-type="time">
            <text:p>19:29:20</text:p>
          </table:table-cell>
          <table:table-cell office:value-type="float" office:value="292" calcext:value-type="float">
            <text:p>29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30M20S" calcext:value-type="time">
            <text:p>19:30:20</text:p>
          </table:table-cell>
          <table:table-cell office:value-type="float" office:value="349" calcext:value-type="float">
            <text:p>34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31M20S" calcext:value-type="time">
            <text:p>19:31:20</text:p>
          </table:table-cell>
          <table:table-cell office:value-type="float" office:value="384" calcext:value-type="float">
            <text:p>38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32M21S" calcext:value-type="time">
            <text:p>19:32:21</text:p>
          </table:table-cell>
          <table:table-cell office:value-type="float" office:value="374" calcext:value-type="float">
            <text:p>37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33M21S" calcext:value-type="time">
            <text:p>19:33:21</text:p>
          </table:table-cell>
          <table:table-cell office:value-type="float" office:value="421" calcext:value-type="float">
            <text:p>42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34M21S" calcext:value-type="time">
            <text:p>19:34:21</text:p>
          </table:table-cell>
          <table:table-cell office:value-type="float" office:value="405" calcext:value-type="float">
            <text:p>40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35M22S" calcext:value-type="time">
            <text:p>19:35:22</text:p>
          </table:table-cell>
          <table:table-cell office:value-type="float" office:value="358" calcext:value-type="float">
            <text:p>35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36M22S" calcext:value-type="time">
            <text:p>19:36:22</text:p>
          </table:table-cell>
          <table:table-cell office:value-type="float" office:value="409" calcext:value-type="float">
            <text:p>40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37M22S" calcext:value-type="time">
            <text:p>19:37:22</text:p>
          </table:table-cell>
          <table:table-cell office:value-type="float" office:value="393" calcext:value-type="float">
            <text:p>39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38M23S" calcext:value-type="time">
            <text:p>19:38:23</text:p>
          </table:table-cell>
          <table:table-cell office:value-type="float" office:value="388" calcext:value-type="float">
            <text:p>38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39M23S" calcext:value-type="time">
            <text:p>19:39:23</text:p>
          </table:table-cell>
          <table:table-cell office:value-type="float" office:value="384" calcext:value-type="float">
            <text:p>38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40M24S" calcext:value-type="time">
            <text:p>19:40:24</text:p>
          </table:table-cell>
          <table:table-cell office:value-type="float" office:value="378" calcext:value-type="float">
            <text:p>37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41M24S" calcext:value-type="time">
            <text:p>19:41:24</text:p>
          </table:table-cell>
          <table:table-cell office:value-type="float" office:value="378" calcext:value-type="float">
            <text:p>37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42M24S" calcext:value-type="time">
            <text:p>19:42:24</text:p>
          </table:table-cell>
          <table:table-cell office:value-type="float" office:value="420" calcext:value-type="float">
            <text:p>42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43M25S" calcext:value-type="time">
            <text:p>19:43:25</text:p>
          </table:table-cell>
          <table:table-cell office:value-type="float" office:value="454" calcext:value-type="float">
            <text:p>45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44M25S" calcext:value-type="time">
            <text:p>19:44:25</text:p>
          </table:table-cell>
          <table:table-cell office:value-type="float" office:value="444" calcext:value-type="float">
            <text:p>44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45M25S" calcext:value-type="time">
            <text:p>19:45:25</text:p>
          </table:table-cell>
          <table:table-cell office:value-type="float" office:value="410" calcext:value-type="float">
            <text:p>41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46M26S" calcext:value-type="time">
            <text:p>19:46:26</text:p>
          </table:table-cell>
          <table:table-cell office:value-type="float" office:value="426" calcext:value-type="float">
            <text:p>42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47M26S" calcext:value-type="time">
            <text:p>19:47:26</text:p>
          </table:table-cell>
          <table:table-cell office:value-type="float" office:value="426" calcext:value-type="float">
            <text:p>42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48M26S" calcext:value-type="time">
            <text:p>19:48:26</text:p>
          </table:table-cell>
          <table:table-cell office:value-type="float" office:value="453" calcext:value-type="float">
            <text:p>45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49M27S" calcext:value-type="time">
            <text:p>19:49:27</text:p>
          </table:table-cell>
          <table:table-cell office:value-type="float" office:value="430" calcext:value-type="float">
            <text:p>43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50M27S" calcext:value-type="time">
            <text:p>19:50:27</text:p>
          </table:table-cell>
          <table:table-cell office:value-type="float" office:value="405" calcext:value-type="float">
            <text:p>40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51M28S" calcext:value-type="time">
            <text:p>19:51:28</text:p>
          </table:table-cell>
          <table:table-cell office:value-type="float" office:value="487" calcext:value-type="float">
            <text:p>48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52M28S" calcext:value-type="time">
            <text:p>19:52:28</text:p>
          </table:table-cell>
          <table:table-cell office:value-type="float" office:value="429" calcext:value-type="float">
            <text:p>42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53M28S" calcext:value-type="time">
            <text:p>19:53:28</text:p>
          </table:table-cell>
          <table:table-cell office:value-type="float" office:value="456" calcext:value-type="float">
            <text:p>45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54M29S" calcext:value-type="time">
            <text:p>19:54:29</text:p>
          </table:table-cell>
          <table:table-cell office:value-type="float" office:value="394" calcext:value-type="float">
            <text:p>39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55M29S" calcext:value-type="time">
            <text:p>19:55:29</text:p>
          </table:table-cell>
          <table:table-cell office:value-type="float" office:value="430" calcext:value-type="float">
            <text:p>43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56M29S" calcext:value-type="time">
            <text:p>19:56:29</text:p>
          </table:table-cell>
          <table:table-cell office:value-type="float" office:value="449" calcext:value-type="float">
            <text:p>44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57M30S" calcext:value-type="time">
            <text:p>19:57:30</text:p>
          </table:table-cell>
          <table:table-cell office:value-type="float" office:value="461" calcext:value-type="float">
            <text:p>46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58M30S" calcext:value-type="time">
            <text:p>19:58:30</text:p>
          </table:table-cell>
          <table:table-cell office:value-type="float" office:value="447" calcext:value-type="float">
            <text:p>44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19H59M31S" calcext:value-type="time">
            <text:p>19:59:31</text:p>
          </table:table-cell>
          <table:table-cell office:value-type="float" office:value="440" calcext:value-type="float">
            <text:p>44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00M31S" calcext:value-type="time">
            <text:p>20:00:31</text:p>
          </table:table-cell>
          <table:table-cell office:value-type="float" office:value="197" calcext:value-type="float">
            <text:p>19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01M31S" calcext:value-type="time">
            <text:p>20:01:31</text:p>
          </table:table-cell>
          <table:table-cell office:value-type="float" office:value="197" calcext:value-type="float">
            <text:p>19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02M32S" calcext:value-type="time">
            <text:p>20:02:32</text:p>
          </table:table-cell>
          <table:table-cell office:value-type="float" office:value="283" calcext:value-type="float">
            <text:p>28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03M32S" calcext:value-type="time">
            <text:p>20:03:32</text:p>
          </table:table-cell>
          <table:table-cell office:value-type="float" office:value="302" calcext:value-type="float">
            <text:p>30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04M33S" calcext:value-type="time">
            <text:p>20:04:33</text:p>
          </table:table-cell>
          <table:table-cell office:value-type="float" office:value="371" calcext:value-type="float">
            <text:p>37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05M33S" calcext:value-type="time">
            <text:p>20:05:33</text:p>
          </table:table-cell>
          <table:table-cell office:value-type="float" office:value="343" calcext:value-type="float">
            <text:p>34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06M33S" calcext:value-type="time">
            <text:p>20:06:33</text:p>
          </table:table-cell>
          <table:table-cell office:value-type="float" office:value="362" calcext:value-type="float">
            <text:p>36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07M34S" calcext:value-type="time">
            <text:p>20:07:34</text:p>
          </table:table-cell>
          <table:table-cell office:value-type="float" office:value="397" calcext:value-type="float">
            <text:p>39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08M34S" calcext:value-type="time">
            <text:p>20:08:34</text:p>
          </table:table-cell>
          <table:table-cell office:value-type="float" office:value="375" calcext:value-type="float">
            <text:p>37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09M35S" calcext:value-type="time">
            <text:p>20:09:35</text:p>
          </table:table-cell>
          <table:table-cell office:value-type="float" office:value="475" calcext:value-type="float">
            <text:p>47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10M35S" calcext:value-type="time">
            <text:p>20:10:35</text:p>
          </table:table-cell>
          <table:table-cell office:value-type="float" office:value="428" calcext:value-type="float">
            <text:p>42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11M35S" calcext:value-type="time">
            <text:p>20:11:35</text:p>
          </table:table-cell>
          <table:table-cell office:value-type="float" office:value="446" calcext:value-type="float">
            <text:p>44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12M36S" calcext:value-type="time">
            <text:p>20:12:36</text:p>
          </table:table-cell>
          <table:table-cell office:value-type="float" office:value="471" calcext:value-type="float">
            <text:p>47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13M36S" calcext:value-type="time">
            <text:p>20:13:36</text:p>
          </table:table-cell>
          <table:table-cell office:value-type="float" office:value="430" calcext:value-type="float">
            <text:p>43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14M36S" calcext:value-type="time">
            <text:p>20:14:36</text:p>
          </table:table-cell>
          <table:table-cell office:value-type="float" office:value="449" calcext:value-type="float">
            <text:p>44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15M37S" calcext:value-type="time">
            <text:p>20:15:37</text:p>
          </table:table-cell>
          <table:table-cell office:value-type="float" office:value="417" calcext:value-type="float">
            <text:p>41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16M37S" calcext:value-type="time">
            <text:p>20:16:37</text:p>
          </table:table-cell>
          <table:table-cell office:value-type="float" office:value="488" calcext:value-type="float">
            <text:p>48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17M38S" calcext:value-type="time">
            <text:p>20:17:38</text:p>
          </table:table-cell>
          <table:table-cell office:value-type="float" office:value="451" calcext:value-type="float">
            <text:p>45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18M38S" calcext:value-type="time">
            <text:p>20:18:38</text:p>
          </table:table-cell>
          <table:table-cell office:value-type="float" office:value="503" calcext:value-type="float">
            <text:p>50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19M38S" calcext:value-type="time">
            <text:p>20:19:38</text:p>
          </table:table-cell>
          <table:table-cell office:value-type="float" office:value="506" calcext:value-type="float">
            <text:p>50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20M39S" calcext:value-type="time">
            <text:p>20:20:39</text:p>
          </table:table-cell>
          <table:table-cell office:value-type="float" office:value="499" calcext:value-type="float">
            <text:p>49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21M39S" calcext:value-type="time">
            <text:p>20:21:39</text:p>
          </table:table-cell>
          <table:table-cell office:value-type="float" office:value="549" calcext:value-type="float">
            <text:p>54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22M40S" calcext:value-type="time">
            <text:p>20:22:40</text:p>
          </table:table-cell>
          <table:table-cell office:value-type="float" office:value="525" calcext:value-type="float">
            <text:p>52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23M40S" calcext:value-type="time">
            <text:p>20:23:40</text:p>
          </table:table-cell>
          <table:table-cell office:value-type="float" office:value="469" calcext:value-type="float">
            <text:p>46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24M40S" calcext:value-type="time">
            <text:p>20:24:40</text:p>
          </table:table-cell>
          <table:table-cell office:value-type="float" office:value="523" calcext:value-type="float">
            <text:p>52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25M41S" calcext:value-type="time">
            <text:p>20:25:41</text:p>
          </table:table-cell>
          <table:table-cell office:value-type="float" office:value="513" calcext:value-type="float">
            <text:p>51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26M41S" calcext:value-type="time">
            <text:p>20:26:41</text:p>
          </table:table-cell>
          <table:table-cell office:value-type="float" office:value="491" calcext:value-type="float">
            <text:p>49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27M42S" calcext:value-type="time">
            <text:p>20:27:42</text:p>
          </table:table-cell>
          <table:table-cell office:value-type="float" office:value="521" calcext:value-type="float">
            <text:p>52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28M42S" calcext:value-type="time">
            <text:p>20:28:42</text:p>
          </table:table-cell>
          <table:table-cell office:value-type="float" office:value="491" calcext:value-type="float">
            <text:p>49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29M42S" calcext:value-type="time">
            <text:p>20:29:42</text:p>
          </table:table-cell>
          <table:table-cell office:value-type="float" office:value="543" calcext:value-type="float">
            <text:p>54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30M43S" calcext:value-type="time">
            <text:p>20:30:43</text:p>
          </table:table-cell>
          <table:table-cell office:value-type="float" office:value="503" calcext:value-type="float">
            <text:p>50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31M43S" calcext:value-type="time">
            <text:p>20:31:43</text:p>
          </table:table-cell>
          <table:table-cell office:value-type="float" office:value="478" calcext:value-type="float">
            <text:p>47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32M44S" calcext:value-type="time">
            <text:p>20:32:44</text:p>
          </table:table-cell>
          <table:table-cell office:value-type="float" office:value="536" calcext:value-type="float">
            <text:p>53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33M44S" calcext:value-type="time">
            <text:p>20:33:44</text:p>
          </table:table-cell>
          <table:table-cell office:value-type="float" office:value="513" calcext:value-type="float">
            <text:p>51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34M44S" calcext:value-type="time">
            <text:p>20:34:44</text:p>
          </table:table-cell>
          <table:table-cell office:value-type="float" office:value="545" calcext:value-type="float">
            <text:p>54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35M45S" calcext:value-type="time">
            <text:p>20:35:45</text:p>
          </table:table-cell>
          <table:table-cell office:value-type="float" office:value="553" calcext:value-type="float">
            <text:p>55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36M45S" calcext:value-type="time">
            <text:p>20:36:45</text:p>
          </table:table-cell>
          <table:table-cell office:value-type="float" office:value="545" calcext:value-type="float">
            <text:p>54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37M46S" calcext:value-type="time">
            <text:p>20:37:46</text:p>
          </table:table-cell>
          <table:table-cell office:value-type="float" office:value="565" calcext:value-type="float">
            <text:p>56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38M46S" calcext:value-type="time">
            <text:p>20:38:46</text:p>
          </table:table-cell>
          <table:table-cell office:value-type="float" office:value="572" calcext:value-type="float">
            <text:p>57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39M46S" calcext:value-type="time">
            <text:p>20:39:46</text:p>
          </table:table-cell>
          <table:table-cell office:value-type="float" office:value="504" calcext:value-type="float">
            <text:p>5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40M47S" calcext:value-type="time">
            <text:p>20:40:47</text:p>
          </table:table-cell>
          <table:table-cell office:value-type="float" office:value="547" calcext:value-type="float">
            <text:p>54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41M47S" calcext:value-type="time">
            <text:p>20:41:47</text:p>
          </table:table-cell>
          <table:table-cell office:value-type="float" office:value="563" calcext:value-type="float">
            <text:p>56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42M48S" calcext:value-type="time">
            <text:p>20:42:48</text:p>
          </table:table-cell>
          <table:table-cell office:value-type="float" office:value="573" calcext:value-type="float">
            <text:p>57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43M48S" calcext:value-type="time">
            <text:p>20:43:48</text:p>
          </table:table-cell>
          <table:table-cell office:value-type="float" office:value="545" calcext:value-type="float">
            <text:p>54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44M49S" calcext:value-type="time">
            <text:p>20:44:49</text:p>
          </table:table-cell>
          <table:table-cell office:value-type="float" office:value="592" calcext:value-type="float">
            <text:p>59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45M49S" calcext:value-type="time">
            <text:p>20:45:49</text:p>
          </table:table-cell>
          <table:table-cell office:value-type="float" office:value="582" calcext:value-type="float">
            <text:p>58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46M49S" calcext:value-type="time">
            <text:p>20:46:49</text:p>
          </table:table-cell>
          <table:table-cell office:value-type="float" office:value="534" calcext:value-type="float">
            <text:p>53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47M50S" calcext:value-type="time">
            <text:p>20:47:50</text:p>
          </table:table-cell>
          <table:table-cell office:value-type="float" office:value="525" calcext:value-type="float">
            <text:p>52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48M50S" calcext:value-type="time">
            <text:p>20:48:50</text:p>
          </table:table-cell>
          <table:table-cell office:value-type="float" office:value="560" calcext:value-type="float">
            <text:p>56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49M51S" calcext:value-type="time">
            <text:p>20:49:51</text:p>
          </table:table-cell>
          <table:table-cell office:value-type="float" office:value="533" calcext:value-type="float">
            <text:p>53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50M51S" calcext:value-type="time">
            <text:p>20:50:51</text:p>
          </table:table-cell>
          <table:table-cell office:value-type="float" office:value="557" calcext:value-type="float">
            <text:p>55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51M51S" calcext:value-type="time">
            <text:p>20:51:51</text:p>
          </table:table-cell>
          <table:table-cell office:value-type="float" office:value="576" calcext:value-type="float">
            <text:p>5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52M52S" calcext:value-type="time">
            <text:p>20:52:52</text:p>
          </table:table-cell>
          <table:table-cell office:value-type="float" office:value="599" calcext:value-type="float">
            <text:p>59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53M52S" calcext:value-type="time">
            <text:p>20:53:52</text:p>
          </table:table-cell>
          <table:table-cell office:value-type="float" office:value="522" calcext:value-type="float">
            <text:p>52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54M53S" calcext:value-type="time">
            <text:p>20:54:53</text:p>
          </table:table-cell>
          <table:table-cell office:value-type="float" office:value="557" calcext:value-type="float">
            <text:p>55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55M53S" calcext:value-type="time">
            <text:p>20:55:53</text:p>
          </table:table-cell>
          <table:table-cell office:value-type="float" office:value="549" calcext:value-type="float">
            <text:p>54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56M54S" calcext:value-type="time">
            <text:p>20:56:54</text:p>
          </table:table-cell>
          <table:table-cell office:value-type="float" office:value="532" calcext:value-type="float">
            <text:p>53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57M54S" calcext:value-type="time">
            <text:p>20:57:54</text:p>
          </table:table-cell>
          <table:table-cell office:value-type="float" office:value="572" calcext:value-type="float">
            <text:p>57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58M54S" calcext:value-type="time">
            <text:p>20:58:54</text:p>
          </table:table-cell>
          <table:table-cell office:value-type="float" office:value="584" calcext:value-type="float">
            <text:p>58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0H59M55S" calcext:value-type="time">
            <text:p>20:59:55</text:p>
          </table:table-cell>
          <table:table-cell office:value-type="float" office:value="570" calcext:value-type="float">
            <text:p>57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00M55S" calcext:value-type="time">
            <text:p>21:00:55</text:p>
          </table:table-cell>
          <table:table-cell office:value-type="float" office:value="575" calcext:value-type="float">
            <text:p>57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01M56S" calcext:value-type="time">
            <text:p>21:01:56</text:p>
          </table:table-cell>
          <table:table-cell office:value-type="float" office:value="523" calcext:value-type="float">
            <text:p>52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02M56S" calcext:value-type="time">
            <text:p>21:02:56</text:p>
          </table:table-cell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03M57S" calcext:value-type="time">
            <text:p>21:03:57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04M57S" calcext:value-type="time">
            <text:p>21:04:57</text:p>
          </table:table-cell>
          <table:table-cell office:value-type="float" office:value="43" calcext:value-type="float">
            <text:p>4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05M57S" calcext:value-type="time">
            <text:p>21:05:57</text:p>
          </table:table-cell>
          <table:table-cell office:value-type="float" office:value="515" calcext:value-type="float">
            <text:p>51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06M58S" calcext:value-type="time">
            <text:p>21:06:58</text:p>
          </table:table-cell>
          <table:table-cell office:value-type="float" office:value="82" calcext:value-type="float">
            <text:p>8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07M58S" calcext:value-type="time">
            <text:p>21:07:58</text:p>
          </table:table-cell>
          <table:table-cell office:value-type="float" office:value="43" calcext:value-type="float">
            <text:p>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08M59S" calcext:value-type="time">
            <text:p>21:08:59</text:p>
          </table:table-cell>
          <table:table-cell office:value-type="float" office:value="40" calcext:value-type="float">
            <text:p>4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09M59S" calcext:value-type="time">
            <text:p>21:09:59</text:p>
          </table:table-cell>
          <table:table-cell office:value-type="float" office:value="220" calcext:value-type="float">
            <text:p>22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11M00S" calcext:value-type="time">
            <text:p>21:11:00</text:p>
          </table:table-cell>
          <table:table-cell office:value-type="float" office:value="237" calcext:value-type="float">
            <text:p>23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12M00S" calcext:value-type="time">
            <text:p>21:12:00</text:p>
          </table:table-cell>
          <table:table-cell office:value-type="float" office:value="614" calcext:value-type="float">
            <text:p>61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13M01S" calcext:value-type="time">
            <text:p>21:13:01</text:p>
          </table:table-cell>
          <table:table-cell office:value-type="float" office:value="161" calcext:value-type="float">
            <text:p>16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14M01S" calcext:value-type="time">
            <text:p>21:14:01</text:p>
          </table:table-cell>
          <table:table-cell office:value-type="float" office:value="63" calcext:value-type="float">
            <text:p>6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15M01S" calcext:value-type="time">
            <text:p>21:15:01</text:p>
          </table:table-cell>
          <table:table-cell office:value-type="float" office:value="269" calcext:value-type="float">
            <text:p>26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16M02S" calcext:value-type="time">
            <text:p>21:16:02</text:p>
          </table:table-cell>
          <table:table-cell office:value-type="float" office:value="601" calcext:value-type="float">
            <text:p>60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17M02S" calcext:value-type="time">
            <text:p>21:17:02</text:p>
          </table:table-cell>
          <table:table-cell office:value-type="float" office:value="217" calcext:value-type="float">
            <text:p>21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18M03S" calcext:value-type="time">
            <text:p>21:18:03</text:p>
          </table:table-cell>
          <table:table-cell office:value-type="float" office:value="170" calcext:value-type="float">
            <text:p>17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19M03S" calcext:value-type="time">
            <text:p>21:19:03</text:p>
          </table:table-cell>
          <table:table-cell office:value-type="float" office:value="62" calcext:value-type="float">
            <text:p>6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20M04S" calcext:value-type="time">
            <text:p>21:20:04</text:p>
          </table:table-cell>
          <table:table-cell office:value-type="float" office:value="21" calcext:value-type="float">
            <text:p>2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21M04S" calcext:value-type="time">
            <text:p>21:21:04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22M04S" calcext:value-type="time">
            <text:p>21:22:04</text:p>
          </table:table-cell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23M05S" calcext:value-type="time">
            <text:p>21:23:05</text:p>
          </table:table-cell>
          <table:table-cell office:value-type="float" office:value="67" calcext:value-type="float">
            <text:p>6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24M05S" calcext:value-type="time">
            <text:p>21:24:05</text:p>
          </table:table-cell>
          <table:table-cell office:value-type="float" office:value="67" calcext:value-type="float">
            <text:p>67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25M06S" calcext:value-type="time">
            <text:p>21:25:06</text:p>
          </table:table-cell>
          <table:table-cell office:value-type="float" office:value="506" calcext:value-type="float">
            <text:p>50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26M06S" calcext:value-type="time">
            <text:p>21:26:06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27M07S" calcext:value-type="time">
            <text:p>21:27:07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28M07S" calcext:value-type="time">
            <text:p>21:28:07</text:p>
          </table:table-cell>
          <table:table-cell office:value-type="float" office:value="243" calcext:value-type="float">
            <text:p>24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29M08S" calcext:value-type="time">
            <text:p>21:29:08</text:p>
          </table:table-cell>
          <table:table-cell office:value-type="float" office:value="64" calcext:value-type="float">
            <text:p>6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30M08S" calcext:value-type="time">
            <text:p>21:30:08</text:p>
          </table:table-cell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31M09S" calcext:value-type="time">
            <text:p>21:31:09</text:p>
          </table:table-cell>
          <table:table-cell office:value-type="float" office:value="101" calcext:value-type="float">
            <text:p>10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32M09S" calcext:value-type="time">
            <text:p>21:32:09</text:p>
          </table:table-cell>
          <table:table-cell office:value-type="float" office:value="51" calcext:value-type="float">
            <text:p>5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33M09S" calcext:value-type="time">
            <text:p>21:33:09</text:p>
          </table:table-cell>
          <table:table-cell office:value-type="float" office:value="92" calcext:value-type="float">
            <text:p>9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34M10S" calcext:value-type="time">
            <text:p>21:34:10</text:p>
          </table:table-cell>
          <table:table-cell office:value-type="float" office:value="72" calcext:value-type="float">
            <text:p>7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35M10S" calcext:value-type="time">
            <text:p>21:35:10</text:p>
          </table:table-cell>
          <table:table-cell office:value-type="float" office:value="43" calcext:value-type="float">
            <text:p>4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36M11S" calcext:value-type="time">
            <text:p>21:36:11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37M11S" calcext:value-type="time">
            <text:p>21:37:11</text:p>
          </table:table-cell>
          <table:table-cell office:value-type="float" office:value="321" calcext:value-type="float">
            <text:p>32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38M12S" calcext:value-type="time">
            <text:p>21:38:12</text:p>
          </table:table-cell>
          <table:table-cell office:value-type="float" office:value="131" calcext:value-type="float">
            <text:p>131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39M12S" calcext:value-type="time">
            <text:p>21:39:12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40M13S" calcext:value-type="time">
            <text:p>21:40:13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41M13S" calcext:value-type="time">
            <text:p>21:41:13</text:p>
          </table:table-cell>
          <table:table-cell office:value-type="float" office:value="18" calcext:value-type="float">
            <text:p>1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42M14S" calcext:value-type="time">
            <text:p>21:42:14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43M14S" calcext:value-type="time">
            <text:p>21:43:14</text:p>
          </table:table-cell>
          <table:table-cell office:value-type="float" office:value="126" calcext:value-type="float">
            <text:p>12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44M15S" calcext:value-type="time">
            <text:p>21:44:15</text:p>
          </table:table-cell>
          <table:table-cell office:value-type="float" office:value="90" calcext:value-type="float">
            <text:p>9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45M15S" calcext:value-type="time">
            <text:p>21:45:15</text:p>
          </table:table-cell>
          <table:table-cell office:value-type="float" office:value="179" calcext:value-type="float">
            <text:p>17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46M15S" calcext:value-type="time">
            <text:p>21:46:15</text:p>
          </table:table-cell>
          <table:table-cell office:value-type="float" office:value="95" calcext:value-type="float">
            <text:p>9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47M16S" calcext:value-type="time">
            <text:p>21:47:16</text:p>
          </table:table-cell>
          <table:table-cell office:value-type="float" office:value="175" calcext:value-type="float">
            <text:p>17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48M16S" calcext:value-type="time">
            <text:p>21:48:16</text:p>
          </table:table-cell>
          <table:table-cell office:value-type="float" office:value="88" calcext:value-type="float">
            <text:p>8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49M17S" calcext:value-type="time">
            <text:p>21:49:17</text:p>
          </table:table-cell>
          <table:table-cell office:value-type="float" office:value="200" calcext:value-type="float">
            <text:p>20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50M17S" calcext:value-type="time">
            <text:p>21:50:1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51M18S" calcext:value-type="time">
            <text:p>21:51:18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52M18S" calcext:value-type="time">
            <text:p>21:52:18</text:p>
          </table:table-cell>
          <table:table-cell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53M19S" calcext:value-type="time">
            <text:p>21:53:19</text:p>
          </table:table-cell>
          <table:table-cell office:value-type="float" office:value="226" calcext:value-type="float">
            <text:p>22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54M19S" calcext:value-type="time">
            <text:p>21:54:19</text:p>
          </table:table-cell>
          <table:table-cell office:value-type="float" office:value="483" calcext:value-type="float">
            <text:p>48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55M20S" calcext:value-type="time">
            <text:p>21:55:20</text:p>
          </table:table-cell>
          <table:table-cell office:value-type="float" office:value="486" calcext:value-type="float">
            <text:p>48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56M20S" calcext:value-type="time">
            <text:p>21:56:20</text:p>
          </table:table-cell>
          <table:table-cell office:value-type="float" office:value="530" calcext:value-type="float">
            <text:p>53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57M21S" calcext:value-type="time">
            <text:p>21:57:21</text:p>
          </table:table-cell>
          <table:table-cell office:value-type="float" office:value="601" calcext:value-type="float">
            <text:p>6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58M21S" calcext:value-type="time">
            <text:p>21:58:21</text:p>
          </table:table-cell>
          <table:table-cell office:value-type="float" office:value="659" calcext:value-type="float">
            <text:p>65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1H59M21S" calcext:value-type="time">
            <text:p>21:59:21</text:p>
          </table:table-cell>
          <table:table-cell office:value-type="float" office:value="287" calcext:value-type="float">
            <text:p>28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2H00M22S" calcext:value-type="time">
            <text:p>22:00:22</text:p>
          </table:table-cell>
          <table:table-cell office:value-type="float" office:value="114" calcext:value-type="float">
            <text:p>11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2H01M22S" calcext:value-type="time">
            <text:p>22:01:22</text:p>
          </table:table-cell>
          <table:table-cell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2H02M23S" calcext:value-type="time">
            <text:p>22:02:23</text:p>
          </table:table-cell>
          <table:table-cell office:value-type="float" office:value="111" calcext:value-type="float">
            <text:p>11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2H03M23S" calcext:value-type="time">
            <text:p>22:03:23</text:p>
          </table:table-cell>
          <table:table-cell office:value-type="float" office:value="140" calcext:value-type="float">
            <text:p>14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2H04M24S" calcext:value-type="time">
            <text:p>22:04:24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2H05M24S" calcext:value-type="time">
            <text:p>22:05:24</text:p>
          </table:table-cell>
          <table:table-cell office:value-type="float" office:value="33" calcext:value-type="float">
            <text:p>3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2H06M25S" calcext:value-type="time">
            <text:p>22:06:25</text:p>
          </table:table-cell>
          <table:table-cell office:value-type="float" office:value="81" calcext:value-type="float">
            <text:p>8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2H07M25S" calcext:value-type="time">
            <text:p>22:07:25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2H08M26S" calcext:value-type="time">
            <text:p>22:08:26</text:p>
          </table:table-cell>
          <table:table-cell office:value-type="float" office:value="240" calcext:value-type="float">
            <text:p>24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2H09M26S" calcext:value-type="time">
            <text:p>22:09:26</text:p>
          </table:table-cell>
          <table:table-cell office:value-type="float" office:value="502" calcext:value-type="float">
            <text:p>50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2H10M27S" calcext:value-type="time">
            <text:p>22:10:27</text:p>
          </table:table-cell>
          <table:table-cell office:value-type="float" office:value="259" calcext:value-type="float">
            <text:p>25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2H11M27S" calcext:value-type="time">
            <text:p>22:11:27</text:p>
          </table:table-cell>
          <table:table-cell office:value-type="float" office:value="439" calcext:value-type="float">
            <text:p>43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2H12M28S" calcext:value-type="time">
            <text:p>22:12:28</text:p>
          </table:table-cell>
          <table:table-cell office:value-type="float" office:value="591" calcext:value-type="float">
            <text:p>59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2H13M28S" calcext:value-type="time">
            <text:p>22:13:28</text:p>
          </table:table-cell>
          <table:table-cell office:value-type="float" office:value="643" calcext:value-type="float">
            <text:p>64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2H14M29S" calcext:value-type="time">
            <text:p>22:14:29</text:p>
          </table:table-cell>
          <table:table-cell office:value-type="float" office:value="640" calcext:value-type="float">
            <text:p>64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2H15M29S" calcext:value-type="time">
            <text:p>22:15:29</text:p>
          </table:table-cell>
          <table:table-cell office:value-type="float" office:value="583" calcext:value-type="float">
            <text:p>58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2H16M30S" calcext:value-type="time">
            <text:p>22:16:30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2H17M30S" calcext:value-type="time">
            <text:p>22:17:30</text:p>
          </table:table-cell>
          <table:table-cell office:value-type="float" office:value="626" calcext:value-type="float">
            <text:p>62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2H18M31S" calcext:value-type="time">
            <text:p>22:18:31</text:p>
          </table:table-cell>
          <table:table-cell office:value-type="float" office:value="609" calcext:value-type="float">
            <text:p>60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2H19M31S" calcext:value-type="time">
            <text:p>22:19:31</text:p>
          </table:table-cell>
          <table:table-cell office:value-type="float" office:value="703" calcext:value-type="float">
            <text:p>70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2H20M32S" calcext:value-type="time">
            <text:p>22:20:32</text:p>
          </table:table-cell>
          <table:table-cell office:value-type="float" office:value="668" calcext:value-type="float">
            <text:p>66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2H21M32S" calcext:value-type="time">
            <text:p>22:21:32</text:p>
          </table:table-cell>
          <table:table-cell office:value-type="float" office:value="732" calcext:value-type="float">
            <text:p>73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2H22M33S" calcext:value-type="time">
            <text:p>22:22:33</text:p>
          </table:table-cell>
          <table:table-cell office:value-type="float" office:value="615" calcext:value-type="float">
            <text:p>61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2H23M33S" calcext:value-type="time">
            <text:p>22:23:33</text:p>
          </table:table-cell>
          <table:table-cell office:value-type="float" office:value="640" calcext:value-type="float">
            <text:p>64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2H24M34S" calcext:value-type="time">
            <text:p>22:24:34</text:p>
          </table:table-cell>
          <table:table-cell office:value-type="float" office:value="651" calcext:value-type="float">
            <text:p>6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2H25M34S" calcext:value-type="time">
            <text:p>22:25:34</text:p>
          </table:table-cell>
          <table:table-cell office:value-type="float" office:value="655" calcext:value-type="float">
            <text:p>65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2H26M35S" calcext:value-type="time">
            <text:p>22:26:35</text:p>
          </table:table-cell>
          <table:table-cell office:value-type="float" office:value="730" calcext:value-type="float">
            <text:p>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2H27M35S" calcext:value-type="time">
            <text:p>22:27:35</text:p>
          </table:table-cell>
          <table:table-cell office:value-type="float" office:value="739" calcext:value-type="float">
            <text:p>73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2H28M36S" calcext:value-type="time">
            <text:p>22:28:36</text:p>
          </table:table-cell>
          <table:table-cell office:value-type="float" office:value="634" calcext:value-type="float">
            <text:p>63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2H29M36S" calcext:value-type="time">
            <text:p>22:29:36</text:p>
          </table:table-cell>
          <table:table-cell office:value-type="float" office:value="695" calcext:value-type="float">
            <text:p>69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2H30M37S" calcext:value-type="time">
            <text:p>22:30:37</text:p>
          </table:table-cell>
          <table:table-cell office:value-type="float" office:value="727" calcext:value-type="float">
            <text:p>72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2H31M37S" calcext:value-type="time">
            <text:p>22:31:37</text:p>
          </table:table-cell>
          <table:table-cell office:value-type="float" office:value="626" calcext:value-type="float">
            <text:p>62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2H32M38S" calcext:value-type="time">
            <text:p>22:32:38</text:p>
          </table:table-cell>
          <table:table-cell office:value-type="float" office:value="652" calcext:value-type="float">
            <text:p>65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2H33M38S" calcext:value-type="time">
            <text:p>22:33:38</text:p>
          </table:table-cell>
          <table:table-cell office:value-type="float" office:value="643" calcext:value-type="float">
            <text:p>64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2H34M39S" calcext:value-type="time">
            <text:p>22:34:39</text:p>
          </table:table-cell>
          <table:table-cell office:value-type="float" office:value="653" calcext:value-type="float">
            <text:p>65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2H35M39S" calcext:value-type="time">
            <text:p>22:35:39</text:p>
          </table:table-cell>
          <table:table-cell office:value-type="float" office:value="616" calcext:value-type="float">
            <text:p>61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2H36M40S" calcext:value-type="time">
            <text:p>22:36:40</text:p>
          </table:table-cell>
          <table:table-cell office:value-type="float" office:value="655" calcext:value-type="float">
            <text:p>65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2H37M40S" calcext:value-type="time">
            <text:p>22:37:40</text:p>
          </table:table-cell>
          <table:table-cell office:value-type="float" office:value="699" calcext:value-type="float">
            <text:p>69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2H38M41S" calcext:value-type="time">
            <text:p>22:38:41</text:p>
          </table:table-cell>
          <table:table-cell office:value-type="float" office:value="625" calcext:value-type="float">
            <text:p>62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2H39M41S" calcext:value-type="time">
            <text:p>22:39:41</text:p>
          </table:table-cell>
          <table:table-cell office:value-type="float" office:value="677" calcext:value-type="float">
            <text:p>67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2H40M42S" calcext:value-type="time">
            <text:p>22:40:42</text:p>
          </table:table-cell>
          <table:table-cell office:value-type="float" office:value="650" calcext:value-type="float">
            <text:p>65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2H41M42S" calcext:value-type="time">
            <text:p>22:41:42</text:p>
          </table:table-cell>
          <table:table-cell office:value-type="float" office:value="691" calcext:value-type="float">
            <text:p>69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22H42M43S" calcext:value-type="time">
            <text:p>22:42:43</text:p>
          </table:table-cell>
          <table:table-cell office:value-type="float" office:value="656" calcext:value-type="float">
            <text:p>656</text:p>
          </table:table-cell>
          <table:table-cell office:value-type="float" office:value="118" calcext:value-type="float">
            <text:p>1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10:01:33.577217106</meta:creation-date>
    <dc:date>2022-11-07T17:34:48.837480297</dc:date>
    <meta:editing-duration>PT6H32M19S</meta:editing-duration>
    <meta:editing-cycles>3</meta:editing-cycles>
    <meta:generator>LibreOffice/7.3.6.2$Linux_X86_64 LibreOffice_project/30$Build-2</meta:generator>
    <meta:document-statistic meta:table-count="1" meta:cell-count="2064" meta:object-count="0"/>
  </office:meta>
</office:document-meta>
</file>