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data_18_nov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oudness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07S" calcext:value-type="time">
            <text:p>15:11:07</text:p>
          </table:table-cell>
          <table:table-cell office:value-type="float" office:value="47" calcext:value-type="float">
            <text:p>47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08S" calcext:value-type="time">
            <text:p>15:11:08</text:p>
          </table:table-cell>
          <table:table-cell office:value-type="float" office:value="21" calcext:value-type="float">
            <text:p>21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09S" calcext:value-type="time">
            <text:p>15:11:09</text:p>
          </table:table-cell>
          <table:table-cell office:value-type="float" office:value="15" calcext:value-type="float">
            <text:p>15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0S" calcext:value-type="time">
            <text:p>15:11:10</text:p>
          </table:table-cell>
          <table:table-cell office:value-type="float" office:value="27" calcext:value-type="float">
            <text:p>27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1S" calcext:value-type="time">
            <text:p>15:11:11</text:p>
          </table:table-cell>
          <table:table-cell office:value-type="float" office:value="28" calcext:value-type="float">
            <text:p>28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2S" calcext:value-type="time">
            <text:p>15:11:12</text:p>
          </table:table-cell>
          <table:table-cell office:value-type="float" office:value="22" calcext:value-type="float">
            <text:p>22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3S" calcext:value-type="time">
            <text:p>15:11:13</text:p>
          </table:table-cell>
          <table:table-cell office:value-type="float" office:value="41" calcext:value-type="float">
            <text:p>41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4S" calcext:value-type="time">
            <text:p>15:11:14</text:p>
          </table:table-cell>
          <table:table-cell office:value-type="float" office:value="69" calcext:value-type="float">
            <text:p>69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6S" calcext:value-type="time">
            <text:p>15:11:16</text:p>
          </table:table-cell>
          <table:table-cell office:value-type="float" office:value="17" calcext:value-type="float">
            <text:p>17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7S" calcext:value-type="time">
            <text:p>15:11:17</text:p>
          </table:table-cell>
          <table:table-cell office:value-type="float" office:value="28" calcext:value-type="float">
            <text:p>28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8S" calcext:value-type="time">
            <text:p>15:11:18</text:p>
          </table:table-cell>
          <table:table-cell office:value-type="float" office:value="41" calcext:value-type="float">
            <text:p>41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9S" calcext:value-type="time">
            <text:p>15:11:19</text:p>
          </table:table-cell>
          <table:table-cell office:value-type="float" office:value="37" calcext:value-type="float">
            <text:p>37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0S" calcext:value-type="time">
            <text:p>15:11:20</text:p>
          </table:table-cell>
          <table:table-cell office:value-type="float" office:value="30" calcext:value-type="float">
            <text:p>30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1S" calcext:value-type="time">
            <text:p>15:11:21</text:p>
          </table:table-cell>
          <table:table-cell office:value-type="float" office:value="32" calcext:value-type="float">
            <text:p>32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2S" calcext:value-type="time">
            <text:p>15:11:22</text:p>
          </table:table-cell>
          <table:table-cell office:value-type="float" office:value="75" calcext:value-type="float">
            <text:p>75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4S" calcext:value-type="time">
            <text:p>15:11:24</text:p>
          </table:table-cell>
          <table:table-cell office:value-type="float" office:value="562" calcext:value-type="float">
            <text:p>56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5S" calcext:value-type="time">
            <text:p>15:11:25</text:p>
          </table:table-cell>
          <table:table-cell office:value-type="float" office:value="66" calcext:value-type="float">
            <text:p>66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6S" calcext:value-type="time">
            <text:p>15:11:2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7S" calcext:value-type="time">
            <text:p>15:11:27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8S" calcext:value-type="time">
            <text:p>15:11:2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9S" calcext:value-type="time">
            <text:p>15:11:29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0S" calcext:value-type="time">
            <text:p>15:11:30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2S" calcext:value-type="time">
            <text:p>15:11:32</text:p>
          </table:table-cell>
          <table:table-cell office:value-type="float" office:value="139" calcext:value-type="float">
            <text:p>13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3S" calcext:value-type="time">
            <text:p>15:11:33</text:p>
          </table:table-cell>
          <table:table-cell office:value-type="float" office:value="387" calcext:value-type="float">
            <text:p>38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4S" calcext:value-type="time">
            <text:p>15:11:34</text:p>
          </table:table-cell>
          <table:table-cell office:value-type="float" office:value="144" calcext:value-type="float">
            <text:p>14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5S" calcext:value-type="time">
            <text:p>15:11:35</text:p>
          </table:table-cell>
          <table:table-cell office:value-type="float" office:value="125" calcext:value-type="float">
            <text:p>12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6S" calcext:value-type="time">
            <text:p>15:11:36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7S" calcext:value-type="time">
            <text:p>15:11:37</text:p>
          </table:table-cell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8S" calcext:value-type="time">
            <text:p>15:11:38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9S" calcext:value-type="time">
            <text:p>15:11:39</text:p>
          </table:table-cell>
          <table:table-cell office:value-type="float" office:value="353" calcext:value-type="float">
            <text:p>35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41S" calcext:value-type="time">
            <text:p>15:11:41</text:p>
          </table:table-cell>
          <table:table-cell office:value-type="float" office:value="300" calcext:value-type="float">
            <text:p>3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42S" calcext:value-type="time">
            <text:p>15:11:42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43S" calcext:value-type="time">
            <text:p>15:11:43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44S" calcext:value-type="time">
            <text:p>15:11:44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45S" calcext:value-type="time">
            <text:p>15:11:45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46S" calcext:value-type="time">
            <text:p>15:11:46</text:p>
          </table:table-cell>
          <table:table-cell office:value-type="float" office:value="39" calcext:value-type="float">
            <text:p>3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47S" calcext:value-type="time">
            <text:p>15:11:47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49S" calcext:value-type="time">
            <text:p>15:11:49</text:p>
          </table:table-cell>
          <table:table-cell office:value-type="float" office:value="36" calcext:value-type="float">
            <text:p>3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0S" calcext:value-type="time">
            <text:p>15:11:50</text:p>
          </table:table-cell>
          <table:table-cell office:value-type="float" office:value="46" calcext:value-type="float">
            <text:p>4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1S" calcext:value-type="time">
            <text:p>15:11:51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2S" calcext:value-type="time">
            <text:p>15:11:52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3S" calcext:value-type="time">
            <text:p>15:11:53</text:p>
          </table:table-cell>
          <table:table-cell office:value-type="float" office:value="395" calcext:value-type="float">
            <text:p>39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4S" calcext:value-type="time">
            <text:p>15:11:54</text:p>
          </table:table-cell>
          <table:table-cell office:value-type="float" office:value="41" calcext:value-type="float">
            <text:p>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5S" calcext:value-type="time">
            <text:p>15:11:55</text:p>
          </table:table-cell>
          <table:table-cell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7S" calcext:value-type="time">
            <text:p>15:11:57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8S" calcext:value-type="time">
            <text:p>15:11:58</text:p>
          </table:table-cell>
          <table:table-cell office:value-type="float" office:value="455" calcext:value-type="float">
            <text:p>45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9S" calcext:value-type="time">
            <text:p>15:11:59</text:p>
          </table:table-cell>
          <table:table-cell office:value-type="float" office:value="281" calcext:value-type="float">
            <text:p>28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0S" calcext:value-type="time">
            <text:p>15:12:0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1S" calcext:value-type="time">
            <text:p>15:12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2S" calcext:value-type="time">
            <text:p>15:12:02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3S" calcext:value-type="time">
            <text:p>15:12:03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5S" calcext:value-type="time">
            <text:p>15:12:05</text:p>
          </table:table-cell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6S" calcext:value-type="time">
            <text:p>15:12:06</text:p>
          </table:table-cell>
          <table:table-cell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7S" calcext:value-type="time">
            <text:p>15:12:07</text:p>
          </table:table-cell>
          <table:table-cell office:value-type="float" office:value="909" calcext:value-type="float">
            <text:p>90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8S" calcext:value-type="time">
            <text:p>15:12:08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9S" calcext:value-type="time">
            <text:p>15:12:09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10S" calcext:value-type="time">
            <text:p>15:12:10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11S" calcext:value-type="time">
            <text:p>15:12:11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13S" calcext:value-type="time">
            <text:p>15:12:1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14S" calcext:value-type="time">
            <text:p>15:12:14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15S" calcext:value-type="time">
            <text:p>15:12:15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16S" calcext:value-type="time">
            <text:p>15:12:1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17S" calcext:value-type="time">
            <text:p>15:12:17</text:p>
          </table:table-cell>
          <table:table-cell office:value-type="float" office:value="1023" calcext:value-type="float">
            <text:p>102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18S" calcext:value-type="time">
            <text:p>15:12:18</text:p>
          </table:table-cell>
          <table:table-cell office:value-type="float" office:value="404" calcext:value-type="float">
            <text:p>4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0S" calcext:value-type="time">
            <text:p>15:12:20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1S" calcext:value-type="time">
            <text:p>15:12: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2S" calcext:value-type="time">
            <text:p>15:12:22</text:p>
          </table:table-cell>
          <table:table-cell office:value-type="float" office:value="685" calcext:value-type="float">
            <text:p>68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3S" calcext:value-type="time">
            <text:p>15:12:23</text:p>
          </table:table-cell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4S" calcext:value-type="time">
            <text:p>15:12:24</text:p>
          </table:table-cell>
          <table:table-cell office:value-type="float" office:value="73" calcext:value-type="float">
            <text:p>7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5S" calcext:value-type="time">
            <text:p>15:12:25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6S" calcext:value-type="time">
            <text:p>15:12:26</text:p>
          </table:table-cell>
          <table:table-cell office:value-type="float" office:value="846" calcext:value-type="float">
            <text:p>84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8S" calcext:value-type="time">
            <text:p>15:12:28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9S" calcext:value-type="time">
            <text:p>15:12:29</text:p>
          </table:table-cell>
          <table:table-cell office:value-type="float" office:value="686" calcext:value-type="float">
            <text:p>68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0S" calcext:value-type="time">
            <text:p>15:12:30</text:p>
          </table:table-cell>
          <table:table-cell office:value-type="float" office:value="23" calcext:value-type="float">
            <text:p>2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1S" calcext:value-type="time">
            <text:p>15:12:31</text:p>
          </table:table-cell>
          <table:table-cell office:value-type="float" office:value="231" calcext:value-type="float">
            <text:p>23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2S" calcext:value-type="time">
            <text:p>15:12:32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3S" calcext:value-type="time">
            <text:p>15:12:3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5S" calcext:value-type="time">
            <text:p>15:12:35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6S" calcext:value-type="time">
            <text:p>15:12:3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7S" calcext:value-type="time">
            <text:p>15:12:3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8S" calcext:value-type="time">
            <text:p>15:12:3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9S" calcext:value-type="time">
            <text:p>15:12:39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41S" calcext:value-type="time">
            <text:p>15:12:4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42S" calcext:value-type="time">
            <text:p>15:12:42</text:p>
          </table:table-cell>
          <table:table-cell office:value-type="float" office:value="29" calcext:value-type="float">
            <text:p>2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43S" calcext:value-type="time">
            <text:p>15:12:43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44S" calcext:value-type="time">
            <text:p>15:12:44</text:p>
          </table:table-cell>
          <table:table-cell office:value-type="float" office:value="401" calcext:value-type="float">
            <text:p>4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45S" calcext:value-type="time">
            <text:p>15:12:45</text:p>
          </table:table-cell>
          <table:table-cell office:value-type="float" office:value="41" calcext:value-type="float">
            <text:p>4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46S" calcext:value-type="time">
            <text:p>15:12:46</text:p>
          </table:table-cell>
          <table:table-cell office:value-type="float" office:value="111" calcext:value-type="float">
            <text:p>11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48S" calcext:value-type="time">
            <text:p>15:12:4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49S" calcext:value-type="time">
            <text:p>15:12:49</text:p>
          </table:table-cell>
          <table:table-cell office:value-type="float" office:value="397" calcext:value-type="float">
            <text:p>39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0S" calcext:value-type="time">
            <text:p>15:12:50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1S" calcext:value-type="time">
            <text:p>15:12:5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2S" calcext:value-type="time">
            <text:p>15:12:5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3S" calcext:value-type="time">
            <text:p>15:12:53</text:p>
          </table:table-cell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5S" calcext:value-type="time">
            <text:p>15:12:55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6S" calcext:value-type="time">
            <text:p>15:12:56</text:p>
          </table:table-cell>
          <table:table-cell office:value-type="float" office:value="773" calcext:value-type="float">
            <text:p>77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7S" calcext:value-type="time">
            <text:p>15:12:5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8S" calcext:value-type="time">
            <text:p>15:12:58</text:p>
          </table:table-cell>
          <table:table-cell office:value-type="float" office:value="411" calcext:value-type="float">
            <text:p>41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9S" calcext:value-type="time">
            <text:p>15:12:59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01S" calcext:value-type="time">
            <text:p>15:13:01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02S" calcext:value-type="time">
            <text:p>15:13:02</text:p>
          </table:table-cell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03S" calcext:value-type="time">
            <text:p>15:13:03</text:p>
          </table:table-cell>
          <table:table-cell office:value-type="float" office:value="139" calcext:value-type="float">
            <text:p>13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04S" calcext:value-type="time">
            <text:p>15:13:04</text:p>
          </table:table-cell>
          <table:table-cell office:value-type="float" office:value="215" calcext:value-type="float">
            <text:p>21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05S" calcext:value-type="time">
            <text:p>15:13:05</text:p>
          </table:table-cell>
          <table:table-cell office:value-type="float" office:value="93" calcext:value-type="float">
            <text:p>9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07S" calcext:value-type="time">
            <text:p>15:13:07</text:p>
          </table:table-cell>
          <table:table-cell office:value-type="float" office:value="6" calcext:value-type="float">
            <text:p>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08S" calcext:value-type="time">
            <text:p>15:13:08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09S" calcext:value-type="time">
            <text:p>15:13:09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10S" calcext:value-type="time">
            <text:p>15:13:10</text:p>
          </table:table-cell>
          <table:table-cell office:value-type="float" office:value="130" calcext:value-type="float">
            <text:p>13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11S" calcext:value-type="time">
            <text:p>15:13:11</text:p>
          </table:table-cell>
          <table:table-cell office:value-type="float" office:value="239" calcext:value-type="float">
            <text:p>23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12S" calcext:value-type="time">
            <text:p>15:13:12</text:p>
          </table:table-cell>
          <table:table-cell office:value-type="float" office:value="72" calcext:value-type="float">
            <text:p>7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14S" calcext:value-type="time">
            <text:p>15:13:14</text:p>
          </table:table-cell>
          <table:table-cell office:value-type="float" office:value="19" calcext:value-type="float">
            <text:p>1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15S" calcext:value-type="time">
            <text:p>15:13:15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16S" calcext:value-type="time">
            <text:p>15:13:16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17S" calcext:value-type="time">
            <text:p>15:13:17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18S" calcext:value-type="time">
            <text:p>15:13:18</text:p>
          </table:table-cell>
          <table:table-cell office:value-type="float" office:value="104" calcext:value-type="float">
            <text:p>10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0S" calcext:value-type="time">
            <text:p>15:13:20</text:p>
          </table:table-cell>
          <table:table-cell office:value-type="float" office:value="137" calcext:value-type="float">
            <text:p>13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1S" calcext:value-type="time">
            <text:p>15:13:21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2S" calcext:value-type="time">
            <text:p>15:13:22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3S" calcext:value-type="time">
            <text:p>15:13:23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4S" calcext:value-type="time">
            <text:p>15:13:24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6S" calcext:value-type="time">
            <text:p>15:13:26</text:p>
          </table:table-cell>
          <table:table-cell office:value-type="float" office:value="120" calcext:value-type="float">
            <text:p>12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7S" calcext:value-type="time">
            <text:p>15:13:27</text:p>
          </table:table-cell>
          <table:table-cell office:value-type="float" office:value="402" calcext:value-type="float">
            <text:p>40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8S" calcext:value-type="time">
            <text:p>15:13:28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9S" calcext:value-type="time">
            <text:p>15:13:29</text:p>
          </table:table-cell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30S" calcext:value-type="time">
            <text:p>15:13:30</text:p>
          </table:table-cell>
          <table:table-cell office:value-type="float" office:value="104" calcext:value-type="float">
            <text:p>10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32S" calcext:value-type="time">
            <text:p>15:13:32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33S" calcext:value-type="time">
            <text:p>15:13:33</text:p>
          </table:table-cell>
          <table:table-cell office:value-type="float" office:value="142" calcext:value-type="float">
            <text:p>14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34S" calcext:value-type="time">
            <text:p>15:13:34</text:p>
          </table:table-cell>
          <table:table-cell office:value-type="float" office:value="180" calcext:value-type="float">
            <text:p>18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35S" calcext:value-type="time">
            <text:p>15:13:35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36S" calcext:value-type="time">
            <text:p>15:13:36</text:p>
          </table:table-cell>
          <table:table-cell office:value-type="float" office:value="56" calcext:value-type="float">
            <text:p>5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38S" calcext:value-type="time">
            <text:p>15:13:38</text:p>
          </table:table-cell>
          <table:table-cell office:value-type="float" office:value="22" calcext:value-type="float">
            <text:p>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39S" calcext:value-type="time">
            <text:p>15:13:39</text:p>
          </table:table-cell>
          <table:table-cell office:value-type="float" office:value="274" calcext:value-type="float">
            <text:p>27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40S" calcext:value-type="time">
            <text:p>15:13:40</text:p>
          </table:table-cell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41S" calcext:value-type="time">
            <text:p>15:13:41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43S" calcext:value-type="time">
            <text:p>15:13:43</text:p>
          </table:table-cell>
          <table:table-cell office:value-type="float" office:value="42" calcext:value-type="float">
            <text:p>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44S" calcext:value-type="time">
            <text:p>15:13:44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45S" calcext:value-type="time">
            <text:p>15:13:45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46S" calcext:value-type="time">
            <text:p>15:13:46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47S" calcext:value-type="time">
            <text:p>15:13:47</text:p>
          </table:table-cell>
          <table:table-cell office:value-type="float" office:value="177" calcext:value-type="float">
            <text:p>17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49S" calcext:value-type="time">
            <text:p>15:13:49</text:p>
          </table:table-cell>
          <table:table-cell office:value-type="float" office:value="111" calcext:value-type="float">
            <text:p>11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50S" calcext:value-type="time">
            <text:p>15:13:50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51S" calcext:value-type="time">
            <text:p>15:13:51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52S" calcext:value-type="time">
            <text:p>15:13:52</text:p>
          </table:table-cell>
          <table:table-cell office:value-type="float" office:value="56" calcext:value-type="float">
            <text:p>5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54S" calcext:value-type="time">
            <text:p>15:13:54</text:p>
          </table:table-cell>
          <table:table-cell office:value-type="float" office:value="34" calcext:value-type="float">
            <text:p>3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55S" calcext:value-type="time">
            <text:p>15:13:55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56S" calcext:value-type="time">
            <text:p>15:13:56</text:p>
          </table:table-cell>
          <table:table-cell office:value-type="float" office:value="50" calcext:value-type="float">
            <text:p>5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57S" calcext:value-type="time">
            <text:p>15:13:57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58S" calcext:value-type="time">
            <text:p>15:13:58</text:p>
          </table:table-cell>
          <table:table-cell office:value-type="float" office:value="366" calcext:value-type="float">
            <text:p>3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0S" calcext:value-type="time">
            <text:p>15:14:00</text:p>
          </table:table-cell>
          <table:table-cell office:value-type="float" office:value="60" calcext:value-type="float">
            <text:p>6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1S" calcext:value-type="time">
            <text:p>15:14:01</text:p>
          </table:table-cell>
          <table:table-cell office:value-type="float" office:value="377" calcext:value-type="float">
            <text:p>37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2S" calcext:value-type="time">
            <text:p>15:14:02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3S" calcext:value-type="time">
            <text:p>15:14:03</text:p>
          </table:table-cell>
          <table:table-cell office:value-type="float" office:value="222" calcext:value-type="float">
            <text:p>22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5S" calcext:value-type="time">
            <text:p>15:14:05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6S" calcext:value-type="time">
            <text:p>15:14:06</text:p>
          </table:table-cell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7S" calcext:value-type="time">
            <text:p>15:14:07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8S" calcext:value-type="time">
            <text:p>15:14:0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9S" calcext:value-type="time">
            <text:p>15:14:09</text:p>
          </table:table-cell>
          <table:table-cell office:value-type="float" office:value="196" calcext:value-type="float">
            <text:p>19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11S" calcext:value-type="time">
            <text:p>15:14:11</text:p>
          </table:table-cell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12S" calcext:value-type="time">
            <text:p>15:14:12</text:p>
          </table:table-cell>
          <table:table-cell office:value-type="float" office:value="152" calcext:value-type="float">
            <text:p>15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13S" calcext:value-type="time">
            <text:p>15:14:13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14S" calcext:value-type="time">
            <text:p>15:14:14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16S" calcext:value-type="time">
            <text:p>15:14:1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17S" calcext:value-type="time">
            <text:p>15:14:17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18S" calcext:value-type="time">
            <text:p>15:14:18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19S" calcext:value-type="time">
            <text:p>15:14:19</text:p>
          </table:table-cell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21S" calcext:value-type="time">
            <text:p>15:14:2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22S" calcext:value-type="time">
            <text:p>15:14:22</text:p>
          </table:table-cell>
          <table:table-cell office:value-type="float" office:value="344" calcext:value-type="float">
            <text:p>3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23S" calcext:value-type="time">
            <text:p>15:14:23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24S" calcext:value-type="time">
            <text:p>15:14:24</text:p>
          </table:table-cell>
          <table:table-cell office:value-type="float" office:value="114" calcext:value-type="float">
            <text:p>11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26S" calcext:value-type="time">
            <text:p>15:14:26</text:p>
          </table:table-cell>
          <table:table-cell office:value-type="float" office:value="63" calcext:value-type="float">
            <text:p>6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27S" calcext:value-type="time">
            <text:p>15:14:27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28S" calcext:value-type="time">
            <text:p>15:14:28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29S" calcext:value-type="time">
            <text:p>15:14:29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31S" calcext:value-type="time">
            <text:p>15:14:3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32S" calcext:value-type="time">
            <text:p>15:14:32</text:p>
          </table:table-cell>
          <table:table-cell office:value-type="float" office:value="27" calcext:value-type="float">
            <text:p>2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33S" calcext:value-type="time">
            <text:p>15:14:33</text:p>
          </table:table-cell>
          <table:table-cell office:value-type="float" office:value="613" calcext:value-type="float">
            <text:p>61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34S" calcext:value-type="time">
            <text:p>15:14:34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36S" calcext:value-type="time">
            <text:p>15:14:36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37S" calcext:value-type="time">
            <text:p>15:14:37</text:p>
          </table:table-cell>
          <table:table-cell office:value-type="float" office:value="254" calcext:value-type="float">
            <text:p>25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38S" calcext:value-type="time">
            <text:p>15:14:38</text:p>
          </table:table-cell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39S" calcext:value-type="time">
            <text:p>15:14:39</text:p>
          </table:table-cell>
          <table:table-cell office:value-type="float" office:value="49" calcext:value-type="float">
            <text:p>4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40S" calcext:value-type="time">
            <text:p>15:14:40</text:p>
          </table:table-cell>
          <table:table-cell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42S" calcext:value-type="time">
            <text:p>15:14:42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43S" calcext:value-type="time">
            <text:p>15:14:43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44S" calcext:value-type="time">
            <text:p>15:14:44</text:p>
          </table:table-cell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46S" calcext:value-type="time">
            <text:p>15:14:46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47S" calcext:value-type="time">
            <text:p>15:14:47</text:p>
          </table:table-cell>
          <table:table-cell office:value-type="float" office:value="46" calcext:value-type="float">
            <text:p>4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48S" calcext:value-type="time">
            <text:p>15:14:48</text:p>
          </table:table-cell>
          <table:table-cell office:value-type="float" office:value="22" calcext:value-type="float">
            <text:p>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49S" calcext:value-type="time">
            <text:p>15:14:49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51S" calcext:value-type="time">
            <text:p>15:14:51</text:p>
          </table:table-cell>
          <table:table-cell office:value-type="float" office:value="15" calcext:value-type="float">
            <text:p>1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52S" calcext:value-type="time">
            <text:p>15:14:52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53S" calcext:value-type="time">
            <text:p>15:14:53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54S" calcext:value-type="time">
            <text:p>15:14:54</text:p>
          </table:table-cell>
          <table:table-cell office:value-type="float" office:value="23" calcext:value-type="float">
            <text:p>2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56S" calcext:value-type="time">
            <text:p>15:14:56</text:p>
          </table:table-cell>
          <table:table-cell office:value-type="float" office:value="27" calcext:value-type="float">
            <text:p>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57S" calcext:value-type="time">
            <text:p>15:14:57</text:p>
          </table:table-cell>
          <table:table-cell office:value-type="float" office:value="17" calcext:value-type="float">
            <text:p>1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58S" calcext:value-type="time">
            <text:p>15:14:58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59S" calcext:value-type="time">
            <text:p>15:14:59</text:p>
          </table:table-cell>
          <table:table-cell office:value-type="float" office:value="22" calcext:value-type="float">
            <text:p>2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01S" calcext:value-type="time">
            <text:p>15:15:01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02S" calcext:value-type="time">
            <text:p>15:15:02</text:p>
          </table:table-cell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03S" calcext:value-type="time">
            <text:p>15:15:03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04S" calcext:value-type="time">
            <text:p>15:15:04</text:p>
          </table:table-cell>
          <table:table-cell office:value-type="float" office:value="18" calcext:value-type="float">
            <text:p>1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06S" calcext:value-type="time">
            <text:p>15:15:06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07S" calcext:value-type="time">
            <text:p>15:15:07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08S" calcext:value-type="time">
            <text:p>15:15:08</text:p>
          </table:table-cell>
          <table:table-cell office:value-type="float" office:value="17" calcext:value-type="float">
            <text:p>1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09S" calcext:value-type="time">
            <text:p>15:15:09</text:p>
          </table:table-cell>
          <table:table-cell office:value-type="float" office:value="35" calcext:value-type="float">
            <text:p>3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11S" calcext:value-type="time">
            <text:p>15:15:11</text:p>
          </table:table-cell>
          <table:table-cell office:value-type="float" office:value="23" calcext:value-type="float">
            <text:p>2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12S" calcext:value-type="time">
            <text:p>15:15:12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13S" calcext:value-type="time">
            <text:p>15:15:13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15S" calcext:value-type="time">
            <text:p>15:15:15</text:p>
          </table:table-cell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16S" calcext:value-type="time">
            <text:p>15:15:16</text:p>
          </table:table-cell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17S" calcext:value-type="time">
            <text:p>15:15:17</text:p>
          </table:table-cell>
          <table:table-cell office:value-type="float" office:value="38" calcext:value-type="float">
            <text:p>3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18S" calcext:value-type="time">
            <text:p>15:15:18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20S" calcext:value-type="time">
            <text:p>15:15:20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21S" calcext:value-type="time">
            <text:p>15:15:21</text:p>
          </table:table-cell>
          <table:table-cell office:value-type="float" office:value="84" calcext:value-type="float">
            <text:p>8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22S" calcext:value-type="time">
            <text:p>15:15:22</text:p>
          </table:table-cell>
          <table:table-cell office:value-type="float" office:value="70" calcext:value-type="float">
            <text:p>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24S" calcext:value-type="time">
            <text:p>15:15:24</text:p>
          </table:table-cell>
          <table:table-cell office:value-type="float" office:value="16" calcext:value-type="float">
            <text:p>1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25S" calcext:value-type="time">
            <text:p>15:15:25</text:p>
          </table:table-cell>
          <table:table-cell office:value-type="float" office:value="54" calcext:value-type="float">
            <text:p>5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26S" calcext:value-type="time">
            <text:p>15:15:26</text:p>
          </table:table-cell>
          <table:table-cell office:value-type="float" office:value="40" calcext:value-type="float">
            <text:p>4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27S" calcext:value-type="time">
            <text:p>15:15:27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29S" calcext:value-type="time">
            <text:p>15:15:29</text:p>
          </table:table-cell>
          <table:table-cell office:value-type="float" office:value="26" calcext:value-type="float">
            <text:p>2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30S" calcext:value-type="time">
            <text:p>15:15:30</text:p>
          </table:table-cell>
          <table:table-cell office:value-type="float" office:value="415" calcext:value-type="float">
            <text:p>41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31S" calcext:value-type="time">
            <text:p>15:15:31</text:p>
          </table:table-cell>
          <table:table-cell office:value-type="float" office:value="673" calcext:value-type="float">
            <text:p>67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32S" calcext:value-type="time">
            <text:p>15:15:32</text:p>
          </table:table-cell>
          <table:table-cell office:value-type="float" office:value="417" calcext:value-type="float">
            <text:p>41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34S" calcext:value-type="time">
            <text:p>15:15:34</text:p>
          </table:table-cell>
          <table:table-cell office:value-type="float" office:value="41" calcext:value-type="float">
            <text:p>4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35S" calcext:value-type="time">
            <text:p>15:15:35</text:p>
          </table:table-cell>
          <table:table-cell office:value-type="float" office:value="34" calcext:value-type="float">
            <text:p>3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36S" calcext:value-type="time">
            <text:p>15:15:36</text:p>
          </table:table-cell>
          <table:table-cell office:value-type="float" office:value="276" calcext:value-type="float">
            <text:p>27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38S" calcext:value-type="time">
            <text:p>15:15:38</text:p>
          </table:table-cell>
          <table:table-cell office:value-type="float" office:value="13" calcext:value-type="float">
            <text:p>1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39S" calcext:value-type="time">
            <text:p>15:15:39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40S" calcext:value-type="time">
            <text:p>15:15:40</text:p>
          </table:table-cell>
          <table:table-cell office:value-type="float" office:value="126" calcext:value-type="float">
            <text:p>12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41S" calcext:value-type="time">
            <text:p>15:15:41</text:p>
          </table:table-cell>
          <table:table-cell office:value-type="float" office:value="229" calcext:value-type="float">
            <text:p>22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43S" calcext:value-type="time">
            <text:p>15:15:43</text:p>
          </table:table-cell>
          <table:table-cell office:value-type="float" office:value="7" calcext:value-type="float">
            <text:p>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44S" calcext:value-type="time">
            <text:p>15:15:44</text:p>
          </table:table-cell>
          <table:table-cell office:value-type="float" office:value="87" calcext:value-type="float">
            <text:p>8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45S" calcext:value-type="time">
            <text:p>15:15:45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47S" calcext:value-type="time">
            <text:p>15:15:47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48S" calcext:value-type="time">
            <text:p>15:15:48</text:p>
          </table:table-cell>
          <table:table-cell office:value-type="float" office:value="158" calcext:value-type="float">
            <text:p>15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49S" calcext:value-type="time">
            <text:p>15:15:49</text:p>
          </table:table-cell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51S" calcext:value-type="time">
            <text:p>15:15:51</text:p>
          </table:table-cell>
          <table:table-cell office:value-type="float" office:value="56" calcext:value-type="float">
            <text:p>5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52S" calcext:value-type="time">
            <text:p>15:15:52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53S" calcext:value-type="time">
            <text:p>15:15:53</text:p>
          </table:table-cell>
          <table:table-cell office:value-type="float" office:value="149" calcext:value-type="float">
            <text:p>14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54S" calcext:value-type="time">
            <text:p>15:15:54</text:p>
          </table:table-cell>
          <table:table-cell office:value-type="float" office:value="37" calcext:value-type="float">
            <text:p>3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56S" calcext:value-type="time">
            <text:p>15:15:56</text:p>
          </table:table-cell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57S" calcext:value-type="time">
            <text:p>15:15:57</text:p>
          </table:table-cell>
          <table:table-cell office:value-type="float" office:value="268" calcext:value-type="float">
            <text:p>26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58S" calcext:value-type="time">
            <text:p>15:15:58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00S" calcext:value-type="time">
            <text:p>15:16:0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01S" calcext:value-type="time">
            <text:p>15:16:01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02S" calcext:value-type="time">
            <text:p>15:16:02</text:p>
          </table:table-cell>
          <table:table-cell office:value-type="float" office:value="87" calcext:value-type="float">
            <text:p>8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04S" calcext:value-type="time">
            <text:p>15:16:04</text:p>
          </table:table-cell>
          <table:table-cell office:value-type="float" office:value="212" calcext:value-type="float">
            <text:p>21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05S" calcext:value-type="time">
            <text:p>15:16:05</text:p>
          </table:table-cell>
          <table:table-cell office:value-type="float" office:value="138" calcext:value-type="float">
            <text:p>13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06S" calcext:value-type="time">
            <text:p>15:16:06</text:p>
          </table:table-cell>
          <table:table-cell office:value-type="float" office:value="53" calcext:value-type="float">
            <text:p>5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07S" calcext:value-type="time">
            <text:p>15:16:07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09S" calcext:value-type="time">
            <text:p>15:16:09</text:p>
          </table:table-cell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10S" calcext:value-type="time">
            <text:p>15:16:10</text:p>
          </table:table-cell>
          <table:table-cell office:value-type="float" office:value="277" calcext:value-type="float">
            <text:p>27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11S" calcext:value-type="time">
            <text:p>15:16:11</text:p>
          </table:table-cell>
          <table:table-cell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13S" calcext:value-type="time">
            <text:p>15:16:13</text:p>
          </table:table-cell>
          <table:table-cell office:value-type="float" office:value="290" calcext:value-type="float">
            <text:p>29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14S" calcext:value-type="time">
            <text:p>15:16:14</text:p>
          </table:table-cell>
          <table:table-cell office:value-type="float" office:value="601" calcext:value-type="float">
            <text:p>6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15S" calcext:value-type="time">
            <text:p>15:16:15</text:p>
          </table:table-cell>
          <table:table-cell office:value-type="float" office:value="25" calcext:value-type="float">
            <text:p>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17S" calcext:value-type="time">
            <text:p>15:16:17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18S" calcext:value-type="time">
            <text:p>15:16:1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19S" calcext:value-type="time">
            <text:p>15:16:19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21S" calcext:value-type="time">
            <text:p>15:16:21</text:p>
          </table:table-cell>
          <table:table-cell office:value-type="float" office:value="40" calcext:value-type="float">
            <text:p>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22S" calcext:value-type="time">
            <text:p>15:16:22</text:p>
          </table:table-cell>
          <table:table-cell office:value-type="float" office:value="45" calcext:value-type="float">
            <text:p>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23S" calcext:value-type="time">
            <text:p>15:16:23</text:p>
          </table:table-cell>
          <table:table-cell office:value-type="float" office:value="39" calcext:value-type="float">
            <text:p>3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24S" calcext:value-type="time">
            <text:p>15:16:24</text:p>
          </table:table-cell>
          <table:table-cell office:value-type="float" office:value="116" calcext:value-type="float">
            <text:p>11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26S" calcext:value-type="time">
            <text:p>15:16:26</text:p>
          </table:table-cell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27S" calcext:value-type="time">
            <text:p>15:16:27</text:p>
          </table:table-cell>
          <table:table-cell office:value-type="float" office:value="76" calcext:value-type="float">
            <text:p>7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28S" calcext:value-type="time">
            <text:p>15:16:28</text:p>
          </table:table-cell>
          <table:table-cell office:value-type="float" office:value="85" calcext:value-type="float">
            <text:p>8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30S" calcext:value-type="time">
            <text:p>15:16:30</text:p>
          </table:table-cell>
          <table:table-cell office:value-type="float" office:value="32" calcext:value-type="float">
            <text:p>3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31S" calcext:value-type="time">
            <text:p>15:16:31</text:p>
          </table:table-cell>
          <table:table-cell office:value-type="float" office:value="101" calcext:value-type="float">
            <text:p>10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32S" calcext:value-type="time">
            <text:p>15:16:32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34S" calcext:value-type="time">
            <text:p>15:16:34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35S" calcext:value-type="time">
            <text:p>15:16:35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36S" calcext:value-type="time">
            <text:p>15:16:36</text:p>
          </table:table-cell>
          <table:table-cell office:value-type="float" office:value="105" calcext:value-type="float">
            <text:p>10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38S" calcext:value-type="time">
            <text:p>15:16:38</text:p>
          </table:table-cell>
          <table:table-cell office:value-type="float" office:value="52" calcext:value-type="float">
            <text:p>5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39S" calcext:value-type="time">
            <text:p>15:16:39</text:p>
          </table:table-cell>
          <table:table-cell office:value-type="float" office:value="14" calcext:value-type="float">
            <text:p>1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40S" calcext:value-type="time">
            <text:p>15:16:40</text:p>
          </table:table-cell>
          <table:table-cell office:value-type="float" office:value="28" calcext:value-type="float">
            <text:p>2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42S" calcext:value-type="time">
            <text:p>15:16:42</text:p>
          </table:table-cell>
          <table:table-cell office:value-type="float" office:value="9" calcext:value-type="float">
            <text:p>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43S" calcext:value-type="time">
            <text:p>15:16:43</text:p>
          </table:table-cell>
          <table:table-cell office:value-type="float" office:value="131" calcext:value-type="float">
            <text:p>13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44S" calcext:value-type="time">
            <text:p>15:16:44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46S" calcext:value-type="time">
            <text:p>15:16:46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47S" calcext:value-type="time">
            <text:p>15:16:47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48S" calcext:value-type="time">
            <text:p>15:16:48</text:p>
          </table:table-cell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50S" calcext:value-type="time">
            <text:p>15:16:50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51S" calcext:value-type="time">
            <text:p>15:16:51</text:p>
          </table:table-cell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52S" calcext:value-type="time">
            <text:p>15:16:52</text:p>
          </table:table-cell>
          <table:table-cell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54S" calcext:value-type="time">
            <text:p>15:16:54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55S" calcext:value-type="time">
            <text:p>15:16:55</text:p>
          </table:table-cell>
          <table:table-cell office:value-type="float" office:value="93" calcext:value-type="float">
            <text:p>9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56S" calcext:value-type="time">
            <text:p>15:16:56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58S" calcext:value-type="time">
            <text:p>15:16:58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59S" calcext:value-type="time">
            <text:p>15:16:59</text:p>
          </table:table-cell>
          <table:table-cell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00S" calcext:value-type="time">
            <text:p>15:17:00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02S" calcext:value-type="time">
            <text:p>15:17:02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03S" calcext:value-type="time">
            <text:p>15:17:03</text:p>
          </table:table-cell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04S" calcext:value-type="time">
            <text:p>15:17:04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06S" calcext:value-type="time">
            <text:p>15:17:06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07S" calcext:value-type="time">
            <text:p>15:17:07</text:p>
          </table:table-cell>
          <table:table-cell office:value-type="float" office:value="125" calcext:value-type="float">
            <text:p>12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08S" calcext:value-type="time">
            <text:p>15:17:08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10S" calcext:value-type="time">
            <text:p>15:17:10</text:p>
          </table:table-cell>
          <table:table-cell office:value-type="float" office:value="106" calcext:value-type="float">
            <text:p>10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11S" calcext:value-type="time">
            <text:p>15:17:11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12S" calcext:value-type="time">
            <text:p>15:17:12</text:p>
          </table:table-cell>
          <table:table-cell office:value-type="float" office:value="46" calcext:value-type="float">
            <text:p>4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14S" calcext:value-type="time">
            <text:p>15:17:14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15S" calcext:value-type="time">
            <text:p>15:17:15</text:p>
          </table:table-cell>
          <table:table-cell office:value-type="float" office:value="57" calcext:value-type="float">
            <text:p>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16S" calcext:value-type="time">
            <text:p>15:17:16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18S" calcext:value-type="time">
            <text:p>15:17:18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19S" calcext:value-type="time">
            <text:p>15:17:19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20S" calcext:value-type="time">
            <text:p>15:17:20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22S" calcext:value-type="time">
            <text:p>15:17:22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23S" calcext:value-type="time">
            <text:p>15:17:23</text:p>
          </table:table-cell>
          <table:table-cell office:value-type="float" office:value="76" calcext:value-type="float">
            <text:p>7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24S" calcext:value-type="time">
            <text:p>15:17:24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26S" calcext:value-type="time">
            <text:p>15:17:26</text:p>
          </table:table-cell>
          <table:table-cell office:value-type="float" office:value="16" calcext:value-type="float">
            <text:p>1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27S" calcext:value-type="time">
            <text:p>15:17:27</text:p>
          </table:table-cell>
          <table:table-cell office:value-type="float" office:value="27" calcext:value-type="float">
            <text:p>2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28S" calcext:value-type="time">
            <text:p>15:17:28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30S" calcext:value-type="time">
            <text:p>15:17:30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31S" calcext:value-type="time">
            <text:p>15:17:3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33S" calcext:value-type="time">
            <text:p>15:17:33</text:p>
          </table:table-cell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34S" calcext:value-type="time">
            <text:p>15:17:34</text:p>
          </table:table-cell>
          <table:table-cell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35S" calcext:value-type="time">
            <text:p>15:17:35</text:p>
          </table:table-cell>
          <table:table-cell office:value-type="float" office:value="158" calcext:value-type="float">
            <text:p>1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37S" calcext:value-type="time">
            <text:p>15:17:37</text:p>
          </table:table-cell>
          <table:table-cell office:value-type="float" office:value="77" calcext:value-type="float">
            <text:p>7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38S" calcext:value-type="time">
            <text:p>15:17:3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39S" calcext:value-type="time">
            <text:p>15:17:39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41S" calcext:value-type="time">
            <text:p>15:17:41</text:p>
          </table:table-cell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42S" calcext:value-type="time">
            <text:p>15:17:42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43S" calcext:value-type="time">
            <text:p>15:17:43</text:p>
          </table:table-cell>
          <table:table-cell office:value-type="float" office:value="39" calcext:value-type="float">
            <text:p>3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45S" calcext:value-type="time">
            <text:p>15:17:45</text:p>
          </table:table-cell>
          <table:table-cell office:value-type="float" office:value="101" calcext:value-type="float">
            <text:p>1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46S" calcext:value-type="time">
            <text:p>15:17:46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48S" calcext:value-type="time">
            <text:p>15:17:48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49S" calcext:value-type="time">
            <text:p>15:17:49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50S" calcext:value-type="time">
            <text:p>15:17:5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52S" calcext:value-type="time">
            <text:p>15:17:52</text:p>
          </table:table-cell>
          <table:table-cell office:value-type="float" office:value="182" calcext:value-type="float">
            <text:p>18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53S" calcext:value-type="time">
            <text:p>15:17:53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54S" calcext:value-type="time">
            <text:p>15:17:54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56S" calcext:value-type="time">
            <text:p>15:17:5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57S" calcext:value-type="time">
            <text:p>15:17:57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58S" calcext:value-type="time">
            <text:p>15:17:58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00S" calcext:value-type="time">
            <text:p>15:18:00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01S" calcext:value-type="time">
            <text:p>15:18:01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03S" calcext:value-type="time">
            <text:p>15:18:0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04S" calcext:value-type="time">
            <text:p>15:18:04</text:p>
          </table:table-cell>
          <table:table-cell office:value-type="float" office:value="65" calcext:value-type="float">
            <text:p>6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05S" calcext:value-type="time">
            <text:p>15:18:05</text:p>
          </table:table-cell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07S" calcext:value-type="time">
            <text:p>15:18:07</text:p>
          </table:table-cell>
          <table:table-cell office:value-type="float" office:value="145" calcext:value-type="float">
            <text:p>14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08S" calcext:value-type="time">
            <text:p>15:18:08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09S" calcext:value-type="time">
            <text:p>15:18:09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11S" calcext:value-type="time">
            <text:p>15:18:11</text:p>
          </table:table-cell>
          <table:table-cell office:value-type="float" office:value="71" calcext:value-type="float">
            <text:p>7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12S" calcext:value-type="time">
            <text:p>15:18:12</text:p>
          </table:table-cell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14S" calcext:value-type="time">
            <text:p>15:18:14</text:p>
          </table:table-cell>
          <table:table-cell office:value-type="float" office:value="134" calcext:value-type="float">
            <text:p>13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15S" calcext:value-type="time">
            <text:p>15:18:15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16S" calcext:value-type="time">
            <text:p>15:18:16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18S" calcext:value-type="time">
            <text:p>15:18:18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19S" calcext:value-type="time">
            <text:p>15:18:19</text:p>
          </table:table-cell>
          <table:table-cell office:value-type="float" office:value="36" calcext:value-type="float">
            <text:p>3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21S" calcext:value-type="time">
            <text:p>15:18:21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22S" calcext:value-type="time">
            <text:p>15:18:22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23S" calcext:value-type="time">
            <text:p>15:18:23</text:p>
          </table:table-cell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25S" calcext:value-type="time">
            <text:p>15:18:25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26S" calcext:value-type="time">
            <text:p>15:18:26</text:p>
          </table:table-cell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27S" calcext:value-type="time">
            <text:p>15:18:27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29S" calcext:value-type="time">
            <text:p>15:18:29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30S" calcext:value-type="time">
            <text:p>15:18:30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32S" calcext:value-type="time">
            <text:p>15:18:32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33S" calcext:value-type="time">
            <text:p>15:18:33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34S" calcext:value-type="time">
            <text:p>15:18:34</text:p>
          </table:table-cell>
          <table:table-cell office:value-type="float" office:value="58" calcext:value-type="float">
            <text:p>5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36S" calcext:value-type="time">
            <text:p>15:18:36</text:p>
          </table:table-cell>
          <table:table-cell office:value-type="float" office:value="58" calcext:value-type="float">
            <text:p>5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37S" calcext:value-type="time">
            <text:p>15:18:37</text:p>
          </table:table-cell>
          <table:table-cell office:value-type="float" office:value="44" calcext:value-type="float">
            <text:p>4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39S" calcext:value-type="time">
            <text:p>15:18:39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40S" calcext:value-type="time">
            <text:p>15:18:40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41S" calcext:value-type="time">
            <text:p>15:18:41</text:p>
          </table:table-cell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43S" calcext:value-type="time">
            <text:p>15:18:43</text:p>
          </table:table-cell>
          <table:table-cell office:value-type="float" office:value="94" calcext:value-type="float">
            <text:p>9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44S" calcext:value-type="time">
            <text:p>15:18:44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46S" calcext:value-type="time">
            <text:p>15:18:46</text:p>
          </table:table-cell>
          <table:table-cell office:value-type="float" office:value="46" calcext:value-type="float">
            <text:p>4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47S" calcext:value-type="time">
            <text:p>15:18:47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48S" calcext:value-type="time">
            <text:p>15:18:48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50S" calcext:value-type="time">
            <text:p>15:18:50</text:p>
          </table:table-cell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51S" calcext:value-type="time">
            <text:p>15:18:51</text:p>
          </table:table-cell>
          <table:table-cell office:value-type="float" office:value="78" calcext:value-type="float">
            <text:p>7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53S" calcext:value-type="time">
            <text:p>15:18:53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54S" calcext:value-type="time">
            <text:p>15:18:54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55S" calcext:value-type="time">
            <text:p>15:18:55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57S" calcext:value-type="time">
            <text:p>15:18:57</text:p>
          </table:table-cell>
          <table:table-cell office:value-type="float" office:value="11" calcext:value-type="float">
            <text:p>1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58S" calcext:value-type="time">
            <text:p>15:18:58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00S" calcext:value-type="time">
            <text:p>15:19:00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01S" calcext:value-type="time">
            <text:p>15:19:01</text:p>
          </table:table-cell>
          <table:table-cell office:value-type="float" office:value="39" calcext:value-type="float">
            <text:p>3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02S" calcext:value-type="time">
            <text:p>15:19:02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04S" calcext:value-type="time">
            <text:p>15:19:04</text:p>
          </table:table-cell>
          <table:table-cell office:value-type="float" office:value="47" calcext:value-type="float">
            <text:p>4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05S" calcext:value-type="time">
            <text:p>15:19:05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07S" calcext:value-type="time">
            <text:p>15:19:07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08S" calcext:value-type="time">
            <text:p>15:19:08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09S" calcext:value-type="time">
            <text:p>15:19:09</text:p>
          </table:table-cell>
          <table:table-cell office:value-type="float" office:value="71" calcext:value-type="float">
            <text:p>7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11S" calcext:value-type="time">
            <text:p>15:19:11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12S" calcext:value-type="time">
            <text:p>15:19:12</text:p>
          </table:table-cell>
          <table:table-cell office:value-type="float" office:value="21" calcext:value-type="float">
            <text:p>2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14S" calcext:value-type="time">
            <text:p>15:19:14</text:p>
          </table:table-cell>
          <table:table-cell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15S" calcext:value-type="time">
            <text:p>15:19:15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17S" calcext:value-type="time">
            <text:p>15:19:17</text:p>
          </table:table-cell>
          <table:table-cell office:value-type="float" office:value="76" calcext:value-type="float">
            <text:p>7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18S" calcext:value-type="time">
            <text:p>15:19:18</text:p>
          </table:table-cell>
          <table:table-cell office:value-type="float" office:value="79" calcext:value-type="float">
            <text:p>7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19S" calcext:value-type="time">
            <text:p>15:19:19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21S" calcext:value-type="time">
            <text:p>15:19:21</text:p>
          </table:table-cell>
          <table:table-cell office:value-type="float" office:value="39" calcext:value-type="float">
            <text:p>3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22S" calcext:value-type="time">
            <text:p>15:19:22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24S" calcext:value-type="time">
            <text:p>15:19:24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25S" calcext:value-type="time">
            <text:p>15:19:25</text:p>
          </table:table-cell>
          <table:table-cell office:value-type="float" office:value="26" calcext:value-type="float">
            <text:p>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26S" calcext:value-type="time">
            <text:p>15:19:26</text:p>
          </table:table-cell>
          <table:table-cell office:value-type="float" office:value="42" calcext:value-type="float">
            <text:p>4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28S" calcext:value-type="time">
            <text:p>15:19:28</text:p>
          </table:table-cell>
          <table:table-cell office:value-type="float" office:value="27" calcext:value-type="float">
            <text:p>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29S" calcext:value-type="time">
            <text:p>15:19:29</text:p>
          </table:table-cell>
          <table:table-cell office:value-type="float" office:value="124" calcext:value-type="float">
            <text:p>1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31S" calcext:value-type="time">
            <text:p>15:19:31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32S" calcext:value-type="time">
            <text:p>15:19:32</text:p>
          </table:table-cell>
          <table:table-cell office:value-type="float" office:value="113" calcext:value-type="float">
            <text:p>11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34S" calcext:value-type="time">
            <text:p>15:19:34</text:p>
          </table:table-cell>
          <table:table-cell office:value-type="float" office:value="82" calcext:value-type="float">
            <text:p>8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35S" calcext:value-type="time">
            <text:p>15:19:35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36S" calcext:value-type="time">
            <text:p>15:19:36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38S" calcext:value-type="time">
            <text:p>15:19:38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39S" calcext:value-type="time">
            <text:p>15:19:39</text:p>
          </table:table-cell>
          <table:table-cell office:value-type="float" office:value="137" calcext:value-type="float">
            <text:p>13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41S" calcext:value-type="time">
            <text:p>15:19:41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42S" calcext:value-type="time">
            <text:p>15:19:42</text:p>
          </table:table-cell>
          <table:table-cell office:value-type="float" office:value="18" calcext:value-type="float">
            <text:p>1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44S" calcext:value-type="time">
            <text:p>15:19:44</text:p>
          </table:table-cell>
          <table:table-cell office:value-type="float" office:value="63" calcext:value-type="float">
            <text:p>6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45S" calcext:value-type="time">
            <text:p>15:19:45</text:p>
          </table:table-cell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46S" calcext:value-type="time">
            <text:p>15:19:46</text:p>
          </table:table-cell>
          <table:table-cell office:value-type="float" office:value="18" calcext:value-type="float">
            <text:p>1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48S" calcext:value-type="time">
            <text:p>15:19:48</text:p>
          </table:table-cell>
          <table:table-cell office:value-type="float" office:value="74" calcext:value-type="float">
            <text:p>7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49S" calcext:value-type="time">
            <text:p>15:19:49</text:p>
          </table:table-cell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51S" calcext:value-type="time">
            <text:p>15:19:51</text:p>
          </table:table-cell>
          <table:table-cell office:value-type="float" office:value="58" calcext:value-type="float">
            <text:p>5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52S" calcext:value-type="time">
            <text:p>15:19:52</text:p>
          </table:table-cell>
          <table:table-cell office:value-type="float" office:value="57" calcext:value-type="float">
            <text:p>5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54S" calcext:value-type="time">
            <text:p>15:19:54</text:p>
          </table:table-cell>
          <table:table-cell office:value-type="float" office:value="79" calcext:value-type="float">
            <text:p>7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55S" calcext:value-type="time">
            <text:p>15:19:55</text:p>
          </table:table-cell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56S" calcext:value-type="time">
            <text:p>15:19:56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58S" calcext:value-type="time">
            <text:p>15:19:58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59S" calcext:value-type="time">
            <text:p>15:19:59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01S" calcext:value-type="time">
            <text:p>15:20:01</text:p>
          </table:table-cell>
          <table:table-cell office:value-type="float" office:value="35" calcext:value-type="float">
            <text:p>3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02S" calcext:value-type="time">
            <text:p>15:20:02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04S" calcext:value-type="time">
            <text:p>15:20:04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05S" calcext:value-type="time">
            <text:p>15:20:05</text:p>
          </table:table-cell>
          <table:table-cell office:value-type="float" office:value="65" calcext:value-type="float">
            <text:p>6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07S" calcext:value-type="time">
            <text:p>15:20:07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08S" calcext:value-type="time">
            <text:p>15:20:08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09S" calcext:value-type="time">
            <text:p>15:20:09</text:p>
          </table:table-cell>
          <table:table-cell office:value-type="float" office:value="31" calcext:value-type="float">
            <text:p>3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11S" calcext:value-type="time">
            <text:p>15:20:11</text:p>
          </table:table-cell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12S" calcext:value-type="time">
            <text:p>15:20:12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14S" calcext:value-type="time">
            <text:p>15:20:14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15S" calcext:value-type="time">
            <text:p>15:20:15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17S" calcext:value-type="time">
            <text:p>15:20:17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18S" calcext:value-type="time">
            <text:p>15:20:18</text:p>
          </table:table-cell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20S" calcext:value-type="time">
            <text:p>15:20:20</text:p>
          </table:table-cell>
          <table:table-cell office:value-type="float" office:value="41" calcext:value-type="float">
            <text:p>4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21S" calcext:value-type="time">
            <text:p>15:20:21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22S" calcext:value-type="time">
            <text:p>15:20:22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24S" calcext:value-type="time">
            <text:p>15:20:24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25S" calcext:value-type="time">
            <text:p>15:20:25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27S" calcext:value-type="time">
            <text:p>15:20:2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28S" calcext:value-type="time">
            <text:p>15:20:2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30S" calcext:value-type="time">
            <text:p>15:20:30</text:p>
          </table:table-cell>
          <table:table-cell office:value-type="float" office:value="193" calcext:value-type="float">
            <text:p>19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31S" calcext:value-type="time">
            <text:p>15:20:31</text:p>
          </table:table-cell>
          <table:table-cell office:value-type="float" office:value="70" calcext:value-type="float">
            <text:p>7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33S" calcext:value-type="time">
            <text:p>15:20:33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34S" calcext:value-type="time">
            <text:p>15:20:3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36S" calcext:value-type="time">
            <text:p>15:20:36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37S" calcext:value-type="time">
            <text:p>15:20:37</text:p>
          </table:table-cell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39S" calcext:value-type="time">
            <text:p>15:20:3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40S" calcext:value-type="time">
            <text:p>15:20:40</text:p>
          </table:table-cell>
          <table:table-cell office:value-type="float" office:value="68" calcext:value-type="float">
            <text:p>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41S" calcext:value-type="time">
            <text:p>15:20:41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43S" calcext:value-type="time">
            <text:p>15:20:43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44S" calcext:value-type="time">
            <text:p>15:20:44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46S" calcext:value-type="time">
            <text:p>15:20:46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47S" calcext:value-type="time">
            <text:p>15:20:47</text:p>
          </table:table-cell>
          <table:table-cell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49S" calcext:value-type="time">
            <text:p>15:20:49</text:p>
          </table:table-cell>
          <table:table-cell office:value-type="float" office:value="36" calcext:value-type="float">
            <text:p>3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50S" calcext:value-type="time">
            <text:p>15:20:50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52S" calcext:value-type="time">
            <text:p>15:20:52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53S" calcext:value-type="time">
            <text:p>15:20:53</text:p>
          </table:table-cell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55S" calcext:value-type="time">
            <text:p>15:20:55</text:p>
          </table:table-cell>
          <table:table-cell office:value-type="float" office:value="27" calcext:value-type="float">
            <text:p>2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56S" calcext:value-type="time">
            <text:p>15:20:56</text:p>
          </table:table-cell>
          <table:table-cell office:value-type="float" office:value="67" calcext:value-type="float">
            <text:p>6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58S" calcext:value-type="time">
            <text:p>15:20:58</text:p>
          </table:table-cell>
          <table:table-cell office:value-type="float" office:value="71" calcext:value-type="float">
            <text:p>7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59S" calcext:value-type="time">
            <text:p>15:20:59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01S" calcext:value-type="time">
            <text:p>15:21:01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02S" calcext:value-type="time">
            <text:p>15:21:02</text:p>
          </table:table-cell>
          <table:table-cell office:value-type="float" office:value="22" calcext:value-type="float">
            <text:p>2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03S" calcext:value-type="time">
            <text:p>15:21:03</text:p>
          </table:table-cell>
          <table:table-cell office:value-type="float" office:value="59" calcext:value-type="float">
            <text:p>5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05S" calcext:value-type="time">
            <text:p>15:21:05</text:p>
          </table:table-cell>
          <table:table-cell office:value-type="float" office:value="41" calcext:value-type="float">
            <text:p>4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06S" calcext:value-type="time">
            <text:p>15:21:06</text:p>
          </table:table-cell>
          <table:table-cell office:value-type="float" office:value="82" calcext:value-type="float">
            <text:p>8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08S" calcext:value-type="time">
            <text:p>15:21:08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09S" calcext:value-type="time">
            <text:p>15:21:09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11S" calcext:value-type="time">
            <text:p>15:21:11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12S" calcext:value-type="time">
            <text:p>15:21:12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14S" calcext:value-type="time">
            <text:p>15:21:14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15S" calcext:value-type="time">
            <text:p>15:21:15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17S" calcext:value-type="time">
            <text:p>15:21:17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18S" calcext:value-type="time">
            <text:p>15:21:18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20S" calcext:value-type="time">
            <text:p>15:21:20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21S" calcext:value-type="time">
            <text:p>15:21:21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23S" calcext:value-type="time">
            <text:p>15:21:23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24S" calcext:value-type="time">
            <text:p>15:21:24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26S" calcext:value-type="time">
            <text:p>15:21:26</text:p>
          </table:table-cell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27S" calcext:value-type="time">
            <text:p>15:21:27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29S" calcext:value-type="time">
            <text:p>15:21:29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30S" calcext:value-type="time">
            <text:p>15:21:30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32S" calcext:value-type="time">
            <text:p>15:21:32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33S" calcext:value-type="time">
            <text:p>15:21:33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35S" calcext:value-type="time">
            <text:p>15:21:35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36S" calcext:value-type="time">
            <text:p>15:21:3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38S" calcext:value-type="time">
            <text:p>15:21:38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39S" calcext:value-type="time">
            <text:p>15:21:39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41S" calcext:value-type="time">
            <text:p>15:21:41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42S" calcext:value-type="time">
            <text:p>15:21:42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44S" calcext:value-type="time">
            <text:p>15:21:44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45S" calcext:value-type="time">
            <text:p>15:21:45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47S" calcext:value-type="time">
            <text:p>15:21:47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48S" calcext:value-type="time">
            <text:p>15:21:48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50S" calcext:value-type="time">
            <text:p>15:21:50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51S" calcext:value-type="time">
            <text:p>15:21:51</text:p>
          </table:table-cell>
          <table:table-cell office:value-type="float" office:value="64" calcext:value-type="float">
            <text:p>6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53S" calcext:value-type="time">
            <text:p>15:21:53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54S" calcext:value-type="time">
            <text:p>15:21:54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56S" calcext:value-type="time">
            <text:p>15:21:56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57S" calcext:value-type="time">
            <text:p>15:21:57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59S" calcext:value-type="time">
            <text:p>15:21:5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00S" calcext:value-type="time">
            <text:p>15:22: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02S" calcext:value-type="time">
            <text:p>15:22:02</text:p>
          </table:table-cell>
          <table:table-cell office:value-type="float" office:value="63" calcext:value-type="float">
            <text:p>6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03S" calcext:value-type="time">
            <text:p>15:22:03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05S" calcext:value-type="time">
            <text:p>15:22:05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06S" calcext:value-type="time">
            <text:p>15:22:06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08S" calcext:value-type="time">
            <text:p>15:22:08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09S" calcext:value-type="time">
            <text:p>15:22:09</text:p>
          </table:table-cell>
          <table:table-cell office:value-type="float" office:value="89" calcext:value-type="float">
            <text:p>8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11S" calcext:value-type="time">
            <text:p>15:22:11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12S" calcext:value-type="time">
            <text:p>15:22:12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14S" calcext:value-type="time">
            <text:p>15:22:14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15S" calcext:value-type="time">
            <text:p>15:22:15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17S" calcext:value-type="time">
            <text:p>15:22:17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18S" calcext:value-type="time">
            <text:p>15:22:18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20S" calcext:value-type="time">
            <text:p>15:22:20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21S" calcext:value-type="time">
            <text:p>15:22:21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23S" calcext:value-type="time">
            <text:p>15:22:23</text:p>
          </table:table-cell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24S" calcext:value-type="time">
            <text:p>15:22:24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26S" calcext:value-type="time">
            <text:p>15:22:26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27S" calcext:value-type="time">
            <text:p>15:22:27</text:p>
          </table:table-cell>
          <table:table-cell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29S" calcext:value-type="time">
            <text:p>15:22:29</text:p>
          </table:table-cell>
          <table:table-cell office:value-type="float" office:value="68" calcext:value-type="float">
            <text:p>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30S" calcext:value-type="time">
            <text:p>15:22:30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32S" calcext:value-type="time">
            <text:p>15:22:32</text:p>
          </table:table-cell>
          <table:table-cell office:value-type="float" office:value="87" calcext:value-type="float">
            <text:p>8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33S" calcext:value-type="time">
            <text:p>15:22:33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35S" calcext:value-type="time">
            <text:p>15:22:35</text:p>
          </table:table-cell>
          <table:table-cell office:value-type="float" office:value="86" calcext:value-type="float">
            <text:p>8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36S" calcext:value-type="time">
            <text:p>15:22:36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38S" calcext:value-type="time">
            <text:p>15:22:38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39S" calcext:value-type="time">
            <text:p>15:22:39</text:p>
          </table:table-cell>
          <table:table-cell office:value-type="float" office:value="81" calcext:value-type="float">
            <text:p>8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41S" calcext:value-type="time">
            <text:p>15:22:41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42S" calcext:value-type="time">
            <text:p>15:22:42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44S" calcext:value-type="time">
            <text:p>15:22:44</text:p>
          </table:table-cell>
          <table:table-cell office:value-type="float" office:value="143" calcext:value-type="float">
            <text:p>14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46S" calcext:value-type="time">
            <text:p>15:22:46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47S" calcext:value-type="time">
            <text:p>15:22:47</text:p>
          </table:table-cell>
          <table:table-cell office:value-type="float" office:value="33" calcext:value-type="float">
            <text:p>3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49S" calcext:value-type="time">
            <text:p>15:22:49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50S" calcext:value-type="time">
            <text:p>15:22:50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52S" calcext:value-type="time">
            <text:p>15:22:52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53S" calcext:value-type="time">
            <text:p>15:22:53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55S" calcext:value-type="time">
            <text:p>15:22:55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56S" calcext:value-type="time">
            <text:p>15:22:56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58S" calcext:value-type="time">
            <text:p>15:22:58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59S" calcext:value-type="time">
            <text:p>15:22:59</text:p>
          </table:table-cell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01S" calcext:value-type="time">
            <text:p>15:23:0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02S" calcext:value-type="time">
            <text:p>15:23:02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04S" calcext:value-type="time">
            <text:p>15:23:04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05S" calcext:value-type="time">
            <text:p>15:23:05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07S" calcext:value-type="time">
            <text:p>15:23:07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09S" calcext:value-type="time">
            <text:p>15:23:09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10S" calcext:value-type="time">
            <text:p>15:23:10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12S" calcext:value-type="time">
            <text:p>15:23:12</text:p>
          </table:table-cell>
          <table:table-cell office:value-type="float" office:value="38" calcext:value-type="float">
            <text:p>3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13S" calcext:value-type="time">
            <text:p>15:23:13</text:p>
          </table:table-cell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15S" calcext:value-type="time">
            <text:p>15:23:15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16S" calcext:value-type="time">
            <text:p>15:23:16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18S" calcext:value-type="time">
            <text:p>15:23:18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19S" calcext:value-type="time">
            <text:p>15:23:19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21S" calcext:value-type="time">
            <text:p>15:23:21</text:p>
          </table:table-cell>
          <table:table-cell office:value-type="float" office:value="67" calcext:value-type="float">
            <text:p>6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22S" calcext:value-type="time">
            <text:p>15:23:22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24S" calcext:value-type="time">
            <text:p>15:23:24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26S" calcext:value-type="time">
            <text:p>15:23:26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27S" calcext:value-type="time">
            <text:p>15:23:27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29S" calcext:value-type="time">
            <text:p>15:23:29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30S" calcext:value-type="time">
            <text:p>15:23:30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32S" calcext:value-type="time">
            <text:p>15:23:3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33S" calcext:value-type="time">
            <text:p>15:23:33</text:p>
          </table:table-cell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35S" calcext:value-type="time">
            <text:p>15:23:35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36S" calcext:value-type="time">
            <text:p>15:23:36</text:p>
          </table:table-cell>
          <table:table-cell office:value-type="float" office:value="33" calcext:value-type="float">
            <text:p>3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38S" calcext:value-type="time">
            <text:p>15:23:38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40S" calcext:value-type="time">
            <text:p>15:23:40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41S" calcext:value-type="time">
            <text:p>15:23:41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43S" calcext:value-type="time">
            <text:p>15:23:43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44S" calcext:value-type="time">
            <text:p>15:23:44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46S" calcext:value-type="time">
            <text:p>15:23:46</text:p>
          </table:table-cell>
          <table:table-cell office:value-type="float" office:value="31" calcext:value-type="float">
            <text:p>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47S" calcext:value-type="time">
            <text:p>15:23:47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49S" calcext:value-type="time">
            <text:p>15:23:49</text:p>
          </table:table-cell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50S" calcext:value-type="time">
            <text:p>15:23:5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52S" calcext:value-type="time">
            <text:p>15:23:52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54S" calcext:value-type="time">
            <text:p>15:23:54</text:p>
          </table:table-cell>
          <table:table-cell office:value-type="float" office:value="78" calcext:value-type="float">
            <text:p>7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55S" calcext:value-type="time">
            <text:p>15:23:55</text:p>
          </table:table-cell>
          <table:table-cell office:value-type="float" office:value="82" calcext:value-type="float">
            <text:p>8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57S" calcext:value-type="time">
            <text:p>15:23:57</text:p>
          </table:table-cell>
          <table:table-cell office:value-type="float" office:value="64" calcext:value-type="float">
            <text:p>6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58S" calcext:value-type="time">
            <text:p>15:23:58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00S" calcext:value-type="time">
            <text:p>15:24:00</text:p>
          </table:table-cell>
          <table:table-cell table:number-columns-repeated="2"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01S" calcext:value-type="time">
            <text:p>15:24:01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03S" calcext:value-type="time">
            <text:p>15:24:03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05S" calcext:value-type="time">
            <text:p>15:24:05</text:p>
          </table:table-cell>
          <table:table-cell office:value-type="float" office:value="212" calcext:value-type="float">
            <text:p>21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06S" calcext:value-type="time">
            <text:p>15:24:06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08S" calcext:value-type="time">
            <text:p>15:24:08</text:p>
          </table:table-cell>
          <table:table-cell office:value-type="float" office:value="82" calcext:value-type="float">
            <text:p>8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09S" calcext:value-type="time">
            <text:p>15:24:09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11S" calcext:value-type="time">
            <text:p>15:24:11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12S" calcext:value-type="time">
            <text:p>15:24:12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14S" calcext:value-type="time">
            <text:p>15:24:14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16S" calcext:value-type="time">
            <text:p>15:24:16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17S" calcext:value-type="time">
            <text:p>15:24:17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19S" calcext:value-type="time">
            <text:p>15:24:19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20S" calcext:value-type="time">
            <text:p>15:24:2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22S" calcext:value-type="time">
            <text:p>15:24:2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23S" calcext:value-type="time">
            <text:p>15:24:23</text:p>
          </table:table-cell>
          <table:table-cell office:value-type="float" office:value="45" calcext:value-type="float">
            <text:p>4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25S" calcext:value-type="time">
            <text:p>15:24:25</text:p>
          </table:table-cell>
          <table:table-cell office:value-type="float" office:value="467" calcext:value-type="float">
            <text:p>46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27S" calcext:value-type="time">
            <text:p>15:24:27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28S" calcext:value-type="time">
            <text:p>15:24:28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30S" calcext:value-type="time">
            <text:p>15:24:30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31S" calcext:value-type="time">
            <text:p>15:24:31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33S" calcext:value-type="time">
            <text:p>15:24:33</text:p>
          </table:table-cell>
          <table:table-cell office:value-type="float" office:value="224" calcext:value-type="float">
            <text:p>2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34S" calcext:value-type="time">
            <text:p>15:24:34</text:p>
          </table:table-cell>
          <table:table-cell office:value-type="float" office:value="627" calcext:value-type="float">
            <text:p>62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36S" calcext:value-type="time">
            <text:p>15:24:36</text:p>
          </table:table-cell>
          <table:table-cell office:value-type="float" office:value="192" calcext:value-type="float">
            <text:p>19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38S" calcext:value-type="time">
            <text:p>15:24:38</text:p>
          </table:table-cell>
          <table:table-cell office:value-type="float" office:value="47" calcext:value-type="float">
            <text:p>4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39S" calcext:value-type="time">
            <text:p>15:24:39</text:p>
          </table:table-cell>
          <table:table-cell office:value-type="float" office:value="121" calcext:value-type="float">
            <text:p>12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41S" calcext:value-type="time">
            <text:p>15:24:41</text:p>
          </table:table-cell>
          <table:table-cell office:value-type="float" office:value="179" calcext:value-type="float">
            <text:p>17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42S" calcext:value-type="time">
            <text:p>15:24:42</text:p>
          </table:table-cell>
          <table:table-cell office:value-type="float" office:value="319" calcext:value-type="float">
            <text:p>31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44S" calcext:value-type="time">
            <text:p>15:24:44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46S" calcext:value-type="time">
            <text:p>15:24:46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47S" calcext:value-type="time">
            <text:p>15:24:47</text:p>
          </table:table-cell>
          <table:table-cell office:value-type="float" office:value="314" calcext:value-type="float">
            <text:p>31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49S" calcext:value-type="time">
            <text:p>15:24:49</text:p>
          </table:table-cell>
          <table:table-cell office:value-type="float" office:value="223" calcext:value-type="float">
            <text:p>22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50S" calcext:value-type="time">
            <text:p>15:24:50</text:p>
          </table:table-cell>
          <table:table-cell office:value-type="float" office:value="97" calcext:value-type="float">
            <text:p>9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52S" calcext:value-type="time">
            <text:p>15:24:52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54S" calcext:value-type="time">
            <text:p>15:24:54</text:p>
          </table:table-cell>
          <table:table-cell office:value-type="float" office:value="240" calcext:value-type="float">
            <text:p>24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55S" calcext:value-type="time">
            <text:p>15:24:55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57S" calcext:value-type="time">
            <text:p>15:24:57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58S" calcext:value-type="time">
            <text:p>15:24:58</text:p>
          </table:table-cell>
          <table:table-cell office:value-type="float" office:value="38" calcext:value-type="float">
            <text:p>3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00S" calcext:value-type="time">
            <text:p>15:25:00</text:p>
          </table:table-cell>
          <table:table-cell office:value-type="float" office:value="18" calcext:value-type="float">
            <text:p>1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02S" calcext:value-type="time">
            <text:p>15:25:02</text:p>
          </table:table-cell>
          <table:table-cell office:value-type="float" office:value="323" calcext:value-type="float">
            <text:p>3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03S" calcext:value-type="time">
            <text:p>15:25:03</text:p>
          </table:table-cell>
          <table:table-cell office:value-type="float" office:value="263" calcext:value-type="float">
            <text:p>26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05S" calcext:value-type="time">
            <text:p>15:25:05</text:p>
          </table:table-cell>
          <table:table-cell office:value-type="float" office:value="58" calcext:value-type="float">
            <text:p>5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06S" calcext:value-type="time">
            <text:p>15:25:06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08S" calcext:value-type="time">
            <text:p>15:25:08</text:p>
          </table:table-cell>
          <table:table-cell office:value-type="float" office:value="564" calcext:value-type="float">
            <text:p>56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09S" calcext:value-type="time">
            <text:p>15:25:09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11S" calcext:value-type="time">
            <text:p>15:25:11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13S" calcext:value-type="time">
            <text:p>15:25:13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14S" calcext:value-type="time">
            <text:p>15:25:14</text:p>
          </table:table-cell>
          <table:table-cell office:value-type="float" office:value="134" calcext:value-type="float">
            <text:p>13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16S" calcext:value-type="time">
            <text:p>15:25:16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18S" calcext:value-type="time">
            <text:p>15:25:18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19S" calcext:value-type="time">
            <text:p>15:25:19</text:p>
          </table:table-cell>
          <table:table-cell office:value-type="float" office:value="197" calcext:value-type="float">
            <text:p>19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21S" calcext:value-type="time">
            <text:p>15:25:21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22S" calcext:value-type="time">
            <text:p>15:25:2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24S" calcext:value-type="time">
            <text:p>15:25:24</text:p>
          </table:table-cell>
          <table:table-cell office:value-type="float" office:value="38" calcext:value-type="float">
            <text:p>3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26S" calcext:value-type="time">
            <text:p>15:25:26</text:p>
          </table:table-cell>
          <table:table-cell office:value-type="float" office:value="36" calcext:value-type="float">
            <text:p>3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27S" calcext:value-type="time">
            <text:p>15:25:27</text:p>
          </table:table-cell>
          <table:table-cell office:value-type="float" office:value="114" calcext:value-type="float">
            <text:p>11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29S" calcext:value-type="time">
            <text:p>15:25:29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30S" calcext:value-type="time">
            <text:p>15:25:30</text:p>
          </table:table-cell>
          <table:table-cell office:value-type="float" office:value="89" calcext:value-type="float">
            <text:p>8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32S" calcext:value-type="time">
            <text:p>15:25:32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34S" calcext:value-type="time">
            <text:p>15:25:34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35S" calcext:value-type="time">
            <text:p>15:25:35</text:p>
          </table:table-cell>
          <table:table-cell office:value-type="float" office:value="215" calcext:value-type="float">
            <text:p>21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37S" calcext:value-type="time">
            <text:p>15:25:37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38S" calcext:value-type="time">
            <text:p>15:25:38</text:p>
          </table:table-cell>
          <table:table-cell office:value-type="float" office:value="61" calcext:value-type="float">
            <text:p>6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40S" calcext:value-type="time">
            <text:p>15:25:40</text:p>
          </table:table-cell>
          <table:table-cell office:value-type="float" office:value="33" calcext:value-type="float">
            <text:p>3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42S" calcext:value-type="time">
            <text:p>15:25:42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43S" calcext:value-type="time">
            <text:p>15:25:43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45S" calcext:value-type="time">
            <text:p>15:25:45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47S" calcext:value-type="time">
            <text:p>15:25:47</text:p>
          </table:table-cell>
          <table:table-cell office:value-type="float" office:value="16" calcext:value-type="float">
            <text:p>1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48S" calcext:value-type="time">
            <text:p>15:25:48</text:p>
          </table:table-cell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50S" calcext:value-type="time">
            <text:p>15:25:50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51S" calcext:value-type="time">
            <text:p>15:25:51</text:p>
          </table:table-cell>
          <table:table-cell office:value-type="float" office:value="367" calcext:value-type="float">
            <text:p>36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53S" calcext:value-type="time">
            <text:p>15:25:53</text:p>
          </table:table-cell>
          <table:table-cell office:value-type="float" office:value="48" calcext:value-type="float">
            <text:p>4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55S" calcext:value-type="time">
            <text:p>15:25:5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56S" calcext:value-type="time">
            <text:p>15:25:56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58S" calcext:value-type="time">
            <text:p>15:25:58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00S" calcext:value-type="time">
            <text:p>15:26:00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01S" calcext:value-type="time">
            <text:p>15:26:01</text:p>
          </table:table-cell>
          <table:table-cell office:value-type="float" office:value="53" calcext:value-type="float">
            <text:p>5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03S" calcext:value-type="time">
            <text:p>15:26:03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04S" calcext:value-type="time">
            <text:p>15:26:04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06S" calcext:value-type="time">
            <text:p>15:26:0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08S" calcext:value-type="time">
            <text:p>15:26:08</text:p>
          </table:table-cell>
          <table:table-cell office:value-type="float" office:value="62" calcext:value-type="float">
            <text:p>6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09S" calcext:value-type="time">
            <text:p>15:26:09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11S" calcext:value-type="time">
            <text:p>15:26:1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13S" calcext:value-type="time">
            <text:p>15:26:13</text:p>
          </table:table-cell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14S" calcext:value-type="time">
            <text:p>15:26:14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16S" calcext:value-type="time">
            <text:p>15:26:1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17S" calcext:value-type="time">
            <text:p>15:26:17</text:p>
          </table:table-cell>
          <table:table-cell office:value-type="float" office:value="95" calcext:value-type="float">
            <text:p>9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19S" calcext:value-type="time">
            <text:p>15:26:1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21S" calcext:value-type="time">
            <text:p>15:26:21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22S" calcext:value-type="time">
            <text:p>15:26:22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24S" calcext:value-type="time">
            <text:p>15:26:24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26S" calcext:value-type="time">
            <text:p>15:26:26</text:p>
          </table:table-cell>
          <table:table-cell office:value-type="float" office:value="67" calcext:value-type="float">
            <text:p>6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27S" calcext:value-type="time">
            <text:p>15:26:27</text:p>
          </table:table-cell>
          <table:table-cell office:value-type="float" office:value="19" calcext:value-type="float">
            <text:p>1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29S" calcext:value-type="time">
            <text:p>15:26:29</text:p>
          </table:table-cell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31S" calcext:value-type="time">
            <text:p>15:26:31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32S" calcext:value-type="time">
            <text:p>15:26:32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34S" calcext:value-type="time">
            <text:p>15:26:34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35S" calcext:value-type="time">
            <text:p>15:26:35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37S" calcext:value-type="time">
            <text:p>15:26:37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39S" calcext:value-type="time">
            <text:p>15:26:39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40S" calcext:value-type="time">
            <text:p>15:26:40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42S" calcext:value-type="time">
            <text:p>15:26:42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44S" calcext:value-type="time">
            <text:p>15:26:44</text:p>
          </table:table-cell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45S" calcext:value-type="time">
            <text:p>15:26:45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47S" calcext:value-type="time">
            <text:p>15:26:47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49S" calcext:value-type="time">
            <text:p>15:26:49</text:p>
          </table:table-cell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50S" calcext:value-type="time">
            <text:p>15:26:5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52S" calcext:value-type="time">
            <text:p>15:26:52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54S" calcext:value-type="time">
            <text:p>15:26:54</text:p>
          </table:table-cell>
          <table:table-cell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55S" calcext:value-type="time">
            <text:p>15:26:55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57S" calcext:value-type="time">
            <text:p>15:26:57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59S" calcext:value-type="time">
            <text:p>15:26:59</text:p>
          </table:table-cell>
          <table:table-cell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00S" calcext:value-type="time">
            <text:p>15:27:00</text:p>
          </table:table-cell>
          <table:table-cell office:value-type="float" office:value="21" calcext:value-type="float">
            <text:p>2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02S" calcext:value-type="time">
            <text:p>15:27:02</text:p>
          </table:table-cell>
          <table:table-cell office:value-type="float" office:value="46" calcext:value-type="float">
            <text:p>4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04S" calcext:value-type="time">
            <text:p>15:27:04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05S" calcext:value-type="time">
            <text:p>15:27:05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07S" calcext:value-type="time">
            <text:p>15:27:07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08S" calcext:value-type="time">
            <text:p>15:27:08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10S" calcext:value-type="time">
            <text:p>15:27:10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12S" calcext:value-type="time">
            <text:p>15:27:12</text:p>
          </table:table-cell>
          <table:table-cell office:value-type="float" office:value="115" calcext:value-type="float">
            <text:p>11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13S" calcext:value-type="time">
            <text:p>15:27:13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15S" calcext:value-type="time">
            <text:p>15:27:15</text:p>
          </table:table-cell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17S" calcext:value-type="time">
            <text:p>15:27:1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18S" calcext:value-type="time">
            <text:p>15:27:18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20S" calcext:value-type="time">
            <text:p>15:27:20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22S" calcext:value-type="time">
            <text:p>15:27:22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23S" calcext:value-type="time">
            <text:p>15:27:23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25S" calcext:value-type="time">
            <text:p>15:27:25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27S" calcext:value-type="time">
            <text:p>15:27:27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28S" calcext:value-type="time">
            <text:p>15:27:28</text:p>
          </table:table-cell>
          <table:table-cell office:value-type="float" office:value="361" calcext:value-type="float">
            <text:p>36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30S" calcext:value-type="time">
            <text:p>15:27:30</text:p>
          </table:table-cell>
          <table:table-cell office:value-type="float" office:value="53" calcext:value-type="float">
            <text:p>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32S" calcext:value-type="time">
            <text:p>15:27:32</text:p>
          </table:table-cell>
          <table:table-cell office:value-type="float" office:value="36" calcext:value-type="float">
            <text:p>3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33S" calcext:value-type="time">
            <text:p>15:27:33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35S" calcext:value-type="time">
            <text:p>15:27:35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37S" calcext:value-type="time">
            <text:p>15:27:37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38S" calcext:value-type="time">
            <text:p>15:27:38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41S" calcext:value-type="time">
            <text:p>15:27:41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42S" calcext:value-type="time">
            <text:p>15:27:42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44S" calcext:value-type="time">
            <text:p>15:27:44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46S" calcext:value-type="time">
            <text:p>15:27:46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47S" calcext:value-type="time">
            <text:p>15:27:47</text:p>
          </table:table-cell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49S" calcext:value-type="time">
            <text:p>15:27:49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51S" calcext:value-type="time">
            <text:p>15:27:51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52S" calcext:value-type="time">
            <text:p>15:27:52</text:p>
          </table:table-cell>
          <table:table-cell office:value-type="float" office:value="364" calcext:value-type="float">
            <text:p>36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54S" calcext:value-type="time">
            <text:p>15:27:54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56S" calcext:value-type="time">
            <text:p>15:27:56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57S" calcext:value-type="time">
            <text:p>15:27:57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59S" calcext:value-type="time">
            <text:p>15:27:59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01S" calcext:value-type="time">
            <text:p>15:28:01</text:p>
          </table:table-cell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03S" calcext:value-type="time">
            <text:p>15:28:03</text:p>
          </table:table-cell>
          <table:table-cell office:value-type="float" office:value="177" calcext:value-type="float">
            <text:p>17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04S" calcext:value-type="time">
            <text:p>15:28:04</text:p>
          </table:table-cell>
          <table:table-cell office:value-type="float" office:value="366" calcext:value-type="float">
            <text:p>36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06S" calcext:value-type="time">
            <text:p>15:28:06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08S" calcext:value-type="time">
            <text:p>15:28:08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09S" calcext:value-type="time">
            <text:p>15:28:09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11S" calcext:value-type="time">
            <text:p>15:28:11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13S" calcext:value-type="time">
            <text:p>15:28:1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14S" calcext:value-type="time">
            <text:p>15:28:14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16S" calcext:value-type="time">
            <text:p>15:28:1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18S" calcext:value-type="time">
            <text:p>15:28:18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19S" calcext:value-type="time">
            <text:p>15:28:19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21S" calcext:value-type="time">
            <text:p>15:28:21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23S" calcext:value-type="time">
            <text:p>15:28:23</text:p>
          </table:table-cell>
          <table:table-cell office:value-type="float" office:value="358" calcext:value-type="float">
            <text:p>35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24S" calcext:value-type="time">
            <text:p>15:28:24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26S" calcext:value-type="time">
            <text:p>15:28:26</text:p>
          </table:table-cell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28S" calcext:value-type="time">
            <text:p>15:28:28</text:p>
          </table:table-cell>
          <table:table-cell office:value-type="float" office:value="32" calcext:value-type="float">
            <text:p>3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30S" calcext:value-type="time">
            <text:p>15:28:30</text:p>
          </table:table-cell>
          <table:table-cell office:value-type="float" office:value="43" calcext:value-type="float">
            <text:p>4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31S" calcext:value-type="time">
            <text:p>15:28:31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33S" calcext:value-type="time">
            <text:p>15:28:33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35S" calcext:value-type="time">
            <text:p>15:28:35</text:p>
          </table:table-cell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36S" calcext:value-type="time">
            <text:p>15:28:36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38S" calcext:value-type="time">
            <text:p>15:28:38</text:p>
          </table:table-cell>
          <table:table-cell office:value-type="float" office:value="22" calcext:value-type="float">
            <text:p>2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40S" calcext:value-type="time">
            <text:p>15:28:4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41S" calcext:value-type="time">
            <text:p>15:28:41</text:p>
          </table:table-cell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43S" calcext:value-type="time">
            <text:p>15:28:43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45S" calcext:value-type="time">
            <text:p>15:28:45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47S" calcext:value-type="time">
            <text:p>15:28:47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48S" calcext:value-type="time">
            <text:p>15:28:48</text:p>
          </table:table-cell>
          <table:table-cell office:value-type="float" office:value="53" calcext:value-type="float">
            <text:p>5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50S" calcext:value-type="time">
            <text:p>15:28:50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52S" calcext:value-type="time">
            <text:p>15:28:52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53S" calcext:value-type="time">
            <text:p>15:28:53</text:p>
          </table:table-cell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55S" calcext:value-type="time">
            <text:p>15:28:55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57S" calcext:value-type="time">
            <text:p>15:28:57</text:p>
          </table:table-cell>
          <table:table-cell office:value-type="float" office:value="32" calcext:value-type="float">
            <text:p>3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59S" calcext:value-type="time">
            <text:p>15:28:59</text:p>
          </table:table-cell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00S" calcext:value-type="time">
            <text:p>15:29:00</text:p>
          </table:table-cell>
          <table:table-cell office:value-type="float" office:value="43" calcext:value-type="float">
            <text:p>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02S" calcext:value-type="time">
            <text:p>15:29:02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04S" calcext:value-type="time">
            <text:p>15:29:04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05S" calcext:value-type="time">
            <text:p>15:29:05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07S" calcext:value-type="time">
            <text:p>15:29:07</text:p>
          </table:table-cell>
          <table:table-cell office:value-type="float" office:value="44" calcext:value-type="float">
            <text:p>4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09S" calcext:value-type="time">
            <text:p>15:29:09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11S" calcext:value-type="time">
            <text:p>15:29:11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12S" calcext:value-type="time">
            <text:p>15:29:12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14S" calcext:value-type="time">
            <text:p>15:29:14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16S" calcext:value-type="time">
            <text:p>15:29:16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17S" calcext:value-type="time">
            <text:p>15:29:17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19S" calcext:value-type="time">
            <text:p>15:29:19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21S" calcext:value-type="time">
            <text:p>15:29:21</text:p>
          </table:table-cell>
          <table:table-cell office:value-type="float" office:value="64" calcext:value-type="float">
            <text:p>6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23S" calcext:value-type="time">
            <text:p>15:29:23</text:p>
          </table:table-cell>
          <table:table-cell office:value-type="float" office:value="42" calcext:value-type="float">
            <text:p>4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24S" calcext:value-type="time">
            <text:p>15:29:24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26S" calcext:value-type="time">
            <text:p>15:29:26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28S" calcext:value-type="time">
            <text:p>15:29:28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29S" calcext:value-type="time">
            <text:p>15:29:29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31S" calcext:value-type="time">
            <text:p>15:29:31</text:p>
          </table:table-cell>
          <table:table-cell office:value-type="float" office:value="26" calcext:value-type="float">
            <text:p>2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33S" calcext:value-type="time">
            <text:p>15:29:33</text:p>
          </table:table-cell>
          <table:table-cell office:value-type="float" office:value="93" calcext:value-type="float">
            <text:p>9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35S" calcext:value-type="time">
            <text:p>15:29:35</text:p>
          </table:table-cell>
          <table:table-cell office:value-type="float" office:value="59" calcext:value-type="float">
            <text:p>5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36S" calcext:value-type="time">
            <text:p>15:29:36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38S" calcext:value-type="time">
            <text:p>15:29:38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40S" calcext:value-type="time">
            <text:p>15:29:40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42S" calcext:value-type="time">
            <text:p>15:29:42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43S" calcext:value-type="time">
            <text:p>15:29:43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45S" calcext:value-type="time">
            <text:p>15:29:45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47S" calcext:value-type="time">
            <text:p>15:29:47</text:p>
          </table:table-cell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48S" calcext:value-type="time">
            <text:p>15:29:48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50S" calcext:value-type="time">
            <text:p>15:29:5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52S" calcext:value-type="time">
            <text:p>15:29:52</text:p>
          </table:table-cell>
          <table:table-cell office:value-type="float" office:value="303" calcext:value-type="float">
            <text:p>30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54S" calcext:value-type="time">
            <text:p>15:29:54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55S" calcext:value-type="time">
            <text:p>15:29:55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57S" calcext:value-type="time">
            <text:p>15:29:57</text:p>
          </table:table-cell>
          <table:table-cell office:value-type="float" office:value="205" calcext:value-type="float">
            <text:p>20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59S" calcext:value-type="time">
            <text:p>15:29:59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01S" calcext:value-type="time">
            <text:p>15:30:0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02S" calcext:value-type="time">
            <text:p>15:30:02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04S" calcext:value-type="time">
            <text:p>15:30:04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06S" calcext:value-type="time">
            <text:p>15:30:06</text:p>
          </table:table-cell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08S" calcext:value-type="time">
            <text:p>15:30:08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09S" calcext:value-type="time">
            <text:p>15:30:09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11S" calcext:value-type="time">
            <text:p>15:30:11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13S" calcext:value-type="time">
            <text:p>15:30:13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15S" calcext:value-type="time">
            <text:p>15:30:15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16S" calcext:value-type="time">
            <text:p>15:30:16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18S" calcext:value-type="time">
            <text:p>15:30:18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20S" calcext:value-type="time">
            <text:p>15:30:20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22S" calcext:value-type="time">
            <text:p>15:30:22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23S" calcext:value-type="time">
            <text:p>15:30:23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25S" calcext:value-type="time">
            <text:p>15:30:25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27S" calcext:value-type="time">
            <text:p>15:30:27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29S" calcext:value-type="time">
            <text:p>15:30:29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30S" calcext:value-type="time">
            <text:p>15:30:30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32S" calcext:value-type="time">
            <text:p>15:30:32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34S" calcext:value-type="time">
            <text:p>15:30:34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36S" calcext:value-type="time">
            <text:p>15:30:36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37S" calcext:value-type="time">
            <text:p>15:30:37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39S" calcext:value-type="time">
            <text:p>15:30:39</text:p>
          </table:table-cell>
          <table:table-cell office:value-type="float" office:value="53" calcext:value-type="float">
            <text:p>5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41S" calcext:value-type="time">
            <text:p>15:30:41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43S" calcext:value-type="time">
            <text:p>15:30:43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44S" calcext:value-type="time">
            <text:p>15:30:44</text:p>
          </table:table-cell>
          <table:table-cell office:value-type="float" office:value="32" calcext:value-type="float">
            <text:p>3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46S" calcext:value-type="time">
            <text:p>15:30:46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48S" calcext:value-type="time">
            <text:p>15:30:48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50S" calcext:value-type="time">
            <text:p>15:30:50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51S" calcext:value-type="time">
            <text:p>15:30:51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53S" calcext:value-type="time">
            <text:p>15:30:53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55S" calcext:value-type="time">
            <text:p>15:30:55</text:p>
          </table:table-cell>
          <table:table-cell office:value-type="float" office:value="89" calcext:value-type="float">
            <text:p>8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57S" calcext:value-type="time">
            <text:p>15:30:57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58S" calcext:value-type="time">
            <text:p>15:30:58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00S" calcext:value-type="time">
            <text:p>15:31:00</text:p>
          </table:table-cell>
          <table:table-cell office:value-type="float" office:value="62" calcext:value-type="float">
            <text:p>6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02S" calcext:value-type="time">
            <text:p>15:31:02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04S" calcext:value-type="time">
            <text:p>15:31:04</text:p>
          </table:table-cell>
          <table:table-cell office:value-type="float" office:value="47" calcext:value-type="float">
            <text:p>4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06S" calcext:value-type="time">
            <text:p>15:31:06</text:p>
          </table:table-cell>
          <table:table-cell office:value-type="float" office:value="333" calcext:value-type="float">
            <text:p>33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07S" calcext:value-type="time">
            <text:p>15:31:07</text:p>
          </table:table-cell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09S" calcext:value-type="time">
            <text:p>15:31:09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11S" calcext:value-type="time">
            <text:p>15:31:11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13S" calcext:value-type="time">
            <text:p>15:31:13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14S" calcext:value-type="time">
            <text:p>15:31:14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16S" calcext:value-type="time">
            <text:p>15:31:16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18S" calcext:value-type="time">
            <text:p>15:31:18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20S" calcext:value-type="time">
            <text:p>15:31:20</text:p>
          </table:table-cell>
          <table:table-cell office:value-type="float" office:value="55" calcext:value-type="float">
            <text:p>5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21S" calcext:value-type="time">
            <text:p>15:31:21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23S" calcext:value-type="time">
            <text:p>15:31:23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25S" calcext:value-type="time">
            <text:p>15:31:25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27S" calcext:value-type="time">
            <text:p>15:31:27</text:p>
          </table:table-cell>
          <table:table-cell office:value-type="float" office:value="40" calcext:value-type="float">
            <text:p>4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29S" calcext:value-type="time">
            <text:p>15:31:29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30S" calcext:value-type="time">
            <text:p>15:31:30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32S" calcext:value-type="time">
            <text:p>15:31:32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34S" calcext:value-type="time">
            <text:p>15:31:34</text:p>
          </table:table-cell>
          <table:table-cell office:value-type="float" office:value="43" calcext:value-type="float">
            <text:p>4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36S" calcext:value-type="time">
            <text:p>15:31:36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37S" calcext:value-type="time">
            <text:p>15:31:37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39S" calcext:value-type="time">
            <text:p>15:31:39</text:p>
          </table:table-cell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41S" calcext:value-type="time">
            <text:p>15:31:41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43S" calcext:value-type="time">
            <text:p>15:31:43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45S" calcext:value-type="time">
            <text:p>15:31:45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46S" calcext:value-type="time">
            <text:p>15:31:46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48S" calcext:value-type="time">
            <text:p>15:31:48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50S" calcext:value-type="time">
            <text:p>15:31:5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52S" calcext:value-type="time">
            <text:p>15:31:52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54S" calcext:value-type="time">
            <text:p>15:31:54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55S" calcext:value-type="time">
            <text:p>15:31:5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57S" calcext:value-type="time">
            <text:p>15:31:57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1M59S" calcext:value-type="time">
            <text:p>15:31:59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01S" calcext:value-type="time">
            <text:p>15:32:01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03S" calcext:value-type="time">
            <text:p>15:32:03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04S" calcext:value-type="time">
            <text:p>15:32:04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06S" calcext:value-type="time">
            <text:p>15:32:06</text:p>
          </table:table-cell>
          <table:table-cell office:value-type="float" office:value="63" calcext:value-type="float">
            <text:p>6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08S" calcext:value-type="time">
            <text:p>15:32:08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10S" calcext:value-type="time">
            <text:p>15:32:1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12S" calcext:value-type="time">
            <text:p>15:32:12</text:p>
          </table:table-cell>
          <table:table-cell office:value-type="float" office:value="216" calcext:value-type="float">
            <text:p>21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13S" calcext:value-type="time">
            <text:p>15:32:13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15S" calcext:value-type="time">
            <text:p>15:32:15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17S" calcext:value-type="time">
            <text:p>15:32:17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19S" calcext:value-type="time">
            <text:p>15:32:19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20S" calcext:value-type="time">
            <text:p>15:32:20</text:p>
          </table:table-cell>
          <table:table-cell office:value-type="float" office:value="82" calcext:value-type="float">
            <text:p>8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22S" calcext:value-type="time">
            <text:p>15:32:22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24S" calcext:value-type="time">
            <text:p>15:32:24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26S" calcext:value-type="time">
            <text:p>15:32:26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28S" calcext:value-type="time">
            <text:p>15:32:28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30S" calcext:value-type="time">
            <text:p>15:32:30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31S" calcext:value-type="time">
            <text:p>15:32:31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33S" calcext:value-type="time">
            <text:p>15:32:33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35S" calcext:value-type="time">
            <text:p>15:32:3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37S" calcext:value-type="time">
            <text:p>15:32:37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39S" calcext:value-type="time">
            <text:p>15:32:39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40S" calcext:value-type="time">
            <text:p>15:32:40</text:p>
          </table:table-cell>
          <table:table-cell office:value-type="float" office:value="63" calcext:value-type="float">
            <text:p>6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42S" calcext:value-type="time">
            <text:p>15:32:42</text:p>
          </table:table-cell>
          <table:table-cell office:value-type="float" office:value="53" calcext:value-type="float">
            <text:p>5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44S" calcext:value-type="time">
            <text:p>15:32:44</text:p>
          </table:table-cell>
          <table:table-cell office:value-type="float" office:value="52" calcext:value-type="float">
            <text:p>5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46S" calcext:value-type="time">
            <text:p>15:32:46</text:p>
          </table:table-cell>
          <table:table-cell office:value-type="float" office:value="161" calcext:value-type="float">
            <text:p>16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48S" calcext:value-type="time">
            <text:p>15:32:48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49S" calcext:value-type="time">
            <text:p>15:32:49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52S" calcext:value-type="time">
            <text:p>15:32:52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54S" calcext:value-type="time">
            <text:p>15:32:54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56S" calcext:value-type="time">
            <text:p>15:32:56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57S" calcext:value-type="time">
            <text:p>15:32:57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2M59S" calcext:value-type="time">
            <text:p>15:32:59</text:p>
          </table:table-cell>
          <table:table-cell office:value-type="float" office:value="77" calcext:value-type="float">
            <text:p>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01S" calcext:value-type="time">
            <text:p>15:33:01</text:p>
          </table:table-cell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03S" calcext:value-type="time">
            <text:p>15:33:03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05S" calcext:value-type="time">
            <text:p>15:33:05</text:p>
          </table:table-cell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07S" calcext:value-type="time">
            <text:p>15:33:07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08S" calcext:value-type="time">
            <text:p>15:33:08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10S" calcext:value-type="time">
            <text:p>15:33:10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12S" calcext:value-type="time">
            <text:p>15:33:12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14S" calcext:value-type="time">
            <text:p>15:33:14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16S" calcext:value-type="time">
            <text:p>15:33:16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17S" calcext:value-type="time">
            <text:p>15:33:17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19S" calcext:value-type="time">
            <text:p>15:33:1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21S" calcext:value-type="time">
            <text:p>15:33:2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23S" calcext:value-type="time">
            <text:p>15:33:23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25S" calcext:value-type="time">
            <text:p>15:33:25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27S" calcext:value-type="time">
            <text:p>15:33:2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28S" calcext:value-type="time">
            <text:p>15:33:28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30S" calcext:value-type="time">
            <text:p>15:33:30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32S" calcext:value-type="time">
            <text:p>15:33:32</text:p>
          </table:table-cell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34S" calcext:value-type="time">
            <text:p>15:33:34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36S" calcext:value-type="time">
            <text:p>15:33:36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38S" calcext:value-type="time">
            <text:p>15:33:38</text:p>
          </table:table-cell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39S" calcext:value-type="time">
            <text:p>15:33:39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41S" calcext:value-type="time">
            <text:p>15:33:41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43S" calcext:value-type="time">
            <text:p>15:33:43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45S" calcext:value-type="time">
            <text:p>15:33:45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47S" calcext:value-type="time">
            <text:p>15:33:47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49S" calcext:value-type="time">
            <text:p>15:33:49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51S" calcext:value-type="time">
            <text:p>15:33:51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52S" calcext:value-type="time">
            <text:p>15:33:52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54S" calcext:value-type="time">
            <text:p>15:33:54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56S" calcext:value-type="time">
            <text:p>15:33:56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3M58S" calcext:value-type="time">
            <text:p>15:33:58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00S" calcext:value-type="time">
            <text:p>15:34:00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02S" calcext:value-type="time">
            <text:p>15:34:02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04S" calcext:value-type="time">
            <text:p>15:34:04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05S" calcext:value-type="time">
            <text:p>15:34:05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07S" calcext:value-type="time">
            <text:p>15:34:07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09S" calcext:value-type="time">
            <text:p>15:34:09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11S" calcext:value-type="time">
            <text:p>15:34:11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13S" calcext:value-type="time">
            <text:p>15:34:13</text:p>
          </table:table-cell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15S" calcext:value-type="time">
            <text:p>15:34:15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16S" calcext:value-type="time">
            <text:p>15:34:16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18S" calcext:value-type="time">
            <text:p>15:34:18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20S" calcext:value-type="time">
            <text:p>15:34:20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22S" calcext:value-type="time">
            <text:p>15:34:22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24S" calcext:value-type="time">
            <text:p>15:34:24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26S" calcext:value-type="time">
            <text:p>15:34:2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28S" calcext:value-type="time">
            <text:p>15:34:28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29S" calcext:value-type="time">
            <text:p>15:34:29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31S" calcext:value-type="time">
            <text:p>15:34:31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33S" calcext:value-type="time">
            <text:p>15:34:33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35S" calcext:value-type="time">
            <text:p>15:34:35</text:p>
          </table:table-cell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37S" calcext:value-type="time">
            <text:p>15:34:37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39S" calcext:value-type="time">
            <text:p>15:34:39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41S" calcext:value-type="time">
            <text:p>15:34:41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43S" calcext:value-type="time">
            <text:p>15:34:43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44S" calcext:value-type="time">
            <text:p>15:34:44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46S" calcext:value-type="time">
            <text:p>15:34:46</text:p>
          </table:table-cell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48S" calcext:value-type="time">
            <text:p>15:34:48</text:p>
          </table:table-cell>
          <table:table-cell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50S" calcext:value-type="time">
            <text:p>15:34:50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52S" calcext:value-type="time">
            <text:p>15:34:52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54S" calcext:value-type="time">
            <text:p>15:34:54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56S" calcext:value-type="time">
            <text:p>15:34:56</text:p>
          </table:table-cell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57S" calcext:value-type="time">
            <text:p>15:34:57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4M59S" calcext:value-type="time">
            <text:p>15:34:59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01S" calcext:value-type="time">
            <text:p>15:35:01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03S" calcext:value-type="time">
            <text:p>15:35:03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05S" calcext:value-type="time">
            <text:p>15:35: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07S" calcext:value-type="time">
            <text:p>15:35:0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09S" calcext:value-type="time">
            <text:p>15:35:09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11S" calcext:value-type="time">
            <text:p>15:35:11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12S" calcext:value-type="time">
            <text:p>15:35:12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14S" calcext:value-type="time">
            <text:p>15:35:1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16S" calcext:value-type="time">
            <text:p>15:35:16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18S" calcext:value-type="time">
            <text:p>15:35:18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20S" calcext:value-type="time">
            <text:p>15:35:20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22S" calcext:value-type="time">
            <text:p>15:35:22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24S" calcext:value-type="time">
            <text:p>15:35:24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26S" calcext:value-type="time">
            <text:p>15:35:2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27S" calcext:value-type="time">
            <text:p>15:35:27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29S" calcext:value-type="time">
            <text:p>15:35:29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31S" calcext:value-type="time">
            <text:p>15:35:31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33S" calcext:value-type="time">
            <text:p>15:35:33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35S" calcext:value-type="time">
            <text:p>15:35:35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37S" calcext:value-type="time">
            <text:p>15:35:37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39S" calcext:value-type="time">
            <text:p>15:35:39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41S" calcext:value-type="time">
            <text:p>15:35:41</text:p>
          </table:table-cell>
          <table:table-cell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43S" calcext:value-type="time">
            <text:p>15:35: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44S" calcext:value-type="time">
            <text:p>15:35:44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46S" calcext:value-type="time">
            <text:p>15:35:46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48S" calcext:value-type="time">
            <text:p>15:35:48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50S" calcext:value-type="time">
            <text:p>15:35:50</text:p>
          </table:table-cell>
          <table:table-cell office:value-type="float" office:value="75" calcext:value-type="float">
            <text:p>7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52S" calcext:value-type="time">
            <text:p>15:35:52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54S" calcext:value-type="time">
            <text:p>15:35:54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56S" calcext:value-type="time">
            <text:p>15:35:56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5M58S" calcext:value-type="time">
            <text:p>15:35:58</text:p>
          </table:table-cell>
          <table:table-cell office:value-type="float" office:value="67" calcext:value-type="float">
            <text:p>6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00S" calcext:value-type="time">
            <text:p>15:36:00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02S" calcext:value-type="time">
            <text:p>15:36:02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03S" calcext:value-type="time">
            <text:p>15:36:03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05S" calcext:value-type="time">
            <text:p>15:36:05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07S" calcext:value-type="time">
            <text:p>15:36:07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09S" calcext:value-type="time">
            <text:p>15:36:09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11S" calcext:value-type="time">
            <text:p>15:36:11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13S" calcext:value-type="time">
            <text:p>15:36:13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15S" calcext:value-type="time">
            <text:p>15:36:15</text:p>
          </table:table-cell>
          <table:table-cell office:value-type="float" office:value="225" calcext:value-type="float">
            <text:p>22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17S" calcext:value-type="time">
            <text:p>15:36:17</text:p>
          </table:table-cell>
          <table:table-cell office:value-type="float" office:value="215" calcext:value-type="float">
            <text:p>21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19S" calcext:value-type="time">
            <text:p>15:36:19</text:p>
          </table:table-cell>
          <table:table-cell office:value-type="float" office:value="161" calcext:value-type="float">
            <text:p>16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21S" calcext:value-type="time">
            <text:p>15:36:21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22S" calcext:value-type="time">
            <text:p>15:36:22</text:p>
          </table:table-cell>
          <table:table-cell office:value-type="float" office:value="147" calcext:value-type="float">
            <text:p>14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24S" calcext:value-type="time">
            <text:p>15:36:24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26S" calcext:value-type="time">
            <text:p>15:36:26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28S" calcext:value-type="time">
            <text:p>15:36:28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30S" calcext:value-type="time">
            <text:p>15:36:30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32S" calcext:value-type="time">
            <text:p>15:36:32</text:p>
          </table:table-cell>
          <table:table-cell office:value-type="float" office:value="176" calcext:value-type="float">
            <text:p>17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34S" calcext:value-type="time">
            <text:p>15:36:34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36S" calcext:value-type="time">
            <text:p>15:36:36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38S" calcext:value-type="time">
            <text:p>15:36:38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40S" calcext:value-type="time">
            <text:p>15:36:40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42S" calcext:value-type="time">
            <text:p>15:36:42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43S" calcext:value-type="time">
            <text:p>15:36:43</text:p>
          </table:table-cell>
          <table:table-cell office:value-type="float" office:value="121" calcext:value-type="float">
            <text:p>12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45S" calcext:value-type="time">
            <text:p>15:36:45</text:p>
          </table:table-cell>
          <table:table-cell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47S" calcext:value-type="time">
            <text:p>15:36:47</text:p>
          </table:table-cell>
          <table:table-cell office:value-type="float" office:value="16" calcext:value-type="float">
            <text:p>1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49S" calcext:value-type="time">
            <text:p>15:36:49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51S" calcext:value-type="time">
            <text:p>15:36:51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53S" calcext:value-type="time">
            <text:p>15:36:53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55S" calcext:value-type="time">
            <text:p>15:36:55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57S" calcext:value-type="time">
            <text:p>15:36:57</text:p>
          </table:table-cell>
          <table:table-cell office:value-type="float" office:value="83" calcext:value-type="float">
            <text:p>8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6M59S" calcext:value-type="time">
            <text:p>15:36:59</text:p>
          </table:table-cell>
          <table:table-cell office:value-type="float" office:value="116" calcext:value-type="float">
            <text:p>11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01S" calcext:value-type="time">
            <text:p>15:37:01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03S" calcext:value-type="time">
            <text:p>15:37:03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05S" calcext:value-type="time">
            <text:p>15:37:05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06S" calcext:value-type="time">
            <text:p>15:37:06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08S" calcext:value-type="time">
            <text:p>15:37:08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10S" calcext:value-type="time">
            <text:p>15:37:10</text:p>
          </table:table-cell>
          <table:table-cell office:value-type="float" office:value="401" calcext:value-type="float">
            <text:p>40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12S" calcext:value-type="time">
            <text:p>15:37:12</text:p>
          </table:table-cell>
          <table:table-cell office:value-type="float" office:value="235" calcext:value-type="float">
            <text:p>23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14S" calcext:value-type="time">
            <text:p>15:37:14</text:p>
          </table:table-cell>
          <table:table-cell office:value-type="float" office:value="36" calcext:value-type="float">
            <text:p>3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16S" calcext:value-type="time">
            <text:p>15:37:16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18S" calcext:value-type="time">
            <text:p>15:37:18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20S" calcext:value-type="time">
            <text:p>15:37:20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22S" calcext:value-type="time">
            <text:p>15:37:2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24S" calcext:value-type="time">
            <text:p>15:37:24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26S" calcext:value-type="time">
            <text:p>15:37:26</text:p>
          </table:table-cell>
          <table:table-cell office:value-type="float" office:value="19" calcext:value-type="float">
            <text:p>1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28S" calcext:value-type="time">
            <text:p>15:37:28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30S" calcext:value-type="time">
            <text:p>15:37:30</text:p>
          </table:table-cell>
          <table:table-cell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32S" calcext:value-type="time">
            <text:p>15:37:32</text:p>
          </table:table-cell>
          <table:table-cell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34S" calcext:value-type="time">
            <text:p>15:37:34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35S" calcext:value-type="time">
            <text:p>15:37:35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37S" calcext:value-type="time">
            <text:p>15:37:37</text:p>
          </table:table-cell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39S" calcext:value-type="time">
            <text:p>15:37:39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41S" calcext:value-type="time">
            <text:p>15:37:41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43S" calcext:value-type="time">
            <text:p>15:37:43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45S" calcext:value-type="time">
            <text:p>15:37:45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47S" calcext:value-type="time">
            <text:p>15:37:47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49S" calcext:value-type="time">
            <text:p>15:37:49</text:p>
          </table:table-cell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51S" calcext:value-type="time">
            <text:p>15:37:51</text:p>
          </table:table-cell>
          <table:table-cell office:value-type="float" office:value="179" calcext:value-type="float">
            <text:p>17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53S" calcext:value-type="time">
            <text:p>15:37:53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55S" calcext:value-type="time">
            <text:p>15:37:55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57S" calcext:value-type="time">
            <text:p>15:37:57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7M59S" calcext:value-type="time">
            <text:p>15:37:59</text:p>
          </table:table-cell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01S" calcext:value-type="time">
            <text:p>15:38:01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03S" calcext:value-type="time">
            <text:p>15:38:03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05S" calcext:value-type="time">
            <text:p>15:38:05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07S" calcext:value-type="time">
            <text:p>15:38:07</text:p>
          </table:table-cell>
          <table:table-cell office:value-type="float" office:value="23" calcext:value-type="float">
            <text:p>2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09S" calcext:value-type="time">
            <text:p>15:38:09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10S" calcext:value-type="time">
            <text:p>15:38:10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12S" calcext:value-type="time">
            <text:p>15:38:12</text:p>
          </table:table-cell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14S" calcext:value-type="time">
            <text:p>15:38:14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16S" calcext:value-type="time">
            <text:p>15:38:16</text:p>
          </table:table-cell>
          <table:table-cell office:value-type="float" office:value="162" calcext:value-type="float">
            <text:p>16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18S" calcext:value-type="time">
            <text:p>15:38:18</text:p>
          </table:table-cell>
          <table:table-cell office:value-type="float" office:value="52" calcext:value-type="float">
            <text:p>5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20S" calcext:value-type="time">
            <text:p>15:38:20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22S" calcext:value-type="time">
            <text:p>15:38:22</text:p>
          </table:table-cell>
          <table:table-cell office:value-type="float" office:value="49" calcext:value-type="float">
            <text:p>4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24S" calcext:value-type="time">
            <text:p>15:38:24</text:p>
          </table:table-cell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26S" calcext:value-type="time">
            <text:p>15:38:26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28S" calcext:value-type="time">
            <text:p>15:38:28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30S" calcext:value-type="time">
            <text:p>15:38:3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32S" calcext:value-type="time">
            <text:p>15:38:32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34S" calcext:value-type="time">
            <text:p>15:38:34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36S" calcext:value-type="time">
            <text:p>15:38:36</text:p>
          </table:table-cell>
          <table:table-cell office:value-type="float" office:value="104" calcext:value-type="float">
            <text:p>10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38S" calcext:value-type="time">
            <text:p>15:38:38</text:p>
          </table:table-cell>
          <table:table-cell office:value-type="float" office:value="180" calcext:value-type="float">
            <text:p>18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40S" calcext:value-type="time">
            <text:p>15:38:4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42S" calcext:value-type="time">
            <text:p>15:38:42</text:p>
          </table:table-cell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44S" calcext:value-type="time">
            <text:p>15:38:44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46S" calcext:value-type="time">
            <text:p>15:38:46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48S" calcext:value-type="time">
            <text:p>15:38:48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50S" calcext:value-type="time">
            <text:p>15:38:50</text:p>
          </table:table-cell>
          <table:table-cell office:value-type="float" office:value="92" calcext:value-type="float">
            <text:p>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52S" calcext:value-type="time">
            <text:p>15:38:52</text:p>
          </table:table-cell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54S" calcext:value-type="time">
            <text:p>15:38:54</text:p>
          </table:table-cell>
          <table:table-cell office:value-type="float" office:value="134" calcext:value-type="float">
            <text:p>13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56S" calcext:value-type="time">
            <text:p>15:38:56</text:p>
          </table:table-cell>
          <table:table-cell office:value-type="float" office:value="201" calcext:value-type="float">
            <text:p>20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8M58S" calcext:value-type="time">
            <text:p>15:38:58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00S" calcext:value-type="time">
            <text:p>15:39:00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01S" calcext:value-type="time">
            <text:p>15:39:01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03S" calcext:value-type="time">
            <text:p>15:39:03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05S" calcext:value-type="time">
            <text:p>15:39:0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07S" calcext:value-type="time">
            <text:p>15:39:07</text:p>
          </table:table-cell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09S" calcext:value-type="time">
            <text:p>15:39:09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11S" calcext:value-type="time">
            <text:p>15:39:11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13S" calcext:value-type="time">
            <text:p>15:39:13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15S" calcext:value-type="time">
            <text:p>15:39:15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17S" calcext:value-type="time">
            <text:p>15:39:17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19S" calcext:value-type="time">
            <text:p>15:39:19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21S" calcext:value-type="time">
            <text:p>15:39:21</text:p>
          </table:table-cell>
          <table:table-cell office:value-type="float" office:value="105" calcext:value-type="float">
            <text:p>10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23S" calcext:value-type="time">
            <text:p>15:39:23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25S" calcext:value-type="time">
            <text:p>15:39:25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27S" calcext:value-type="time">
            <text:p>15:39:27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29S" calcext:value-type="time">
            <text:p>15:39:29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31S" calcext:value-type="time">
            <text:p>15:39:31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33S" calcext:value-type="time">
            <text:p>15:39:33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35S" calcext:value-type="time">
            <text:p>15:39:35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37S" calcext:value-type="time">
            <text:p>15:39:3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39S" calcext:value-type="time">
            <text:p>15:39:39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41S" calcext:value-type="time">
            <text:p>15:39:41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43S" calcext:value-type="time">
            <text:p>15:39:43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45S" calcext:value-type="time">
            <text:p>15:39:45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47S" calcext:value-type="time">
            <text:p>15:39:4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49S" calcext:value-type="time">
            <text:p>15:39:4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51S" calcext:value-type="time">
            <text:p>15:39:51</text:p>
          </table:table-cell>
          <table:table-cell office:value-type="float" office:value="143" calcext:value-type="float">
            <text:p>14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53S" calcext:value-type="time">
            <text:p>15:39:53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55S" calcext:value-type="time">
            <text:p>15:39:55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57S" calcext:value-type="time">
            <text:p>15:39:5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9M59S" calcext:value-type="time">
            <text:p>15:39:59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01S" calcext:value-type="time">
            <text:p>15:40:0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03S" calcext:value-type="time">
            <text:p>15:40:03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05S" calcext:value-type="time">
            <text:p>15:40:05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07S" calcext:value-type="time">
            <text:p>15:40:07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09S" calcext:value-type="time">
            <text:p>15:40:09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11S" calcext:value-type="time">
            <text:p>15:40:11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13S" calcext:value-type="time">
            <text:p>15:40:13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15S" calcext:value-type="time">
            <text:p>15:40:15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17S" calcext:value-type="time">
            <text:p>15:40:17</text:p>
          </table:table-cell>
          <table:table-cell office:value-type="float" office:value="174" calcext:value-type="float">
            <text:p>17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19S" calcext:value-type="time">
            <text:p>15:40:19</text:p>
          </table:table-cell>
          <table:table-cell office:value-type="float" office:value="188" calcext:value-type="float">
            <text:p>18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21S" calcext:value-type="time">
            <text:p>15:40:2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23S" calcext:value-type="time">
            <text:p>15:40:23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25S" calcext:value-type="time">
            <text:p>15:40:25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27S" calcext:value-type="time">
            <text:p>15:40:27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29S" calcext:value-type="time">
            <text:p>15:40:29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31S" calcext:value-type="time">
            <text:p>15:40:31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33S" calcext:value-type="time">
            <text:p>15:40:33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35S" calcext:value-type="time">
            <text:p>15:40:35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37S" calcext:value-type="time">
            <text:p>15:40:3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39S" calcext:value-type="time">
            <text:p>15:40:39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41S" calcext:value-type="time">
            <text:p>15:40:41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43S" calcext:value-type="time">
            <text:p>15:40:43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45S" calcext:value-type="time">
            <text:p>15:40:45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47S" calcext:value-type="time">
            <text:p>15:40:47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49S" calcext:value-type="time">
            <text:p>15:40:49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51S" calcext:value-type="time">
            <text:p>15:40:51</text:p>
          </table:table-cell>
          <table:table-cell office:value-type="float" office:value="176" calcext:value-type="float">
            <text:p>17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53S" calcext:value-type="time">
            <text:p>15:40:53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55S" calcext:value-type="time">
            <text:p>15:40:55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57S" calcext:value-type="time">
            <text:p>15:40:57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0M59S" calcext:value-type="time">
            <text:p>15:40:59</text:p>
          </table:table-cell>
          <table:table-cell office:value-type="float" office:value="121" calcext:value-type="float">
            <text:p>12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01S" calcext:value-type="time">
            <text:p>15:41:01</text:p>
          </table:table-cell>
          <table:table-cell office:value-type="float" office:value="25" calcext:value-type="float">
            <text:p>2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03S" calcext:value-type="time">
            <text:p>15:41:03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05S" calcext:value-type="time">
            <text:p>15:41:05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07S" calcext:value-type="time">
            <text:p>15:41:07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09S" calcext:value-type="time">
            <text:p>15:41:0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11S" calcext:value-type="time">
            <text:p>15:41:11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13S" calcext:value-type="time">
            <text:p>15:41:13</text:p>
          </table:table-cell>
          <table:table-cell office:value-type="float" office:value="33" calcext:value-type="float">
            <text:p>3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15S" calcext:value-type="time">
            <text:p>15:41:15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17S" calcext:value-type="time">
            <text:p>15:41:17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20S" calcext:value-type="time">
            <text:p>15:41:20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22S" calcext:value-type="time">
            <text:p>15:41:22</text:p>
          </table:table-cell>
          <table:table-cell office:value-type="float" office:value="281" calcext:value-type="float">
            <text:p>28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24S" calcext:value-type="time">
            <text:p>15:41:24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26S" calcext:value-type="time">
            <text:p>15:41:26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28S" calcext:value-type="time">
            <text:p>15:41:28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30S" calcext:value-type="time">
            <text:p>15:41:30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32S" calcext:value-type="time">
            <text:p>15:41:32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34S" calcext:value-type="time">
            <text:p>15:41:34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36S" calcext:value-type="time">
            <text:p>15:41:36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38S" calcext:value-type="time">
            <text:p>15:41:38</text:p>
          </table:table-cell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40S" calcext:value-type="time">
            <text:p>15:41:40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42S" calcext:value-type="time">
            <text:p>15:41:42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44S" calcext:value-type="time">
            <text:p>15:41:44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46S" calcext:value-type="time">
            <text:p>15:41:46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48S" calcext:value-type="time">
            <text:p>15:41:48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50S" calcext:value-type="time">
            <text:p>15:41:50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52S" calcext:value-type="time">
            <text:p>15:41:52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54S" calcext:value-type="time">
            <text:p>15:41:54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57S" calcext:value-type="time">
            <text:p>15:41:57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1M59S" calcext:value-type="time">
            <text:p>15:41:59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01S" calcext:value-type="time">
            <text:p>15:42:01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03S" calcext:value-type="time">
            <text:p>15:42:03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05S" calcext:value-type="time">
            <text:p>15:42:05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07S" calcext:value-type="time">
            <text:p>15:42:07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09S" calcext:value-type="time">
            <text:p>15:42:09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11S" calcext:value-type="time">
            <text:p>15:42:11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13S" calcext:value-type="time">
            <text:p>15:42:13</text:p>
          </table:table-cell>
          <table:table-cell office:value-type="float" office:value="400" calcext:value-type="float">
            <text:p>40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15S" calcext:value-type="time">
            <text:p>15:42:15</text:p>
          </table:table-cell>
          <table:table-cell office:value-type="float" office:value="426" calcext:value-type="float">
            <text:p>42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17S" calcext:value-type="time">
            <text:p>15:42:17</text:p>
          </table:table-cell>
          <table:table-cell office:value-type="float" office:value="508" calcext:value-type="float">
            <text:p>50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19S" calcext:value-type="time">
            <text:p>15:42:19</text:p>
          </table:table-cell>
          <table:table-cell office:value-type="float" office:value="259" calcext:value-type="float">
            <text:p>25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21S" calcext:value-type="time">
            <text:p>15:42:21</text:p>
          </table:table-cell>
          <table:table-cell office:value-type="float" office:value="526" calcext:value-type="float">
            <text:p>52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23S" calcext:value-type="time">
            <text:p>15:42:23</text:p>
          </table:table-cell>
          <table:table-cell office:value-type="float" office:value="438" calcext:value-type="float">
            <text:p>438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26S" calcext:value-type="time">
            <text:p>15:42:26</text:p>
          </table:table-cell>
          <table:table-cell office:value-type="float" office:value="478" calcext:value-type="float">
            <text:p>47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28S" calcext:value-type="time">
            <text:p>15:42:28</text:p>
          </table:table-cell>
          <table:table-cell office:value-type="float" office:value="486" calcext:value-type="float">
            <text:p>48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30S" calcext:value-type="time">
            <text:p>15:42:30</text:p>
          </table:table-cell>
          <table:table-cell office:value-type="float" office:value="358" calcext:value-type="float">
            <text:p>35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32S" calcext:value-type="time">
            <text:p>15:42:32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34S" calcext:value-type="time">
            <text:p>15:42:34</text:p>
          </table:table-cell>
          <table:table-cell office:value-type="float" office:value="413" calcext:value-type="float">
            <text:p>41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36S" calcext:value-type="time">
            <text:p>15:42:36</text:p>
          </table:table-cell>
          <table:table-cell office:value-type="float" office:value="412" calcext:value-type="float">
            <text:p>41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38S" calcext:value-type="time">
            <text:p>15:42:38</text:p>
          </table:table-cell>
          <table:table-cell office:value-type="float" office:value="443" calcext:value-type="float">
            <text:p>44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40S" calcext:value-type="time">
            <text:p>15:42:40</text:p>
          </table:table-cell>
          <table:table-cell office:value-type="float" office:value="308" calcext:value-type="float">
            <text:p>30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42S" calcext:value-type="time">
            <text:p>15:42:42</text:p>
          </table:table-cell>
          <table:table-cell office:value-type="float" office:value="566" calcext:value-type="float">
            <text:p>5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44S" calcext:value-type="time">
            <text:p>15:42:44</text:p>
          </table:table-cell>
          <table:table-cell office:value-type="float" office:value="278" calcext:value-type="float">
            <text:p>27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46S" calcext:value-type="time">
            <text:p>15:42:46</text:p>
          </table:table-cell>
          <table:table-cell office:value-type="float" office:value="355" calcext:value-type="float">
            <text:p>35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48S" calcext:value-type="time">
            <text:p>15:42:48</text:p>
          </table:table-cell>
          <table:table-cell office:value-type="float" office:value="615" calcext:value-type="float">
            <text:p>61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51S" calcext:value-type="time">
            <text:p>15:42:51</text:p>
          </table:table-cell>
          <table:table-cell office:value-type="float" office:value="562" calcext:value-type="float">
            <text:p>56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53S" calcext:value-type="time">
            <text:p>15:42:53</text:p>
          </table:table-cell>
          <table:table-cell office:value-type="float" office:value="285" calcext:value-type="float">
            <text:p>28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55S" calcext:value-type="time">
            <text:p>15:42:55</text:p>
          </table:table-cell>
          <table:table-cell office:value-type="float" office:value="329" calcext:value-type="float">
            <text:p>32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57S" calcext:value-type="time">
            <text:p>15:42:57</text:p>
          </table:table-cell>
          <table:table-cell office:value-type="float" office:value="353" calcext:value-type="float">
            <text:p>35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59S" calcext:value-type="time">
            <text:p>15:42:59</text:p>
          </table:table-cell>
          <table:table-cell office:value-type="float" office:value="279" calcext:value-type="float">
            <text:p>27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01S" calcext:value-type="time">
            <text:p>15:43:01</text:p>
          </table:table-cell>
          <table:table-cell office:value-type="float" office:value="469" calcext:value-type="float">
            <text:p>46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03S" calcext:value-type="time">
            <text:p>15:43:03</text:p>
          </table:table-cell>
          <table:table-cell office:value-type="float" office:value="818" calcext:value-type="float">
            <text:p>81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05S" calcext:value-type="time">
            <text:p>15:43:05</text:p>
          </table:table-cell>
          <table:table-cell office:value-type="float" office:value="378" calcext:value-type="float">
            <text:p>37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07S" calcext:value-type="time">
            <text:p>15:43:07</text:p>
          </table:table-cell>
          <table:table-cell office:value-type="float" office:value="531" calcext:value-type="float">
            <text:p>53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09S" calcext:value-type="time">
            <text:p>15:43:09</text:p>
          </table:table-cell>
          <table:table-cell office:value-type="float" office:value="410" calcext:value-type="float">
            <text:p>41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11S" calcext:value-type="time">
            <text:p>15:43:11</text:p>
          </table:table-cell>
          <table:table-cell office:value-type="float" office:value="617" calcext:value-type="float">
            <text:p>61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14S" calcext:value-type="time">
            <text:p>15:43:14</text:p>
          </table:table-cell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16S" calcext:value-type="time">
            <text:p>15:43:16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18S" calcext:value-type="time">
            <text:p>15:43:18</text:p>
          </table:table-cell>
          <table:table-cell office:value-type="float" office:value="321" calcext:value-type="float">
            <text:p>32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20S" calcext:value-type="time">
            <text:p>15:43:20</text:p>
          </table:table-cell>
          <table:table-cell office:value-type="float" office:value="602" calcext:value-type="float">
            <text:p>60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22S" calcext:value-type="time">
            <text:p>15:43:22</text:p>
          </table:table-cell>
          <table:table-cell office:value-type="float" office:value="581" calcext:value-type="float">
            <text:p>58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24S" calcext:value-type="time">
            <text:p>15:43:24</text:p>
          </table:table-cell>
          <table:table-cell office:value-type="float" office:value="378" calcext:value-type="float">
            <text:p>37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26S" calcext:value-type="time">
            <text:p>15:43:26</text:p>
          </table:table-cell>
          <table:table-cell office:value-type="float" office:value="442" calcext:value-type="float">
            <text:p>44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28S" calcext:value-type="time">
            <text:p>15:43:28</text:p>
          </table:table-cell>
          <table:table-cell office:value-type="float" office:value="570" calcext:value-type="float">
            <text:p>57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30S" calcext:value-type="time">
            <text:p>15:43:30</text:p>
          </table:table-cell>
          <table:table-cell office:value-type="float" office:value="604" calcext:value-type="float">
            <text:p>60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32S" calcext:value-type="time">
            <text:p>15:43:32</text:p>
          </table:table-cell>
          <table:table-cell office:value-type="float" office:value="472" calcext:value-type="float">
            <text:p>47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35S" calcext:value-type="time">
            <text:p>15:43:35</text:p>
          </table:table-cell>
          <table:table-cell office:value-type="float" office:value="569" calcext:value-type="float">
            <text:p>56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37S" calcext:value-type="time">
            <text:p>15:43:37</text:p>
          </table:table-cell>
          <table:table-cell office:value-type="float" office:value="516" calcext:value-type="float">
            <text:p>51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39S" calcext:value-type="time">
            <text:p>15:43:39</text:p>
          </table:table-cell>
          <table:table-cell office:value-type="float" office:value="462" calcext:value-type="float">
            <text:p>46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41S" calcext:value-type="time">
            <text:p>15:43:41</text:p>
          </table:table-cell>
          <table:table-cell office:value-type="float" office:value="362" calcext:value-type="float">
            <text:p>36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43S" calcext:value-type="time">
            <text:p>15:43:43</text:p>
          </table:table-cell>
          <table:table-cell office:value-type="float" office:value="449" calcext:value-type="float">
            <text:p>44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45S" calcext:value-type="time">
            <text:p>15:43:45</text:p>
          </table:table-cell>
          <table:table-cell office:value-type="float" office:value="455" calcext:value-type="float">
            <text:p>45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47S" calcext:value-type="time">
            <text:p>15:43:47</text:p>
          </table:table-cell>
          <table:table-cell office:value-type="float" office:value="530" calcext:value-type="float">
            <text:p>53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49S" calcext:value-type="time">
            <text:p>15:43:49</text:p>
          </table:table-cell>
          <table:table-cell office:value-type="float" office:value="515" calcext:value-type="float">
            <text:p>51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51S" calcext:value-type="time">
            <text:p>15:43:51</text:p>
          </table:table-cell>
          <table:table-cell office:value-type="float" office:value="626" calcext:value-type="float">
            <text:p>62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54S" calcext:value-type="time">
            <text:p>15:43:54</text:p>
          </table:table-cell>
          <table:table-cell office:value-type="float" office:value="535" calcext:value-type="float">
            <text:p>53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56S" calcext:value-type="time">
            <text:p>15:43:56</text:p>
          </table:table-cell>
          <table:table-cell office:value-type="float" office:value="422" calcext:value-type="float">
            <text:p>42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58S" calcext:value-type="time">
            <text:p>15:43:58</text:p>
          </table:table-cell>
          <table:table-cell office:value-type="float" office:value="688" calcext:value-type="float">
            <text:p>68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00S" calcext:value-type="time">
            <text:p>15:44:00</text:p>
          </table:table-cell>
          <table:table-cell office:value-type="float" office:value="658" calcext:value-type="float">
            <text:p>65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02S" calcext:value-type="time">
            <text:p>15:44:02</text:p>
          </table:table-cell>
          <table:table-cell office:value-type="float" office:value="603" calcext:value-type="float">
            <text:p>60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04S" calcext:value-type="time">
            <text:p>15:44:04</text:p>
          </table:table-cell>
          <table:table-cell office:value-type="float" office:value="500" calcext:value-type="float">
            <text:p>50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06S" calcext:value-type="time">
            <text:p>15:44:06</text:p>
          </table:table-cell>
          <table:table-cell office:value-type="float" office:value="355" calcext:value-type="float">
            <text:p>3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08S" calcext:value-type="time">
            <text:p>15:44:08</text:p>
          </table:table-cell>
          <table:table-cell office:value-type="float" office:value="394" calcext:value-type="float">
            <text:p>39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10S" calcext:value-type="time">
            <text:p>15:44:10</text:p>
          </table:table-cell>
          <table:table-cell office:value-type="float" office:value="460" calcext:value-type="float">
            <text:p>46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13S" calcext:value-type="time">
            <text:p>15:44:13</text:p>
          </table:table-cell>
          <table:table-cell office:value-type="float" office:value="404" calcext:value-type="float">
            <text:p>40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15S" calcext:value-type="time">
            <text:p>15:44:15</text:p>
          </table:table-cell>
          <table:table-cell office:value-type="float" office:value="324" calcext:value-type="float">
            <text:p>32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17S" calcext:value-type="time">
            <text:p>15:44:17</text:p>
          </table:table-cell>
          <table:table-cell office:value-type="float" office:value="503" calcext:value-type="float">
            <text:p>50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19S" calcext:value-type="time">
            <text:p>15:44:19</text:p>
          </table:table-cell>
          <table:table-cell office:value-type="float" office:value="255" calcext:value-type="float">
            <text:p>25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21S" calcext:value-type="time">
            <text:p>15:44:21</text:p>
          </table:table-cell>
          <table:table-cell office:value-type="float" office:value="517" calcext:value-type="float">
            <text:p>51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23S" calcext:value-type="time">
            <text:p>15:44:23</text:p>
          </table:table-cell>
          <table:table-cell office:value-type="float" office:value="506" calcext:value-type="float">
            <text:p>50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25S" calcext:value-type="time">
            <text:p>15:44:25</text:p>
          </table:table-cell>
          <table:table-cell office:value-type="float" office:value="553" calcext:value-type="float">
            <text:p>55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27S" calcext:value-type="time">
            <text:p>15:44:27</text:p>
          </table:table-cell>
          <table:table-cell office:value-type="float" office:value="427" calcext:value-type="float">
            <text:p>42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30S" calcext:value-type="time">
            <text:p>15:44:30</text:p>
          </table:table-cell>
          <table:table-cell office:value-type="float" office:value="497" calcext:value-type="float">
            <text:p>49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32S" calcext:value-type="time">
            <text:p>15:44:32</text:p>
          </table:table-cell>
          <table:table-cell office:value-type="float" office:value="356" calcext:value-type="float">
            <text:p>3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34S" calcext:value-type="time">
            <text:p>15:44:34</text:p>
          </table:table-cell>
          <table:table-cell office:value-type="float" office:value="348" calcext:value-type="float">
            <text:p>34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36S" calcext:value-type="time">
            <text:p>15:44:36</text:p>
          </table:table-cell>
          <table:table-cell office:value-type="float" office:value="491" calcext:value-type="float">
            <text:p>49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38S" calcext:value-type="time">
            <text:p>15:44:38</text:p>
          </table:table-cell>
          <table:table-cell office:value-type="float" office:value="508" calcext:value-type="float">
            <text:p>50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40S" calcext:value-type="time">
            <text:p>15:44:40</text:p>
          </table:table-cell>
          <table:table-cell office:value-type="float" office:value="550" calcext:value-type="float">
            <text:p>55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42S" calcext:value-type="time">
            <text:p>15:44:42</text:p>
          </table:table-cell>
          <table:table-cell office:value-type="float" office:value="547" calcext:value-type="float">
            <text:p>54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44S" calcext:value-type="time">
            <text:p>15:44:44</text:p>
          </table:table-cell>
          <table:table-cell office:value-type="float" office:value="575" calcext:value-type="float">
            <text:p>57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47S" calcext:value-type="time">
            <text:p>15:44:47</text:p>
          </table:table-cell>
          <table:table-cell office:value-type="float" office:value="523" calcext:value-type="float">
            <text:p>52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49S" calcext:value-type="time">
            <text:p>15:44:49</text:p>
          </table:table-cell>
          <table:table-cell office:value-type="float" office:value="453" calcext:value-type="float">
            <text:p>45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51S" calcext:value-type="time">
            <text:p>15:44:51</text:p>
          </table:table-cell>
          <table:table-cell office:value-type="float" office:value="417" calcext:value-type="float">
            <text:p>41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53S" calcext:value-type="time">
            <text:p>15:44:53</text:p>
          </table:table-cell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55S" calcext:value-type="time">
            <text:p>15:44:55</text:p>
          </table:table-cell>
          <table:table-cell office:value-type="float" office:value="394" calcext:value-type="float">
            <text:p>39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57S" calcext:value-type="time">
            <text:p>15:44:57</text:p>
          </table:table-cell>
          <table:table-cell office:value-type="float" office:value="508" calcext:value-type="float">
            <text:p>50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59S" calcext:value-type="time">
            <text:p>15:44:59</text:p>
          </table:table-cell>
          <table:table-cell office:value-type="float" office:value="277" calcext:value-type="float">
            <text:p>27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02S" calcext:value-type="time">
            <text:p>15:45:02</text:p>
          </table:table-cell>
          <table:table-cell office:value-type="float" office:value="577" calcext:value-type="float">
            <text:p>57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04S" calcext:value-type="time">
            <text:p>15:45:04</text:p>
          </table:table-cell>
          <table:table-cell office:value-type="float" office:value="529" calcext:value-type="float">
            <text:p>52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06S" calcext:value-type="time">
            <text:p>15:45:06</text:p>
          </table:table-cell>
          <table:table-cell office:value-type="float" office:value="465" calcext:value-type="float">
            <text:p>46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08S" calcext:value-type="time">
            <text:p>15:45:08</text:p>
          </table:table-cell>
          <table:table-cell office:value-type="float" office:value="493" calcext:value-type="float">
            <text:p>49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10S" calcext:value-type="time">
            <text:p>15:45:10</text:p>
          </table:table-cell>
          <table:table-cell office:value-type="float" office:value="636" calcext:value-type="float">
            <text:p>63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12S" calcext:value-type="time">
            <text:p>15:45:12</text:p>
          </table:table-cell>
          <table:table-cell office:value-type="float" office:value="444" calcext:value-type="float">
            <text:p>44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14S" calcext:value-type="time">
            <text:p>15:45:14</text:p>
          </table:table-cell>
          <table:table-cell office:value-type="float" office:value="545" calcext:value-type="float">
            <text:p>54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17S" calcext:value-type="time">
            <text:p>15:45:17</text:p>
          </table:table-cell>
          <table:table-cell office:value-type="float" office:value="422" calcext:value-type="float">
            <text:p>42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19S" calcext:value-type="time">
            <text:p>15:45:19</text:p>
          </table:table-cell>
          <table:table-cell office:value-type="float" office:value="671" calcext:value-type="float">
            <text:p>67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21S" calcext:value-type="time">
            <text:p>15:45:21</text:p>
          </table:table-cell>
          <table:table-cell office:value-type="float" office:value="402" calcext:value-type="float">
            <text:p>40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23S" calcext:value-type="time">
            <text:p>15:45:23</text:p>
          </table:table-cell>
          <table:table-cell office:value-type="float" office:value="550" calcext:value-type="float">
            <text:p>55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25S" calcext:value-type="time">
            <text:p>15:45:25</text:p>
          </table:table-cell>
          <table:table-cell office:value-type="float" office:value="540" calcext:value-type="float">
            <text:p>54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27S" calcext:value-type="time">
            <text:p>15:45:27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29S" calcext:value-type="time">
            <text:p>15:45:29</text:p>
          </table:table-cell>
          <table:table-cell office:value-type="float" office:value="404" calcext:value-type="float">
            <text:p>40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32S" calcext:value-type="time">
            <text:p>15:45:32</text:p>
          </table:table-cell>
          <table:table-cell office:value-type="float" office:value="337" calcext:value-type="float">
            <text:p>33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34S" calcext:value-type="time">
            <text:p>15:45:34</text:p>
          </table:table-cell>
          <table:table-cell office:value-type="float" office:value="720" calcext:value-type="float">
            <text:p>72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36S" calcext:value-type="time">
            <text:p>15:45:36</text:p>
          </table:table-cell>
          <table:table-cell office:value-type="float" office:value="436" calcext:value-type="float">
            <text:p>43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38S" calcext:value-type="time">
            <text:p>15:45:38</text:p>
          </table:table-cell>
          <table:table-cell office:value-type="float" office:value="588" calcext:value-type="float">
            <text:p>58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40S" calcext:value-type="time">
            <text:p>15:45:40</text:p>
          </table:table-cell>
          <table:table-cell office:value-type="float" office:value="451" calcext:value-type="float">
            <text:p>45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42S" calcext:value-type="time">
            <text:p>15:45:42</text:p>
          </table:table-cell>
          <table:table-cell office:value-type="float" office:value="444" calcext:value-type="float">
            <text:p>44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45S" calcext:value-type="time">
            <text:p>15:45:45</text:p>
          </table:table-cell>
          <table:table-cell office:value-type="float" office:value="525" calcext:value-type="float">
            <text:p>52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47S" calcext:value-type="time">
            <text:p>15:45:47</text:p>
          </table:table-cell>
          <table:table-cell office:value-type="float" office:value="719" calcext:value-type="float">
            <text:p>71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49S" calcext:value-type="time">
            <text:p>15:45:49</text:p>
          </table:table-cell>
          <table:table-cell office:value-type="float" office:value="562" calcext:value-type="float">
            <text:p>56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51S" calcext:value-type="time">
            <text:p>15:45:51</text:p>
          </table:table-cell>
          <table:table-cell office:value-type="float" office:value="506" calcext:value-type="float">
            <text:p>50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53S" calcext:value-type="time">
            <text:p>15:45:53</text:p>
          </table:table-cell>
          <table:table-cell office:value-type="float" office:value="452" calcext:value-type="float">
            <text:p>45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55S" calcext:value-type="time">
            <text:p>15:45:55</text:p>
          </table:table-cell>
          <table:table-cell office:value-type="float" office:value="423" calcext:value-type="float">
            <text:p>42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57S" calcext:value-type="time">
            <text:p>15:45:57</text:p>
          </table:table-cell>
          <table:table-cell office:value-type="float" office:value="543" calcext:value-type="float">
            <text:p>54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00S" calcext:value-type="time">
            <text:p>15:46:00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02S" calcext:value-type="time">
            <text:p>15:46:02</text:p>
          </table:table-cell>
          <table:table-cell office:value-type="float" office:value="302" calcext:value-type="float">
            <text:p>30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04S" calcext:value-type="time">
            <text:p>15:46:04</text:p>
          </table:table-cell>
          <table:table-cell office:value-type="float" office:value="418" calcext:value-type="float">
            <text:p>41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06S" calcext:value-type="time">
            <text:p>15:46:06</text:p>
          </table:table-cell>
          <table:table-cell office:value-type="float" office:value="433" calcext:value-type="float">
            <text:p>43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08S" calcext:value-type="time">
            <text:p>15:46:08</text:p>
          </table:table-cell>
          <table:table-cell office:value-type="float" office:value="361" calcext:value-type="float">
            <text:p>36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10S" calcext:value-type="time">
            <text:p>15:46:10</text:p>
          </table:table-cell>
          <table:table-cell office:value-type="float" office:value="435" calcext:value-type="float">
            <text:p>43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13S" calcext:value-type="time">
            <text:p>15:46:13</text:p>
          </table:table-cell>
          <table:table-cell office:value-type="float" office:value="458" calcext:value-type="float">
            <text:p>45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15S" calcext:value-type="time">
            <text:p>15:46:15</text:p>
          </table:table-cell>
          <table:table-cell office:value-type="float" office:value="581" calcext:value-type="float">
            <text:p>58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17S" calcext:value-type="time">
            <text:p>15:46:17</text:p>
          </table:table-cell>
          <table:table-cell office:value-type="float" office:value="688" calcext:value-type="float">
            <text:p>68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19S" calcext:value-type="time">
            <text:p>15:46:19</text:p>
          </table:table-cell>
          <table:table-cell office:value-type="float" office:value="533" calcext:value-type="float">
            <text:p>53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21S" calcext:value-type="time">
            <text:p>15:46:21</text:p>
          </table:table-cell>
          <table:table-cell office:value-type="float" office:value="591" calcext:value-type="float">
            <text:p>59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23S" calcext:value-type="time">
            <text:p>15:46:23</text:p>
          </table:table-cell>
          <table:table-cell office:value-type="float" office:value="622" calcext:value-type="float">
            <text:p>62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26S" calcext:value-type="time">
            <text:p>15:46:26</text:p>
          </table:table-cell>
          <table:table-cell office:value-type="float" office:value="516" calcext:value-type="float">
            <text:p>51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28S" calcext:value-type="time">
            <text:p>15:46:28</text:p>
          </table:table-cell>
          <table:table-cell office:value-type="float" office:value="611" calcext:value-type="float">
            <text:p>61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30S" calcext:value-type="time">
            <text:p>15:46:30</text:p>
          </table:table-cell>
          <table:table-cell office:value-type="float" office:value="440" calcext:value-type="float">
            <text:p>44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32S" calcext:value-type="time">
            <text:p>15:46:32</text:p>
          </table:table-cell>
          <table:table-cell office:value-type="float" office:value="357" calcext:value-type="float">
            <text:p>35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34S" calcext:value-type="time">
            <text:p>15:46:34</text:p>
          </table:table-cell>
          <table:table-cell office:value-type="float" office:value="452" calcext:value-type="float">
            <text:p>45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36S" calcext:value-type="time">
            <text:p>15:46:36</text:p>
          </table:table-cell>
          <table:table-cell office:value-type="float" office:value="652" calcext:value-type="float">
            <text:p>65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39S" calcext:value-type="time">
            <text:p>15:46:39</text:p>
          </table:table-cell>
          <table:table-cell office:value-type="float" office:value="302" calcext:value-type="float">
            <text:p>30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41S" calcext:value-type="time">
            <text:p>15:46:41</text:p>
          </table:table-cell>
          <table:table-cell office:value-type="float" office:value="484" calcext:value-type="float">
            <text:p>48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43S" calcext:value-type="time">
            <text:p>15:46:43</text:p>
          </table:table-cell>
          <table:table-cell office:value-type="float" office:value="434" calcext:value-type="float">
            <text:p>43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45S" calcext:value-type="time">
            <text:p>15:46:45</text:p>
          </table:table-cell>
          <table:table-cell office:value-type="float" office:value="523" calcext:value-type="float">
            <text:p>52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47S" calcext:value-type="time">
            <text:p>15:46:47</text:p>
          </table:table-cell>
          <table:table-cell office:value-type="float" office:value="340" calcext:value-type="float">
            <text:p>34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50S" calcext:value-type="time">
            <text:p>15:46:50</text:p>
          </table:table-cell>
          <table:table-cell office:value-type="float" office:value="269" calcext:value-type="float">
            <text:p>26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52S" calcext:value-type="time">
            <text:p>15:46:52</text:p>
          </table:table-cell>
          <table:table-cell office:value-type="float" office:value="462" calcext:value-type="float">
            <text:p>46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54S" calcext:value-type="time">
            <text:p>15:46:54</text:p>
          </table:table-cell>
          <table:table-cell office:value-type="float" office:value="665" calcext:value-type="float">
            <text:p>66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56S" calcext:value-type="time">
            <text:p>15:46:56</text:p>
          </table:table-cell>
          <table:table-cell office:value-type="float" office:value="468" calcext:value-type="float">
            <text:p>46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58S" calcext:value-type="time">
            <text:p>15:46:58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00S" calcext:value-type="time">
            <text:p>15:47:00</text:p>
          </table:table-cell>
          <table:table-cell office:value-type="float" office:value="321" calcext:value-type="float">
            <text:p>32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03S" calcext:value-type="time">
            <text:p>15:47:03</text:p>
          </table:table-cell>
          <table:table-cell office:value-type="float" office:value="491" calcext:value-type="float">
            <text:p>49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05S" calcext:value-type="time">
            <text:p>15:47:05</text:p>
          </table:table-cell>
          <table:table-cell office:value-type="float" office:value="622" calcext:value-type="float">
            <text:p>6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07S" calcext:value-type="time">
            <text:p>15:47:07</text:p>
          </table:table-cell>
          <table:table-cell office:value-type="float" office:value="941" calcext:value-type="float">
            <text:p>94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09S" calcext:value-type="time">
            <text:p>15:47:09</text:p>
          </table:table-cell>
          <table:table-cell office:value-type="float" office:value="259" calcext:value-type="float">
            <text:p>25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11S" calcext:value-type="time">
            <text:p>15:47:11</text:p>
          </table:table-cell>
          <table:table-cell office:value-type="float" office:value="452" calcext:value-type="float">
            <text:p>45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14S" calcext:value-type="time">
            <text:p>15:47:14</text:p>
          </table:table-cell>
          <table:table-cell office:value-type="float" office:value="561" calcext:value-type="float">
            <text:p>56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16S" calcext:value-type="time">
            <text:p>15:47:16</text:p>
          </table:table-cell>
          <table:table-cell office:value-type="float" office:value="669" calcext:value-type="float">
            <text:p>66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18S" calcext:value-type="time">
            <text:p>15:47:18</text:p>
          </table:table-cell>
          <table:table-cell office:value-type="float" office:value="767" calcext:value-type="float">
            <text:p>76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20S" calcext:value-type="time">
            <text:p>15:47:20</text:p>
          </table:table-cell>
          <table:table-cell office:value-type="float" office:value="734" calcext:value-type="float">
            <text:p>73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22S" calcext:value-type="time">
            <text:p>15:47:22</text:p>
          </table:table-cell>
          <table:table-cell office:value-type="float" office:value="797" calcext:value-type="float">
            <text:p>7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24S" calcext:value-type="time">
            <text:p>15:47:24</text:p>
          </table:table-cell>
          <table:table-cell office:value-type="float" office:value="782" calcext:value-type="float">
            <text:p>78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27S" calcext:value-type="time">
            <text:p>15:47:27</text:p>
          </table:table-cell>
          <table:table-cell office:value-type="float" office:value="866" calcext:value-type="float">
            <text:p>8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29S" calcext:value-type="time">
            <text:p>15:47:29</text:p>
          </table:table-cell>
          <table:table-cell office:value-type="float" office:value="854" calcext:value-type="float">
            <text:p>85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31S" calcext:value-type="time">
            <text:p>15:47:31</text:p>
          </table:table-cell>
          <table:table-cell office:value-type="float" office:value="868" calcext:value-type="float">
            <text:p>86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33S" calcext:value-type="time">
            <text:p>15:47:33</text:p>
          </table:table-cell>
          <table:table-cell office:value-type="float" office:value="850" calcext:value-type="float">
            <text:p>8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35S" calcext:value-type="time">
            <text:p>15:47:35</text:p>
          </table:table-cell>
          <table:table-cell office:value-type="float" office:value="843" calcext:value-type="float">
            <text:p>84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38S" calcext:value-type="time">
            <text:p>15:47:38</text:p>
          </table:table-cell>
          <table:table-cell office:value-type="float" office:value="901" calcext:value-type="float">
            <text:p>90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40S" calcext:value-type="time">
            <text:p>15:47:40</text:p>
          </table:table-cell>
          <table:table-cell office:value-type="float" office:value="885" calcext:value-type="float">
            <text:p>88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42S" calcext:value-type="time">
            <text:p>15:47:42</text:p>
          </table:table-cell>
          <table:table-cell office:value-type="float" office:value="908" calcext:value-type="float">
            <text:p>90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44S" calcext:value-type="time">
            <text:p>15:47:44</text:p>
          </table:table-cell>
          <table:table-cell office:value-type="float" office:value="900" calcext:value-type="float">
            <text:p>9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46S" calcext:value-type="time">
            <text:p>15:47:46</text:p>
          </table:table-cell>
          <table:table-cell office:value-type="float" office:value="876" calcext:value-type="float">
            <text:p>87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49S" calcext:value-type="time">
            <text:p>15:47:49</text:p>
          </table:table-cell>
          <table:table-cell office:value-type="float" office:value="883" calcext:value-type="float">
            <text:p>88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51S" calcext:value-type="time">
            <text:p>15:47:51</text:p>
          </table:table-cell>
          <table:table-cell office:value-type="float" office:value="730" calcext:value-type="float">
            <text:p>73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53S" calcext:value-type="time">
            <text:p>15:47:53</text:p>
          </table:table-cell>
          <table:table-cell office:value-type="float" office:value="692" calcext:value-type="float">
            <text:p>69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55S" calcext:value-type="time">
            <text:p>15:47:55</text:p>
          </table:table-cell>
          <table:table-cell office:value-type="float" office:value="741" calcext:value-type="float">
            <text:p>74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57S" calcext:value-type="time">
            <text:p>15:47:57</text:p>
          </table:table-cell>
          <table:table-cell office:value-type="float" office:value="749" calcext:value-type="float">
            <text:p>74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00S" calcext:value-type="time">
            <text:p>15:48:00</text:p>
          </table:table-cell>
          <table:table-cell office:value-type="float" office:value="843" calcext:value-type="float">
            <text:p>84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02S" calcext:value-type="time">
            <text:p>15:48:02</text:p>
          </table:table-cell>
          <table:table-cell office:value-type="float" office:value="820" calcext:value-type="float">
            <text:p>8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04S" calcext:value-type="time">
            <text:p>15:48:04</text:p>
          </table:table-cell>
          <table:table-cell office:value-type="float" office:value="733" calcext:value-type="float">
            <text:p>73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06S" calcext:value-type="time">
            <text:p>15:48:06</text:p>
          </table:table-cell>
          <table:table-cell office:value-type="float" office:value="787" calcext:value-type="float">
            <text:p>78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09S" calcext:value-type="time">
            <text:p>15:48:09</text:p>
          </table:table-cell>
          <table:table-cell office:value-type="float" office:value="836" calcext:value-type="float">
            <text:p>8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11S" calcext:value-type="time">
            <text:p>15:48:11</text:p>
          </table:table-cell>
          <table:table-cell office:value-type="float" office:value="716" calcext:value-type="float">
            <text:p>71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13S" calcext:value-type="time">
            <text:p>15:48:13</text:p>
          </table:table-cell>
          <table:table-cell office:value-type="float" office:value="751" calcext:value-type="float">
            <text:p>75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15S" calcext:value-type="time">
            <text:p>15:48:15</text:p>
          </table:table-cell>
          <table:table-cell office:value-type="float" office:value="478" calcext:value-type="float">
            <text:p>47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17S" calcext:value-type="time">
            <text:p>15:48:17</text:p>
          </table:table-cell>
          <table:table-cell office:value-type="float" office:value="415" calcext:value-type="float">
            <text:p>41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20S" calcext:value-type="time">
            <text:p>15:48:20</text:p>
          </table:table-cell>
          <table:table-cell office:value-type="float" office:value="566" calcext:value-type="float">
            <text:p>56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22S" calcext:value-type="time">
            <text:p>15:48:22</text:p>
          </table:table-cell>
          <table:table-cell office:value-type="float" office:value="311" calcext:value-type="float">
            <text:p>31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24S" calcext:value-type="time">
            <text:p>15:48:24</text:p>
          </table:table-cell>
          <table:table-cell office:value-type="float" office:value="455" calcext:value-type="float">
            <text:p>4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26S" calcext:value-type="time">
            <text:p>15:48:26</text:p>
          </table:table-cell>
          <table:table-cell office:value-type="float" office:value="307" calcext:value-type="float">
            <text:p>30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28S" calcext:value-type="time">
            <text:p>15:48:28</text:p>
          </table:table-cell>
          <table:table-cell office:value-type="float" office:value="304" calcext:value-type="float">
            <text:p>30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31S" calcext:value-type="time">
            <text:p>15:48:31</text:p>
          </table:table-cell>
          <table:table-cell office:value-type="float" office:value="509" calcext:value-type="float">
            <text:p>50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33S" calcext:value-type="time">
            <text:p>15:48:33</text:p>
          </table:table-cell>
          <table:table-cell office:value-type="float" office:value="718" calcext:value-type="float">
            <text:p>71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35S" calcext:value-type="time">
            <text:p>15:48:35</text:p>
          </table:table-cell>
          <table:table-cell office:value-type="float" office:value="587" calcext:value-type="float">
            <text:p>58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37S" calcext:value-type="time">
            <text:p>15:48:37</text:p>
          </table:table-cell>
          <table:table-cell office:value-type="float" office:value="717" calcext:value-type="float">
            <text:p>7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40S" calcext:value-type="time">
            <text:p>15:48:40</text:p>
          </table:table-cell>
          <table:table-cell office:value-type="float" office:value="549" calcext:value-type="float">
            <text:p>54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42S" calcext:value-type="time">
            <text:p>15:48:42</text:p>
          </table:table-cell>
          <table:table-cell office:value-type="float" office:value="616" calcext:value-type="float">
            <text:p>6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44S" calcext:value-type="time">
            <text:p>15:48:44</text:p>
          </table:table-cell>
          <table:table-cell office:value-type="float" office:value="668" calcext:value-type="float">
            <text:p>66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46S" calcext:value-type="time">
            <text:p>15:48:46</text:p>
          </table:table-cell>
          <table:table-cell office:value-type="float" office:value="756" calcext:value-type="float">
            <text:p>75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48S" calcext:value-type="time">
            <text:p>15:48:48</text:p>
          </table:table-cell>
          <table:table-cell office:value-type="float" office:value="334" calcext:value-type="float">
            <text:p>33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51S" calcext:value-type="time">
            <text:p>15:48:51</text:p>
          </table:table-cell>
          <table:table-cell office:value-type="float" office:value="504" calcext:value-type="float">
            <text:p>50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53S" calcext:value-type="time">
            <text:p>15:48:53</text:p>
          </table:table-cell>
          <table:table-cell office:value-type="float" office:value="627" calcext:value-type="float">
            <text:p>62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55S" calcext:value-type="time">
            <text:p>15:48:55</text:p>
          </table:table-cell>
          <table:table-cell office:value-type="float" office:value="687" calcext:value-type="float">
            <text:p>68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8M58S" calcext:value-type="time">
            <text:p>15:48:58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00S" calcext:value-type="time">
            <text:p>15:49:00</text:p>
          </table:table-cell>
          <table:table-cell office:value-type="float" office:value="787" calcext:value-type="float">
            <text:p>78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02S" calcext:value-type="time">
            <text:p>15:49:02</text:p>
          </table:table-cell>
          <table:table-cell office:value-type="float" office:value="785" calcext:value-type="float">
            <text:p>7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05S" calcext:value-type="time">
            <text:p>15:49:05</text:p>
          </table:table-cell>
          <table:table-cell office:value-type="float" office:value="812" calcext:value-type="float">
            <text:p>81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07S" calcext:value-type="time">
            <text:p>15:49:07</text:p>
          </table:table-cell>
          <table:table-cell office:value-type="float" office:value="830" calcext:value-type="float">
            <text:p>83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09S" calcext:value-type="time">
            <text:p>15:49:09</text:p>
          </table:table-cell>
          <table:table-cell office:value-type="float" office:value="794" calcext:value-type="float">
            <text:p>79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11S" calcext:value-type="time">
            <text:p>15:49:11</text:p>
          </table:table-cell>
          <table:table-cell office:value-type="float" office:value="860" calcext:value-type="float">
            <text:p>8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14S" calcext:value-type="time">
            <text:p>15:49:14</text:p>
          </table:table-cell>
          <table:table-cell office:value-type="float" office:value="810" calcext:value-type="float">
            <text:p>81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16S" calcext:value-type="time">
            <text:p>15:49:16</text:p>
          </table:table-cell>
          <table:table-cell office:value-type="float" office:value="820" calcext:value-type="float">
            <text:p>8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18S" calcext:value-type="time">
            <text:p>15:49:18</text:p>
          </table:table-cell>
          <table:table-cell office:value-type="float" office:value="838" calcext:value-type="float">
            <text:p>8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20S" calcext:value-type="time">
            <text:p>15:49:20</text:p>
          </table:table-cell>
          <table:table-cell office:value-type="float" office:value="880" calcext:value-type="float">
            <text:p>8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22S" calcext:value-type="time">
            <text:p>15:49:22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25S" calcext:value-type="time">
            <text:p>15:49:25</text:p>
          </table:table-cell>
          <table:table-cell office:value-type="float" office:value="822" calcext:value-type="float">
            <text:p>82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27S" calcext:value-type="time">
            <text:p>15:49:27</text:p>
          </table:table-cell>
          <table:table-cell office:value-type="float" office:value="859" calcext:value-type="float">
            <text:p>8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29S" calcext:value-type="time">
            <text:p>15:49:29</text:p>
          </table:table-cell>
          <table:table-cell office:value-type="float" office:value="915" calcext:value-type="float">
            <text:p>91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31S" calcext:value-type="time">
            <text:p>15:49:31</text:p>
          </table:table-cell>
          <table:table-cell office:value-type="float" office:value="865" calcext:value-type="float">
            <text:p>86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34S" calcext:value-type="time">
            <text:p>15:49:34</text:p>
          </table:table-cell>
          <table:table-cell office:value-type="float" office:value="861" calcext:value-type="float">
            <text:p>86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36S" calcext:value-type="time">
            <text:p>15:49:36</text:p>
          </table:table-cell>
          <table:table-cell office:value-type="float" office:value="871" calcext:value-type="float">
            <text:p>8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38S" calcext:value-type="time">
            <text:p>15:49:38</text:p>
          </table:table-cell>
          <table:table-cell office:value-type="float" office:value="848" calcext:value-type="float">
            <text:p>84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40S" calcext:value-type="time">
            <text:p>15:49:40</text:p>
          </table:table-cell>
          <table:table-cell office:value-type="float" office:value="903" calcext:value-type="float">
            <text:p>9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43S" calcext:value-type="time">
            <text:p>15:49:43</text:p>
          </table:table-cell>
          <table:table-cell office:value-type="float" office:value="836" calcext:value-type="float">
            <text:p>83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45S" calcext:value-type="time">
            <text:p>15:49:45</text:p>
          </table:table-cell>
          <table:table-cell office:value-type="float" office:value="832" calcext:value-type="float">
            <text:p>83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47S" calcext:value-type="time">
            <text:p>15:49:47</text:p>
          </table:table-cell>
          <table:table-cell office:value-type="float" office:value="895" calcext:value-type="float">
            <text:p>89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49S" calcext:value-type="time">
            <text:p>15:49:49</text:p>
          </table:table-cell>
          <table:table-cell office:value-type="float" office:value="901" calcext:value-type="float">
            <text:p>9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52S" calcext:value-type="time">
            <text:p>15:49:52</text:p>
          </table:table-cell>
          <table:table-cell office:value-type="float" office:value="878" calcext:value-type="float">
            <text:p>87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54S" calcext:value-type="time">
            <text:p>15:49:54</text:p>
          </table:table-cell>
          <table:table-cell office:value-type="float" office:value="941" calcext:value-type="float">
            <text:p>94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56S" calcext:value-type="time">
            <text:p>15:49:56</text:p>
          </table:table-cell>
          <table:table-cell office:value-type="float" office:value="847" calcext:value-type="float">
            <text:p>84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9M58S" calcext:value-type="time">
            <text:p>15:49:58</text:p>
          </table:table-cell>
          <table:table-cell office:value-type="float" office:value="883" calcext:value-type="float">
            <text:p>88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01S" calcext:value-type="time">
            <text:p>15:50:01</text:p>
          </table:table-cell>
          <table:table-cell office:value-type="float" office:value="890" calcext:value-type="float">
            <text:p>89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03S" calcext:value-type="time">
            <text:p>15:50:03</text:p>
          </table:table-cell>
          <table:table-cell office:value-type="float" office:value="880" calcext:value-type="float">
            <text:p>88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05S" calcext:value-type="time">
            <text:p>15:50:05</text:p>
          </table:table-cell>
          <table:table-cell office:value-type="float" office:value="890" calcext:value-type="float">
            <text:p>8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07S" calcext:value-type="time">
            <text:p>15:50:07</text:p>
          </table:table-cell>
          <table:table-cell office:value-type="float" office:value="777" calcext:value-type="float">
            <text:p>7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10S" calcext:value-type="time">
            <text:p>15:50:10</text:p>
          </table:table-cell>
          <table:table-cell office:value-type="float" office:value="800" calcext:value-type="float">
            <text:p>8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12S" calcext:value-type="time">
            <text:p>15:50:12</text:p>
          </table:table-cell>
          <table:table-cell office:value-type="float" office:value="808" calcext:value-type="float">
            <text:p>8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14S" calcext:value-type="time">
            <text:p>15:50:14</text:p>
          </table:table-cell>
          <table:table-cell office:value-type="float" office:value="857" calcext:value-type="float">
            <text:p>85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16S" calcext:value-type="time">
            <text:p>15:50:16</text:p>
          </table:table-cell>
          <table:table-cell office:value-type="float" office:value="834" calcext:value-type="float">
            <text:p>83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19S" calcext:value-type="time">
            <text:p>15:50:19</text:p>
          </table:table-cell>
          <table:table-cell office:value-type="float" office:value="784" calcext:value-type="float">
            <text:p>78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21S" calcext:value-type="time">
            <text:p>15:50:21</text:p>
          </table:table-cell>
          <table:table-cell office:value-type="float" office:value="791" calcext:value-type="float">
            <text:p>7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23S" calcext:value-type="time">
            <text:p>15:50:23</text:p>
          </table:table-cell>
          <table:table-cell office:value-type="float" office:value="849" calcext:value-type="float">
            <text:p>84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25S" calcext:value-type="time">
            <text:p>15:50:25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28S" calcext:value-type="time">
            <text:p>15:50:28</text:p>
          </table:table-cell>
          <table:table-cell office:value-type="float" office:value="482" calcext:value-type="float">
            <text:p>48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30S" calcext:value-type="time">
            <text:p>15:50:30</text:p>
          </table:table-cell>
          <table:table-cell office:value-type="float" office:value="529" calcext:value-type="float">
            <text:p>52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32S" calcext:value-type="time">
            <text:p>15:50:32</text:p>
          </table:table-cell>
          <table:table-cell office:value-type="float" office:value="694" calcext:value-type="float">
            <text:p>69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34S" calcext:value-type="time">
            <text:p>15:50:34</text:p>
          </table:table-cell>
          <table:table-cell office:value-type="float" office:value="713" calcext:value-type="float">
            <text:p>71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37S" calcext:value-type="time">
            <text:p>15:50:37</text:p>
          </table:table-cell>
          <table:table-cell office:value-type="float" office:value="639" calcext:value-type="float">
            <text:p>63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39S" calcext:value-type="time">
            <text:p>15:50:39</text:p>
          </table:table-cell>
          <table:table-cell office:value-type="float" office:value="701" calcext:value-type="float">
            <text:p>7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41S" calcext:value-type="time">
            <text:p>15:50:41</text:p>
          </table:table-cell>
          <table:table-cell office:value-type="float" office:value="749" calcext:value-type="float">
            <text:p>74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44S" calcext:value-type="time">
            <text:p>15:50:44</text:p>
          </table:table-cell>
          <table:table-cell office:value-type="float" office:value="797" calcext:value-type="float">
            <text:p>79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46S" calcext:value-type="time">
            <text:p>15:50:46</text:p>
          </table:table-cell>
          <table:table-cell office:value-type="float" office:value="779" calcext:value-type="float">
            <text:p>77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48S" calcext:value-type="time">
            <text:p>15:50:48</text:p>
          </table:table-cell>
          <table:table-cell office:value-type="float" office:value="854" calcext:value-type="float">
            <text:p>85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50S" calcext:value-type="time">
            <text:p>15:50:50</text:p>
          </table:table-cell>
          <table:table-cell office:value-type="float" office:value="855" calcext:value-type="float">
            <text:p>85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53S" calcext:value-type="time">
            <text:p>15:50:53</text:p>
          </table:table-cell>
          <table:table-cell office:value-type="float" office:value="820" calcext:value-type="float">
            <text:p>8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55S" calcext:value-type="time">
            <text:p>15:50:55</text:p>
          </table:table-cell>
          <table:table-cell office:value-type="float" office:value="897" calcext:value-type="float">
            <text:p>89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57S" calcext:value-type="time">
            <text:p>15:50:57</text:p>
          </table:table-cell>
          <table:table-cell office:value-type="float" office:value="843" calcext:value-type="float">
            <text:p>84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0M59S" calcext:value-type="time">
            <text:p>15:50:59</text:p>
          </table:table-cell>
          <table:table-cell office:value-type="float" office:value="832" calcext:value-type="float">
            <text:p>8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02S" calcext:value-type="time">
            <text:p>15:51:02</text:p>
          </table:table-cell>
          <table:table-cell office:value-type="float" office:value="873" calcext:value-type="float">
            <text:p>8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04S" calcext:value-type="time">
            <text:p>15:51:04</text:p>
          </table:table-cell>
          <table:table-cell office:value-type="float" office:value="880" calcext:value-type="float">
            <text:p>88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06S" calcext:value-type="time">
            <text:p>15:51:06</text:p>
          </table:table-cell>
          <table:table-cell office:value-type="float" office:value="914" calcext:value-type="float">
            <text:p>91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08S" calcext:value-type="time">
            <text:p>15:51:08</text:p>
          </table:table-cell>
          <table:table-cell office:value-type="float" office:value="879" calcext:value-type="float">
            <text:p>87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11S" calcext:value-type="time">
            <text:p>15:51:11</text:p>
          </table:table-cell>
          <table:table-cell office:value-type="float" office:value="389" calcext:value-type="float">
            <text:p>38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13S" calcext:value-type="time">
            <text:p>15:51:13</text:p>
          </table:table-cell>
          <table:table-cell office:value-type="float" office:value="556" calcext:value-type="float">
            <text:p>55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15S" calcext:value-type="time">
            <text:p>15:51:15</text:p>
          </table:table-cell>
          <table:table-cell office:value-type="float" office:value="641" calcext:value-type="float">
            <text:p>64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18S" calcext:value-type="time">
            <text:p>15:51:18</text:p>
          </table:table-cell>
          <table:table-cell office:value-type="float" office:value="678" calcext:value-type="float">
            <text:p>67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20S" calcext:value-type="time">
            <text:p>15:51:20</text:p>
          </table:table-cell>
          <table:table-cell office:value-type="float" office:value="722" calcext:value-type="float">
            <text:p>72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22S" calcext:value-type="time">
            <text:p>15:51:22</text:p>
          </table:table-cell>
          <table:table-cell office:value-type="float" office:value="620" calcext:value-type="float">
            <text:p>6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24S" calcext:value-type="time">
            <text:p>15:51:24</text:p>
          </table:table-cell>
          <table:table-cell office:value-type="float" office:value="650" calcext:value-type="float">
            <text:p>65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27S" calcext:value-type="time">
            <text:p>15:51:27</text:p>
          </table:table-cell>
          <table:table-cell office:value-type="float" office:value="742" calcext:value-type="float">
            <text:p>7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29S" calcext:value-type="time">
            <text:p>15:51:29</text:p>
          </table:table-cell>
          <table:table-cell office:value-type="float" office:value="738" calcext:value-type="float">
            <text:p>7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31S" calcext:value-type="time">
            <text:p>15:51:31</text:p>
          </table:table-cell>
          <table:table-cell office:value-type="float" office:value="816" calcext:value-type="float">
            <text:p>8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34S" calcext:value-type="time">
            <text:p>15:51:34</text:p>
          </table:table-cell>
          <table:table-cell office:value-type="float" office:value="805" calcext:value-type="float">
            <text:p>8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36S" calcext:value-type="time">
            <text:p>15:51:36</text:p>
          </table:table-cell>
          <table:table-cell office:value-type="float" office:value="306" calcext:value-type="float">
            <text:p>30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38S" calcext:value-type="time">
            <text:p>15:51:38</text:p>
          </table:table-cell>
          <table:table-cell office:value-type="float" office:value="447" calcext:value-type="float">
            <text:p>4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40S" calcext:value-type="time">
            <text:p>15:51:40</text:p>
          </table:table-cell>
          <table:table-cell office:value-type="float" office:value="552" calcext:value-type="float">
            <text:p>55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43S" calcext:value-type="time">
            <text:p>15:51:43</text:p>
          </table:table-cell>
          <table:table-cell office:value-type="float" office:value="604" calcext:value-type="float">
            <text:p>60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45S" calcext:value-type="time">
            <text:p>15:51:45</text:p>
          </table:table-cell>
          <table:table-cell office:value-type="float" office:value="644" calcext:value-type="float">
            <text:p>64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47S" calcext:value-type="time">
            <text:p>15:51:47</text:p>
          </table:table-cell>
          <table:table-cell office:value-type="float" office:value="870" calcext:value-type="float">
            <text:p>87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50S" calcext:value-type="time">
            <text:p>15:51:50</text:p>
          </table:table-cell>
          <table:table-cell office:value-type="float" office:value="536" calcext:value-type="float">
            <text:p>53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52S" calcext:value-type="time">
            <text:p>15:51:52</text:p>
          </table:table-cell>
          <table:table-cell office:value-type="float" office:value="522" calcext:value-type="float">
            <text:p>52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54S" calcext:value-type="time">
            <text:p>15:51:54</text:p>
          </table:table-cell>
          <table:table-cell office:value-type="float" office:value="469" calcext:value-type="float">
            <text:p>46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56S" calcext:value-type="time">
            <text:p>15:51:56</text:p>
          </table:table-cell>
          <table:table-cell office:value-type="float" office:value="477" calcext:value-type="float">
            <text:p>47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1M59S" calcext:value-type="time">
            <text:p>15:51:59</text:p>
          </table:table-cell>
          <table:table-cell office:value-type="float" office:value="353" calcext:value-type="float">
            <text:p>35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01S" calcext:value-type="time">
            <text:p>15:52:01</text:p>
          </table:table-cell>
          <table:table-cell office:value-type="float" office:value="469" calcext:value-type="float">
            <text:p>46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03S" calcext:value-type="time">
            <text:p>15:52:03</text:p>
          </table:table-cell>
          <table:table-cell office:value-type="float" office:value="514" calcext:value-type="float">
            <text:p>51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06S" calcext:value-type="time">
            <text:p>15:52:06</text:p>
          </table:table-cell>
          <table:table-cell office:value-type="float" office:value="567" calcext:value-type="float">
            <text:p>56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08S" calcext:value-type="time">
            <text:p>15:52:08</text:p>
          </table:table-cell>
          <table:table-cell office:value-type="float" office:value="464" calcext:value-type="float">
            <text:p>46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10S" calcext:value-type="time">
            <text:p>15:52:10</text:p>
          </table:table-cell>
          <table:table-cell office:value-type="float" office:value="349" calcext:value-type="float">
            <text:p>34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13S" calcext:value-type="time">
            <text:p>15:52:13</text:p>
          </table:table-cell>
          <table:table-cell office:value-type="float" office:value="524" calcext:value-type="float">
            <text:p>52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15S" calcext:value-type="time">
            <text:p>15:52:15</text:p>
          </table:table-cell>
          <table:table-cell office:value-type="float" office:value="187" calcext:value-type="float">
            <text:p>18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17S" calcext:value-type="time">
            <text:p>15:52:17</text:p>
          </table:table-cell>
          <table:table-cell office:value-type="float" office:value="377" calcext:value-type="float">
            <text:p>37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19S" calcext:value-type="time">
            <text:p>15:52:19</text:p>
          </table:table-cell>
          <table:table-cell office:value-type="float" office:value="488" calcext:value-type="float">
            <text:p>48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22S" calcext:value-type="time">
            <text:p>15:52:22</text:p>
          </table:table-cell>
          <table:table-cell office:value-type="float" office:value="550" calcext:value-type="float">
            <text:p>55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24S" calcext:value-type="time">
            <text:p>15:52:24</text:p>
          </table:table-cell>
          <table:table-cell office:value-type="float" office:value="331" calcext:value-type="float">
            <text:p>33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26S" calcext:value-type="time">
            <text:p>15:52:26</text:p>
          </table:table-cell>
          <table:table-cell office:value-type="float" office:value="474" calcext:value-type="float">
            <text:p>47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29S" calcext:value-type="time">
            <text:p>15:52:29</text:p>
          </table:table-cell>
          <table:table-cell office:value-type="float" office:value="394" calcext:value-type="float">
            <text:p>39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31S" calcext:value-type="time">
            <text:p>15:52:31</text:p>
          </table:table-cell>
          <table:table-cell office:value-type="float" office:value="313" calcext:value-type="float">
            <text:p>31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33S" calcext:value-type="time">
            <text:p>15:52:33</text:p>
          </table:table-cell>
          <table:table-cell office:value-type="float" office:value="403" calcext:value-type="float">
            <text:p>40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36S" calcext:value-type="time">
            <text:p>15:52:36</text:p>
          </table:table-cell>
          <table:table-cell office:value-type="float" office:value="380" calcext:value-type="float">
            <text:p>38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38S" calcext:value-type="time">
            <text:p>15:52:38</text:p>
          </table:table-cell>
          <table:table-cell office:value-type="float" office:value="491" calcext:value-type="float">
            <text:p>49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40S" calcext:value-type="time">
            <text:p>15:52:40</text:p>
          </table:table-cell>
          <table:table-cell office:value-type="float" office:value="263" calcext:value-type="float">
            <text:p>26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42S" calcext:value-type="time">
            <text:p>15:52:42</text:p>
          </table:table-cell>
          <table:table-cell office:value-type="float" office:value="352" calcext:value-type="float">
            <text:p>35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45S" calcext:value-type="time">
            <text:p>15:52:45</text:p>
          </table:table-cell>
          <table:table-cell office:value-type="float" office:value="282" calcext:value-type="float">
            <text:p>28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47S" calcext:value-type="time">
            <text:p>15:52:47</text:p>
          </table:table-cell>
          <table:table-cell office:value-type="float" office:value="402" calcext:value-type="float">
            <text:p>40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49S" calcext:value-type="time">
            <text:p>15:52:49</text:p>
          </table:table-cell>
          <table:table-cell office:value-type="float" office:value="338" calcext:value-type="float">
            <text:p>33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52S" calcext:value-type="time">
            <text:p>15:52:52</text:p>
          </table:table-cell>
          <table:table-cell office:value-type="float" office:value="540" calcext:value-type="float">
            <text:p>54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54S" calcext:value-type="time">
            <text:p>15:52:54</text:p>
          </table:table-cell>
          <table:table-cell office:value-type="float" office:value="338" calcext:value-type="float">
            <text:p>33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56S" calcext:value-type="time">
            <text:p>15:52:56</text:p>
          </table:table-cell>
          <table:table-cell office:value-type="float" office:value="491" calcext:value-type="float">
            <text:p>49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59S" calcext:value-type="time">
            <text:p>15:52:59</text:p>
          </table:table-cell>
          <table:table-cell office:value-type="float" office:value="464" calcext:value-type="float">
            <text:p>46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01S" calcext:value-type="time">
            <text:p>15:53:01</text:p>
          </table:table-cell>
          <table:table-cell office:value-type="float" office:value="687" calcext:value-type="float">
            <text:p>68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03S" calcext:value-type="time">
            <text:p>15:53:03</text:p>
          </table:table-cell>
          <table:table-cell office:value-type="float" office:value="657" calcext:value-type="float">
            <text:p>65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06S" calcext:value-type="time">
            <text:p>15:53:06</text:p>
          </table:table-cell>
          <table:table-cell office:value-type="float" office:value="393" calcext:value-type="float">
            <text:p>39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08S" calcext:value-type="time">
            <text:p>15:53:08</text:p>
          </table:table-cell>
          <table:table-cell office:value-type="float" office:value="387" calcext:value-type="float">
            <text:p>38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10S" calcext:value-type="time">
            <text:p>15:53:10</text:p>
          </table:table-cell>
          <table:table-cell office:value-type="float" office:value="286" calcext:value-type="float">
            <text:p>28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13S" calcext:value-type="time">
            <text:p>15:53:13</text:p>
          </table:table-cell>
          <table:table-cell office:value-type="float" office:value="581" calcext:value-type="float">
            <text:p>58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15S" calcext:value-type="time">
            <text:p>15:53:15</text:p>
          </table:table-cell>
          <table:table-cell office:value-type="float" office:value="411" calcext:value-type="float">
            <text:p>41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17S" calcext:value-type="time">
            <text:p>15:53:17</text:p>
          </table:table-cell>
          <table:table-cell office:value-type="float" office:value="511" calcext:value-type="float">
            <text:p>51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20S" calcext:value-type="time">
            <text:p>15:53:20</text:p>
          </table:table-cell>
          <table:table-cell office:value-type="float" office:value="112" calcext:value-type="float">
            <text:p>11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22S" calcext:value-type="time">
            <text:p>15:53:22</text:p>
          </table:table-cell>
          <table:table-cell office:value-type="float" office:value="39" calcext:value-type="float">
            <text:p>3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24S" calcext:value-type="time">
            <text:p>15:53:24</text:p>
          </table:table-cell>
          <table:table-cell office:value-type="float" office:value="255" calcext:value-type="float">
            <text:p>25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26S" calcext:value-type="time">
            <text:p>15:53:26</text:p>
          </table:table-cell>
          <table:table-cell office:value-type="float" office:value="523" calcext:value-type="float">
            <text:p>52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29S" calcext:value-type="time">
            <text:p>15:53:29</text:p>
          </table:table-cell>
          <table:table-cell office:value-type="float" office:value="501" calcext:value-type="float">
            <text:p>50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31S" calcext:value-type="time">
            <text:p>15:53:31</text:p>
          </table:table-cell>
          <table:table-cell office:value-type="float" office:value="287" calcext:value-type="float">
            <text:p>28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33S" calcext:value-type="time">
            <text:p>15:53:33</text:p>
          </table:table-cell>
          <table:table-cell office:value-type="float" office:value="558" calcext:value-type="float">
            <text:p>55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36S" calcext:value-type="time">
            <text:p>15:53:36</text:p>
          </table:table-cell>
          <table:table-cell office:value-type="float" office:value="102" calcext:value-type="float">
            <text:p>10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38S" calcext:value-type="time">
            <text:p>15:53:38</text:p>
          </table:table-cell>
          <table:table-cell office:value-type="float" office:value="684" calcext:value-type="float">
            <text:p>68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40S" calcext:value-type="time">
            <text:p>15:53:40</text:p>
          </table:table-cell>
          <table:table-cell office:value-type="float" office:value="507" calcext:value-type="float">
            <text:p>50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43S" calcext:value-type="time">
            <text:p>15:53:43</text:p>
          </table:table-cell>
          <table:table-cell office:value-type="float" office:value="251" calcext:value-type="float">
            <text:p>25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45S" calcext:value-type="time">
            <text:p>15:53:45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47S" calcext:value-type="time">
            <text:p>15:53:47</text:p>
          </table:table-cell>
          <table:table-cell office:value-type="float" office:value="253" calcext:value-type="float">
            <text:p>25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50S" calcext:value-type="time">
            <text:p>15:53:50</text:p>
          </table:table-cell>
          <table:table-cell office:value-type="float" office:value="527" calcext:value-type="float">
            <text:p>52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52S" calcext:value-type="time">
            <text:p>15:53:52</text:p>
          </table:table-cell>
          <table:table-cell office:value-type="float" office:value="421" calcext:value-type="float">
            <text:p>42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54S" calcext:value-type="time">
            <text:p>15:53:54</text:p>
          </table:table-cell>
          <table:table-cell office:value-type="float" office:value="317" calcext:value-type="float">
            <text:p>31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57S" calcext:value-type="time">
            <text:p>15:53:57</text:p>
          </table:table-cell>
          <table:table-cell office:value-type="float" office:value="163" calcext:value-type="float">
            <text:p>16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59S" calcext:value-type="time">
            <text:p>15:53:59</text:p>
          </table:table-cell>
          <table:table-cell office:value-type="float" office:value="459" calcext:value-type="float">
            <text:p>45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01S" calcext:value-type="time">
            <text:p>15:54:01</text:p>
          </table:table-cell>
          <table:table-cell office:value-type="float" office:value="612" calcext:value-type="float">
            <text:p>61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04S" calcext:value-type="time">
            <text:p>15:54:04</text:p>
          </table:table-cell>
          <table:table-cell office:value-type="float" office:value="403" calcext:value-type="float">
            <text:p>40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06S" calcext:value-type="time">
            <text:p>15:54:06</text:p>
          </table:table-cell>
          <table:table-cell office:value-type="float" office:value="413" calcext:value-type="float">
            <text:p>41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08S" calcext:value-type="time">
            <text:p>15:54:08</text:p>
          </table:table-cell>
          <table:table-cell office:value-type="float" office:value="256" calcext:value-type="float">
            <text:p>25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11S" calcext:value-type="time">
            <text:p>15:54:11</text:p>
          </table:table-cell>
          <table:table-cell office:value-type="float" office:value="578" calcext:value-type="float">
            <text:p>57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13S" calcext:value-type="time">
            <text:p>15:54:13</text:p>
          </table:table-cell>
          <table:table-cell office:value-type="float" office:value="607" calcext:value-type="float">
            <text:p>60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15S" calcext:value-type="time">
            <text:p>15:54:15</text:p>
          </table:table-cell>
          <table:table-cell office:value-type="float" office:value="434" calcext:value-type="float">
            <text:p>43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18S" calcext:value-type="time">
            <text:p>15:54:18</text:p>
          </table:table-cell>
          <table:table-cell office:value-type="float" office:value="507" calcext:value-type="float">
            <text:p>50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20S" calcext:value-type="time">
            <text:p>15:54:20</text:p>
          </table:table-cell>
          <table:table-cell office:value-type="float" office:value="592" calcext:value-type="float">
            <text:p>59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22S" calcext:value-type="time">
            <text:p>15:54:22</text:p>
          </table:table-cell>
          <table:table-cell office:value-type="float" office:value="861" calcext:value-type="float">
            <text:p>86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25S" calcext:value-type="time">
            <text:p>15:54:25</text:p>
          </table:table-cell>
          <table:table-cell office:value-type="float" office:value="524" calcext:value-type="float">
            <text:p>52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27S" calcext:value-type="time">
            <text:p>15:54:27</text:p>
          </table:table-cell>
          <table:table-cell office:value-type="float" office:value="595" calcext:value-type="float">
            <text:p>59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30S" calcext:value-type="time">
            <text:p>15:54:30</text:p>
          </table:table-cell>
          <table:table-cell office:value-type="float" office:value="353" calcext:value-type="float">
            <text:p>35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32S" calcext:value-type="time">
            <text:p>15:54:32</text:p>
          </table:table-cell>
          <table:table-cell office:value-type="float" office:value="380" calcext:value-type="float">
            <text:p>38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34S" calcext:value-type="time">
            <text:p>15:54:34</text:p>
          </table:table-cell>
          <table:table-cell office:value-type="float" office:value="418" calcext:value-type="float">
            <text:p>418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37S" calcext:value-type="time">
            <text:p>15:54:37</text:p>
          </table:table-cell>
          <table:table-cell office:value-type="float" office:value="352" calcext:value-type="float">
            <text:p>35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39S" calcext:value-type="time">
            <text:p>15:54:39</text:p>
          </table:table-cell>
          <table:table-cell office:value-type="float" office:value="565" calcext:value-type="float">
            <text:p>56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41S" calcext:value-type="time">
            <text:p>15:54:41</text:p>
          </table:table-cell>
          <table:table-cell office:value-type="float" office:value="684" calcext:value-type="float">
            <text:p>68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44S" calcext:value-type="time">
            <text:p>15:54:44</text:p>
          </table:table-cell>
          <table:table-cell office:value-type="float" office:value="369" calcext:value-type="float">
            <text:p>36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46S" calcext:value-type="time">
            <text:p>15:54:46</text:p>
          </table:table-cell>
          <table:table-cell office:value-type="float" office:value="434" calcext:value-type="float">
            <text:p>434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48S" calcext:value-type="time">
            <text:p>15:54:48</text:p>
          </table:table-cell>
          <table:table-cell office:value-type="float" office:value="505" calcext:value-type="float">
            <text:p>505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51S" calcext:value-type="time">
            <text:p>15:54:51</text:p>
          </table:table-cell>
          <table:table-cell office:value-type="float" office:value="622" calcext:value-type="float">
            <text:p>62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53S" calcext:value-type="time">
            <text:p>15:54:53</text:p>
          </table:table-cell>
          <table:table-cell office:value-type="float" office:value="151" calcext:value-type="float">
            <text:p>15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55S" calcext:value-type="time">
            <text:p>15:54:55</text:p>
          </table:table-cell>
          <table:table-cell office:value-type="float" office:value="488" calcext:value-type="float">
            <text:p>48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58S" calcext:value-type="time">
            <text:p>15:54:58</text:p>
          </table:table-cell>
          <table:table-cell office:value-type="float" office:value="553" calcext:value-type="float">
            <text:p>553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00S" calcext:value-type="time">
            <text:p>15:55:00</text:p>
          </table:table-cell>
          <table:table-cell office:value-type="float" office:value="456" calcext:value-type="float">
            <text:p>45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02S" calcext:value-type="time">
            <text:p>15:55:02</text:p>
          </table:table-cell>
          <table:table-cell office:value-type="float" office:value="454" calcext:value-type="float">
            <text:p>454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05S" calcext:value-type="time">
            <text:p>15:55:05</text:p>
          </table:table-cell>
          <table:table-cell office:value-type="float" office:value="207" calcext:value-type="float">
            <text:p>207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07S" calcext:value-type="time">
            <text:p>15:55:07</text:p>
          </table:table-cell>
          <table:table-cell office:value-type="float" office:value="455" calcext:value-type="float">
            <text:p>45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09S" calcext:value-type="time">
            <text:p>15:55:09</text:p>
          </table:table-cell>
          <table:table-cell office:value-type="float" office:value="312" calcext:value-type="float">
            <text:p>31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12S" calcext:value-type="time">
            <text:p>15:55:12</text:p>
          </table:table-cell>
          <table:table-cell office:value-type="float" office:value="493" calcext:value-type="float">
            <text:p>49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14S" calcext:value-type="time">
            <text:p>15:55:14</text:p>
          </table:table-cell>
          <table:table-cell office:value-type="float" office:value="476" calcext:value-type="float">
            <text:p>47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17S" calcext:value-type="time">
            <text:p>15:55:17</text:p>
          </table:table-cell>
          <table:table-cell office:value-type="float" office:value="595" calcext:value-type="float">
            <text:p>59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19S" calcext:value-type="time">
            <text:p>15:55:19</text:p>
          </table:table-cell>
          <table:table-cell office:value-type="float" office:value="403" calcext:value-type="float">
            <text:p>40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21S" calcext:value-type="time">
            <text:p>15:55:21</text:p>
          </table:table-cell>
          <table:table-cell office:value-type="float" office:value="365" calcext:value-type="float">
            <text:p>36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24S" calcext:value-type="time">
            <text:p>15:55:24</text:p>
          </table:table-cell>
          <table:table-cell office:value-type="float" office:value="578" calcext:value-type="float">
            <text:p>578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26S" calcext:value-type="time">
            <text:p>15:55:26</text:p>
          </table:table-cell>
          <table:table-cell office:value-type="float" office:value="321" calcext:value-type="float">
            <text:p>32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28S" calcext:value-type="time">
            <text:p>15:55:28</text:p>
          </table:table-cell>
          <table:table-cell office:value-type="float" office:value="353" calcext:value-type="float">
            <text:p>35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31S" calcext:value-type="time">
            <text:p>15:55:31</text:p>
          </table:table-cell>
          <table:table-cell office:value-type="float" office:value="550" calcext:value-type="float">
            <text:p>55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33S" calcext:value-type="time">
            <text:p>15:55:33</text:p>
          </table:table-cell>
          <table:table-cell office:value-type="float" office:value="525" calcext:value-type="float">
            <text:p>52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35S" calcext:value-type="time">
            <text:p>15:55:35</text:p>
          </table:table-cell>
          <table:table-cell office:value-type="float" office:value="347" calcext:value-type="float">
            <text:p>347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38S" calcext:value-type="time">
            <text:p>15:55:38</text:p>
          </table:table-cell>
          <table:table-cell office:value-type="float" office:value="649" calcext:value-type="float">
            <text:p>649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40S" calcext:value-type="time">
            <text:p>15:55:40</text:p>
          </table:table-cell>
          <table:table-cell office:value-type="float" office:value="462" calcext:value-type="float">
            <text:p>46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43S" calcext:value-type="time">
            <text:p>15:55:43</text:p>
          </table:table-cell>
          <table:table-cell office:value-type="float" office:value="423" calcext:value-type="float">
            <text:p>423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45S" calcext:value-type="time">
            <text:p>15:55:45</text:p>
          </table:table-cell>
          <table:table-cell office:value-type="float" office:value="273" calcext:value-type="float">
            <text:p>273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47S" calcext:value-type="time">
            <text:p>15:55:47</text:p>
          </table:table-cell>
          <table:table-cell office:value-type="float" office:value="451" calcext:value-type="float">
            <text:p>45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50S" calcext:value-type="time">
            <text:p>15:55:50</text:p>
          </table:table-cell>
          <table:table-cell office:value-type="float" office:value="180" calcext:value-type="float">
            <text:p>18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52S" calcext:value-type="time">
            <text:p>15:55:52</text:p>
          </table:table-cell>
          <table:table-cell office:value-type="float" office:value="587" calcext:value-type="float">
            <text:p>587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54S" calcext:value-type="time">
            <text:p>15:55:54</text:p>
          </table:table-cell>
          <table:table-cell office:value-type="float" office:value="552" calcext:value-type="float">
            <text:p>552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57S" calcext:value-type="time">
            <text:p>15:55:57</text:p>
          </table:table-cell>
          <table:table-cell office:value-type="float" office:value="452" calcext:value-type="float">
            <text:p>45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59S" calcext:value-type="time">
            <text:p>15:55:59</text:p>
          </table:table-cell>
          <table:table-cell office:value-type="float" office:value="413" calcext:value-type="float">
            <text:p>41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02S" calcext:value-type="time">
            <text:p>15:56:02</text:p>
          </table:table-cell>
          <table:table-cell office:value-type="float" office:value="202" calcext:value-type="float">
            <text:p>202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04S" calcext:value-type="time">
            <text:p>15:56:04</text:p>
          </table:table-cell>
          <table:table-cell office:value-type="float" office:value="241" calcext:value-type="float">
            <text:p>241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06S" calcext:value-type="time">
            <text:p>15:56:06</text:p>
          </table:table-cell>
          <table:table-cell office:value-type="float" office:value="521" calcext:value-type="float">
            <text:p>52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09S" calcext:value-type="time">
            <text:p>15:56:09</text:p>
          </table:table-cell>
          <table:table-cell office:value-type="float" office:value="553" calcext:value-type="float">
            <text:p>55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11S" calcext:value-type="time">
            <text:p>15:56:11</text:p>
          </table:table-cell>
          <table:table-cell office:value-type="float" office:value="497" calcext:value-type="float">
            <text:p>49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14S" calcext:value-type="time">
            <text:p>15:56:14</text:p>
          </table:table-cell>
          <table:table-cell office:value-type="float" office:value="506" calcext:value-type="float">
            <text:p>506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16S" calcext:value-type="time">
            <text:p>15:56:16</text:p>
          </table:table-cell>
          <table:table-cell office:value-type="float" office:value="484" calcext:value-type="float">
            <text:p>48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18S" calcext:value-type="time">
            <text:p>15:56:18</text:p>
          </table:table-cell>
          <table:table-cell office:value-type="float" office:value="525" calcext:value-type="float">
            <text:p>525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21S" calcext:value-type="time">
            <text:p>15:56:21</text:p>
          </table:table-cell>
          <table:table-cell office:value-type="float" office:value="488" calcext:value-type="float">
            <text:p>488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23S" calcext:value-type="time">
            <text:p>15:56:23</text:p>
          </table:table-cell>
          <table:table-cell office:value-type="float" office:value="544" calcext:value-type="float">
            <text:p>544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25S" calcext:value-type="time">
            <text:p>15:56:25</text:p>
          </table:table-cell>
          <table:table-cell office:value-type="float" office:value="490" calcext:value-type="float">
            <text:p>49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28S" calcext:value-type="time">
            <text:p>15:56:28</text:p>
          </table:table-cell>
          <table:table-cell office:value-type="float" office:value="640" calcext:value-type="float">
            <text:p>64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30S" calcext:value-type="time">
            <text:p>15:56:30</text:p>
          </table:table-cell>
          <table:table-cell office:value-type="float" office:value="206" calcext:value-type="float">
            <text:p>206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33S" calcext:value-type="time">
            <text:p>15:56:33</text:p>
          </table:table-cell>
          <table:table-cell office:value-type="float" office:value="337" calcext:value-type="float">
            <text:p>33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35S" calcext:value-type="time">
            <text:p>15:56:35</text:p>
          </table:table-cell>
          <table:table-cell office:value-type="float" office:value="570" calcext:value-type="float">
            <text:p>57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37S" calcext:value-type="time">
            <text:p>15:56:37</text:p>
          </table:table-cell>
          <table:table-cell office:value-type="float" office:value="517" calcext:value-type="float">
            <text:p>517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40S" calcext:value-type="time">
            <text:p>15:56:40</text:p>
          </table:table-cell>
          <table:table-cell office:value-type="float" office:value="440" calcext:value-type="float">
            <text:p>44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42S" calcext:value-type="time">
            <text:p>15:56:42</text:p>
          </table:table-cell>
          <table:table-cell office:value-type="float" office:value="307" calcext:value-type="float">
            <text:p>307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45S" calcext:value-type="time">
            <text:p>15:56:45</text:p>
          </table:table-cell>
          <table:table-cell office:value-type="float" office:value="433" calcext:value-type="float">
            <text:p>43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47S" calcext:value-type="time">
            <text:p>15:56:47</text:p>
          </table:table-cell>
          <table:table-cell office:value-type="float" office:value="461" calcext:value-type="float">
            <text:p>461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49S" calcext:value-type="time">
            <text:p>15:56:49</text:p>
          </table:table-cell>
          <table:table-cell office:value-type="float" office:value="491" calcext:value-type="float">
            <text:p>49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52S" calcext:value-type="time">
            <text:p>15:56:52</text:p>
          </table:table-cell>
          <table:table-cell office:value-type="float" office:value="750" calcext:value-type="float">
            <text:p>75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54S" calcext:value-type="time">
            <text:p>15:56:54</text:p>
          </table:table-cell>
          <table:table-cell office:value-type="float" office:value="767" calcext:value-type="float">
            <text:p>76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57S" calcext:value-type="time">
            <text:p>15:56:57</text:p>
          </table:table-cell>
          <table:table-cell office:value-type="float" office:value="383" calcext:value-type="float">
            <text:p>38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59S" calcext:value-type="time">
            <text:p>15:56:59</text:p>
          </table:table-cell>
          <table:table-cell office:value-type="float" office:value="813" calcext:value-type="float">
            <text:p>81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01S" calcext:value-type="time">
            <text:p>15:57:01</text:p>
          </table:table-cell>
          <table:table-cell office:value-type="float" office:value="846" calcext:value-type="float">
            <text:p>84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04S" calcext:value-type="time">
            <text:p>15:57:04</text:p>
          </table:table-cell>
          <table:table-cell office:value-type="float" office:value="974" calcext:value-type="float">
            <text:p>97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06S" calcext:value-type="time">
            <text:p>15:57:06</text:p>
          </table:table-cell>
          <table:table-cell office:value-type="float" office:value="927" calcext:value-type="float">
            <text:p>92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08S" calcext:value-type="time">
            <text:p>15:57:08</text:p>
          </table:table-cell>
          <table:table-cell office:value-type="float" office:value="952" calcext:value-type="float">
            <text:p>95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11S" calcext:value-type="time">
            <text:p>15:57:11</text:p>
          </table:table-cell>
          <table:table-cell office:value-type="float" office:value="792" calcext:value-type="float">
            <text:p>79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13S" calcext:value-type="time">
            <text:p>15:57:13</text:p>
          </table:table-cell>
          <table:table-cell office:value-type="float" office:value="948" calcext:value-type="float">
            <text:p>94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16S" calcext:value-type="time">
            <text:p>15:57:16</text:p>
          </table:table-cell>
          <table:table-cell office:value-type="float" office:value="925" calcext:value-type="float">
            <text:p>92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18S" calcext:value-type="time">
            <text:p>15:57:18</text:p>
          </table:table-cell>
          <table:table-cell office:value-type="float" office:value="888" calcext:value-type="float">
            <text:p>88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21S" calcext:value-type="time">
            <text:p>15:57:21</text:p>
          </table:table-cell>
          <table:table-cell office:value-type="float" office:value="905" calcext:value-type="float">
            <text:p>9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23S" calcext:value-type="time">
            <text:p>15:57:23</text:p>
          </table:table-cell>
          <table:table-cell office:value-type="float" office:value="932" calcext:value-type="float">
            <text:p>93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25S" calcext:value-type="time">
            <text:p>15:57:25</text:p>
          </table:table-cell>
          <table:table-cell office:value-type="float" office:value="907" calcext:value-type="float">
            <text:p>907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28S" calcext:value-type="time">
            <text:p>15:57:28</text:p>
          </table:table-cell>
          <table:table-cell office:value-type="float" office:value="1003" calcext:value-type="float">
            <text:p>100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30S" calcext:value-type="time">
            <text:p>15:57:30</text:p>
          </table:table-cell>
          <table:table-cell office:value-type="float" office:value="957" calcext:value-type="float">
            <text:p>95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33S" calcext:value-type="time">
            <text:p>15:57:33</text:p>
          </table:table-cell>
          <table:table-cell office:value-type="float" office:value="987" calcext:value-type="float">
            <text:p>98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35S" calcext:value-type="time">
            <text:p>15:57:35</text:p>
          </table:table-cell>
          <table:table-cell office:value-type="float" office:value="949" calcext:value-type="float">
            <text:p>94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37S" calcext:value-type="time">
            <text:p>15:57:37</text:p>
          </table:table-cell>
          <table:table-cell office:value-type="float" office:value="782" calcext:value-type="float">
            <text:p>78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40S" calcext:value-type="time">
            <text:p>15:57:40</text:p>
          </table:table-cell>
          <table:table-cell office:value-type="float" office:value="882" calcext:value-type="float">
            <text:p>88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42S" calcext:value-type="time">
            <text:p>15:57:42</text:p>
          </table:table-cell>
          <table:table-cell office:value-type="float" office:value="825" calcext:value-type="float">
            <text:p>82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45S" calcext:value-type="time">
            <text:p>15:57:45</text:p>
          </table:table-cell>
          <table:table-cell office:value-type="float" office:value="789" calcext:value-type="float">
            <text:p>78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47S" calcext:value-type="time">
            <text:p>15:57:47</text:p>
          </table:table-cell>
          <table:table-cell office:value-type="float" office:value="697" calcext:value-type="float">
            <text:p>69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49S" calcext:value-type="time">
            <text:p>15:57:49</text:p>
          </table:table-cell>
          <table:table-cell office:value-type="float" office:value="882" calcext:value-type="float">
            <text:p>88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52S" calcext:value-type="time">
            <text:p>15:57:52</text:p>
          </table:table-cell>
          <table:table-cell office:value-type="float" office:value="883" calcext:value-type="float">
            <text:p>88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54S" calcext:value-type="time">
            <text:p>15:57:54</text:p>
          </table:table-cell>
          <table:table-cell office:value-type="float" office:value="608" calcext:value-type="float">
            <text:p>60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57S" calcext:value-type="time">
            <text:p>15:57:57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00S" calcext:value-type="time">
            <text:p>15:58:00</text:p>
          </table:table-cell>
          <table:table-cell office:value-type="float" office:value="776" calcext:value-type="float">
            <text:p>77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02S" calcext:value-type="time">
            <text:p>15:58:02</text:p>
          </table:table-cell>
          <table:table-cell office:value-type="float" office:value="884" calcext:value-type="float">
            <text:p>88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05S" calcext:value-type="time">
            <text:p>15:58:05</text:p>
          </table:table-cell>
          <table:table-cell office:value-type="float" office:value="958" calcext:value-type="float">
            <text:p>95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07S" calcext:value-type="time">
            <text:p>15:58:07</text:p>
          </table:table-cell>
          <table:table-cell office:value-type="float" office:value="951" calcext:value-type="float">
            <text:p>95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10S" calcext:value-type="time">
            <text:p>15:58:10</text:p>
          </table:table-cell>
          <table:table-cell office:value-type="float" office:value="959" calcext:value-type="float">
            <text:p>95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12S" calcext:value-type="time">
            <text:p>15:58:12</text:p>
          </table:table-cell>
          <table:table-cell office:value-type="float" office:value="966" calcext:value-type="float">
            <text:p>96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14S" calcext:value-type="time">
            <text:p>15:58:14</text:p>
          </table:table-cell>
          <table:table-cell office:value-type="float" office:value="947" calcext:value-type="float">
            <text:p>94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17S" calcext:value-type="time">
            <text:p>15:58:17</text:p>
          </table:table-cell>
          <table:table-cell office:value-type="float" office:value="744" calcext:value-type="float">
            <text:p>74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19S" calcext:value-type="time">
            <text:p>15:58:19</text:p>
          </table:table-cell>
          <table:table-cell office:value-type="float" office:value="752" calcext:value-type="float">
            <text:p>75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22S" calcext:value-type="time">
            <text:p>15:58:22</text:p>
          </table:table-cell>
          <table:table-cell office:value-type="float" office:value="811" calcext:value-type="float">
            <text:p>81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24S" calcext:value-type="time">
            <text:p>15:58:24</text:p>
          </table:table-cell>
          <table:table-cell office:value-type="float" office:value="924" calcext:value-type="float">
            <text:p>92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27S" calcext:value-type="time">
            <text:p>15:58:27</text:p>
          </table:table-cell>
          <table:table-cell office:value-type="float" office:value="920" calcext:value-type="float">
            <text:p>92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29S" calcext:value-type="time">
            <text:p>15:58:29</text:p>
          </table:table-cell>
          <table:table-cell office:value-type="float" office:value="894" calcext:value-type="float">
            <text:p>89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31S" calcext:value-type="time">
            <text:p>15:58:31</text:p>
          </table:table-cell>
          <table:table-cell office:value-type="float" office:value="928" calcext:value-type="float">
            <text:p>92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34S" calcext:value-type="time">
            <text:p>15:58:34</text:p>
          </table:table-cell>
          <table:table-cell office:value-type="float" office:value="937" calcext:value-type="float">
            <text:p>93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36S" calcext:value-type="time">
            <text:p>15:58:36</text:p>
          </table:table-cell>
          <table:table-cell office:value-type="float" office:value="464" calcext:value-type="float">
            <text:p>46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39S" calcext:value-type="time">
            <text:p>15:58:39</text:p>
          </table:table-cell>
          <table:table-cell office:value-type="float" office:value="721" calcext:value-type="float">
            <text:p>72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41S" calcext:value-type="time">
            <text:p>15:58:41</text:p>
          </table:table-cell>
          <table:table-cell office:value-type="float" office:value="814" calcext:value-type="float">
            <text:p>81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44S" calcext:value-type="time">
            <text:p>15:58:44</text:p>
          </table:table-cell>
          <table:table-cell office:value-type="float" office:value="809" calcext:value-type="float">
            <text:p>80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46S" calcext:value-type="time">
            <text:p>15:58:46</text:p>
          </table:table-cell>
          <table:table-cell office:value-type="float" office:value="896" calcext:value-type="float">
            <text:p>89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48S" calcext:value-type="time">
            <text:p>15:58:48</text:p>
          </table:table-cell>
          <table:table-cell office:value-type="float" office:value="865" calcext:value-type="float">
            <text:p>86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51S" calcext:value-type="time">
            <text:p>15:58:51</text:p>
          </table:table-cell>
          <table:table-cell office:value-type="float" office:value="918" calcext:value-type="float">
            <text:p>91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53S" calcext:value-type="time">
            <text:p>15:58:53</text:p>
          </table:table-cell>
          <table:table-cell office:value-type="float" office:value="980" calcext:value-type="float">
            <text:p>98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56S" calcext:value-type="time">
            <text:p>15:58:56</text:p>
          </table:table-cell>
          <table:table-cell office:value-type="float" office:value="925" calcext:value-type="float">
            <text:p>92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8M58S" calcext:value-type="time">
            <text:p>15:58:58</text:p>
          </table:table-cell>
          <table:table-cell office:value-type="float" office:value="969" calcext:value-type="float">
            <text:p>96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01S" calcext:value-type="time">
            <text:p>15:59:01</text:p>
          </table:table-cell>
          <table:table-cell office:value-type="float" office:value="971" calcext:value-type="float">
            <text:p>97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03S" calcext:value-type="time">
            <text:p>15:59:03</text:p>
          </table:table-cell>
          <table:table-cell office:value-type="float" office:value="976" calcext:value-type="float">
            <text:p>97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06S" calcext:value-type="time">
            <text:p>15:59:06</text:p>
          </table:table-cell>
          <table:table-cell office:value-type="float" office:value="1027" calcext:value-type="float">
            <text:p>102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08S" calcext:value-type="time">
            <text:p>15:59:08</text:p>
          </table:table-cell>
          <table:table-cell office:value-type="float" office:value="883" calcext:value-type="float">
            <text:p>88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10S" calcext:value-type="time">
            <text:p>15:59:10</text:p>
          </table:table-cell>
          <table:table-cell office:value-type="float" office:value="873" calcext:value-type="float">
            <text:p>87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13S" calcext:value-type="time">
            <text:p>15:59:13</text:p>
          </table:table-cell>
          <table:table-cell office:value-type="float" office:value="312" calcext:value-type="float">
            <text:p>31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15S" calcext:value-type="time">
            <text:p>15:59:15</text:p>
          </table:table-cell>
          <table:table-cell office:value-type="float" office:value="642" calcext:value-type="float">
            <text:p>64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18S" calcext:value-type="time">
            <text:p>15:59:18</text:p>
          </table:table-cell>
          <table:table-cell office:value-type="float" office:value="354" calcext:value-type="float">
            <text:p>35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20S" calcext:value-type="time">
            <text:p>15:59:20</text:p>
          </table:table-cell>
          <table:table-cell office:value-type="float" office:value="763" calcext:value-type="float">
            <text:p>76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23S" calcext:value-type="time">
            <text:p>15:59:23</text:p>
          </table:table-cell>
          <table:table-cell office:value-type="float" office:value="652" calcext:value-type="float">
            <text:p>65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25S" calcext:value-type="time">
            <text:p>15:59:25</text:p>
          </table:table-cell>
          <table:table-cell office:value-type="float" office:value="611" calcext:value-type="float">
            <text:p>61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28S" calcext:value-type="time">
            <text:p>15:59:28</text:p>
          </table:table-cell>
          <table:table-cell office:value-type="float" office:value="398" calcext:value-type="float">
            <text:p>39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30S" calcext:value-type="time">
            <text:p>15:59:30</text:p>
          </table:table-cell>
          <table:table-cell office:value-type="float" office:value="451" calcext:value-type="float">
            <text:p>45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32S" calcext:value-type="time">
            <text:p>15:59:32</text:p>
          </table:table-cell>
          <table:table-cell office:value-type="float" office:value="284" calcext:value-type="float">
            <text:p>28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35S" calcext:value-type="time">
            <text:p>15:59:35</text:p>
          </table:table-cell>
          <table:table-cell office:value-type="float" office:value="238" calcext:value-type="float">
            <text:p>23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37S" calcext:value-type="time">
            <text:p>15:59:37</text:p>
          </table:table-cell>
          <table:table-cell office:value-type="float" office:value="299" calcext:value-type="float">
            <text:p>29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40S" calcext:value-type="time">
            <text:p>15:59:40</text:p>
          </table:table-cell>
          <table:table-cell office:value-type="float" office:value="703" calcext:value-type="float">
            <text:p>70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42S" calcext:value-type="time">
            <text:p>15:59:42</text:p>
          </table:table-cell>
          <table:table-cell office:value-type="float" office:value="771" calcext:value-type="float">
            <text:p>77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45S" calcext:value-type="time">
            <text:p>15:59:45</text:p>
          </table:table-cell>
          <table:table-cell office:value-type="float" office:value="635" calcext:value-type="float">
            <text:p>63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47S" calcext:value-type="time">
            <text:p>15:59:47</text:p>
          </table:table-cell>
          <table:table-cell office:value-type="float" office:value="568" calcext:value-type="float">
            <text:p>56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50S" calcext:value-type="time">
            <text:p>15:59:50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52S" calcext:value-type="time">
            <text:p>15:59:52</text:p>
          </table:table-cell>
          <table:table-cell office:value-type="float" office:value="322" calcext:value-type="float">
            <text:p>32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55S" calcext:value-type="time">
            <text:p>15:59:55</text:p>
          </table:table-cell>
          <table:table-cell office:value-type="float" office:value="510" calcext:value-type="float">
            <text:p>51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57S" calcext:value-type="time">
            <text:p>15:59:57</text:p>
          </table:table-cell>
          <table:table-cell office:value-type="float" office:value="134" calcext:value-type="float">
            <text:p>1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9M59S" calcext:value-type="time">
            <text:p>15:59:59</text:p>
          </table:table-cell>
          <table:table-cell office:value-type="float" office:value="61" calcext:value-type="float">
            <text:p>6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02S" calcext:value-type="time">
            <text:p>16:00:02</text:p>
          </table:table-cell>
          <table:table-cell office:value-type="float" office:value="322" calcext:value-type="float">
            <text:p>32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04S" calcext:value-type="time">
            <text:p>16:00:04</text:p>
          </table:table-cell>
          <table:table-cell office:value-type="float" office:value="265" calcext:value-type="float">
            <text:p>26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07S" calcext:value-type="time">
            <text:p>16:00:07</text:p>
          </table:table-cell>
          <table:table-cell office:value-type="float" office:value="624" calcext:value-type="float">
            <text:p>62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09S" calcext:value-type="time">
            <text:p>16:00:09</text:p>
          </table:table-cell>
          <table:table-cell office:value-type="float" office:value="406" calcext:value-type="float">
            <text:p>40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12S" calcext:value-type="time">
            <text:p>16:00:12</text:p>
          </table:table-cell>
          <table:table-cell office:value-type="float" office:value="761" calcext:value-type="float">
            <text:p>76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14S" calcext:value-type="time">
            <text:p>16:00:14</text:p>
          </table:table-cell>
          <table:table-cell office:value-type="float" office:value="623" calcext:value-type="float">
            <text:p>62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17S" calcext:value-type="time">
            <text:p>16:00:17</text:p>
          </table:table-cell>
          <table:table-cell office:value-type="float" office:value="609" calcext:value-type="float">
            <text:p>60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19S" calcext:value-type="time">
            <text:p>16:00:19</text:p>
          </table:table-cell>
          <table:table-cell office:value-type="float" office:value="327" calcext:value-type="float">
            <text:p>32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22S" calcext:value-type="time">
            <text:p>16:00:22</text:p>
          </table:table-cell>
          <table:table-cell office:value-type="float" office:value="617" calcext:value-type="float">
            <text:p>61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24S" calcext:value-type="time">
            <text:p>16:00:24</text:p>
          </table:table-cell>
          <table:table-cell office:value-type="float" office:value="380" calcext:value-type="float">
            <text:p>38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27S" calcext:value-type="time">
            <text:p>16:00:27</text:p>
          </table:table-cell>
          <table:table-cell office:value-type="float" office:value="605" calcext:value-type="float">
            <text:p>60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29S" calcext:value-type="time">
            <text:p>16:00:29</text:p>
          </table:table-cell>
          <table:table-cell office:value-type="float" office:value="386" calcext:value-type="float">
            <text:p>38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31S" calcext:value-type="time">
            <text:p>16:00:31</text:p>
          </table:table-cell>
          <table:table-cell office:value-type="float" office:value="821" calcext:value-type="float">
            <text:p>82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34S" calcext:value-type="time">
            <text:p>16:00:34</text:p>
          </table:table-cell>
          <table:table-cell office:value-type="float" office:value="731" calcext:value-type="float">
            <text:p>73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36S" calcext:value-type="time">
            <text:p>16:00:36</text:p>
          </table:table-cell>
          <table:table-cell office:value-type="float" office:value="384" calcext:value-type="float">
            <text:p>38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39S" calcext:value-type="time">
            <text:p>16:00:39</text:p>
          </table:table-cell>
          <table:table-cell office:value-type="float" office:value="512" calcext:value-type="float">
            <text:p>5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41S" calcext:value-type="time">
            <text:p>16:00:41</text:p>
          </table:table-cell>
          <table:table-cell office:value-type="float" office:value="355" calcext:value-type="float">
            <text:p>35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44S" calcext:value-type="time">
            <text:p>16:00:44</text:p>
          </table:table-cell>
          <table:table-cell office:value-type="float" office:value="169" calcext:value-type="float">
            <text:p>16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46S" calcext:value-type="time">
            <text:p>16:00:46</text:p>
          </table:table-cell>
          <table:table-cell office:value-type="float" office:value="238" calcext:value-type="float">
            <text:p>23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49S" calcext:value-type="time">
            <text:p>16:00:49</text:p>
          </table:table-cell>
          <table:table-cell office:value-type="float" office:value="788" calcext:value-type="float">
            <text:p>78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51S" calcext:value-type="time">
            <text:p>16:00:51</text:p>
          </table:table-cell>
          <table:table-cell office:value-type="float" office:value="921" calcext:value-type="float">
            <text:p>92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54S" calcext:value-type="time">
            <text:p>16:00:54</text:p>
          </table:table-cell>
          <table:table-cell office:value-type="float" office:value="859" calcext:value-type="float">
            <text:p>859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56S" calcext:value-type="time">
            <text:p>16:00:56</text:p>
          </table:table-cell>
          <table:table-cell office:value-type="float" office:value="916" calcext:value-type="float">
            <text:p>91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0M59S" calcext:value-type="time">
            <text:p>16:00:59</text:p>
          </table:table-cell>
          <table:table-cell office:value-type="float" office:value="949" calcext:value-type="float">
            <text:p>94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01S" calcext:value-type="time">
            <text:p>16:01:01</text:p>
          </table:table-cell>
          <table:table-cell office:value-type="float" office:value="919" calcext:value-type="float">
            <text:p>91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04S" calcext:value-type="time">
            <text:p>16:01:04</text:p>
          </table:table-cell>
          <table:table-cell office:value-type="float" office:value="915" calcext:value-type="float">
            <text:p>91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06S" calcext:value-type="time">
            <text:p>16:01:06</text:p>
          </table:table-cell>
          <table:table-cell office:value-type="float" office:value="609" calcext:value-type="float">
            <text:p>60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09S" calcext:value-type="time">
            <text:p>16:01:09</text:p>
          </table:table-cell>
          <table:table-cell office:value-type="float" office:value="886" calcext:value-type="float">
            <text:p>88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11S" calcext:value-type="time">
            <text:p>16:01:11</text:p>
          </table:table-cell>
          <table:table-cell office:value-type="float" office:value="925" calcext:value-type="float">
            <text:p>92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14S" calcext:value-type="time">
            <text:p>16:01:14</text:p>
          </table:table-cell>
          <table:table-cell office:value-type="float" office:value="950" calcext:value-type="float">
            <text:p>95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16S" calcext:value-type="time">
            <text:p>16:01:16</text:p>
          </table:table-cell>
          <table:table-cell office:value-type="float" office:value="965" calcext:value-type="float">
            <text:p>96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19S" calcext:value-type="time">
            <text:p>16:01:19</text:p>
          </table:table-cell>
          <table:table-cell office:value-type="float" office:value="973" calcext:value-type="float">
            <text:p>97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21S" calcext:value-type="time">
            <text:p>16:01:21</text:p>
          </table:table-cell>
          <table:table-cell office:value-type="float" office:value="941" calcext:value-type="float">
            <text:p>94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23S" calcext:value-type="time">
            <text:p>16:01:23</text:p>
          </table:table-cell>
          <table:table-cell office:value-type="float" office:value="962" calcext:value-type="float">
            <text:p>96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26S" calcext:value-type="time">
            <text:p>16:01:26</text:p>
          </table:table-cell>
          <table:table-cell office:value-type="float" office:value="935" calcext:value-type="float">
            <text:p>93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28S" calcext:value-type="time">
            <text:p>16:01:28</text:p>
          </table:table-cell>
          <table:table-cell office:value-type="float" office:value="951" calcext:value-type="float">
            <text:p>95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31S" calcext:value-type="time">
            <text:p>16:01:31</text:p>
          </table:table-cell>
          <table:table-cell office:value-type="float" office:value="874" calcext:value-type="float">
            <text:p>87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33S" calcext:value-type="time">
            <text:p>16:01:33</text:p>
          </table:table-cell>
          <table:table-cell office:value-type="float" office:value="930" calcext:value-type="float">
            <text:p>93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36S" calcext:value-type="time">
            <text:p>16:01:36</text:p>
          </table:table-cell>
          <table:table-cell office:value-type="float" office:value="973" calcext:value-type="float">
            <text:p>97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38S" calcext:value-type="time">
            <text:p>16:01:38</text:p>
          </table:table-cell>
          <table:table-cell office:value-type="float" office:value="969" calcext:value-type="float">
            <text:p>96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41S" calcext:value-type="time">
            <text:p>16:01:41</text:p>
          </table:table-cell>
          <table:table-cell office:value-type="float" office:value="954" calcext:value-type="float">
            <text:p>95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43S" calcext:value-type="time">
            <text:p>16:01:43</text:p>
          </table:table-cell>
          <table:table-cell office:value-type="float" office:value="976" calcext:value-type="float">
            <text:p>97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46S" calcext:value-type="time">
            <text:p>16:01:46</text:p>
          </table:table-cell>
          <table:table-cell office:value-type="float" office:value="994" calcext:value-type="float">
            <text:p>99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48S" calcext:value-type="time">
            <text:p>16:01:48</text:p>
          </table:table-cell>
          <table:table-cell office:value-type="float" office:value="1001" calcext:value-type="float">
            <text:p>100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51S" calcext:value-type="time">
            <text:p>16:01:51</text:p>
          </table:table-cell>
          <table:table-cell office:value-type="float" office:value="946" calcext:value-type="float">
            <text:p>94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53S" calcext:value-type="time">
            <text:p>16:01:53</text:p>
          </table:table-cell>
          <table:table-cell office:value-type="float" office:value="991" calcext:value-type="float">
            <text:p>99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56S" calcext:value-type="time">
            <text:p>16:01:56</text:p>
          </table:table-cell>
          <table:table-cell office:value-type="float" office:value="945" calcext:value-type="float">
            <text:p>94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1M58S" calcext:value-type="time">
            <text:p>16:01:58</text:p>
          </table:table-cell>
          <table:table-cell office:value-type="float" office:value="312" calcext:value-type="float">
            <text:p>31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01S" calcext:value-type="time">
            <text:p>16:02:01</text:p>
          </table:table-cell>
          <table:table-cell office:value-type="float" office:value="821" calcext:value-type="float">
            <text:p>82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03S" calcext:value-type="time">
            <text:p>16:02:03</text:p>
          </table:table-cell>
          <table:table-cell office:value-type="float" office:value="896" calcext:value-type="float">
            <text:p>89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06S" calcext:value-type="time">
            <text:p>16:02:06</text:p>
          </table:table-cell>
          <table:table-cell office:value-type="float" office:value="933" calcext:value-type="float">
            <text:p>93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08S" calcext:value-type="time">
            <text:p>16:02:08</text:p>
          </table:table-cell>
          <table:table-cell office:value-type="float" office:value="941" calcext:value-type="float">
            <text:p>94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11S" calcext:value-type="time">
            <text:p>16:02:11</text:p>
          </table:table-cell>
          <table:table-cell office:value-type="float" office:value="493" calcext:value-type="float">
            <text:p>49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13S" calcext:value-type="time">
            <text:p>16:02:13</text:p>
          </table:table-cell>
          <table:table-cell office:value-type="float" office:value="863" calcext:value-type="float">
            <text:p>86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16S" calcext:value-type="time">
            <text:p>16:02:16</text:p>
          </table:table-cell>
          <table:table-cell office:value-type="float" office:value="950" calcext:value-type="float">
            <text:p>95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18S" calcext:value-type="time">
            <text:p>16:02:18</text:p>
          </table:table-cell>
          <table:table-cell office:value-type="float" office:value="969" calcext:value-type="float">
            <text:p>96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21S" calcext:value-type="time">
            <text:p>16:02:21</text:p>
          </table:table-cell>
          <table:table-cell office:value-type="float" office:value="984" calcext:value-type="float">
            <text:p>98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23S" calcext:value-type="time">
            <text:p>16:02:23</text:p>
          </table:table-cell>
          <table:table-cell office:value-type="float" office:value="987" calcext:value-type="float">
            <text:p>98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26S" calcext:value-type="time">
            <text:p>16:02:26</text:p>
          </table:table-cell>
          <table:table-cell office:value-type="float" office:value="992" calcext:value-type="float">
            <text:p>99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28S" calcext:value-type="time">
            <text:p>16:02:28</text:p>
          </table:table-cell>
          <table:table-cell office:value-type="float" office:value="1004" calcext:value-type="float">
            <text:p>100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31S" calcext:value-type="time">
            <text:p>16:02:31</text:p>
          </table:table-cell>
          <table:table-cell office:value-type="float" office:value="948" calcext:value-type="float">
            <text:p>94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33S" calcext:value-type="time">
            <text:p>16:02:33</text:p>
          </table:table-cell>
          <table:table-cell office:value-type="float" office:value="984" calcext:value-type="float">
            <text:p>98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36S" calcext:value-type="time">
            <text:p>16:02:36</text:p>
          </table:table-cell>
          <table:table-cell office:value-type="float" office:value="1013" calcext:value-type="float">
            <text:p>101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38S" calcext:value-type="time">
            <text:p>16:02:38</text:p>
          </table:table-cell>
          <table:table-cell office:value-type="float" office:value="980" calcext:value-type="float">
            <text:p>98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41S" calcext:value-type="time">
            <text:p>16:02:41</text:p>
          </table:table-cell>
          <table:table-cell office:value-type="float" office:value="991" calcext:value-type="float">
            <text:p>99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43S" calcext:value-type="time">
            <text:p>16:02:43</text:p>
          </table:table-cell>
          <table:table-cell office:value-type="float" office:value="994" calcext:value-type="float">
            <text:p>994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46S" calcext:value-type="time">
            <text:p>16:02:46</text:p>
          </table:table-cell>
          <table:table-cell office:value-type="float" office:value="977" calcext:value-type="float">
            <text:p>97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48S" calcext:value-type="time">
            <text:p>16:02:48</text:p>
          </table:table-cell>
          <table:table-cell office:value-type="float" office:value="907" calcext:value-type="float">
            <text:p>9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51S" calcext:value-type="time">
            <text:p>16:02:51</text:p>
          </table:table-cell>
          <table:table-cell office:value-type="float" office:value="935" calcext:value-type="float">
            <text:p>93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53S" calcext:value-type="time">
            <text:p>16:02:53</text:p>
          </table:table-cell>
          <table:table-cell office:value-type="float" office:value="934" calcext:value-type="float">
            <text:p>93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56S" calcext:value-type="time">
            <text:p>16:02:56</text:p>
          </table:table-cell>
          <table:table-cell office:value-type="float" office:value="955" calcext:value-type="float">
            <text:p>95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2M59S" calcext:value-type="time">
            <text:p>16:02:59</text:p>
          </table:table-cell>
          <table:table-cell office:value-type="float" office:value="941" calcext:value-type="float">
            <text:p>94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01S" calcext:value-type="time">
            <text:p>16:03:01</text:p>
          </table:table-cell>
          <table:table-cell office:value-type="float" office:value="975" calcext:value-type="float">
            <text:p>97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04S" calcext:value-type="time">
            <text:p>16:03:04</text:p>
          </table:table-cell>
          <table:table-cell office:value-type="float" office:value="974" calcext:value-type="float">
            <text:p>97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06S" calcext:value-type="time">
            <text:p>16:03:06</text:p>
          </table:table-cell>
          <table:table-cell office:value-type="float" office:value="974" calcext:value-type="float">
            <text:p>97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09S" calcext:value-type="time">
            <text:p>16:03:09</text:p>
          </table:table-cell>
          <table:table-cell office:value-type="float" office:value="974" calcext:value-type="float">
            <text:p>97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11S" calcext:value-type="time">
            <text:p>16:03:11</text:p>
          </table:table-cell>
          <table:table-cell office:value-type="float" office:value="1000" calcext:value-type="float">
            <text:p>100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14S" calcext:value-type="time">
            <text:p>16:03:14</text:p>
          </table:table-cell>
          <table:table-cell office:value-type="float" office:value="941" calcext:value-type="float">
            <text:p>94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16S" calcext:value-type="time">
            <text:p>16:03:16</text:p>
          </table:table-cell>
          <table:table-cell office:value-type="float" office:value="936" calcext:value-type="float">
            <text:p>93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19S" calcext:value-type="time">
            <text:p>16:03:19</text:p>
          </table:table-cell>
          <table:table-cell office:value-type="float" office:value="982" calcext:value-type="float">
            <text:p>98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21S" calcext:value-type="time">
            <text:p>16:03:21</text:p>
          </table:table-cell>
          <table:table-cell office:value-type="float" office:value="967" calcext:value-type="float">
            <text:p>96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24S" calcext:value-type="time">
            <text:p>16:03:24</text:p>
          </table:table-cell>
          <table:table-cell office:value-type="float" office:value="986" calcext:value-type="float">
            <text:p>98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26S" calcext:value-type="time">
            <text:p>16:03:26</text:p>
          </table:table-cell>
          <table:table-cell office:value-type="float" office:value="986" calcext:value-type="float">
            <text:p>98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29S" calcext:value-type="time">
            <text:p>16:03:29</text:p>
          </table:table-cell>
          <table:table-cell office:value-type="float" office:value="1004" calcext:value-type="float">
            <text:p>100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31S" calcext:value-type="time">
            <text:p>16:03:31</text:p>
          </table:table-cell>
          <table:table-cell office:value-type="float" office:value="964" calcext:value-type="float">
            <text:p>96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34S" calcext:value-type="time">
            <text:p>16:03:34</text:p>
          </table:table-cell>
          <table:table-cell office:value-type="float" office:value="940" calcext:value-type="float">
            <text:p>94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36S" calcext:value-type="time">
            <text:p>16:03:36</text:p>
          </table:table-cell>
          <table:table-cell office:value-type="float" office:value="978" calcext:value-type="float">
            <text:p>97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39S" calcext:value-type="time">
            <text:p>16:03:39</text:p>
          </table:table-cell>
          <table:table-cell office:value-type="float" office:value="979" calcext:value-type="float">
            <text:p>97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41S" calcext:value-type="time">
            <text:p>16:03:41</text:p>
          </table:table-cell>
          <table:table-cell office:value-type="float" office:value="1001" calcext:value-type="float">
            <text:p>100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44S" calcext:value-type="time">
            <text:p>16:03:44</text:p>
          </table:table-cell>
          <table:table-cell office:value-type="float" office:value="1012" calcext:value-type="float">
            <text:p>101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46S" calcext:value-type="time">
            <text:p>16:03:46</text:p>
          </table:table-cell>
          <table:table-cell office:value-type="float" office:value="1012" calcext:value-type="float">
            <text:p>101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49S" calcext:value-type="time">
            <text:p>16:03:49</text:p>
          </table:table-cell>
          <table:table-cell office:value-type="float" office:value="961" calcext:value-type="float">
            <text:p>96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52S" calcext:value-type="time">
            <text:p>16:03:52</text:p>
          </table:table-cell>
          <table:table-cell office:value-type="float" office:value="994" calcext:value-type="float">
            <text:p>99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54S" calcext:value-type="time">
            <text:p>16:03:54</text:p>
          </table:table-cell>
          <table:table-cell office:value-type="float" office:value="984" calcext:value-type="float">
            <text:p>98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57S" calcext:value-type="time">
            <text:p>16:03:57</text:p>
          </table:table-cell>
          <table:table-cell office:value-type="float" office:value="1017" calcext:value-type="float">
            <text:p>101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3M59S" calcext:value-type="time">
            <text:p>16:03:59</text:p>
          </table:table-cell>
          <table:table-cell office:value-type="float" office:value="996" calcext:value-type="float">
            <text:p>99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02S" calcext:value-type="time">
            <text:p>16:04:02</text:p>
          </table:table-cell>
          <table:table-cell office:value-type="float" office:value="1002" calcext:value-type="float">
            <text:p>100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04S" calcext:value-type="time">
            <text:p>16:04:04</text:p>
          </table:table-cell>
          <table:table-cell office:value-type="float" office:value="995" calcext:value-type="float">
            <text:p>99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07S" calcext:value-type="time">
            <text:p>16:04:07</text:p>
          </table:table-cell>
          <table:table-cell office:value-type="float" office:value="952" calcext:value-type="float">
            <text:p>95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09S" calcext:value-type="time">
            <text:p>16:04:09</text:p>
          </table:table-cell>
          <table:table-cell office:value-type="float" office:value="976" calcext:value-type="float">
            <text:p>97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12S" calcext:value-type="time">
            <text:p>16:04:12</text:p>
          </table:table-cell>
          <table:table-cell office:value-type="float" office:value="1013" calcext:value-type="float">
            <text:p>101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14S" calcext:value-type="time">
            <text:p>16:04:14</text:p>
          </table:table-cell>
          <table:table-cell office:value-type="float" office:value="1010" calcext:value-type="float">
            <text:p>101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17S" calcext:value-type="time">
            <text:p>16:04:17</text:p>
          </table:table-cell>
          <table:table-cell office:value-type="float" office:value="1035" calcext:value-type="float">
            <text:p>103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19S" calcext:value-type="time">
            <text:p>16:04:19</text:p>
          </table:table-cell>
          <table:table-cell office:value-type="float" office:value="976" calcext:value-type="float">
            <text:p>97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22S" calcext:value-type="time">
            <text:p>16:04:22</text:p>
          </table:table-cell>
          <table:table-cell office:value-type="float" office:value="989" calcext:value-type="float">
            <text:p>98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25S" calcext:value-type="time">
            <text:p>16:04:25</text:p>
          </table:table-cell>
          <table:table-cell office:value-type="float" office:value="1016" calcext:value-type="float">
            <text:p>101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27S" calcext:value-type="time">
            <text:p>16:04:27</text:p>
          </table:table-cell>
          <table:table-cell office:value-type="float" office:value="1010" calcext:value-type="float">
            <text:p>101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30S" calcext:value-type="time">
            <text:p>16:04:30</text:p>
          </table:table-cell>
          <table:table-cell office:value-type="float" office:value="960" calcext:value-type="float">
            <text:p>96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32S" calcext:value-type="time">
            <text:p>16:04:32</text:p>
          </table:table-cell>
          <table:table-cell office:value-type="float" office:value="1007" calcext:value-type="float">
            <text:p>1007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35S" calcext:value-type="time">
            <text:p>16:04:35</text:p>
          </table:table-cell>
          <table:table-cell office:value-type="float" office:value="1011" calcext:value-type="float">
            <text:p>101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37S" calcext:value-type="time">
            <text:p>16:04:37</text:p>
          </table:table-cell>
          <table:table-cell office:value-type="float" office:value="1017" calcext:value-type="float">
            <text:p>101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40S" calcext:value-type="time">
            <text:p>16:04:40</text:p>
          </table:table-cell>
          <table:table-cell office:value-type="float" office:value="991" calcext:value-type="float">
            <text:p>99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42S" calcext:value-type="time">
            <text:p>16:04:42</text:p>
          </table:table-cell>
          <table:table-cell office:value-type="float" office:value="1033" calcext:value-type="float">
            <text:p>103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45S" calcext:value-type="time">
            <text:p>16:04:45</text:p>
          </table:table-cell>
          <table:table-cell office:value-type="float" office:value="989" calcext:value-type="float">
            <text:p>98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48S" calcext:value-type="time">
            <text:p>16:04:48</text:p>
          </table:table-cell>
          <table:table-cell office:value-type="float" office:value="1021" calcext:value-type="float">
            <text:p>102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50S" calcext:value-type="time">
            <text:p>16:04:50</text:p>
          </table:table-cell>
          <table:table-cell office:value-type="float" office:value="1012" calcext:value-type="float">
            <text:p>101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53S" calcext:value-type="time">
            <text:p>16:04:53</text:p>
          </table:table-cell>
          <table:table-cell office:value-type="float" office:value="1010" calcext:value-type="float">
            <text:p>101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55S" calcext:value-type="time">
            <text:p>16:04:55</text:p>
          </table:table-cell>
          <table:table-cell office:value-type="float" office:value="969" calcext:value-type="float">
            <text:p>96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4M58S" calcext:value-type="time">
            <text:p>16:04:58</text:p>
          </table:table-cell>
          <table:table-cell office:value-type="float" office:value="994" calcext:value-type="float">
            <text:p>99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00S" calcext:value-type="time">
            <text:p>16:05:00</text:p>
          </table:table-cell>
          <table:table-cell office:value-type="float" office:value="996" calcext:value-type="float">
            <text:p>99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03S" calcext:value-type="time">
            <text:p>16:05:03</text:p>
          </table:table-cell>
          <table:table-cell office:value-type="float" office:value="989" calcext:value-type="float">
            <text:p>98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05S" calcext:value-type="time">
            <text:p>16:05:05</text:p>
          </table:table-cell>
          <table:table-cell office:value-type="float" office:value="996" calcext:value-type="float">
            <text:p>99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08S" calcext:value-type="time">
            <text:p>16:05:08</text:p>
          </table:table-cell>
          <table:table-cell office:value-type="float" office:value="1019" calcext:value-type="float">
            <text:p>101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11S" calcext:value-type="time">
            <text:p>16:05:11</text:p>
          </table:table-cell>
          <table:table-cell office:value-type="float" office:value="990" calcext:value-type="float">
            <text:p>99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13S" calcext:value-type="time">
            <text:p>16:05:13</text:p>
          </table:table-cell>
          <table:table-cell office:value-type="float" office:value="980" calcext:value-type="float">
            <text:p>98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16S" calcext:value-type="time">
            <text:p>16:05:16</text:p>
          </table:table-cell>
          <table:table-cell office:value-type="float" office:value="983" calcext:value-type="float">
            <text:p>98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18S" calcext:value-type="time">
            <text:p>16:05:18</text:p>
          </table:table-cell>
          <table:table-cell office:value-type="float" office:value="1007" calcext:value-type="float">
            <text:p>100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21S" calcext:value-type="time">
            <text:p>16:05:21</text:p>
          </table:table-cell>
          <table:table-cell office:value-type="float" office:value="992" calcext:value-type="float">
            <text:p>99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23S" calcext:value-type="time">
            <text:p>16:05:23</text:p>
          </table:table-cell>
          <table:table-cell office:value-type="float" office:value="1009" calcext:value-type="float">
            <text:p>100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26S" calcext:value-type="time">
            <text:p>16:05:26</text:p>
          </table:table-cell>
          <table:table-cell office:value-type="float" office:value="521" calcext:value-type="float">
            <text:p>52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28S" calcext:value-type="time">
            <text:p>16:05:28</text:p>
          </table:table-cell>
          <table:table-cell office:value-type="float" office:value="669" calcext:value-type="float">
            <text:p>66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31S" calcext:value-type="time">
            <text:p>16:05:31</text:p>
          </table:table-cell>
          <table:table-cell office:value-type="float" office:value="403" calcext:value-type="float">
            <text:p>40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34S" calcext:value-type="time">
            <text:p>16:05:34</text:p>
          </table:table-cell>
          <table:table-cell office:value-type="float" office:value="350" calcext:value-type="float">
            <text:p>35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36S" calcext:value-type="time">
            <text:p>16:05:36</text:p>
          </table:table-cell>
          <table:table-cell office:value-type="float" office:value="622" calcext:value-type="float">
            <text:p>62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39S" calcext:value-type="time">
            <text:p>16:05:39</text:p>
          </table:table-cell>
          <table:table-cell office:value-type="float" office:value="342" calcext:value-type="float">
            <text:p>34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41S" calcext:value-type="time">
            <text:p>16:05:41</text:p>
          </table:table-cell>
          <table:table-cell office:value-type="float" office:value="151" calcext:value-type="float">
            <text:p>15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44S" calcext:value-type="time">
            <text:p>16:05:44</text:p>
          </table:table-cell>
          <table:table-cell office:value-type="float" office:value="547" calcext:value-type="float">
            <text:p>54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46S" calcext:value-type="time">
            <text:p>16:05:46</text:p>
          </table:table-cell>
          <table:table-cell office:value-type="float" office:value="207" calcext:value-type="float">
            <text:p>20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49S" calcext:value-type="time">
            <text:p>16:05:49</text:p>
          </table:table-cell>
          <table:table-cell office:value-type="float" office:value="161" calcext:value-type="float">
            <text:p>16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52S" calcext:value-type="time">
            <text:p>16:05:52</text:p>
          </table:table-cell>
          <table:table-cell office:value-type="float" office:value="79" calcext:value-type="float">
            <text:p>7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54S" calcext:value-type="time">
            <text:p>16:05:54</text:p>
          </table:table-cell>
          <table:table-cell office:value-type="float" office:value="195" calcext:value-type="float">
            <text:p>19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57S" calcext:value-type="time">
            <text:p>16:05:57</text:p>
          </table:table-cell>
          <table:table-cell office:value-type="float" office:value="357" calcext:value-type="float">
            <text:p>357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5M59S" calcext:value-type="time">
            <text:p>16:05:59</text:p>
          </table:table-cell>
          <table:table-cell office:value-type="float" office:value="62" calcext:value-type="float">
            <text:p>6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02S" calcext:value-type="time">
            <text:p>16:06:02</text:p>
          </table:table-cell>
          <table:table-cell office:value-type="float" office:value="31" calcext:value-type="float">
            <text:p>3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04S" calcext:value-type="time">
            <text:p>16:06:04</text:p>
          </table:table-cell>
          <table:table-cell office:value-type="float" office:value="159" calcext:value-type="float">
            <text:p>15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07S" calcext:value-type="time">
            <text:p>16:06:07</text:p>
          </table:table-cell>
          <table:table-cell office:value-type="float" office:value="211" calcext:value-type="float">
            <text:p>21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10S" calcext:value-type="time">
            <text:p>16:06:10</text:p>
          </table:table-cell>
          <table:table-cell office:value-type="float" office:value="432" calcext:value-type="float">
            <text:p>43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12S" calcext:value-type="time">
            <text:p>16:06:12</text:p>
          </table:table-cell>
          <table:table-cell office:value-type="float" office:value="541" calcext:value-type="float">
            <text:p>54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15S" calcext:value-type="time">
            <text:p>16:06:15</text:p>
          </table:table-cell>
          <table:table-cell office:value-type="float" office:value="349" calcext:value-type="float">
            <text:p>34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17S" calcext:value-type="time">
            <text:p>16:06:17</text:p>
          </table:table-cell>
          <table:table-cell office:value-type="float" office:value="163" calcext:value-type="float">
            <text:p>16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20S" calcext:value-type="time">
            <text:p>16:06:20</text:p>
          </table:table-cell>
          <table:table-cell office:value-type="float" office:value="279" calcext:value-type="float">
            <text:p>27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23S" calcext:value-type="time">
            <text:p>16:06:23</text:p>
          </table:table-cell>
          <table:table-cell office:value-type="float" office:value="351" calcext:value-type="float">
            <text:p>35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25S" calcext:value-type="time">
            <text:p>16:06:25</text:p>
          </table:table-cell>
          <table:table-cell office:value-type="float" office:value="347" calcext:value-type="float">
            <text:p>34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28S" calcext:value-type="time">
            <text:p>16:06:28</text:p>
          </table:table-cell>
          <table:table-cell office:value-type="float" office:value="342" calcext:value-type="float">
            <text:p>34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30S" calcext:value-type="time">
            <text:p>16:06:30</text:p>
          </table:table-cell>
          <table:table-cell office:value-type="float" office:value="151" calcext:value-type="float">
            <text:p>15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33S" calcext:value-type="time">
            <text:p>16:06:33</text:p>
          </table:table-cell>
          <table:table-cell office:value-type="float" office:value="457" calcext:value-type="float">
            <text:p>45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35S" calcext:value-type="time">
            <text:p>16:06:35</text:p>
          </table:table-cell>
          <table:table-cell office:value-type="float" office:value="257" calcext:value-type="float">
            <text:p>25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38S" calcext:value-type="time">
            <text:p>16:06:38</text:p>
          </table:table-cell>
          <table:table-cell office:value-type="float" office:value="494" calcext:value-type="float">
            <text:p>49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41S" calcext:value-type="time">
            <text:p>16:06:41</text:p>
          </table:table-cell>
          <table:table-cell office:value-type="float" office:value="289" calcext:value-type="float">
            <text:p>28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43S" calcext:value-type="time">
            <text:p>16:06:43</text:p>
          </table:table-cell>
          <table:table-cell office:value-type="float" office:value="787" calcext:value-type="float">
            <text:p>78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46S" calcext:value-type="time">
            <text:p>16:06:46</text:p>
          </table:table-cell>
          <table:table-cell office:value-type="float" office:value="123" calcext:value-type="float">
            <text:p>12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48S" calcext:value-type="time">
            <text:p>16:06:48</text:p>
          </table:table-cell>
          <table:table-cell office:value-type="float" office:value="498" calcext:value-type="float">
            <text:p>49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51S" calcext:value-type="time">
            <text:p>16:06:51</text:p>
          </table:table-cell>
          <table:table-cell office:value-type="float" office:value="288" calcext:value-type="float">
            <text:p>288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54S" calcext:value-type="time">
            <text:p>16:06:54</text:p>
          </table:table-cell>
          <table:table-cell office:value-type="float" office:value="124" calcext:value-type="float">
            <text:p>12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56S" calcext:value-type="time">
            <text:p>16:06:56</text:p>
          </table:table-cell>
          <table:table-cell office:value-type="float" office:value="99" calcext:value-type="float">
            <text:p>9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6M59S" calcext:value-type="time">
            <text:p>16:06:59</text:p>
          </table:table-cell>
          <table:table-cell office:value-type="float" office:value="275" calcext:value-type="float">
            <text:p>27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01S" calcext:value-type="time">
            <text:p>16:07:01</text:p>
          </table:table-cell>
          <table:table-cell office:value-type="float" office:value="706" calcext:value-type="float">
            <text:p>70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04S" calcext:value-type="time">
            <text:p>16:07:04</text:p>
          </table:table-cell>
          <table:table-cell office:value-type="float" office:value="168" calcext:value-type="float">
            <text:p>16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07S" calcext:value-type="time">
            <text:p>16:07:07</text:p>
          </table:table-cell>
          <table:table-cell office:value-type="float" office:value="141" calcext:value-type="float">
            <text:p>14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09S" calcext:value-type="time">
            <text:p>16:07:09</text:p>
          </table:table-cell>
          <table:table-cell office:value-type="float" office:value="210" calcext:value-type="float">
            <text:p>21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12S" calcext:value-type="time">
            <text:p>16:07:12</text:p>
          </table:table-cell>
          <table:table-cell office:value-type="float" office:value="223" calcext:value-type="float">
            <text:p>223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14S" calcext:value-type="time">
            <text:p>16:07:14</text:p>
          </table:table-cell>
          <table:table-cell office:value-type="float" office:value="185" calcext:value-type="float">
            <text:p>18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17S" calcext:value-type="time">
            <text:p>16:07:17</text:p>
          </table:table-cell>
          <table:table-cell office:value-type="float" office:value="234" calcext:value-type="float">
            <text:p>23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19S" calcext:value-type="time">
            <text:p>16:07:19</text:p>
          </table:table-cell>
          <table:table-cell office:value-type="float" office:value="476" calcext:value-type="float">
            <text:p>47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22S" calcext:value-type="time">
            <text:p>16:07:22</text:p>
          </table:table-cell>
          <table:table-cell office:value-type="float" office:value="701" calcext:value-type="float">
            <text:p>70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25S" calcext:value-type="time">
            <text:p>16:07:25</text:p>
          </table:table-cell>
          <table:table-cell office:value-type="float" office:value="260" calcext:value-type="float">
            <text:p>26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27S" calcext:value-type="time">
            <text:p>16:07:27</text:p>
          </table:table-cell>
          <table:table-cell office:value-type="float" office:value="190" calcext:value-type="float">
            <text:p>19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30S" calcext:value-type="time">
            <text:p>16:07:30</text:p>
          </table:table-cell>
          <table:table-cell office:value-type="float" office:value="694" calcext:value-type="float">
            <text:p>69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32S" calcext:value-type="time">
            <text:p>16:07:32</text:p>
          </table:table-cell>
          <table:table-cell office:value-type="float" office:value="207" calcext:value-type="float">
            <text:p>207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35S" calcext:value-type="time">
            <text:p>16:07:35</text:p>
          </table:table-cell>
          <table:table-cell office:value-type="float" office:value="28" calcext:value-type="float">
            <text:p>2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38S" calcext:value-type="time">
            <text:p>16:07:38</text:p>
          </table:table-cell>
          <table:table-cell office:value-type="float" office:value="212" calcext:value-type="float">
            <text:p>21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40S" calcext:value-type="time">
            <text:p>16:07:40</text:p>
          </table:table-cell>
          <table:table-cell office:value-type="float" office:value="700" calcext:value-type="float">
            <text:p>70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43S" calcext:value-type="time">
            <text:p>16:07:43</text:p>
          </table:table-cell>
          <table:table-cell office:value-type="float" office:value="192" calcext:value-type="float">
            <text:p>19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45S" calcext:value-type="time">
            <text:p>16:07:45</text:p>
          </table:table-cell>
          <table:table-cell office:value-type="float" office:value="225" calcext:value-type="float">
            <text:p>22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48S" calcext:value-type="time">
            <text:p>16:07:48</text:p>
          </table:table-cell>
          <table:table-cell office:value-type="float" office:value="57" calcext:value-type="float">
            <text:p>5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51S" calcext:value-type="time">
            <text:p>16:07:51</text:p>
          </table:table-cell>
          <table:table-cell office:value-type="float" office:value="260" calcext:value-type="float">
            <text:p>2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53S" calcext:value-type="time">
            <text:p>16:07:53</text:p>
          </table:table-cell>
          <table:table-cell office:value-type="float" office:value="631" calcext:value-type="float">
            <text:p>63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56S" calcext:value-type="time">
            <text:p>16:07:56</text:p>
          </table:table-cell>
          <table:table-cell office:value-type="float" office:value="508" calcext:value-type="float">
            <text:p>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7M59S" calcext:value-type="time">
            <text:p>16:07:59</text:p>
          </table:table-cell>
          <table:table-cell office:value-type="float" office:value="323" calcext:value-type="float">
            <text:p>32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01S" calcext:value-type="time">
            <text:p>16:08:01</text:p>
          </table:table-cell>
          <table:table-cell office:value-type="float" office:value="417" calcext:value-type="float">
            <text:p>41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04S" calcext:value-type="time">
            <text:p>16:08:04</text:p>
          </table:table-cell>
          <table:table-cell office:value-type="float" office:value="333" calcext:value-type="float">
            <text:p>33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06S" calcext:value-type="time">
            <text:p>16:08:06</text:p>
          </table:table-cell>
          <table:table-cell office:value-type="float" office:value="540" calcext:value-type="float">
            <text:p>54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09S" calcext:value-type="time">
            <text:p>16:08:09</text:p>
          </table:table-cell>
          <table:table-cell office:value-type="float" office:value="774" calcext:value-type="float">
            <text:p>77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12S" calcext:value-type="time">
            <text:p>16:08:12</text:p>
          </table:table-cell>
          <table:table-cell office:value-type="float" office:value="455" calcext:value-type="float">
            <text:p>4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14S" calcext:value-type="time">
            <text:p>16:08:14</text:p>
          </table:table-cell>
          <table:table-cell office:value-type="float" office:value="860" calcext:value-type="float">
            <text:p>86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17S" calcext:value-type="time">
            <text:p>16:08:17</text:p>
          </table:table-cell>
          <table:table-cell office:value-type="float" office:value="837" calcext:value-type="float">
            <text:p>83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19S" calcext:value-type="time">
            <text:p>16:08:19</text:p>
          </table:table-cell>
          <table:table-cell office:value-type="float" office:value="963" calcext:value-type="float">
            <text:p>96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22S" calcext:value-type="time">
            <text:p>16:08:22</text:p>
          </table:table-cell>
          <table:table-cell office:value-type="float" office:value="858" calcext:value-type="float">
            <text:p>85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25S" calcext:value-type="time">
            <text:p>16:08:25</text:p>
          </table:table-cell>
          <table:table-cell office:value-type="float" office:value="177" calcext:value-type="float">
            <text:p>17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27S" calcext:value-type="time">
            <text:p>16:08:27</text:p>
          </table:table-cell>
          <table:table-cell office:value-type="float" office:value="687" calcext:value-type="float">
            <text:p>687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30S" calcext:value-type="time">
            <text:p>16:08:30</text:p>
          </table:table-cell>
          <table:table-cell office:value-type="float" office:value="250" calcext:value-type="float">
            <text:p>25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33S" calcext:value-type="time">
            <text:p>16:08:33</text:p>
          </table:table-cell>
          <table:table-cell office:value-type="float" office:value="288" calcext:value-type="float">
            <text:p>28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35S" calcext:value-type="time">
            <text:p>16:08:35</text:p>
          </table:table-cell>
          <table:table-cell office:value-type="float" office:value="347" calcext:value-type="float">
            <text:p>347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38S" calcext:value-type="time">
            <text:p>16:08:38</text:p>
          </table:table-cell>
          <table:table-cell office:value-type="float" office:value="541" calcext:value-type="float">
            <text:p>54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40S" calcext:value-type="time">
            <text:p>16:08:40</text:p>
          </table:table-cell>
          <table:table-cell office:value-type="float" office:value="526" calcext:value-type="float">
            <text:p>526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43S" calcext:value-type="time">
            <text:p>16:08:43</text:p>
          </table:table-cell>
          <table:table-cell office:value-type="float" office:value="421" calcext:value-type="float">
            <text:p>421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6H08M46S" calcext:value-type="time">
            <text:p>16:08:46</text:p>
          </table:table-cell>
          <table:table-cell office:value-type="float" office:value="77" calcext:value-type="float">
            <text:p>77</text:p>
          </table:table-cell>
          <table:table-cell office:value-type="float" office:value="675" calcext:value-type="float">
            <text:p>675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07S" calcext:value-type="time">
            <text:p>15:11:07</text:p>
          </table:table-cell>
          <table:table-cell office:value-type="float" office:value="47" calcext:value-type="float">
            <text:p>47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08S" calcext:value-type="time">
            <text:p>15:11:08</text:p>
          </table:table-cell>
          <table:table-cell office:value-type="float" office:value="21" calcext:value-type="float">
            <text:p>21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09S" calcext:value-type="time">
            <text:p>15:11:09</text:p>
          </table:table-cell>
          <table:table-cell office:value-type="float" office:value="15" calcext:value-type="float">
            <text:p>15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0S" calcext:value-type="time">
            <text:p>15:11:10</text:p>
          </table:table-cell>
          <table:table-cell office:value-type="float" office:value="27" calcext:value-type="float">
            <text:p>27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1S" calcext:value-type="time">
            <text:p>15:11:11</text:p>
          </table:table-cell>
          <table:table-cell office:value-type="float" office:value="28" calcext:value-type="float">
            <text:p>28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2S" calcext:value-type="time">
            <text:p>15:11:12</text:p>
          </table:table-cell>
          <table:table-cell office:value-type="float" office:value="22" calcext:value-type="float">
            <text:p>22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3S" calcext:value-type="time">
            <text:p>15:11:13</text:p>
          </table:table-cell>
          <table:table-cell office:value-type="float" office:value="41" calcext:value-type="float">
            <text:p>41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4S" calcext:value-type="time">
            <text:p>15:11:14</text:p>
          </table:table-cell>
          <table:table-cell office:value-type="float" office:value="69" calcext:value-type="float">
            <text:p>69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6S" calcext:value-type="time">
            <text:p>15:11:16</text:p>
          </table:table-cell>
          <table:table-cell office:value-type="float" office:value="17" calcext:value-type="float">
            <text:p>17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7S" calcext:value-type="time">
            <text:p>15:11:17</text:p>
          </table:table-cell>
          <table:table-cell office:value-type="float" office:value="28" calcext:value-type="float">
            <text:p>28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8S" calcext:value-type="time">
            <text:p>15:11:18</text:p>
          </table:table-cell>
          <table:table-cell office:value-type="float" office:value="41" calcext:value-type="float">
            <text:p>41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19S" calcext:value-type="time">
            <text:p>15:11:19</text:p>
          </table:table-cell>
          <table:table-cell office:value-type="float" office:value="37" calcext:value-type="float">
            <text:p>37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0S" calcext:value-type="time">
            <text:p>15:11:20</text:p>
          </table:table-cell>
          <table:table-cell office:value-type="float" office:value="30" calcext:value-type="float">
            <text:p>30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1S" calcext:value-type="time">
            <text:p>15:11:21</text:p>
          </table:table-cell>
          <table:table-cell office:value-type="float" office:value="32" calcext:value-type="float">
            <text:p>32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2S" calcext:value-type="time">
            <text:p>15:11:22</text:p>
          </table:table-cell>
          <table:table-cell office:value-type="float" office:value="75" calcext:value-type="float">
            <text:p>75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4S" calcext:value-type="time">
            <text:p>15:11:24</text:p>
          </table:table-cell>
          <table:table-cell office:value-type="float" office:value="562" calcext:value-type="float">
            <text:p>56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5S" calcext:value-type="time">
            <text:p>15:11:25</text:p>
          </table:table-cell>
          <table:table-cell office:value-type="float" office:value="66" calcext:value-type="float">
            <text:p>66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6S" calcext:value-type="time">
            <text:p>15:11:2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7S" calcext:value-type="time">
            <text:p>15:11:27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8S" calcext:value-type="time">
            <text:p>15:11:2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29S" calcext:value-type="time">
            <text:p>15:11:29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0S" calcext:value-type="time">
            <text:p>15:11:30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2S" calcext:value-type="time">
            <text:p>15:11:32</text:p>
          </table:table-cell>
          <table:table-cell office:value-type="float" office:value="139" calcext:value-type="float">
            <text:p>13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3S" calcext:value-type="time">
            <text:p>15:11:33</text:p>
          </table:table-cell>
          <table:table-cell office:value-type="float" office:value="387" calcext:value-type="float">
            <text:p>38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4S" calcext:value-type="time">
            <text:p>15:11:34</text:p>
          </table:table-cell>
          <table:table-cell office:value-type="float" office:value="144" calcext:value-type="float">
            <text:p>14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5S" calcext:value-type="time">
            <text:p>15:11:35</text:p>
          </table:table-cell>
          <table:table-cell office:value-type="float" office:value="125" calcext:value-type="float">
            <text:p>12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6S" calcext:value-type="time">
            <text:p>15:11:36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7S" calcext:value-type="time">
            <text:p>15:11:37</text:p>
          </table:table-cell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8S" calcext:value-type="time">
            <text:p>15:11:38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39S" calcext:value-type="time">
            <text:p>15:11:39</text:p>
          </table:table-cell>
          <table:table-cell office:value-type="float" office:value="353" calcext:value-type="float">
            <text:p>35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41S" calcext:value-type="time">
            <text:p>15:11:41</text:p>
          </table:table-cell>
          <table:table-cell office:value-type="float" office:value="300" calcext:value-type="float">
            <text:p>3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42S" calcext:value-type="time">
            <text:p>15:11:42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43S" calcext:value-type="time">
            <text:p>15:11:43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44S" calcext:value-type="time">
            <text:p>15:11:44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45S" calcext:value-type="time">
            <text:p>15:11:45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46S" calcext:value-type="time">
            <text:p>15:11:46</text:p>
          </table:table-cell>
          <table:table-cell office:value-type="float" office:value="39" calcext:value-type="float">
            <text:p>3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47S" calcext:value-type="time">
            <text:p>15:11:47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49S" calcext:value-type="time">
            <text:p>15:11:49</text:p>
          </table:table-cell>
          <table:table-cell office:value-type="float" office:value="36" calcext:value-type="float">
            <text:p>3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0S" calcext:value-type="time">
            <text:p>15:11:50</text:p>
          </table:table-cell>
          <table:table-cell office:value-type="float" office:value="46" calcext:value-type="float">
            <text:p>4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1S" calcext:value-type="time">
            <text:p>15:11:51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2S" calcext:value-type="time">
            <text:p>15:11:52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3S" calcext:value-type="time">
            <text:p>15:11:53</text:p>
          </table:table-cell>
          <table:table-cell office:value-type="float" office:value="395" calcext:value-type="float">
            <text:p>39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4S" calcext:value-type="time">
            <text:p>15:11:54</text:p>
          </table:table-cell>
          <table:table-cell office:value-type="float" office:value="41" calcext:value-type="float">
            <text:p>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5S" calcext:value-type="time">
            <text:p>15:11:55</text:p>
          </table:table-cell>
          <table:table-cell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7S" calcext:value-type="time">
            <text:p>15:11:57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8S" calcext:value-type="time">
            <text:p>15:11:58</text:p>
          </table:table-cell>
          <table:table-cell office:value-type="float" office:value="455" calcext:value-type="float">
            <text:p>45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1M59S" calcext:value-type="time">
            <text:p>15:11:59</text:p>
          </table:table-cell>
          <table:table-cell office:value-type="float" office:value="281" calcext:value-type="float">
            <text:p>28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0S" calcext:value-type="time">
            <text:p>15:12:0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1S" calcext:value-type="time">
            <text:p>15:12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2S" calcext:value-type="time">
            <text:p>15:12:02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3S" calcext:value-type="time">
            <text:p>15:12:03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5S" calcext:value-type="time">
            <text:p>15:12:05</text:p>
          </table:table-cell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6S" calcext:value-type="time">
            <text:p>15:12:06</text:p>
          </table:table-cell>
          <table:table-cell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7S" calcext:value-type="time">
            <text:p>15:12:07</text:p>
          </table:table-cell>
          <table:table-cell office:value-type="float" office:value="909" calcext:value-type="float">
            <text:p>90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8S" calcext:value-type="time">
            <text:p>15:12:08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09S" calcext:value-type="time">
            <text:p>15:12:09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10S" calcext:value-type="time">
            <text:p>15:12:10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11S" calcext:value-type="time">
            <text:p>15:12:11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13S" calcext:value-type="time">
            <text:p>15:12:1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14S" calcext:value-type="time">
            <text:p>15:12:14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15S" calcext:value-type="time">
            <text:p>15:12:15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16S" calcext:value-type="time">
            <text:p>15:12:1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17S" calcext:value-type="time">
            <text:p>15:12:17</text:p>
          </table:table-cell>
          <table:table-cell office:value-type="float" office:value="1023" calcext:value-type="float">
            <text:p>102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18S" calcext:value-type="time">
            <text:p>15:12:18</text:p>
          </table:table-cell>
          <table:table-cell office:value-type="float" office:value="404" calcext:value-type="float">
            <text:p>4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0S" calcext:value-type="time">
            <text:p>15:12:20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1S" calcext:value-type="time">
            <text:p>15:12: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2S" calcext:value-type="time">
            <text:p>15:12:22</text:p>
          </table:table-cell>
          <table:table-cell office:value-type="float" office:value="685" calcext:value-type="float">
            <text:p>68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3S" calcext:value-type="time">
            <text:p>15:12:23</text:p>
          </table:table-cell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4S" calcext:value-type="time">
            <text:p>15:12:24</text:p>
          </table:table-cell>
          <table:table-cell office:value-type="float" office:value="73" calcext:value-type="float">
            <text:p>7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5S" calcext:value-type="time">
            <text:p>15:12:25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6S" calcext:value-type="time">
            <text:p>15:12:26</text:p>
          </table:table-cell>
          <table:table-cell office:value-type="float" office:value="846" calcext:value-type="float">
            <text:p>84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8S" calcext:value-type="time">
            <text:p>15:12:28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29S" calcext:value-type="time">
            <text:p>15:12:29</text:p>
          </table:table-cell>
          <table:table-cell office:value-type="float" office:value="686" calcext:value-type="float">
            <text:p>68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0S" calcext:value-type="time">
            <text:p>15:12:30</text:p>
          </table:table-cell>
          <table:table-cell office:value-type="float" office:value="23" calcext:value-type="float">
            <text:p>2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1S" calcext:value-type="time">
            <text:p>15:12:31</text:p>
          </table:table-cell>
          <table:table-cell office:value-type="float" office:value="231" calcext:value-type="float">
            <text:p>23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2S" calcext:value-type="time">
            <text:p>15:12:32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3S" calcext:value-type="time">
            <text:p>15:12:3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5S" calcext:value-type="time">
            <text:p>15:12:35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6S" calcext:value-type="time">
            <text:p>15:12:3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7S" calcext:value-type="time">
            <text:p>15:12:3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8S" calcext:value-type="time">
            <text:p>15:12:3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39S" calcext:value-type="time">
            <text:p>15:12:39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41S" calcext:value-type="time">
            <text:p>15:12:4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42S" calcext:value-type="time">
            <text:p>15:12:42</text:p>
          </table:table-cell>
          <table:table-cell office:value-type="float" office:value="29" calcext:value-type="float">
            <text:p>2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43S" calcext:value-type="time">
            <text:p>15:12:43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44S" calcext:value-type="time">
            <text:p>15:12:44</text:p>
          </table:table-cell>
          <table:table-cell office:value-type="float" office:value="401" calcext:value-type="float">
            <text:p>4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45S" calcext:value-type="time">
            <text:p>15:12:45</text:p>
          </table:table-cell>
          <table:table-cell office:value-type="float" office:value="41" calcext:value-type="float">
            <text:p>4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46S" calcext:value-type="time">
            <text:p>15:12:46</text:p>
          </table:table-cell>
          <table:table-cell office:value-type="float" office:value="111" calcext:value-type="float">
            <text:p>11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48S" calcext:value-type="time">
            <text:p>15:12:4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49S" calcext:value-type="time">
            <text:p>15:12:49</text:p>
          </table:table-cell>
          <table:table-cell office:value-type="float" office:value="397" calcext:value-type="float">
            <text:p>39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0S" calcext:value-type="time">
            <text:p>15:12:50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1S" calcext:value-type="time">
            <text:p>15:12:5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2S" calcext:value-type="time">
            <text:p>15:12:5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3S" calcext:value-type="time">
            <text:p>15:12:53</text:p>
          </table:table-cell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5S" calcext:value-type="time">
            <text:p>15:12:55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6S" calcext:value-type="time">
            <text:p>15:12:56</text:p>
          </table:table-cell>
          <table:table-cell office:value-type="float" office:value="773" calcext:value-type="float">
            <text:p>77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7S" calcext:value-type="time">
            <text:p>15:12:5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8S" calcext:value-type="time">
            <text:p>15:12:58</text:p>
          </table:table-cell>
          <table:table-cell office:value-type="float" office:value="411" calcext:value-type="float">
            <text:p>41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2M59S" calcext:value-type="time">
            <text:p>15:12:59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01S" calcext:value-type="time">
            <text:p>15:13:01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02S" calcext:value-type="time">
            <text:p>15:13:02</text:p>
          </table:table-cell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03S" calcext:value-type="time">
            <text:p>15:13:03</text:p>
          </table:table-cell>
          <table:table-cell office:value-type="float" office:value="139" calcext:value-type="float">
            <text:p>13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04S" calcext:value-type="time">
            <text:p>15:13:04</text:p>
          </table:table-cell>
          <table:table-cell office:value-type="float" office:value="215" calcext:value-type="float">
            <text:p>21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05S" calcext:value-type="time">
            <text:p>15:13:05</text:p>
          </table:table-cell>
          <table:table-cell office:value-type="float" office:value="93" calcext:value-type="float">
            <text:p>9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07S" calcext:value-type="time">
            <text:p>15:13:07</text:p>
          </table:table-cell>
          <table:table-cell office:value-type="float" office:value="6" calcext:value-type="float">
            <text:p>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08S" calcext:value-type="time">
            <text:p>15:13:08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09S" calcext:value-type="time">
            <text:p>15:13:09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10S" calcext:value-type="time">
            <text:p>15:13:10</text:p>
          </table:table-cell>
          <table:table-cell office:value-type="float" office:value="130" calcext:value-type="float">
            <text:p>13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11S" calcext:value-type="time">
            <text:p>15:13:11</text:p>
          </table:table-cell>
          <table:table-cell office:value-type="float" office:value="239" calcext:value-type="float">
            <text:p>23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12S" calcext:value-type="time">
            <text:p>15:13:12</text:p>
          </table:table-cell>
          <table:table-cell office:value-type="float" office:value="72" calcext:value-type="float">
            <text:p>7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14S" calcext:value-type="time">
            <text:p>15:13:14</text:p>
          </table:table-cell>
          <table:table-cell office:value-type="float" office:value="19" calcext:value-type="float">
            <text:p>1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15S" calcext:value-type="time">
            <text:p>15:13:15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16S" calcext:value-type="time">
            <text:p>15:13:16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17S" calcext:value-type="time">
            <text:p>15:13:17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18S" calcext:value-type="time">
            <text:p>15:13:18</text:p>
          </table:table-cell>
          <table:table-cell office:value-type="float" office:value="104" calcext:value-type="float">
            <text:p>10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0S" calcext:value-type="time">
            <text:p>15:13:20</text:p>
          </table:table-cell>
          <table:table-cell office:value-type="float" office:value="137" calcext:value-type="float">
            <text:p>13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1S" calcext:value-type="time">
            <text:p>15:13:21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2S" calcext:value-type="time">
            <text:p>15:13:22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3S" calcext:value-type="time">
            <text:p>15:13:23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4S" calcext:value-type="time">
            <text:p>15:13:24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6S" calcext:value-type="time">
            <text:p>15:13:26</text:p>
          </table:table-cell>
          <table:table-cell office:value-type="float" office:value="120" calcext:value-type="float">
            <text:p>12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7S" calcext:value-type="time">
            <text:p>15:13:27</text:p>
          </table:table-cell>
          <table:table-cell office:value-type="float" office:value="402" calcext:value-type="float">
            <text:p>40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8S" calcext:value-type="time">
            <text:p>15:13:28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29S" calcext:value-type="time">
            <text:p>15:13:29</text:p>
          </table:table-cell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30S" calcext:value-type="time">
            <text:p>15:13:30</text:p>
          </table:table-cell>
          <table:table-cell office:value-type="float" office:value="104" calcext:value-type="float">
            <text:p>10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32S" calcext:value-type="time">
            <text:p>15:13:32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33S" calcext:value-type="time">
            <text:p>15:13:33</text:p>
          </table:table-cell>
          <table:table-cell office:value-type="float" office:value="142" calcext:value-type="float">
            <text:p>14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34S" calcext:value-type="time">
            <text:p>15:13:34</text:p>
          </table:table-cell>
          <table:table-cell office:value-type="float" office:value="180" calcext:value-type="float">
            <text:p>18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35S" calcext:value-type="time">
            <text:p>15:13:35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36S" calcext:value-type="time">
            <text:p>15:13:36</text:p>
          </table:table-cell>
          <table:table-cell office:value-type="float" office:value="56" calcext:value-type="float">
            <text:p>5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38S" calcext:value-type="time">
            <text:p>15:13:38</text:p>
          </table:table-cell>
          <table:table-cell office:value-type="float" office:value="22" calcext:value-type="float">
            <text:p>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39S" calcext:value-type="time">
            <text:p>15:13:39</text:p>
          </table:table-cell>
          <table:table-cell office:value-type="float" office:value="274" calcext:value-type="float">
            <text:p>27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40S" calcext:value-type="time">
            <text:p>15:13:40</text:p>
          </table:table-cell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41S" calcext:value-type="time">
            <text:p>15:13:41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43S" calcext:value-type="time">
            <text:p>15:13:43</text:p>
          </table:table-cell>
          <table:table-cell office:value-type="float" office:value="42" calcext:value-type="float">
            <text:p>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44S" calcext:value-type="time">
            <text:p>15:13:44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45S" calcext:value-type="time">
            <text:p>15:13:45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46S" calcext:value-type="time">
            <text:p>15:13:46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47S" calcext:value-type="time">
            <text:p>15:13:47</text:p>
          </table:table-cell>
          <table:table-cell office:value-type="float" office:value="177" calcext:value-type="float">
            <text:p>17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49S" calcext:value-type="time">
            <text:p>15:13:49</text:p>
          </table:table-cell>
          <table:table-cell office:value-type="float" office:value="111" calcext:value-type="float">
            <text:p>11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50S" calcext:value-type="time">
            <text:p>15:13:50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51S" calcext:value-type="time">
            <text:p>15:13:51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52S" calcext:value-type="time">
            <text:p>15:13:52</text:p>
          </table:table-cell>
          <table:table-cell office:value-type="float" office:value="56" calcext:value-type="float">
            <text:p>5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54S" calcext:value-type="time">
            <text:p>15:13:54</text:p>
          </table:table-cell>
          <table:table-cell office:value-type="float" office:value="34" calcext:value-type="float">
            <text:p>3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55S" calcext:value-type="time">
            <text:p>15:13:55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56S" calcext:value-type="time">
            <text:p>15:13:56</text:p>
          </table:table-cell>
          <table:table-cell office:value-type="float" office:value="50" calcext:value-type="float">
            <text:p>5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57S" calcext:value-type="time">
            <text:p>15:13:57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3M58S" calcext:value-type="time">
            <text:p>15:13:58</text:p>
          </table:table-cell>
          <table:table-cell office:value-type="float" office:value="366" calcext:value-type="float">
            <text:p>3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0S" calcext:value-type="time">
            <text:p>15:14:00</text:p>
          </table:table-cell>
          <table:table-cell office:value-type="float" office:value="60" calcext:value-type="float">
            <text:p>6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1S" calcext:value-type="time">
            <text:p>15:14:01</text:p>
          </table:table-cell>
          <table:table-cell office:value-type="float" office:value="377" calcext:value-type="float">
            <text:p>37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2S" calcext:value-type="time">
            <text:p>15:14:02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3S" calcext:value-type="time">
            <text:p>15:14:03</text:p>
          </table:table-cell>
          <table:table-cell office:value-type="float" office:value="222" calcext:value-type="float">
            <text:p>22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5S" calcext:value-type="time">
            <text:p>15:14:05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6S" calcext:value-type="time">
            <text:p>15:14:06</text:p>
          </table:table-cell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7S" calcext:value-type="time">
            <text:p>15:14:07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8S" calcext:value-type="time">
            <text:p>15:14:0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09S" calcext:value-type="time">
            <text:p>15:14:09</text:p>
          </table:table-cell>
          <table:table-cell office:value-type="float" office:value="196" calcext:value-type="float">
            <text:p>19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11S" calcext:value-type="time">
            <text:p>15:14:11</text:p>
          </table:table-cell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12S" calcext:value-type="time">
            <text:p>15:14:12</text:p>
          </table:table-cell>
          <table:table-cell office:value-type="float" office:value="152" calcext:value-type="float">
            <text:p>15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13S" calcext:value-type="time">
            <text:p>15:14:13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14S" calcext:value-type="time">
            <text:p>15:14:14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16S" calcext:value-type="time">
            <text:p>15:14:1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17S" calcext:value-type="time">
            <text:p>15:14:17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18S" calcext:value-type="time">
            <text:p>15:14:18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19S" calcext:value-type="time">
            <text:p>15:14:19</text:p>
          </table:table-cell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21S" calcext:value-type="time">
            <text:p>15:14:2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22S" calcext:value-type="time">
            <text:p>15:14:22</text:p>
          </table:table-cell>
          <table:table-cell office:value-type="float" office:value="344" calcext:value-type="float">
            <text:p>3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23S" calcext:value-type="time">
            <text:p>15:14:23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24S" calcext:value-type="time">
            <text:p>15:14:24</text:p>
          </table:table-cell>
          <table:table-cell office:value-type="float" office:value="114" calcext:value-type="float">
            <text:p>11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26S" calcext:value-type="time">
            <text:p>15:14:26</text:p>
          </table:table-cell>
          <table:table-cell office:value-type="float" office:value="63" calcext:value-type="float">
            <text:p>6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27S" calcext:value-type="time">
            <text:p>15:14:27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28S" calcext:value-type="time">
            <text:p>15:14:28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29S" calcext:value-type="time">
            <text:p>15:14:29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31S" calcext:value-type="time">
            <text:p>15:14:3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32S" calcext:value-type="time">
            <text:p>15:14:32</text:p>
          </table:table-cell>
          <table:table-cell office:value-type="float" office:value="27" calcext:value-type="float">
            <text:p>2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33S" calcext:value-type="time">
            <text:p>15:14:33</text:p>
          </table:table-cell>
          <table:table-cell office:value-type="float" office:value="613" calcext:value-type="float">
            <text:p>61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34S" calcext:value-type="time">
            <text:p>15:14:34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36S" calcext:value-type="time">
            <text:p>15:14:36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37S" calcext:value-type="time">
            <text:p>15:14:37</text:p>
          </table:table-cell>
          <table:table-cell office:value-type="float" office:value="254" calcext:value-type="float">
            <text:p>25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38S" calcext:value-type="time">
            <text:p>15:14:38</text:p>
          </table:table-cell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39S" calcext:value-type="time">
            <text:p>15:14:39</text:p>
          </table:table-cell>
          <table:table-cell office:value-type="float" office:value="49" calcext:value-type="float">
            <text:p>4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40S" calcext:value-type="time">
            <text:p>15:14:40</text:p>
          </table:table-cell>
          <table:table-cell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42S" calcext:value-type="time">
            <text:p>15:14:42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43S" calcext:value-type="time">
            <text:p>15:14:43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44S" calcext:value-type="time">
            <text:p>15:14:44</text:p>
          </table:table-cell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46S" calcext:value-type="time">
            <text:p>15:14:46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47S" calcext:value-type="time">
            <text:p>15:14:47</text:p>
          </table:table-cell>
          <table:table-cell office:value-type="float" office:value="46" calcext:value-type="float">
            <text:p>4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48S" calcext:value-type="time">
            <text:p>15:14:48</text:p>
          </table:table-cell>
          <table:table-cell office:value-type="float" office:value="22" calcext:value-type="float">
            <text:p>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49S" calcext:value-type="time">
            <text:p>15:14:49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51S" calcext:value-type="time">
            <text:p>15:14:51</text:p>
          </table:table-cell>
          <table:table-cell office:value-type="float" office:value="15" calcext:value-type="float">
            <text:p>1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52S" calcext:value-type="time">
            <text:p>15:14:52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53S" calcext:value-type="time">
            <text:p>15:14:53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54S" calcext:value-type="time">
            <text:p>15:14:54</text:p>
          </table:table-cell>
          <table:table-cell office:value-type="float" office:value="23" calcext:value-type="float">
            <text:p>2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56S" calcext:value-type="time">
            <text:p>15:14:56</text:p>
          </table:table-cell>
          <table:table-cell office:value-type="float" office:value="27" calcext:value-type="float">
            <text:p>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57S" calcext:value-type="time">
            <text:p>15:14:57</text:p>
          </table:table-cell>
          <table:table-cell office:value-type="float" office:value="17" calcext:value-type="float">
            <text:p>1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58S" calcext:value-type="time">
            <text:p>15:14:58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4M59S" calcext:value-type="time">
            <text:p>15:14:59</text:p>
          </table:table-cell>
          <table:table-cell office:value-type="float" office:value="22" calcext:value-type="float">
            <text:p>2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01S" calcext:value-type="time">
            <text:p>15:15:01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02S" calcext:value-type="time">
            <text:p>15:15:02</text:p>
          </table:table-cell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03S" calcext:value-type="time">
            <text:p>15:15:03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04S" calcext:value-type="time">
            <text:p>15:15:04</text:p>
          </table:table-cell>
          <table:table-cell office:value-type="float" office:value="18" calcext:value-type="float">
            <text:p>1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06S" calcext:value-type="time">
            <text:p>15:15:06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07S" calcext:value-type="time">
            <text:p>15:15:07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08S" calcext:value-type="time">
            <text:p>15:15:08</text:p>
          </table:table-cell>
          <table:table-cell office:value-type="float" office:value="17" calcext:value-type="float">
            <text:p>1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09S" calcext:value-type="time">
            <text:p>15:15:09</text:p>
          </table:table-cell>
          <table:table-cell office:value-type="float" office:value="35" calcext:value-type="float">
            <text:p>3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11S" calcext:value-type="time">
            <text:p>15:15:11</text:p>
          </table:table-cell>
          <table:table-cell office:value-type="float" office:value="23" calcext:value-type="float">
            <text:p>2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12S" calcext:value-type="time">
            <text:p>15:15:12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13S" calcext:value-type="time">
            <text:p>15:15:13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15S" calcext:value-type="time">
            <text:p>15:15:15</text:p>
          </table:table-cell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16S" calcext:value-type="time">
            <text:p>15:15:16</text:p>
          </table:table-cell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17S" calcext:value-type="time">
            <text:p>15:15:17</text:p>
          </table:table-cell>
          <table:table-cell office:value-type="float" office:value="38" calcext:value-type="float">
            <text:p>3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18S" calcext:value-type="time">
            <text:p>15:15:18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20S" calcext:value-type="time">
            <text:p>15:15:20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21S" calcext:value-type="time">
            <text:p>15:15:21</text:p>
          </table:table-cell>
          <table:table-cell office:value-type="float" office:value="84" calcext:value-type="float">
            <text:p>8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22S" calcext:value-type="time">
            <text:p>15:15:22</text:p>
          </table:table-cell>
          <table:table-cell office:value-type="float" office:value="70" calcext:value-type="float">
            <text:p>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24S" calcext:value-type="time">
            <text:p>15:15:24</text:p>
          </table:table-cell>
          <table:table-cell office:value-type="float" office:value="16" calcext:value-type="float">
            <text:p>1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25S" calcext:value-type="time">
            <text:p>15:15:25</text:p>
          </table:table-cell>
          <table:table-cell office:value-type="float" office:value="54" calcext:value-type="float">
            <text:p>5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26S" calcext:value-type="time">
            <text:p>15:15:26</text:p>
          </table:table-cell>
          <table:table-cell office:value-type="float" office:value="40" calcext:value-type="float">
            <text:p>4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27S" calcext:value-type="time">
            <text:p>15:15:27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29S" calcext:value-type="time">
            <text:p>15:15:29</text:p>
          </table:table-cell>
          <table:table-cell office:value-type="float" office:value="26" calcext:value-type="float">
            <text:p>2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30S" calcext:value-type="time">
            <text:p>15:15:30</text:p>
          </table:table-cell>
          <table:table-cell office:value-type="float" office:value="415" calcext:value-type="float">
            <text:p>41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31S" calcext:value-type="time">
            <text:p>15:15:31</text:p>
          </table:table-cell>
          <table:table-cell office:value-type="float" office:value="673" calcext:value-type="float">
            <text:p>67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32S" calcext:value-type="time">
            <text:p>15:15:32</text:p>
          </table:table-cell>
          <table:table-cell office:value-type="float" office:value="417" calcext:value-type="float">
            <text:p>41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34S" calcext:value-type="time">
            <text:p>15:15:34</text:p>
          </table:table-cell>
          <table:table-cell office:value-type="float" office:value="41" calcext:value-type="float">
            <text:p>4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35S" calcext:value-type="time">
            <text:p>15:15:35</text:p>
          </table:table-cell>
          <table:table-cell office:value-type="float" office:value="34" calcext:value-type="float">
            <text:p>3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36S" calcext:value-type="time">
            <text:p>15:15:36</text:p>
          </table:table-cell>
          <table:table-cell office:value-type="float" office:value="276" calcext:value-type="float">
            <text:p>27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38S" calcext:value-type="time">
            <text:p>15:15:38</text:p>
          </table:table-cell>
          <table:table-cell office:value-type="float" office:value="13" calcext:value-type="float">
            <text:p>1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39S" calcext:value-type="time">
            <text:p>15:15:39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40S" calcext:value-type="time">
            <text:p>15:15:40</text:p>
          </table:table-cell>
          <table:table-cell office:value-type="float" office:value="126" calcext:value-type="float">
            <text:p>12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41S" calcext:value-type="time">
            <text:p>15:15:41</text:p>
          </table:table-cell>
          <table:table-cell office:value-type="float" office:value="229" calcext:value-type="float">
            <text:p>22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43S" calcext:value-type="time">
            <text:p>15:15:43</text:p>
          </table:table-cell>
          <table:table-cell office:value-type="float" office:value="7" calcext:value-type="float">
            <text:p>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44S" calcext:value-type="time">
            <text:p>15:15:44</text:p>
          </table:table-cell>
          <table:table-cell office:value-type="float" office:value="87" calcext:value-type="float">
            <text:p>8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45S" calcext:value-type="time">
            <text:p>15:15:45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47S" calcext:value-type="time">
            <text:p>15:15:47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48S" calcext:value-type="time">
            <text:p>15:15:48</text:p>
          </table:table-cell>
          <table:table-cell office:value-type="float" office:value="158" calcext:value-type="float">
            <text:p>15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49S" calcext:value-type="time">
            <text:p>15:15:49</text:p>
          </table:table-cell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51S" calcext:value-type="time">
            <text:p>15:15:51</text:p>
          </table:table-cell>
          <table:table-cell office:value-type="float" office:value="56" calcext:value-type="float">
            <text:p>5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52S" calcext:value-type="time">
            <text:p>15:15:52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53S" calcext:value-type="time">
            <text:p>15:15:53</text:p>
          </table:table-cell>
          <table:table-cell office:value-type="float" office:value="149" calcext:value-type="float">
            <text:p>14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54S" calcext:value-type="time">
            <text:p>15:15:54</text:p>
          </table:table-cell>
          <table:table-cell office:value-type="float" office:value="37" calcext:value-type="float">
            <text:p>3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56S" calcext:value-type="time">
            <text:p>15:15:56</text:p>
          </table:table-cell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57S" calcext:value-type="time">
            <text:p>15:15:57</text:p>
          </table:table-cell>
          <table:table-cell office:value-type="float" office:value="268" calcext:value-type="float">
            <text:p>26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5M58S" calcext:value-type="time">
            <text:p>15:15:58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00S" calcext:value-type="time">
            <text:p>15:16:0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01S" calcext:value-type="time">
            <text:p>15:16:01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02S" calcext:value-type="time">
            <text:p>15:16:02</text:p>
          </table:table-cell>
          <table:table-cell office:value-type="float" office:value="87" calcext:value-type="float">
            <text:p>8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04S" calcext:value-type="time">
            <text:p>15:16:04</text:p>
          </table:table-cell>
          <table:table-cell office:value-type="float" office:value="212" calcext:value-type="float">
            <text:p>21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05S" calcext:value-type="time">
            <text:p>15:16:05</text:p>
          </table:table-cell>
          <table:table-cell office:value-type="float" office:value="138" calcext:value-type="float">
            <text:p>13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06S" calcext:value-type="time">
            <text:p>15:16:06</text:p>
          </table:table-cell>
          <table:table-cell office:value-type="float" office:value="53" calcext:value-type="float">
            <text:p>5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07S" calcext:value-type="time">
            <text:p>15:16:07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09S" calcext:value-type="time">
            <text:p>15:16:09</text:p>
          </table:table-cell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10S" calcext:value-type="time">
            <text:p>15:16:10</text:p>
          </table:table-cell>
          <table:table-cell office:value-type="float" office:value="277" calcext:value-type="float">
            <text:p>27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11S" calcext:value-type="time">
            <text:p>15:16:11</text:p>
          </table:table-cell>
          <table:table-cell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13S" calcext:value-type="time">
            <text:p>15:16:13</text:p>
          </table:table-cell>
          <table:table-cell office:value-type="float" office:value="290" calcext:value-type="float">
            <text:p>29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14S" calcext:value-type="time">
            <text:p>15:16:14</text:p>
          </table:table-cell>
          <table:table-cell office:value-type="float" office:value="601" calcext:value-type="float">
            <text:p>6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15S" calcext:value-type="time">
            <text:p>15:16:15</text:p>
          </table:table-cell>
          <table:table-cell office:value-type="float" office:value="25" calcext:value-type="float">
            <text:p>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17S" calcext:value-type="time">
            <text:p>15:16:17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18S" calcext:value-type="time">
            <text:p>15:16:1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19S" calcext:value-type="time">
            <text:p>15:16:19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21S" calcext:value-type="time">
            <text:p>15:16:21</text:p>
          </table:table-cell>
          <table:table-cell office:value-type="float" office:value="40" calcext:value-type="float">
            <text:p>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22S" calcext:value-type="time">
            <text:p>15:16:22</text:p>
          </table:table-cell>
          <table:table-cell office:value-type="float" office:value="45" calcext:value-type="float">
            <text:p>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23S" calcext:value-type="time">
            <text:p>15:16:23</text:p>
          </table:table-cell>
          <table:table-cell office:value-type="float" office:value="39" calcext:value-type="float">
            <text:p>3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24S" calcext:value-type="time">
            <text:p>15:16:24</text:p>
          </table:table-cell>
          <table:table-cell office:value-type="float" office:value="116" calcext:value-type="float">
            <text:p>11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26S" calcext:value-type="time">
            <text:p>15:16:26</text:p>
          </table:table-cell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27S" calcext:value-type="time">
            <text:p>15:16:27</text:p>
          </table:table-cell>
          <table:table-cell office:value-type="float" office:value="76" calcext:value-type="float">
            <text:p>7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28S" calcext:value-type="time">
            <text:p>15:16:28</text:p>
          </table:table-cell>
          <table:table-cell office:value-type="float" office:value="85" calcext:value-type="float">
            <text:p>8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30S" calcext:value-type="time">
            <text:p>15:16:30</text:p>
          </table:table-cell>
          <table:table-cell office:value-type="float" office:value="32" calcext:value-type="float">
            <text:p>3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31S" calcext:value-type="time">
            <text:p>15:16:31</text:p>
          </table:table-cell>
          <table:table-cell office:value-type="float" office:value="101" calcext:value-type="float">
            <text:p>10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32S" calcext:value-type="time">
            <text:p>15:16:32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34S" calcext:value-type="time">
            <text:p>15:16:34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35S" calcext:value-type="time">
            <text:p>15:16:35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36S" calcext:value-type="time">
            <text:p>15:16:36</text:p>
          </table:table-cell>
          <table:table-cell office:value-type="float" office:value="105" calcext:value-type="float">
            <text:p>10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38S" calcext:value-type="time">
            <text:p>15:16:38</text:p>
          </table:table-cell>
          <table:table-cell office:value-type="float" office:value="52" calcext:value-type="float">
            <text:p>5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39S" calcext:value-type="time">
            <text:p>15:16:39</text:p>
          </table:table-cell>
          <table:table-cell office:value-type="float" office:value="14" calcext:value-type="float">
            <text:p>1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40S" calcext:value-type="time">
            <text:p>15:16:40</text:p>
          </table:table-cell>
          <table:table-cell office:value-type="float" office:value="28" calcext:value-type="float">
            <text:p>2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42S" calcext:value-type="time">
            <text:p>15:16:42</text:p>
          </table:table-cell>
          <table:table-cell office:value-type="float" office:value="9" calcext:value-type="float">
            <text:p>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43S" calcext:value-type="time">
            <text:p>15:16:43</text:p>
          </table:table-cell>
          <table:table-cell office:value-type="float" office:value="131" calcext:value-type="float">
            <text:p>13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44S" calcext:value-type="time">
            <text:p>15:16:44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46S" calcext:value-type="time">
            <text:p>15:16:46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47S" calcext:value-type="time">
            <text:p>15:16:47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48S" calcext:value-type="time">
            <text:p>15:16:48</text:p>
          </table:table-cell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50S" calcext:value-type="time">
            <text:p>15:16:50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51S" calcext:value-type="time">
            <text:p>15:16:51</text:p>
          </table:table-cell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52S" calcext:value-type="time">
            <text:p>15:16:52</text:p>
          </table:table-cell>
          <table:table-cell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54S" calcext:value-type="time">
            <text:p>15:16:54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55S" calcext:value-type="time">
            <text:p>15:16:55</text:p>
          </table:table-cell>
          <table:table-cell office:value-type="float" office:value="93" calcext:value-type="float">
            <text:p>9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56S" calcext:value-type="time">
            <text:p>15:16:56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58S" calcext:value-type="time">
            <text:p>15:16:58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6M59S" calcext:value-type="time">
            <text:p>15:16:59</text:p>
          </table:table-cell>
          <table:table-cell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00S" calcext:value-type="time">
            <text:p>15:17:00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02S" calcext:value-type="time">
            <text:p>15:17:02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03S" calcext:value-type="time">
            <text:p>15:17:03</text:p>
          </table:table-cell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04S" calcext:value-type="time">
            <text:p>15:17:04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06S" calcext:value-type="time">
            <text:p>15:17:06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07S" calcext:value-type="time">
            <text:p>15:17:07</text:p>
          </table:table-cell>
          <table:table-cell office:value-type="float" office:value="125" calcext:value-type="float">
            <text:p>12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08S" calcext:value-type="time">
            <text:p>15:17:08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10S" calcext:value-type="time">
            <text:p>15:17:10</text:p>
          </table:table-cell>
          <table:table-cell office:value-type="float" office:value="106" calcext:value-type="float">
            <text:p>10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11S" calcext:value-type="time">
            <text:p>15:17:11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12S" calcext:value-type="time">
            <text:p>15:17:12</text:p>
          </table:table-cell>
          <table:table-cell office:value-type="float" office:value="46" calcext:value-type="float">
            <text:p>4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14S" calcext:value-type="time">
            <text:p>15:17:14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15S" calcext:value-type="time">
            <text:p>15:17:15</text:p>
          </table:table-cell>
          <table:table-cell office:value-type="float" office:value="57" calcext:value-type="float">
            <text:p>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16S" calcext:value-type="time">
            <text:p>15:17:16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18S" calcext:value-type="time">
            <text:p>15:17:18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19S" calcext:value-type="time">
            <text:p>15:17:19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20S" calcext:value-type="time">
            <text:p>15:17:20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22S" calcext:value-type="time">
            <text:p>15:17:22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23S" calcext:value-type="time">
            <text:p>15:17:23</text:p>
          </table:table-cell>
          <table:table-cell office:value-type="float" office:value="76" calcext:value-type="float">
            <text:p>7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24S" calcext:value-type="time">
            <text:p>15:17:24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26S" calcext:value-type="time">
            <text:p>15:17:26</text:p>
          </table:table-cell>
          <table:table-cell office:value-type="float" office:value="16" calcext:value-type="float">
            <text:p>1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27S" calcext:value-type="time">
            <text:p>15:17:27</text:p>
          </table:table-cell>
          <table:table-cell office:value-type="float" office:value="27" calcext:value-type="float">
            <text:p>2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28S" calcext:value-type="time">
            <text:p>15:17:28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30S" calcext:value-type="time">
            <text:p>15:17:30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31S" calcext:value-type="time">
            <text:p>15:17:3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33S" calcext:value-type="time">
            <text:p>15:17:33</text:p>
          </table:table-cell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34S" calcext:value-type="time">
            <text:p>15:17:34</text:p>
          </table:table-cell>
          <table:table-cell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35S" calcext:value-type="time">
            <text:p>15:17:35</text:p>
          </table:table-cell>
          <table:table-cell office:value-type="float" office:value="158" calcext:value-type="float">
            <text:p>1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37S" calcext:value-type="time">
            <text:p>15:17:37</text:p>
          </table:table-cell>
          <table:table-cell office:value-type="float" office:value="77" calcext:value-type="float">
            <text:p>7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38S" calcext:value-type="time">
            <text:p>15:17:3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39S" calcext:value-type="time">
            <text:p>15:17:39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41S" calcext:value-type="time">
            <text:p>15:17:41</text:p>
          </table:table-cell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42S" calcext:value-type="time">
            <text:p>15:17:42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43S" calcext:value-type="time">
            <text:p>15:17:43</text:p>
          </table:table-cell>
          <table:table-cell office:value-type="float" office:value="39" calcext:value-type="float">
            <text:p>3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45S" calcext:value-type="time">
            <text:p>15:17:45</text:p>
          </table:table-cell>
          <table:table-cell office:value-type="float" office:value="101" calcext:value-type="float">
            <text:p>1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46S" calcext:value-type="time">
            <text:p>15:17:46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48S" calcext:value-type="time">
            <text:p>15:17:48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49S" calcext:value-type="time">
            <text:p>15:17:49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50S" calcext:value-type="time">
            <text:p>15:17:5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52S" calcext:value-type="time">
            <text:p>15:17:52</text:p>
          </table:table-cell>
          <table:table-cell office:value-type="float" office:value="182" calcext:value-type="float">
            <text:p>18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53S" calcext:value-type="time">
            <text:p>15:17:53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54S" calcext:value-type="time">
            <text:p>15:17:54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56S" calcext:value-type="time">
            <text:p>15:17:5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57S" calcext:value-type="time">
            <text:p>15:17:57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7M58S" calcext:value-type="time">
            <text:p>15:17:58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00S" calcext:value-type="time">
            <text:p>15:18:00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01S" calcext:value-type="time">
            <text:p>15:18:01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03S" calcext:value-type="time">
            <text:p>15:18:0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04S" calcext:value-type="time">
            <text:p>15:18:04</text:p>
          </table:table-cell>
          <table:table-cell office:value-type="float" office:value="65" calcext:value-type="float">
            <text:p>6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05S" calcext:value-type="time">
            <text:p>15:18:05</text:p>
          </table:table-cell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07S" calcext:value-type="time">
            <text:p>15:18:07</text:p>
          </table:table-cell>
          <table:table-cell office:value-type="float" office:value="145" calcext:value-type="float">
            <text:p>14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08S" calcext:value-type="time">
            <text:p>15:18:08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09S" calcext:value-type="time">
            <text:p>15:18:09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11S" calcext:value-type="time">
            <text:p>15:18:11</text:p>
          </table:table-cell>
          <table:table-cell office:value-type="float" office:value="71" calcext:value-type="float">
            <text:p>7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12S" calcext:value-type="time">
            <text:p>15:18:12</text:p>
          </table:table-cell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14S" calcext:value-type="time">
            <text:p>15:18:14</text:p>
          </table:table-cell>
          <table:table-cell office:value-type="float" office:value="134" calcext:value-type="float">
            <text:p>13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15S" calcext:value-type="time">
            <text:p>15:18:15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16S" calcext:value-type="time">
            <text:p>15:18:16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18S" calcext:value-type="time">
            <text:p>15:18:18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19S" calcext:value-type="time">
            <text:p>15:18:19</text:p>
          </table:table-cell>
          <table:table-cell office:value-type="float" office:value="36" calcext:value-type="float">
            <text:p>3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21S" calcext:value-type="time">
            <text:p>15:18:21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22S" calcext:value-type="time">
            <text:p>15:18:22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23S" calcext:value-type="time">
            <text:p>15:18:23</text:p>
          </table:table-cell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25S" calcext:value-type="time">
            <text:p>15:18:25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26S" calcext:value-type="time">
            <text:p>15:18:26</text:p>
          </table:table-cell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27S" calcext:value-type="time">
            <text:p>15:18:27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29S" calcext:value-type="time">
            <text:p>15:18:29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30S" calcext:value-type="time">
            <text:p>15:18:30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32S" calcext:value-type="time">
            <text:p>15:18:32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33S" calcext:value-type="time">
            <text:p>15:18:33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34S" calcext:value-type="time">
            <text:p>15:18:34</text:p>
          </table:table-cell>
          <table:table-cell office:value-type="float" office:value="58" calcext:value-type="float">
            <text:p>5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36S" calcext:value-type="time">
            <text:p>15:18:36</text:p>
          </table:table-cell>
          <table:table-cell office:value-type="float" office:value="58" calcext:value-type="float">
            <text:p>5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37S" calcext:value-type="time">
            <text:p>15:18:37</text:p>
          </table:table-cell>
          <table:table-cell office:value-type="float" office:value="44" calcext:value-type="float">
            <text:p>4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39S" calcext:value-type="time">
            <text:p>15:18:39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40S" calcext:value-type="time">
            <text:p>15:18:40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41S" calcext:value-type="time">
            <text:p>15:18:41</text:p>
          </table:table-cell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43S" calcext:value-type="time">
            <text:p>15:18:43</text:p>
          </table:table-cell>
          <table:table-cell office:value-type="float" office:value="94" calcext:value-type="float">
            <text:p>9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44S" calcext:value-type="time">
            <text:p>15:18:44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46S" calcext:value-type="time">
            <text:p>15:18:46</text:p>
          </table:table-cell>
          <table:table-cell office:value-type="float" office:value="46" calcext:value-type="float">
            <text:p>4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47S" calcext:value-type="time">
            <text:p>15:18:47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48S" calcext:value-type="time">
            <text:p>15:18:48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50S" calcext:value-type="time">
            <text:p>15:18:50</text:p>
          </table:table-cell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51S" calcext:value-type="time">
            <text:p>15:18:51</text:p>
          </table:table-cell>
          <table:table-cell office:value-type="float" office:value="78" calcext:value-type="float">
            <text:p>7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53S" calcext:value-type="time">
            <text:p>15:18:53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54S" calcext:value-type="time">
            <text:p>15:18:54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55S" calcext:value-type="time">
            <text:p>15:18:55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57S" calcext:value-type="time">
            <text:p>15:18:57</text:p>
          </table:table-cell>
          <table:table-cell office:value-type="float" office:value="11" calcext:value-type="float">
            <text:p>1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8M58S" calcext:value-type="time">
            <text:p>15:18:58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</table:table-row>
      </table:table>
      <table:table table:name="Sheet3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00S" calcext:value-type="time">
            <text:p>15:19:00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01S" calcext:value-type="time">
            <text:p>15:19:01</text:p>
          </table:table-cell>
          <table:table-cell office:value-type="float" office:value="39" calcext:value-type="float">
            <text:p>3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02S" calcext:value-type="time">
            <text:p>15:19:02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04S" calcext:value-type="time">
            <text:p>15:19:04</text:p>
          </table:table-cell>
          <table:table-cell office:value-type="float" office:value="47" calcext:value-type="float">
            <text:p>4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05S" calcext:value-type="time">
            <text:p>15:19:05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07S" calcext:value-type="time">
            <text:p>15:19:07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08S" calcext:value-type="time">
            <text:p>15:19:08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09S" calcext:value-type="time">
            <text:p>15:19:09</text:p>
          </table:table-cell>
          <table:table-cell office:value-type="float" office:value="71" calcext:value-type="float">
            <text:p>7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11S" calcext:value-type="time">
            <text:p>15:19:11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12S" calcext:value-type="time">
            <text:p>15:19:12</text:p>
          </table:table-cell>
          <table:table-cell office:value-type="float" office:value="21" calcext:value-type="float">
            <text:p>2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14S" calcext:value-type="time">
            <text:p>15:19:14</text:p>
          </table:table-cell>
          <table:table-cell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15S" calcext:value-type="time">
            <text:p>15:19:15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17S" calcext:value-type="time">
            <text:p>15:19:17</text:p>
          </table:table-cell>
          <table:table-cell office:value-type="float" office:value="76" calcext:value-type="float">
            <text:p>7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18S" calcext:value-type="time">
            <text:p>15:19:18</text:p>
          </table:table-cell>
          <table:table-cell office:value-type="float" office:value="79" calcext:value-type="float">
            <text:p>7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19S" calcext:value-type="time">
            <text:p>15:19:19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21S" calcext:value-type="time">
            <text:p>15:19:21</text:p>
          </table:table-cell>
          <table:table-cell office:value-type="float" office:value="39" calcext:value-type="float">
            <text:p>3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22S" calcext:value-type="time">
            <text:p>15:19:22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24S" calcext:value-type="time">
            <text:p>15:19:24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25S" calcext:value-type="time">
            <text:p>15:19:25</text:p>
          </table:table-cell>
          <table:table-cell office:value-type="float" office:value="26" calcext:value-type="float">
            <text:p>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26S" calcext:value-type="time">
            <text:p>15:19:26</text:p>
          </table:table-cell>
          <table:table-cell office:value-type="float" office:value="42" calcext:value-type="float">
            <text:p>4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28S" calcext:value-type="time">
            <text:p>15:19:28</text:p>
          </table:table-cell>
          <table:table-cell office:value-type="float" office:value="27" calcext:value-type="float">
            <text:p>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29S" calcext:value-type="time">
            <text:p>15:19:29</text:p>
          </table:table-cell>
          <table:table-cell office:value-type="float" office:value="124" calcext:value-type="float">
            <text:p>1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31S" calcext:value-type="time">
            <text:p>15:19:31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32S" calcext:value-type="time">
            <text:p>15:19:32</text:p>
          </table:table-cell>
          <table:table-cell office:value-type="float" office:value="113" calcext:value-type="float">
            <text:p>11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34S" calcext:value-type="time">
            <text:p>15:19:34</text:p>
          </table:table-cell>
          <table:table-cell office:value-type="float" office:value="82" calcext:value-type="float">
            <text:p>8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35S" calcext:value-type="time">
            <text:p>15:19:35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36S" calcext:value-type="time">
            <text:p>15:19:36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38S" calcext:value-type="time">
            <text:p>15:19:38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39S" calcext:value-type="time">
            <text:p>15:19:39</text:p>
          </table:table-cell>
          <table:table-cell office:value-type="float" office:value="137" calcext:value-type="float">
            <text:p>13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41S" calcext:value-type="time">
            <text:p>15:19:41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42S" calcext:value-type="time">
            <text:p>15:19:42</text:p>
          </table:table-cell>
          <table:table-cell office:value-type="float" office:value="18" calcext:value-type="float">
            <text:p>1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44S" calcext:value-type="time">
            <text:p>15:19:44</text:p>
          </table:table-cell>
          <table:table-cell office:value-type="float" office:value="63" calcext:value-type="float">
            <text:p>6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45S" calcext:value-type="time">
            <text:p>15:19:45</text:p>
          </table:table-cell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46S" calcext:value-type="time">
            <text:p>15:19:46</text:p>
          </table:table-cell>
          <table:table-cell office:value-type="float" office:value="18" calcext:value-type="float">
            <text:p>1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48S" calcext:value-type="time">
            <text:p>15:19:48</text:p>
          </table:table-cell>
          <table:table-cell office:value-type="float" office:value="74" calcext:value-type="float">
            <text:p>7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49S" calcext:value-type="time">
            <text:p>15:19:49</text:p>
          </table:table-cell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51S" calcext:value-type="time">
            <text:p>15:19:51</text:p>
          </table:table-cell>
          <table:table-cell office:value-type="float" office:value="58" calcext:value-type="float">
            <text:p>5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52S" calcext:value-type="time">
            <text:p>15:19:52</text:p>
          </table:table-cell>
          <table:table-cell office:value-type="float" office:value="57" calcext:value-type="float">
            <text:p>5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54S" calcext:value-type="time">
            <text:p>15:19:54</text:p>
          </table:table-cell>
          <table:table-cell office:value-type="float" office:value="79" calcext:value-type="float">
            <text:p>7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55S" calcext:value-type="time">
            <text:p>15:19:55</text:p>
          </table:table-cell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56S" calcext:value-type="time">
            <text:p>15:19:56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58S" calcext:value-type="time">
            <text:p>15:19:58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19M59S" calcext:value-type="time">
            <text:p>15:19:59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01S" calcext:value-type="time">
            <text:p>15:20:01</text:p>
          </table:table-cell>
          <table:table-cell office:value-type="float" office:value="35" calcext:value-type="float">
            <text:p>3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02S" calcext:value-type="time">
            <text:p>15:20:02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04S" calcext:value-type="time">
            <text:p>15:20:04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05S" calcext:value-type="time">
            <text:p>15:20:05</text:p>
          </table:table-cell>
          <table:table-cell office:value-type="float" office:value="65" calcext:value-type="float">
            <text:p>6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07S" calcext:value-type="time">
            <text:p>15:20:07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08S" calcext:value-type="time">
            <text:p>15:20:08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09S" calcext:value-type="time">
            <text:p>15:20:09</text:p>
          </table:table-cell>
          <table:table-cell office:value-type="float" office:value="31" calcext:value-type="float">
            <text:p>3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11S" calcext:value-type="time">
            <text:p>15:20:11</text:p>
          </table:table-cell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12S" calcext:value-type="time">
            <text:p>15:20:12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14S" calcext:value-type="time">
            <text:p>15:20:14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15S" calcext:value-type="time">
            <text:p>15:20:15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17S" calcext:value-type="time">
            <text:p>15:20:17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18S" calcext:value-type="time">
            <text:p>15:20:18</text:p>
          </table:table-cell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20S" calcext:value-type="time">
            <text:p>15:20:20</text:p>
          </table:table-cell>
          <table:table-cell office:value-type="float" office:value="41" calcext:value-type="float">
            <text:p>4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21S" calcext:value-type="time">
            <text:p>15:20:21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22S" calcext:value-type="time">
            <text:p>15:20:22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24S" calcext:value-type="time">
            <text:p>15:20:24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25S" calcext:value-type="time">
            <text:p>15:20:25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27S" calcext:value-type="time">
            <text:p>15:20:2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28S" calcext:value-type="time">
            <text:p>15:20:2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30S" calcext:value-type="time">
            <text:p>15:20:30</text:p>
          </table:table-cell>
          <table:table-cell office:value-type="float" office:value="193" calcext:value-type="float">
            <text:p>19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31S" calcext:value-type="time">
            <text:p>15:20:31</text:p>
          </table:table-cell>
          <table:table-cell office:value-type="float" office:value="70" calcext:value-type="float">
            <text:p>7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33S" calcext:value-type="time">
            <text:p>15:20:33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34S" calcext:value-type="time">
            <text:p>15:20:3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36S" calcext:value-type="time">
            <text:p>15:20:36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37S" calcext:value-type="time">
            <text:p>15:20:37</text:p>
          </table:table-cell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39S" calcext:value-type="time">
            <text:p>15:20:3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40S" calcext:value-type="time">
            <text:p>15:20:40</text:p>
          </table:table-cell>
          <table:table-cell office:value-type="float" office:value="68" calcext:value-type="float">
            <text:p>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41S" calcext:value-type="time">
            <text:p>15:20:41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43S" calcext:value-type="time">
            <text:p>15:20:43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44S" calcext:value-type="time">
            <text:p>15:20:44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46S" calcext:value-type="time">
            <text:p>15:20:46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47S" calcext:value-type="time">
            <text:p>15:20:47</text:p>
          </table:table-cell>
          <table:table-cell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49S" calcext:value-type="time">
            <text:p>15:20:49</text:p>
          </table:table-cell>
          <table:table-cell office:value-type="float" office:value="36" calcext:value-type="float">
            <text:p>3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50S" calcext:value-type="time">
            <text:p>15:20:50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52S" calcext:value-type="time">
            <text:p>15:20:52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53S" calcext:value-type="time">
            <text:p>15:20:53</text:p>
          </table:table-cell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55S" calcext:value-type="time">
            <text:p>15:20:55</text:p>
          </table:table-cell>
          <table:table-cell office:value-type="float" office:value="27" calcext:value-type="float">
            <text:p>2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56S" calcext:value-type="time">
            <text:p>15:20:56</text:p>
          </table:table-cell>
          <table:table-cell office:value-type="float" office:value="67" calcext:value-type="float">
            <text:p>6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58S" calcext:value-type="time">
            <text:p>15:20:58</text:p>
          </table:table-cell>
          <table:table-cell office:value-type="float" office:value="71" calcext:value-type="float">
            <text:p>7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0M59S" calcext:value-type="time">
            <text:p>15:20:59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01S" calcext:value-type="time">
            <text:p>15:21:01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02S" calcext:value-type="time">
            <text:p>15:21:02</text:p>
          </table:table-cell>
          <table:table-cell office:value-type="float" office:value="22" calcext:value-type="float">
            <text:p>2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03S" calcext:value-type="time">
            <text:p>15:21:03</text:p>
          </table:table-cell>
          <table:table-cell office:value-type="float" office:value="59" calcext:value-type="float">
            <text:p>5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05S" calcext:value-type="time">
            <text:p>15:21:05</text:p>
          </table:table-cell>
          <table:table-cell office:value-type="float" office:value="41" calcext:value-type="float">
            <text:p>4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06S" calcext:value-type="time">
            <text:p>15:21:06</text:p>
          </table:table-cell>
          <table:table-cell office:value-type="float" office:value="82" calcext:value-type="float">
            <text:p>8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08S" calcext:value-type="time">
            <text:p>15:21:08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09S" calcext:value-type="time">
            <text:p>15:21:09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11S" calcext:value-type="time">
            <text:p>15:21:11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12S" calcext:value-type="time">
            <text:p>15:21:12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14S" calcext:value-type="time">
            <text:p>15:21:14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15S" calcext:value-type="time">
            <text:p>15:21:15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17S" calcext:value-type="time">
            <text:p>15:21:17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18S" calcext:value-type="time">
            <text:p>15:21:18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20S" calcext:value-type="time">
            <text:p>15:21:20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21S" calcext:value-type="time">
            <text:p>15:21:21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23S" calcext:value-type="time">
            <text:p>15:21:23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24S" calcext:value-type="time">
            <text:p>15:21:24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26S" calcext:value-type="time">
            <text:p>15:21:26</text:p>
          </table:table-cell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27S" calcext:value-type="time">
            <text:p>15:21:27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29S" calcext:value-type="time">
            <text:p>15:21:29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30S" calcext:value-type="time">
            <text:p>15:21:30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32S" calcext:value-type="time">
            <text:p>15:21:32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33S" calcext:value-type="time">
            <text:p>15:21:33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35S" calcext:value-type="time">
            <text:p>15:21:35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36S" calcext:value-type="time">
            <text:p>15:21:3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38S" calcext:value-type="time">
            <text:p>15:21:38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39S" calcext:value-type="time">
            <text:p>15:21:39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41S" calcext:value-type="time">
            <text:p>15:21:41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42S" calcext:value-type="time">
            <text:p>15:21:42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44S" calcext:value-type="time">
            <text:p>15:21:44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45S" calcext:value-type="time">
            <text:p>15:21:45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47S" calcext:value-type="time">
            <text:p>15:21:47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48S" calcext:value-type="time">
            <text:p>15:21:48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50S" calcext:value-type="time">
            <text:p>15:21:50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51S" calcext:value-type="time">
            <text:p>15:21:51</text:p>
          </table:table-cell>
          <table:table-cell office:value-type="float" office:value="64" calcext:value-type="float">
            <text:p>6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53S" calcext:value-type="time">
            <text:p>15:21:53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54S" calcext:value-type="time">
            <text:p>15:21:54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56S" calcext:value-type="time">
            <text:p>15:21:56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57S" calcext:value-type="time">
            <text:p>15:21:57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1M59S" calcext:value-type="time">
            <text:p>15:21:5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00S" calcext:value-type="time">
            <text:p>15:22: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02S" calcext:value-type="time">
            <text:p>15:22:02</text:p>
          </table:table-cell>
          <table:table-cell office:value-type="float" office:value="63" calcext:value-type="float">
            <text:p>6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03S" calcext:value-type="time">
            <text:p>15:22:03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05S" calcext:value-type="time">
            <text:p>15:22:05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06S" calcext:value-type="time">
            <text:p>15:22:06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08S" calcext:value-type="time">
            <text:p>15:22:08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09S" calcext:value-type="time">
            <text:p>15:22:09</text:p>
          </table:table-cell>
          <table:table-cell office:value-type="float" office:value="89" calcext:value-type="float">
            <text:p>8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11S" calcext:value-type="time">
            <text:p>15:22:11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12S" calcext:value-type="time">
            <text:p>15:22:12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14S" calcext:value-type="time">
            <text:p>15:22:14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15S" calcext:value-type="time">
            <text:p>15:22:15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17S" calcext:value-type="time">
            <text:p>15:22:17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18S" calcext:value-type="time">
            <text:p>15:22:18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20S" calcext:value-type="time">
            <text:p>15:22:20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21S" calcext:value-type="time">
            <text:p>15:22:21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23S" calcext:value-type="time">
            <text:p>15:22:23</text:p>
          </table:table-cell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24S" calcext:value-type="time">
            <text:p>15:22:24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26S" calcext:value-type="time">
            <text:p>15:22:26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27S" calcext:value-type="time">
            <text:p>15:22:27</text:p>
          </table:table-cell>
          <table:table-cell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29S" calcext:value-type="time">
            <text:p>15:22:29</text:p>
          </table:table-cell>
          <table:table-cell office:value-type="float" office:value="68" calcext:value-type="float">
            <text:p>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30S" calcext:value-type="time">
            <text:p>15:22:30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32S" calcext:value-type="time">
            <text:p>15:22:32</text:p>
          </table:table-cell>
          <table:table-cell office:value-type="float" office:value="87" calcext:value-type="float">
            <text:p>8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33S" calcext:value-type="time">
            <text:p>15:22:33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35S" calcext:value-type="time">
            <text:p>15:22:35</text:p>
          </table:table-cell>
          <table:table-cell office:value-type="float" office:value="86" calcext:value-type="float">
            <text:p>8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36S" calcext:value-type="time">
            <text:p>15:22:36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38S" calcext:value-type="time">
            <text:p>15:22:38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39S" calcext:value-type="time">
            <text:p>15:22:39</text:p>
          </table:table-cell>
          <table:table-cell office:value-type="float" office:value="81" calcext:value-type="float">
            <text:p>8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41S" calcext:value-type="time">
            <text:p>15:22:41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42S" calcext:value-type="time">
            <text:p>15:22:42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44S" calcext:value-type="time">
            <text:p>15:22:44</text:p>
          </table:table-cell>
          <table:table-cell office:value-type="float" office:value="143" calcext:value-type="float">
            <text:p>14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46S" calcext:value-type="time">
            <text:p>15:22:46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47S" calcext:value-type="time">
            <text:p>15:22:47</text:p>
          </table:table-cell>
          <table:table-cell office:value-type="float" office:value="33" calcext:value-type="float">
            <text:p>3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49S" calcext:value-type="time">
            <text:p>15:22:49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50S" calcext:value-type="time">
            <text:p>15:22:50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52S" calcext:value-type="time">
            <text:p>15:22:52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53S" calcext:value-type="time">
            <text:p>15:22:53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55S" calcext:value-type="time">
            <text:p>15:22:55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56S" calcext:value-type="time">
            <text:p>15:22:56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58S" calcext:value-type="time">
            <text:p>15:22:58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2M59S" calcext:value-type="time">
            <text:p>15:22:59</text:p>
          </table:table-cell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01S" calcext:value-type="time">
            <text:p>15:23:0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02S" calcext:value-type="time">
            <text:p>15:23:02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04S" calcext:value-type="time">
            <text:p>15:23:04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05S" calcext:value-type="time">
            <text:p>15:23:05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07S" calcext:value-type="time">
            <text:p>15:23:07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09S" calcext:value-type="time">
            <text:p>15:23:09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10S" calcext:value-type="time">
            <text:p>15:23:10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12S" calcext:value-type="time">
            <text:p>15:23:12</text:p>
          </table:table-cell>
          <table:table-cell office:value-type="float" office:value="38" calcext:value-type="float">
            <text:p>3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13S" calcext:value-type="time">
            <text:p>15:23:13</text:p>
          </table:table-cell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15S" calcext:value-type="time">
            <text:p>15:23:15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16S" calcext:value-type="time">
            <text:p>15:23:16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18S" calcext:value-type="time">
            <text:p>15:23:18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19S" calcext:value-type="time">
            <text:p>15:23:19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21S" calcext:value-type="time">
            <text:p>15:23:21</text:p>
          </table:table-cell>
          <table:table-cell office:value-type="float" office:value="67" calcext:value-type="float">
            <text:p>6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22S" calcext:value-type="time">
            <text:p>15:23:22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24S" calcext:value-type="time">
            <text:p>15:23:24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26S" calcext:value-type="time">
            <text:p>15:23:26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27S" calcext:value-type="time">
            <text:p>15:23:27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29S" calcext:value-type="time">
            <text:p>15:23:29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30S" calcext:value-type="time">
            <text:p>15:23:30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32S" calcext:value-type="time">
            <text:p>15:23:3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33S" calcext:value-type="time">
            <text:p>15:23:33</text:p>
          </table:table-cell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35S" calcext:value-type="time">
            <text:p>15:23:35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36S" calcext:value-type="time">
            <text:p>15:23:36</text:p>
          </table:table-cell>
          <table:table-cell office:value-type="float" office:value="33" calcext:value-type="float">
            <text:p>3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38S" calcext:value-type="time">
            <text:p>15:23:38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40S" calcext:value-type="time">
            <text:p>15:23:40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41S" calcext:value-type="time">
            <text:p>15:23:41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43S" calcext:value-type="time">
            <text:p>15:23:43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44S" calcext:value-type="time">
            <text:p>15:23:44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46S" calcext:value-type="time">
            <text:p>15:23:46</text:p>
          </table:table-cell>
          <table:table-cell office:value-type="float" office:value="31" calcext:value-type="float">
            <text:p>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47S" calcext:value-type="time">
            <text:p>15:23:47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49S" calcext:value-type="time">
            <text:p>15:23:49</text:p>
          </table:table-cell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50S" calcext:value-type="time">
            <text:p>15:23:5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52S" calcext:value-type="time">
            <text:p>15:23:52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54S" calcext:value-type="time">
            <text:p>15:23:54</text:p>
          </table:table-cell>
          <table:table-cell office:value-type="float" office:value="78" calcext:value-type="float">
            <text:p>7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55S" calcext:value-type="time">
            <text:p>15:23:55</text:p>
          </table:table-cell>
          <table:table-cell office:value-type="float" office:value="82" calcext:value-type="float">
            <text:p>8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57S" calcext:value-type="time">
            <text:p>15:23:57</text:p>
          </table:table-cell>
          <table:table-cell office:value-type="float" office:value="64" calcext:value-type="float">
            <text:p>6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3M58S" calcext:value-type="time">
            <text:p>15:23:58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4M00S" calcext:value-type="time">
            <text:p>15:24:00</text:p>
          </table:table-cell>
          <table:table-cell table:number-columns-repeated="2" office:value-type="float" office:value="213" calcext:value-type="float">
            <text:p>213</text:p>
          </table:table-cell>
        </table:table-row>
      </table:table>
      <table:table table:name="Sheet4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00S" calcext:value-type="time">
            <text:p>15:25:00</text:p>
          </table:table-cell>
          <table:table-cell office:value-type="float" office:value="18" calcext:value-type="float">
            <text:p>1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02S" calcext:value-type="time">
            <text:p>15:25:02</text:p>
          </table:table-cell>
          <table:table-cell office:value-type="float" office:value="323" calcext:value-type="float">
            <text:p>3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03S" calcext:value-type="time">
            <text:p>15:25:03</text:p>
          </table:table-cell>
          <table:table-cell office:value-type="float" office:value="263" calcext:value-type="float">
            <text:p>26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05S" calcext:value-type="time">
            <text:p>15:25:05</text:p>
          </table:table-cell>
          <table:table-cell office:value-type="float" office:value="58" calcext:value-type="float">
            <text:p>5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06S" calcext:value-type="time">
            <text:p>15:25:06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08S" calcext:value-type="time">
            <text:p>15:25:08</text:p>
          </table:table-cell>
          <table:table-cell office:value-type="float" office:value="564" calcext:value-type="float">
            <text:p>56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09S" calcext:value-type="time">
            <text:p>15:25:09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11S" calcext:value-type="time">
            <text:p>15:25:11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13S" calcext:value-type="time">
            <text:p>15:25:13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14S" calcext:value-type="time">
            <text:p>15:25:14</text:p>
          </table:table-cell>
          <table:table-cell office:value-type="float" office:value="134" calcext:value-type="float">
            <text:p>13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16S" calcext:value-type="time">
            <text:p>15:25:16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18S" calcext:value-type="time">
            <text:p>15:25:18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19S" calcext:value-type="time">
            <text:p>15:25:19</text:p>
          </table:table-cell>
          <table:table-cell office:value-type="float" office:value="197" calcext:value-type="float">
            <text:p>19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21S" calcext:value-type="time">
            <text:p>15:25:21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22S" calcext:value-type="time">
            <text:p>15:25:2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24S" calcext:value-type="time">
            <text:p>15:25:24</text:p>
          </table:table-cell>
          <table:table-cell office:value-type="float" office:value="38" calcext:value-type="float">
            <text:p>3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26S" calcext:value-type="time">
            <text:p>15:25:26</text:p>
          </table:table-cell>
          <table:table-cell office:value-type="float" office:value="36" calcext:value-type="float">
            <text:p>3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27S" calcext:value-type="time">
            <text:p>15:25:27</text:p>
          </table:table-cell>
          <table:table-cell office:value-type="float" office:value="114" calcext:value-type="float">
            <text:p>11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29S" calcext:value-type="time">
            <text:p>15:25:29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30S" calcext:value-type="time">
            <text:p>15:25:30</text:p>
          </table:table-cell>
          <table:table-cell office:value-type="float" office:value="89" calcext:value-type="float">
            <text:p>8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32S" calcext:value-type="time">
            <text:p>15:25:32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34S" calcext:value-type="time">
            <text:p>15:25:34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35S" calcext:value-type="time">
            <text:p>15:25:35</text:p>
          </table:table-cell>
          <table:table-cell office:value-type="float" office:value="215" calcext:value-type="float">
            <text:p>21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37S" calcext:value-type="time">
            <text:p>15:25:37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38S" calcext:value-type="time">
            <text:p>15:25:38</text:p>
          </table:table-cell>
          <table:table-cell office:value-type="float" office:value="61" calcext:value-type="float">
            <text:p>6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40S" calcext:value-type="time">
            <text:p>15:25:40</text:p>
          </table:table-cell>
          <table:table-cell office:value-type="float" office:value="33" calcext:value-type="float">
            <text:p>3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42S" calcext:value-type="time">
            <text:p>15:25:42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43S" calcext:value-type="time">
            <text:p>15:25:43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45S" calcext:value-type="time">
            <text:p>15:25:45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47S" calcext:value-type="time">
            <text:p>15:25:47</text:p>
          </table:table-cell>
          <table:table-cell office:value-type="float" office:value="16" calcext:value-type="float">
            <text:p>1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48S" calcext:value-type="time">
            <text:p>15:25:48</text:p>
          </table:table-cell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50S" calcext:value-type="time">
            <text:p>15:25:50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51S" calcext:value-type="time">
            <text:p>15:25:51</text:p>
          </table:table-cell>
          <table:table-cell office:value-type="float" office:value="367" calcext:value-type="float">
            <text:p>36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53S" calcext:value-type="time">
            <text:p>15:25:53</text:p>
          </table:table-cell>
          <table:table-cell office:value-type="float" office:value="48" calcext:value-type="float">
            <text:p>4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55S" calcext:value-type="time">
            <text:p>15:25:5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56S" calcext:value-type="time">
            <text:p>15:25:56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5M58S" calcext:value-type="time">
            <text:p>15:25:58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00S" calcext:value-type="time">
            <text:p>15:26:00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01S" calcext:value-type="time">
            <text:p>15:26:01</text:p>
          </table:table-cell>
          <table:table-cell office:value-type="float" office:value="53" calcext:value-type="float">
            <text:p>5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03S" calcext:value-type="time">
            <text:p>15:26:03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04S" calcext:value-type="time">
            <text:p>15:26:04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06S" calcext:value-type="time">
            <text:p>15:26:0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08S" calcext:value-type="time">
            <text:p>15:26:08</text:p>
          </table:table-cell>
          <table:table-cell office:value-type="float" office:value="62" calcext:value-type="float">
            <text:p>6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09S" calcext:value-type="time">
            <text:p>15:26:09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11S" calcext:value-type="time">
            <text:p>15:26:1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13S" calcext:value-type="time">
            <text:p>15:26:13</text:p>
          </table:table-cell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14S" calcext:value-type="time">
            <text:p>15:26:14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16S" calcext:value-type="time">
            <text:p>15:26:1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17S" calcext:value-type="time">
            <text:p>15:26:17</text:p>
          </table:table-cell>
          <table:table-cell office:value-type="float" office:value="95" calcext:value-type="float">
            <text:p>9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19S" calcext:value-type="time">
            <text:p>15:26:1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21S" calcext:value-type="time">
            <text:p>15:26:21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22S" calcext:value-type="time">
            <text:p>15:26:22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24S" calcext:value-type="time">
            <text:p>15:26:24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26S" calcext:value-type="time">
            <text:p>15:26:26</text:p>
          </table:table-cell>
          <table:table-cell office:value-type="float" office:value="67" calcext:value-type="float">
            <text:p>6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27S" calcext:value-type="time">
            <text:p>15:26:27</text:p>
          </table:table-cell>
          <table:table-cell office:value-type="float" office:value="19" calcext:value-type="float">
            <text:p>1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29S" calcext:value-type="time">
            <text:p>15:26:29</text:p>
          </table:table-cell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31S" calcext:value-type="time">
            <text:p>15:26:31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32S" calcext:value-type="time">
            <text:p>15:26:32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34S" calcext:value-type="time">
            <text:p>15:26:34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35S" calcext:value-type="time">
            <text:p>15:26:35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37S" calcext:value-type="time">
            <text:p>15:26:37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39S" calcext:value-type="time">
            <text:p>15:26:39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40S" calcext:value-type="time">
            <text:p>15:26:40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42S" calcext:value-type="time">
            <text:p>15:26:42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44S" calcext:value-type="time">
            <text:p>15:26:44</text:p>
          </table:table-cell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45S" calcext:value-type="time">
            <text:p>15:26:45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47S" calcext:value-type="time">
            <text:p>15:26:47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49S" calcext:value-type="time">
            <text:p>15:26:49</text:p>
          </table:table-cell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50S" calcext:value-type="time">
            <text:p>15:26:5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52S" calcext:value-type="time">
            <text:p>15:26:52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54S" calcext:value-type="time">
            <text:p>15:26:54</text:p>
          </table:table-cell>
          <table:table-cell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55S" calcext:value-type="time">
            <text:p>15:26:55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57S" calcext:value-type="time">
            <text:p>15:26:57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6M59S" calcext:value-type="time">
            <text:p>15:26:59</text:p>
          </table:table-cell>
          <table:table-cell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00S" calcext:value-type="time">
            <text:p>15:27:00</text:p>
          </table:table-cell>
          <table:table-cell office:value-type="float" office:value="21" calcext:value-type="float">
            <text:p>2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02S" calcext:value-type="time">
            <text:p>15:27:02</text:p>
          </table:table-cell>
          <table:table-cell office:value-type="float" office:value="46" calcext:value-type="float">
            <text:p>4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04S" calcext:value-type="time">
            <text:p>15:27:04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05S" calcext:value-type="time">
            <text:p>15:27:05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07S" calcext:value-type="time">
            <text:p>15:27:07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08S" calcext:value-type="time">
            <text:p>15:27:08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10S" calcext:value-type="time">
            <text:p>15:27:10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12S" calcext:value-type="time">
            <text:p>15:27:12</text:p>
          </table:table-cell>
          <table:table-cell office:value-type="float" office:value="115" calcext:value-type="float">
            <text:p>11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13S" calcext:value-type="time">
            <text:p>15:27:13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15S" calcext:value-type="time">
            <text:p>15:27:15</text:p>
          </table:table-cell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17S" calcext:value-type="time">
            <text:p>15:27:1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18S" calcext:value-type="time">
            <text:p>15:27:18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20S" calcext:value-type="time">
            <text:p>15:27:20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22S" calcext:value-type="time">
            <text:p>15:27:22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23S" calcext:value-type="time">
            <text:p>15:27:23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25S" calcext:value-type="time">
            <text:p>15:27:25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27S" calcext:value-type="time">
            <text:p>15:27:27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28S" calcext:value-type="time">
            <text:p>15:27:28</text:p>
          </table:table-cell>
          <table:table-cell office:value-type="float" office:value="361" calcext:value-type="float">
            <text:p>36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30S" calcext:value-type="time">
            <text:p>15:27:30</text:p>
          </table:table-cell>
          <table:table-cell office:value-type="float" office:value="53" calcext:value-type="float">
            <text:p>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32S" calcext:value-type="time">
            <text:p>15:27:32</text:p>
          </table:table-cell>
          <table:table-cell office:value-type="float" office:value="36" calcext:value-type="float">
            <text:p>3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33S" calcext:value-type="time">
            <text:p>15:27:33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35S" calcext:value-type="time">
            <text:p>15:27:35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37S" calcext:value-type="time">
            <text:p>15:27:37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38S" calcext:value-type="time">
            <text:p>15:27:38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41S" calcext:value-type="time">
            <text:p>15:27:41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42S" calcext:value-type="time">
            <text:p>15:27:42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44S" calcext:value-type="time">
            <text:p>15:27:44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46S" calcext:value-type="time">
            <text:p>15:27:46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47S" calcext:value-type="time">
            <text:p>15:27:47</text:p>
          </table:table-cell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49S" calcext:value-type="time">
            <text:p>15:27:49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51S" calcext:value-type="time">
            <text:p>15:27:51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52S" calcext:value-type="time">
            <text:p>15:27:52</text:p>
          </table:table-cell>
          <table:table-cell office:value-type="float" office:value="364" calcext:value-type="float">
            <text:p>36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54S" calcext:value-type="time">
            <text:p>15:27:54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56S" calcext:value-type="time">
            <text:p>15:27:56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57S" calcext:value-type="time">
            <text:p>15:27:57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7M59S" calcext:value-type="time">
            <text:p>15:27:59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01S" calcext:value-type="time">
            <text:p>15:28:01</text:p>
          </table:table-cell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03S" calcext:value-type="time">
            <text:p>15:28:03</text:p>
          </table:table-cell>
          <table:table-cell office:value-type="float" office:value="177" calcext:value-type="float">
            <text:p>17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04S" calcext:value-type="time">
            <text:p>15:28:04</text:p>
          </table:table-cell>
          <table:table-cell office:value-type="float" office:value="366" calcext:value-type="float">
            <text:p>36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06S" calcext:value-type="time">
            <text:p>15:28:06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08S" calcext:value-type="time">
            <text:p>15:28:08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09S" calcext:value-type="time">
            <text:p>15:28:09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11S" calcext:value-type="time">
            <text:p>15:28:11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13S" calcext:value-type="time">
            <text:p>15:28:1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14S" calcext:value-type="time">
            <text:p>15:28:14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16S" calcext:value-type="time">
            <text:p>15:28:1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18S" calcext:value-type="time">
            <text:p>15:28:18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19S" calcext:value-type="time">
            <text:p>15:28:19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21S" calcext:value-type="time">
            <text:p>15:28:21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23S" calcext:value-type="time">
            <text:p>15:28:23</text:p>
          </table:table-cell>
          <table:table-cell office:value-type="float" office:value="358" calcext:value-type="float">
            <text:p>35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24S" calcext:value-type="time">
            <text:p>15:28:24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26S" calcext:value-type="time">
            <text:p>15:28:26</text:p>
          </table:table-cell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28S" calcext:value-type="time">
            <text:p>15:28:28</text:p>
          </table:table-cell>
          <table:table-cell office:value-type="float" office:value="32" calcext:value-type="float">
            <text:p>3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30S" calcext:value-type="time">
            <text:p>15:28:30</text:p>
          </table:table-cell>
          <table:table-cell office:value-type="float" office:value="43" calcext:value-type="float">
            <text:p>4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31S" calcext:value-type="time">
            <text:p>15:28:31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33S" calcext:value-type="time">
            <text:p>15:28:33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35S" calcext:value-type="time">
            <text:p>15:28:35</text:p>
          </table:table-cell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36S" calcext:value-type="time">
            <text:p>15:28:36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38S" calcext:value-type="time">
            <text:p>15:28:38</text:p>
          </table:table-cell>
          <table:table-cell office:value-type="float" office:value="22" calcext:value-type="float">
            <text:p>2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40S" calcext:value-type="time">
            <text:p>15:28:4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41S" calcext:value-type="time">
            <text:p>15:28:41</text:p>
          </table:table-cell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43S" calcext:value-type="time">
            <text:p>15:28:43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45S" calcext:value-type="time">
            <text:p>15:28:45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47S" calcext:value-type="time">
            <text:p>15:28:47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48S" calcext:value-type="time">
            <text:p>15:28:48</text:p>
          </table:table-cell>
          <table:table-cell office:value-type="float" office:value="53" calcext:value-type="float">
            <text:p>5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50S" calcext:value-type="time">
            <text:p>15:28:50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52S" calcext:value-type="time">
            <text:p>15:28:52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53S" calcext:value-type="time">
            <text:p>15:28:53</text:p>
          </table:table-cell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55S" calcext:value-type="time">
            <text:p>15:28:55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57S" calcext:value-type="time">
            <text:p>15:28:57</text:p>
          </table:table-cell>
          <table:table-cell office:value-type="float" office:value="32" calcext:value-type="float">
            <text:p>3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8M59S" calcext:value-type="time">
            <text:p>15:28:59</text:p>
          </table:table-cell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00S" calcext:value-type="time">
            <text:p>15:29:00</text:p>
          </table:table-cell>
          <table:table-cell office:value-type="float" office:value="43" calcext:value-type="float">
            <text:p>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02S" calcext:value-type="time">
            <text:p>15:29:02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04S" calcext:value-type="time">
            <text:p>15:29:04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05S" calcext:value-type="time">
            <text:p>15:29:05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07S" calcext:value-type="time">
            <text:p>15:29:07</text:p>
          </table:table-cell>
          <table:table-cell office:value-type="float" office:value="44" calcext:value-type="float">
            <text:p>4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09S" calcext:value-type="time">
            <text:p>15:29:09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11S" calcext:value-type="time">
            <text:p>15:29:11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12S" calcext:value-type="time">
            <text:p>15:29:12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14S" calcext:value-type="time">
            <text:p>15:29:14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16S" calcext:value-type="time">
            <text:p>15:29:16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17S" calcext:value-type="time">
            <text:p>15:29:17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19S" calcext:value-type="time">
            <text:p>15:29:19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21S" calcext:value-type="time">
            <text:p>15:29:21</text:p>
          </table:table-cell>
          <table:table-cell office:value-type="float" office:value="64" calcext:value-type="float">
            <text:p>6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23S" calcext:value-type="time">
            <text:p>15:29:23</text:p>
          </table:table-cell>
          <table:table-cell office:value-type="float" office:value="42" calcext:value-type="float">
            <text:p>4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24S" calcext:value-type="time">
            <text:p>15:29:24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26S" calcext:value-type="time">
            <text:p>15:29:26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28S" calcext:value-type="time">
            <text:p>15:29:28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29S" calcext:value-type="time">
            <text:p>15:29:29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31S" calcext:value-type="time">
            <text:p>15:29:31</text:p>
          </table:table-cell>
          <table:table-cell office:value-type="float" office:value="26" calcext:value-type="float">
            <text:p>2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33S" calcext:value-type="time">
            <text:p>15:29:33</text:p>
          </table:table-cell>
          <table:table-cell office:value-type="float" office:value="93" calcext:value-type="float">
            <text:p>9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35S" calcext:value-type="time">
            <text:p>15:29:35</text:p>
          </table:table-cell>
          <table:table-cell office:value-type="float" office:value="59" calcext:value-type="float">
            <text:p>5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36S" calcext:value-type="time">
            <text:p>15:29:36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38S" calcext:value-type="time">
            <text:p>15:29:38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40S" calcext:value-type="time">
            <text:p>15:29:40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42S" calcext:value-type="time">
            <text:p>15:29:42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43S" calcext:value-type="time">
            <text:p>15:29:43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45S" calcext:value-type="time">
            <text:p>15:29:45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47S" calcext:value-type="time">
            <text:p>15:29:47</text:p>
          </table:table-cell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48S" calcext:value-type="time">
            <text:p>15:29:48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50S" calcext:value-type="time">
            <text:p>15:29:5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52S" calcext:value-type="time">
            <text:p>15:29:52</text:p>
          </table:table-cell>
          <table:table-cell office:value-type="float" office:value="303" calcext:value-type="float">
            <text:p>30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54S" calcext:value-type="time">
            <text:p>15:29:54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55S" calcext:value-type="time">
            <text:p>15:29:55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57S" calcext:value-type="time">
            <text:p>15:29:57</text:p>
          </table:table-cell>
          <table:table-cell office:value-type="float" office:value="205" calcext:value-type="float">
            <text:p>20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29M59S" calcext:value-type="time">
            <text:p>15:29:59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30M01S" calcext:value-type="time">
            <text:p>15:30:0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</table:table-row>
      </table:table>
      <table:table table:name="Sheet5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01S" calcext:value-type="time">
            <text:p>15:42:01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03S" calcext:value-type="time">
            <text:p>15:42:03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05S" calcext:value-type="time">
            <text:p>15:42:05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07S" calcext:value-type="time">
            <text:p>15:42:07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09S" calcext:value-type="time">
            <text:p>15:42:09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11S" calcext:value-type="time">
            <text:p>15:42:11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13S" calcext:value-type="time">
            <text:p>15:42:13</text:p>
          </table:table-cell>
          <table:table-cell office:value-type="float" office:value="400" calcext:value-type="float">
            <text:p>40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15S" calcext:value-type="time">
            <text:p>15:42:15</text:p>
          </table:table-cell>
          <table:table-cell office:value-type="float" office:value="426" calcext:value-type="float">
            <text:p>42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17S" calcext:value-type="time">
            <text:p>15:42:17</text:p>
          </table:table-cell>
          <table:table-cell office:value-type="float" office:value="508" calcext:value-type="float">
            <text:p>50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19S" calcext:value-type="time">
            <text:p>15:42:19</text:p>
          </table:table-cell>
          <table:table-cell office:value-type="float" office:value="259" calcext:value-type="float">
            <text:p>25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21S" calcext:value-type="time">
            <text:p>15:42:21</text:p>
          </table:table-cell>
          <table:table-cell office:value-type="float" office:value="526" calcext:value-type="float">
            <text:p>52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23S" calcext:value-type="time">
            <text:p>15:42:23</text:p>
          </table:table-cell>
          <table:table-cell office:value-type="float" office:value="438" calcext:value-type="float">
            <text:p>438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26S" calcext:value-type="time">
            <text:p>15:42:26</text:p>
          </table:table-cell>
          <table:table-cell office:value-type="float" office:value="478" calcext:value-type="float">
            <text:p>47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28S" calcext:value-type="time">
            <text:p>15:42:28</text:p>
          </table:table-cell>
          <table:table-cell office:value-type="float" office:value="486" calcext:value-type="float">
            <text:p>48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30S" calcext:value-type="time">
            <text:p>15:42:30</text:p>
          </table:table-cell>
          <table:table-cell office:value-type="float" office:value="358" calcext:value-type="float">
            <text:p>35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32S" calcext:value-type="time">
            <text:p>15:42:32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34S" calcext:value-type="time">
            <text:p>15:42:34</text:p>
          </table:table-cell>
          <table:table-cell office:value-type="float" office:value="413" calcext:value-type="float">
            <text:p>41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36S" calcext:value-type="time">
            <text:p>15:42:36</text:p>
          </table:table-cell>
          <table:table-cell office:value-type="float" office:value="412" calcext:value-type="float">
            <text:p>41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38S" calcext:value-type="time">
            <text:p>15:42:38</text:p>
          </table:table-cell>
          <table:table-cell office:value-type="float" office:value="443" calcext:value-type="float">
            <text:p>44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40S" calcext:value-type="time">
            <text:p>15:42:40</text:p>
          </table:table-cell>
          <table:table-cell office:value-type="float" office:value="308" calcext:value-type="float">
            <text:p>30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42S" calcext:value-type="time">
            <text:p>15:42:42</text:p>
          </table:table-cell>
          <table:table-cell office:value-type="float" office:value="566" calcext:value-type="float">
            <text:p>5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44S" calcext:value-type="time">
            <text:p>15:42:44</text:p>
          </table:table-cell>
          <table:table-cell office:value-type="float" office:value="278" calcext:value-type="float">
            <text:p>27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46S" calcext:value-type="time">
            <text:p>15:42:46</text:p>
          </table:table-cell>
          <table:table-cell office:value-type="float" office:value="355" calcext:value-type="float">
            <text:p>35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48S" calcext:value-type="time">
            <text:p>15:42:48</text:p>
          </table:table-cell>
          <table:table-cell office:value-type="float" office:value="615" calcext:value-type="float">
            <text:p>61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51S" calcext:value-type="time">
            <text:p>15:42:51</text:p>
          </table:table-cell>
          <table:table-cell office:value-type="float" office:value="562" calcext:value-type="float">
            <text:p>56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53S" calcext:value-type="time">
            <text:p>15:42:53</text:p>
          </table:table-cell>
          <table:table-cell office:value-type="float" office:value="285" calcext:value-type="float">
            <text:p>28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55S" calcext:value-type="time">
            <text:p>15:42:55</text:p>
          </table:table-cell>
          <table:table-cell office:value-type="float" office:value="329" calcext:value-type="float">
            <text:p>32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57S" calcext:value-type="time">
            <text:p>15:42:57</text:p>
          </table:table-cell>
          <table:table-cell office:value-type="float" office:value="353" calcext:value-type="float">
            <text:p>35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2M59S" calcext:value-type="time">
            <text:p>15:42:59</text:p>
          </table:table-cell>
          <table:table-cell office:value-type="float" office:value="279" calcext:value-type="float">
            <text:p>27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01S" calcext:value-type="time">
            <text:p>15:43:01</text:p>
          </table:table-cell>
          <table:table-cell office:value-type="float" office:value="469" calcext:value-type="float">
            <text:p>46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03S" calcext:value-type="time">
            <text:p>15:43:03</text:p>
          </table:table-cell>
          <table:table-cell office:value-type="float" office:value="818" calcext:value-type="float">
            <text:p>81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05S" calcext:value-type="time">
            <text:p>15:43:05</text:p>
          </table:table-cell>
          <table:table-cell office:value-type="float" office:value="378" calcext:value-type="float">
            <text:p>37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07S" calcext:value-type="time">
            <text:p>15:43:07</text:p>
          </table:table-cell>
          <table:table-cell office:value-type="float" office:value="531" calcext:value-type="float">
            <text:p>53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09S" calcext:value-type="time">
            <text:p>15:43:09</text:p>
          </table:table-cell>
          <table:table-cell office:value-type="float" office:value="410" calcext:value-type="float">
            <text:p>41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11S" calcext:value-type="time">
            <text:p>15:43:11</text:p>
          </table:table-cell>
          <table:table-cell office:value-type="float" office:value="617" calcext:value-type="float">
            <text:p>61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14S" calcext:value-type="time">
            <text:p>15:43:14</text:p>
          </table:table-cell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16S" calcext:value-type="time">
            <text:p>15:43:16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18S" calcext:value-type="time">
            <text:p>15:43:18</text:p>
          </table:table-cell>
          <table:table-cell office:value-type="float" office:value="321" calcext:value-type="float">
            <text:p>32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20S" calcext:value-type="time">
            <text:p>15:43:20</text:p>
          </table:table-cell>
          <table:table-cell office:value-type="float" office:value="602" calcext:value-type="float">
            <text:p>60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22S" calcext:value-type="time">
            <text:p>15:43:22</text:p>
          </table:table-cell>
          <table:table-cell office:value-type="float" office:value="581" calcext:value-type="float">
            <text:p>58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24S" calcext:value-type="time">
            <text:p>15:43:24</text:p>
          </table:table-cell>
          <table:table-cell office:value-type="float" office:value="378" calcext:value-type="float">
            <text:p>37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26S" calcext:value-type="time">
            <text:p>15:43:26</text:p>
          </table:table-cell>
          <table:table-cell office:value-type="float" office:value="442" calcext:value-type="float">
            <text:p>44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28S" calcext:value-type="time">
            <text:p>15:43:28</text:p>
          </table:table-cell>
          <table:table-cell office:value-type="float" office:value="570" calcext:value-type="float">
            <text:p>57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30S" calcext:value-type="time">
            <text:p>15:43:30</text:p>
          </table:table-cell>
          <table:table-cell office:value-type="float" office:value="604" calcext:value-type="float">
            <text:p>60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32S" calcext:value-type="time">
            <text:p>15:43:32</text:p>
          </table:table-cell>
          <table:table-cell office:value-type="float" office:value="472" calcext:value-type="float">
            <text:p>47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35S" calcext:value-type="time">
            <text:p>15:43:35</text:p>
          </table:table-cell>
          <table:table-cell office:value-type="float" office:value="569" calcext:value-type="float">
            <text:p>56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37S" calcext:value-type="time">
            <text:p>15:43:37</text:p>
          </table:table-cell>
          <table:table-cell office:value-type="float" office:value="516" calcext:value-type="float">
            <text:p>51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39S" calcext:value-type="time">
            <text:p>15:43:39</text:p>
          </table:table-cell>
          <table:table-cell office:value-type="float" office:value="462" calcext:value-type="float">
            <text:p>46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41S" calcext:value-type="time">
            <text:p>15:43:41</text:p>
          </table:table-cell>
          <table:table-cell office:value-type="float" office:value="362" calcext:value-type="float">
            <text:p>36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43S" calcext:value-type="time">
            <text:p>15:43:43</text:p>
          </table:table-cell>
          <table:table-cell office:value-type="float" office:value="449" calcext:value-type="float">
            <text:p>44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45S" calcext:value-type="time">
            <text:p>15:43:45</text:p>
          </table:table-cell>
          <table:table-cell office:value-type="float" office:value="455" calcext:value-type="float">
            <text:p>45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47S" calcext:value-type="time">
            <text:p>15:43:47</text:p>
          </table:table-cell>
          <table:table-cell office:value-type="float" office:value="530" calcext:value-type="float">
            <text:p>53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49S" calcext:value-type="time">
            <text:p>15:43:49</text:p>
          </table:table-cell>
          <table:table-cell office:value-type="float" office:value="515" calcext:value-type="float">
            <text:p>51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51S" calcext:value-type="time">
            <text:p>15:43:51</text:p>
          </table:table-cell>
          <table:table-cell office:value-type="float" office:value="626" calcext:value-type="float">
            <text:p>62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54S" calcext:value-type="time">
            <text:p>15:43:54</text:p>
          </table:table-cell>
          <table:table-cell office:value-type="float" office:value="535" calcext:value-type="float">
            <text:p>53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56S" calcext:value-type="time">
            <text:p>15:43:56</text:p>
          </table:table-cell>
          <table:table-cell office:value-type="float" office:value="422" calcext:value-type="float">
            <text:p>42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3M58S" calcext:value-type="time">
            <text:p>15:43:58</text:p>
          </table:table-cell>
          <table:table-cell office:value-type="float" office:value="688" calcext:value-type="float">
            <text:p>68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00S" calcext:value-type="time">
            <text:p>15:44:00</text:p>
          </table:table-cell>
          <table:table-cell office:value-type="float" office:value="658" calcext:value-type="float">
            <text:p>65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02S" calcext:value-type="time">
            <text:p>15:44:02</text:p>
          </table:table-cell>
          <table:table-cell office:value-type="float" office:value="603" calcext:value-type="float">
            <text:p>60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04S" calcext:value-type="time">
            <text:p>15:44:04</text:p>
          </table:table-cell>
          <table:table-cell office:value-type="float" office:value="500" calcext:value-type="float">
            <text:p>50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06S" calcext:value-type="time">
            <text:p>15:44:06</text:p>
          </table:table-cell>
          <table:table-cell office:value-type="float" office:value="355" calcext:value-type="float">
            <text:p>3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08S" calcext:value-type="time">
            <text:p>15:44:08</text:p>
          </table:table-cell>
          <table:table-cell office:value-type="float" office:value="394" calcext:value-type="float">
            <text:p>39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10S" calcext:value-type="time">
            <text:p>15:44:10</text:p>
          </table:table-cell>
          <table:table-cell office:value-type="float" office:value="460" calcext:value-type="float">
            <text:p>46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13S" calcext:value-type="time">
            <text:p>15:44:13</text:p>
          </table:table-cell>
          <table:table-cell office:value-type="float" office:value="404" calcext:value-type="float">
            <text:p>40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15S" calcext:value-type="time">
            <text:p>15:44:15</text:p>
          </table:table-cell>
          <table:table-cell office:value-type="float" office:value="324" calcext:value-type="float">
            <text:p>32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17S" calcext:value-type="time">
            <text:p>15:44:17</text:p>
          </table:table-cell>
          <table:table-cell office:value-type="float" office:value="503" calcext:value-type="float">
            <text:p>50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19S" calcext:value-type="time">
            <text:p>15:44:19</text:p>
          </table:table-cell>
          <table:table-cell office:value-type="float" office:value="255" calcext:value-type="float">
            <text:p>25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21S" calcext:value-type="time">
            <text:p>15:44:21</text:p>
          </table:table-cell>
          <table:table-cell office:value-type="float" office:value="517" calcext:value-type="float">
            <text:p>51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23S" calcext:value-type="time">
            <text:p>15:44:23</text:p>
          </table:table-cell>
          <table:table-cell office:value-type="float" office:value="506" calcext:value-type="float">
            <text:p>50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25S" calcext:value-type="time">
            <text:p>15:44:25</text:p>
          </table:table-cell>
          <table:table-cell office:value-type="float" office:value="553" calcext:value-type="float">
            <text:p>55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27S" calcext:value-type="time">
            <text:p>15:44:27</text:p>
          </table:table-cell>
          <table:table-cell office:value-type="float" office:value="427" calcext:value-type="float">
            <text:p>42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30S" calcext:value-type="time">
            <text:p>15:44:30</text:p>
          </table:table-cell>
          <table:table-cell office:value-type="float" office:value="497" calcext:value-type="float">
            <text:p>49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32S" calcext:value-type="time">
            <text:p>15:44:32</text:p>
          </table:table-cell>
          <table:table-cell office:value-type="float" office:value="356" calcext:value-type="float">
            <text:p>3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34S" calcext:value-type="time">
            <text:p>15:44:34</text:p>
          </table:table-cell>
          <table:table-cell office:value-type="float" office:value="348" calcext:value-type="float">
            <text:p>34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36S" calcext:value-type="time">
            <text:p>15:44:36</text:p>
          </table:table-cell>
          <table:table-cell office:value-type="float" office:value="491" calcext:value-type="float">
            <text:p>49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38S" calcext:value-type="time">
            <text:p>15:44:38</text:p>
          </table:table-cell>
          <table:table-cell office:value-type="float" office:value="508" calcext:value-type="float">
            <text:p>50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40S" calcext:value-type="time">
            <text:p>15:44:40</text:p>
          </table:table-cell>
          <table:table-cell office:value-type="float" office:value="550" calcext:value-type="float">
            <text:p>55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42S" calcext:value-type="time">
            <text:p>15:44:42</text:p>
          </table:table-cell>
          <table:table-cell office:value-type="float" office:value="547" calcext:value-type="float">
            <text:p>54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44S" calcext:value-type="time">
            <text:p>15:44:44</text:p>
          </table:table-cell>
          <table:table-cell office:value-type="float" office:value="575" calcext:value-type="float">
            <text:p>57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47S" calcext:value-type="time">
            <text:p>15:44:47</text:p>
          </table:table-cell>
          <table:table-cell office:value-type="float" office:value="523" calcext:value-type="float">
            <text:p>52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49S" calcext:value-type="time">
            <text:p>15:44:49</text:p>
          </table:table-cell>
          <table:table-cell office:value-type="float" office:value="453" calcext:value-type="float">
            <text:p>45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51S" calcext:value-type="time">
            <text:p>15:44:51</text:p>
          </table:table-cell>
          <table:table-cell office:value-type="float" office:value="417" calcext:value-type="float">
            <text:p>41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53S" calcext:value-type="time">
            <text:p>15:44:53</text:p>
          </table:table-cell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55S" calcext:value-type="time">
            <text:p>15:44:55</text:p>
          </table:table-cell>
          <table:table-cell office:value-type="float" office:value="394" calcext:value-type="float">
            <text:p>39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57S" calcext:value-type="time">
            <text:p>15:44:57</text:p>
          </table:table-cell>
          <table:table-cell office:value-type="float" office:value="508" calcext:value-type="float">
            <text:p>50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4M59S" calcext:value-type="time">
            <text:p>15:44:59</text:p>
          </table:table-cell>
          <table:table-cell office:value-type="float" office:value="277" calcext:value-type="float">
            <text:p>27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02S" calcext:value-type="time">
            <text:p>15:45:02</text:p>
          </table:table-cell>
          <table:table-cell office:value-type="float" office:value="577" calcext:value-type="float">
            <text:p>57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04S" calcext:value-type="time">
            <text:p>15:45:04</text:p>
          </table:table-cell>
          <table:table-cell office:value-type="float" office:value="529" calcext:value-type="float">
            <text:p>52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06S" calcext:value-type="time">
            <text:p>15:45:06</text:p>
          </table:table-cell>
          <table:table-cell office:value-type="float" office:value="465" calcext:value-type="float">
            <text:p>46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08S" calcext:value-type="time">
            <text:p>15:45:08</text:p>
          </table:table-cell>
          <table:table-cell office:value-type="float" office:value="493" calcext:value-type="float">
            <text:p>49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10S" calcext:value-type="time">
            <text:p>15:45:10</text:p>
          </table:table-cell>
          <table:table-cell office:value-type="float" office:value="636" calcext:value-type="float">
            <text:p>63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12S" calcext:value-type="time">
            <text:p>15:45:12</text:p>
          </table:table-cell>
          <table:table-cell office:value-type="float" office:value="444" calcext:value-type="float">
            <text:p>44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14S" calcext:value-type="time">
            <text:p>15:45:14</text:p>
          </table:table-cell>
          <table:table-cell office:value-type="float" office:value="545" calcext:value-type="float">
            <text:p>54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17S" calcext:value-type="time">
            <text:p>15:45:17</text:p>
          </table:table-cell>
          <table:table-cell office:value-type="float" office:value="422" calcext:value-type="float">
            <text:p>42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19S" calcext:value-type="time">
            <text:p>15:45:19</text:p>
          </table:table-cell>
          <table:table-cell office:value-type="float" office:value="671" calcext:value-type="float">
            <text:p>67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21S" calcext:value-type="time">
            <text:p>15:45:21</text:p>
          </table:table-cell>
          <table:table-cell office:value-type="float" office:value="402" calcext:value-type="float">
            <text:p>40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23S" calcext:value-type="time">
            <text:p>15:45:23</text:p>
          </table:table-cell>
          <table:table-cell office:value-type="float" office:value="550" calcext:value-type="float">
            <text:p>55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25S" calcext:value-type="time">
            <text:p>15:45:25</text:p>
          </table:table-cell>
          <table:table-cell office:value-type="float" office:value="540" calcext:value-type="float">
            <text:p>54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27S" calcext:value-type="time">
            <text:p>15:45:27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29S" calcext:value-type="time">
            <text:p>15:45:29</text:p>
          </table:table-cell>
          <table:table-cell office:value-type="float" office:value="404" calcext:value-type="float">
            <text:p>40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32S" calcext:value-type="time">
            <text:p>15:45:32</text:p>
          </table:table-cell>
          <table:table-cell office:value-type="float" office:value="337" calcext:value-type="float">
            <text:p>33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34S" calcext:value-type="time">
            <text:p>15:45:34</text:p>
          </table:table-cell>
          <table:table-cell office:value-type="float" office:value="720" calcext:value-type="float">
            <text:p>72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36S" calcext:value-type="time">
            <text:p>15:45:36</text:p>
          </table:table-cell>
          <table:table-cell office:value-type="float" office:value="436" calcext:value-type="float">
            <text:p>43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38S" calcext:value-type="time">
            <text:p>15:45:38</text:p>
          </table:table-cell>
          <table:table-cell office:value-type="float" office:value="588" calcext:value-type="float">
            <text:p>58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40S" calcext:value-type="time">
            <text:p>15:45:40</text:p>
          </table:table-cell>
          <table:table-cell office:value-type="float" office:value="451" calcext:value-type="float">
            <text:p>45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42S" calcext:value-type="time">
            <text:p>15:45:42</text:p>
          </table:table-cell>
          <table:table-cell office:value-type="float" office:value="444" calcext:value-type="float">
            <text:p>44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45S" calcext:value-type="time">
            <text:p>15:45:45</text:p>
          </table:table-cell>
          <table:table-cell office:value-type="float" office:value="525" calcext:value-type="float">
            <text:p>52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47S" calcext:value-type="time">
            <text:p>15:45:47</text:p>
          </table:table-cell>
          <table:table-cell office:value-type="float" office:value="719" calcext:value-type="float">
            <text:p>71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49S" calcext:value-type="time">
            <text:p>15:45:49</text:p>
          </table:table-cell>
          <table:table-cell office:value-type="float" office:value="562" calcext:value-type="float">
            <text:p>56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51S" calcext:value-type="time">
            <text:p>15:45:51</text:p>
          </table:table-cell>
          <table:table-cell office:value-type="float" office:value="506" calcext:value-type="float">
            <text:p>50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53S" calcext:value-type="time">
            <text:p>15:45:53</text:p>
          </table:table-cell>
          <table:table-cell office:value-type="float" office:value="452" calcext:value-type="float">
            <text:p>45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55S" calcext:value-type="time">
            <text:p>15:45:55</text:p>
          </table:table-cell>
          <table:table-cell office:value-type="float" office:value="423" calcext:value-type="float">
            <text:p>42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5M57S" calcext:value-type="time">
            <text:p>15:45:57</text:p>
          </table:table-cell>
          <table:table-cell office:value-type="float" office:value="543" calcext:value-type="float">
            <text:p>54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00S" calcext:value-type="time">
            <text:p>15:46:00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02S" calcext:value-type="time">
            <text:p>15:46:02</text:p>
          </table:table-cell>
          <table:table-cell office:value-type="float" office:value="302" calcext:value-type="float">
            <text:p>30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04S" calcext:value-type="time">
            <text:p>15:46:04</text:p>
          </table:table-cell>
          <table:table-cell office:value-type="float" office:value="418" calcext:value-type="float">
            <text:p>41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06S" calcext:value-type="time">
            <text:p>15:46:06</text:p>
          </table:table-cell>
          <table:table-cell office:value-type="float" office:value="433" calcext:value-type="float">
            <text:p>43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08S" calcext:value-type="time">
            <text:p>15:46:08</text:p>
          </table:table-cell>
          <table:table-cell office:value-type="float" office:value="361" calcext:value-type="float">
            <text:p>36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10S" calcext:value-type="time">
            <text:p>15:46:10</text:p>
          </table:table-cell>
          <table:table-cell office:value-type="float" office:value="435" calcext:value-type="float">
            <text:p>43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13S" calcext:value-type="time">
            <text:p>15:46:13</text:p>
          </table:table-cell>
          <table:table-cell office:value-type="float" office:value="458" calcext:value-type="float">
            <text:p>45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15S" calcext:value-type="time">
            <text:p>15:46:15</text:p>
          </table:table-cell>
          <table:table-cell office:value-type="float" office:value="581" calcext:value-type="float">
            <text:p>58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17S" calcext:value-type="time">
            <text:p>15:46:17</text:p>
          </table:table-cell>
          <table:table-cell office:value-type="float" office:value="688" calcext:value-type="float">
            <text:p>68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19S" calcext:value-type="time">
            <text:p>15:46:19</text:p>
          </table:table-cell>
          <table:table-cell office:value-type="float" office:value="533" calcext:value-type="float">
            <text:p>53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21S" calcext:value-type="time">
            <text:p>15:46:21</text:p>
          </table:table-cell>
          <table:table-cell office:value-type="float" office:value="591" calcext:value-type="float">
            <text:p>59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23S" calcext:value-type="time">
            <text:p>15:46:23</text:p>
          </table:table-cell>
          <table:table-cell office:value-type="float" office:value="622" calcext:value-type="float">
            <text:p>62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26S" calcext:value-type="time">
            <text:p>15:46:26</text:p>
          </table:table-cell>
          <table:table-cell office:value-type="float" office:value="516" calcext:value-type="float">
            <text:p>51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28S" calcext:value-type="time">
            <text:p>15:46:28</text:p>
          </table:table-cell>
          <table:table-cell office:value-type="float" office:value="611" calcext:value-type="float">
            <text:p>61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30S" calcext:value-type="time">
            <text:p>15:46:30</text:p>
          </table:table-cell>
          <table:table-cell office:value-type="float" office:value="440" calcext:value-type="float">
            <text:p>44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32S" calcext:value-type="time">
            <text:p>15:46:32</text:p>
          </table:table-cell>
          <table:table-cell office:value-type="float" office:value="357" calcext:value-type="float">
            <text:p>35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34S" calcext:value-type="time">
            <text:p>15:46:34</text:p>
          </table:table-cell>
          <table:table-cell office:value-type="float" office:value="452" calcext:value-type="float">
            <text:p>45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36S" calcext:value-type="time">
            <text:p>15:46:36</text:p>
          </table:table-cell>
          <table:table-cell office:value-type="float" office:value="652" calcext:value-type="float">
            <text:p>65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39S" calcext:value-type="time">
            <text:p>15:46:39</text:p>
          </table:table-cell>
          <table:table-cell office:value-type="float" office:value="302" calcext:value-type="float">
            <text:p>30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41S" calcext:value-type="time">
            <text:p>15:46:41</text:p>
          </table:table-cell>
          <table:table-cell office:value-type="float" office:value="484" calcext:value-type="float">
            <text:p>48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43S" calcext:value-type="time">
            <text:p>15:46:43</text:p>
          </table:table-cell>
          <table:table-cell office:value-type="float" office:value="434" calcext:value-type="float">
            <text:p>43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45S" calcext:value-type="time">
            <text:p>15:46:45</text:p>
          </table:table-cell>
          <table:table-cell office:value-type="float" office:value="523" calcext:value-type="float">
            <text:p>52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47S" calcext:value-type="time">
            <text:p>15:46:47</text:p>
          </table:table-cell>
          <table:table-cell office:value-type="float" office:value="340" calcext:value-type="float">
            <text:p>34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50S" calcext:value-type="time">
            <text:p>15:46:50</text:p>
          </table:table-cell>
          <table:table-cell office:value-type="float" office:value="269" calcext:value-type="float">
            <text:p>26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52S" calcext:value-type="time">
            <text:p>15:46:52</text:p>
          </table:table-cell>
          <table:table-cell office:value-type="float" office:value="462" calcext:value-type="float">
            <text:p>46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54S" calcext:value-type="time">
            <text:p>15:46:54</text:p>
          </table:table-cell>
          <table:table-cell office:value-type="float" office:value="665" calcext:value-type="float">
            <text:p>66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56S" calcext:value-type="time">
            <text:p>15:46:56</text:p>
          </table:table-cell>
          <table:table-cell office:value-type="float" office:value="468" calcext:value-type="float">
            <text:p>46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6M58S" calcext:value-type="time">
            <text:p>15:46:58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47M00S" calcext:value-type="time">
            <text:p>15:47:00</text:p>
          </table:table-cell>
          <table:table-cell office:value-type="float" office:value="321" calcext:value-type="float">
            <text:p>321</text:p>
          </table:table-cell>
          <table:table-cell office:value-type="float" office:value="112" calcext:value-type="float">
            <text:p>112</text:p>
          </table:table-cell>
        </table:table-row>
      </table:table>
      <table:table table:name="Sheet6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01S" calcext:value-type="time">
            <text:p>15:52:01</text:p>
          </table:table-cell>
          <table:table-cell office:value-type="float" office:value="469" calcext:value-type="float">
            <text:p>46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03S" calcext:value-type="time">
            <text:p>15:52:03</text:p>
          </table:table-cell>
          <table:table-cell office:value-type="float" office:value="514" calcext:value-type="float">
            <text:p>51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06S" calcext:value-type="time">
            <text:p>15:52:06</text:p>
          </table:table-cell>
          <table:table-cell office:value-type="float" office:value="567" calcext:value-type="float">
            <text:p>56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08S" calcext:value-type="time">
            <text:p>15:52:08</text:p>
          </table:table-cell>
          <table:table-cell office:value-type="float" office:value="464" calcext:value-type="float">
            <text:p>46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10S" calcext:value-type="time">
            <text:p>15:52:10</text:p>
          </table:table-cell>
          <table:table-cell office:value-type="float" office:value="349" calcext:value-type="float">
            <text:p>34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13S" calcext:value-type="time">
            <text:p>15:52:13</text:p>
          </table:table-cell>
          <table:table-cell office:value-type="float" office:value="524" calcext:value-type="float">
            <text:p>52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15S" calcext:value-type="time">
            <text:p>15:52:15</text:p>
          </table:table-cell>
          <table:table-cell office:value-type="float" office:value="187" calcext:value-type="float">
            <text:p>18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17S" calcext:value-type="time">
            <text:p>15:52:17</text:p>
          </table:table-cell>
          <table:table-cell office:value-type="float" office:value="377" calcext:value-type="float">
            <text:p>37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19S" calcext:value-type="time">
            <text:p>15:52:19</text:p>
          </table:table-cell>
          <table:table-cell office:value-type="float" office:value="488" calcext:value-type="float">
            <text:p>48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22S" calcext:value-type="time">
            <text:p>15:52:22</text:p>
          </table:table-cell>
          <table:table-cell office:value-type="float" office:value="550" calcext:value-type="float">
            <text:p>55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24S" calcext:value-type="time">
            <text:p>15:52:24</text:p>
          </table:table-cell>
          <table:table-cell office:value-type="float" office:value="331" calcext:value-type="float">
            <text:p>33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26S" calcext:value-type="time">
            <text:p>15:52:26</text:p>
          </table:table-cell>
          <table:table-cell office:value-type="float" office:value="474" calcext:value-type="float">
            <text:p>47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29S" calcext:value-type="time">
            <text:p>15:52:29</text:p>
          </table:table-cell>
          <table:table-cell office:value-type="float" office:value="394" calcext:value-type="float">
            <text:p>39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31S" calcext:value-type="time">
            <text:p>15:52:31</text:p>
          </table:table-cell>
          <table:table-cell office:value-type="float" office:value="313" calcext:value-type="float">
            <text:p>31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33S" calcext:value-type="time">
            <text:p>15:52:33</text:p>
          </table:table-cell>
          <table:table-cell office:value-type="float" office:value="403" calcext:value-type="float">
            <text:p>40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36S" calcext:value-type="time">
            <text:p>15:52:36</text:p>
          </table:table-cell>
          <table:table-cell office:value-type="float" office:value="380" calcext:value-type="float">
            <text:p>38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38S" calcext:value-type="time">
            <text:p>15:52:38</text:p>
          </table:table-cell>
          <table:table-cell office:value-type="float" office:value="491" calcext:value-type="float">
            <text:p>49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40S" calcext:value-type="time">
            <text:p>15:52:40</text:p>
          </table:table-cell>
          <table:table-cell office:value-type="float" office:value="263" calcext:value-type="float">
            <text:p>26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42S" calcext:value-type="time">
            <text:p>15:52:42</text:p>
          </table:table-cell>
          <table:table-cell office:value-type="float" office:value="352" calcext:value-type="float">
            <text:p>35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45S" calcext:value-type="time">
            <text:p>15:52:45</text:p>
          </table:table-cell>
          <table:table-cell office:value-type="float" office:value="282" calcext:value-type="float">
            <text:p>28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47S" calcext:value-type="time">
            <text:p>15:52:47</text:p>
          </table:table-cell>
          <table:table-cell office:value-type="float" office:value="402" calcext:value-type="float">
            <text:p>40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49S" calcext:value-type="time">
            <text:p>15:52:49</text:p>
          </table:table-cell>
          <table:table-cell office:value-type="float" office:value="338" calcext:value-type="float">
            <text:p>33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52S" calcext:value-type="time">
            <text:p>15:52:52</text:p>
          </table:table-cell>
          <table:table-cell office:value-type="float" office:value="540" calcext:value-type="float">
            <text:p>54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54S" calcext:value-type="time">
            <text:p>15:52:54</text:p>
          </table:table-cell>
          <table:table-cell office:value-type="float" office:value="338" calcext:value-type="float">
            <text:p>33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56S" calcext:value-type="time">
            <text:p>15:52:56</text:p>
          </table:table-cell>
          <table:table-cell office:value-type="float" office:value="491" calcext:value-type="float">
            <text:p>49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2M59S" calcext:value-type="time">
            <text:p>15:52:59</text:p>
          </table:table-cell>
          <table:table-cell office:value-type="float" office:value="464" calcext:value-type="float">
            <text:p>46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01S" calcext:value-type="time">
            <text:p>15:53:01</text:p>
          </table:table-cell>
          <table:table-cell office:value-type="float" office:value="687" calcext:value-type="float">
            <text:p>68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03S" calcext:value-type="time">
            <text:p>15:53:03</text:p>
          </table:table-cell>
          <table:table-cell office:value-type="float" office:value="657" calcext:value-type="float">
            <text:p>65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06S" calcext:value-type="time">
            <text:p>15:53:06</text:p>
          </table:table-cell>
          <table:table-cell office:value-type="float" office:value="393" calcext:value-type="float">
            <text:p>39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08S" calcext:value-type="time">
            <text:p>15:53:08</text:p>
          </table:table-cell>
          <table:table-cell office:value-type="float" office:value="387" calcext:value-type="float">
            <text:p>38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10S" calcext:value-type="time">
            <text:p>15:53:10</text:p>
          </table:table-cell>
          <table:table-cell office:value-type="float" office:value="286" calcext:value-type="float">
            <text:p>28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13S" calcext:value-type="time">
            <text:p>15:53:13</text:p>
          </table:table-cell>
          <table:table-cell office:value-type="float" office:value="581" calcext:value-type="float">
            <text:p>58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15S" calcext:value-type="time">
            <text:p>15:53:15</text:p>
          </table:table-cell>
          <table:table-cell office:value-type="float" office:value="411" calcext:value-type="float">
            <text:p>41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17S" calcext:value-type="time">
            <text:p>15:53:17</text:p>
          </table:table-cell>
          <table:table-cell office:value-type="float" office:value="511" calcext:value-type="float">
            <text:p>51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20S" calcext:value-type="time">
            <text:p>15:53:20</text:p>
          </table:table-cell>
          <table:table-cell office:value-type="float" office:value="112" calcext:value-type="float">
            <text:p>11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22S" calcext:value-type="time">
            <text:p>15:53:22</text:p>
          </table:table-cell>
          <table:table-cell office:value-type="float" office:value="39" calcext:value-type="float">
            <text:p>3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24S" calcext:value-type="time">
            <text:p>15:53:24</text:p>
          </table:table-cell>
          <table:table-cell office:value-type="float" office:value="255" calcext:value-type="float">
            <text:p>25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26S" calcext:value-type="time">
            <text:p>15:53:26</text:p>
          </table:table-cell>
          <table:table-cell office:value-type="float" office:value="523" calcext:value-type="float">
            <text:p>52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29S" calcext:value-type="time">
            <text:p>15:53:29</text:p>
          </table:table-cell>
          <table:table-cell office:value-type="float" office:value="501" calcext:value-type="float">
            <text:p>50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31S" calcext:value-type="time">
            <text:p>15:53:31</text:p>
          </table:table-cell>
          <table:table-cell office:value-type="float" office:value="287" calcext:value-type="float">
            <text:p>28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33S" calcext:value-type="time">
            <text:p>15:53:33</text:p>
          </table:table-cell>
          <table:table-cell office:value-type="float" office:value="558" calcext:value-type="float">
            <text:p>55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36S" calcext:value-type="time">
            <text:p>15:53:36</text:p>
          </table:table-cell>
          <table:table-cell office:value-type="float" office:value="102" calcext:value-type="float">
            <text:p>10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38S" calcext:value-type="time">
            <text:p>15:53:38</text:p>
          </table:table-cell>
          <table:table-cell office:value-type="float" office:value="684" calcext:value-type="float">
            <text:p>68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40S" calcext:value-type="time">
            <text:p>15:53:40</text:p>
          </table:table-cell>
          <table:table-cell office:value-type="float" office:value="507" calcext:value-type="float">
            <text:p>50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43S" calcext:value-type="time">
            <text:p>15:53:43</text:p>
          </table:table-cell>
          <table:table-cell office:value-type="float" office:value="251" calcext:value-type="float">
            <text:p>25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45S" calcext:value-type="time">
            <text:p>15:53:45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47S" calcext:value-type="time">
            <text:p>15:53:47</text:p>
          </table:table-cell>
          <table:table-cell office:value-type="float" office:value="253" calcext:value-type="float">
            <text:p>25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50S" calcext:value-type="time">
            <text:p>15:53:50</text:p>
          </table:table-cell>
          <table:table-cell office:value-type="float" office:value="527" calcext:value-type="float">
            <text:p>52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52S" calcext:value-type="time">
            <text:p>15:53:52</text:p>
          </table:table-cell>
          <table:table-cell office:value-type="float" office:value="421" calcext:value-type="float">
            <text:p>42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54S" calcext:value-type="time">
            <text:p>15:53:54</text:p>
          </table:table-cell>
          <table:table-cell office:value-type="float" office:value="317" calcext:value-type="float">
            <text:p>31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57S" calcext:value-type="time">
            <text:p>15:53:57</text:p>
          </table:table-cell>
          <table:table-cell office:value-type="float" office:value="163" calcext:value-type="float">
            <text:p>16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3M59S" calcext:value-type="time">
            <text:p>15:53:59</text:p>
          </table:table-cell>
          <table:table-cell office:value-type="float" office:value="459" calcext:value-type="float">
            <text:p>45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01S" calcext:value-type="time">
            <text:p>15:54:01</text:p>
          </table:table-cell>
          <table:table-cell office:value-type="float" office:value="612" calcext:value-type="float">
            <text:p>61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04S" calcext:value-type="time">
            <text:p>15:54:04</text:p>
          </table:table-cell>
          <table:table-cell office:value-type="float" office:value="403" calcext:value-type="float">
            <text:p>40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06S" calcext:value-type="time">
            <text:p>15:54:06</text:p>
          </table:table-cell>
          <table:table-cell office:value-type="float" office:value="413" calcext:value-type="float">
            <text:p>41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08S" calcext:value-type="time">
            <text:p>15:54:08</text:p>
          </table:table-cell>
          <table:table-cell office:value-type="float" office:value="256" calcext:value-type="float">
            <text:p>25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11S" calcext:value-type="time">
            <text:p>15:54:11</text:p>
          </table:table-cell>
          <table:table-cell office:value-type="float" office:value="578" calcext:value-type="float">
            <text:p>57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13S" calcext:value-type="time">
            <text:p>15:54:13</text:p>
          </table:table-cell>
          <table:table-cell office:value-type="float" office:value="607" calcext:value-type="float">
            <text:p>60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15S" calcext:value-type="time">
            <text:p>15:54:15</text:p>
          </table:table-cell>
          <table:table-cell office:value-type="float" office:value="434" calcext:value-type="float">
            <text:p>43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18S" calcext:value-type="time">
            <text:p>15:54:18</text:p>
          </table:table-cell>
          <table:table-cell office:value-type="float" office:value="507" calcext:value-type="float">
            <text:p>50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20S" calcext:value-type="time">
            <text:p>15:54:20</text:p>
          </table:table-cell>
          <table:table-cell office:value-type="float" office:value="592" calcext:value-type="float">
            <text:p>59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22S" calcext:value-type="time">
            <text:p>15:54:22</text:p>
          </table:table-cell>
          <table:table-cell office:value-type="float" office:value="861" calcext:value-type="float">
            <text:p>86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25S" calcext:value-type="time">
            <text:p>15:54:25</text:p>
          </table:table-cell>
          <table:table-cell office:value-type="float" office:value="524" calcext:value-type="float">
            <text:p>52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27S" calcext:value-type="time">
            <text:p>15:54:27</text:p>
          </table:table-cell>
          <table:table-cell office:value-type="float" office:value="595" calcext:value-type="float">
            <text:p>59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30S" calcext:value-type="time">
            <text:p>15:54:30</text:p>
          </table:table-cell>
          <table:table-cell office:value-type="float" office:value="353" calcext:value-type="float">
            <text:p>35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32S" calcext:value-type="time">
            <text:p>15:54:32</text:p>
          </table:table-cell>
          <table:table-cell office:value-type="float" office:value="380" calcext:value-type="float">
            <text:p>38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34S" calcext:value-type="time">
            <text:p>15:54:34</text:p>
          </table:table-cell>
          <table:table-cell office:value-type="float" office:value="418" calcext:value-type="float">
            <text:p>418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37S" calcext:value-type="time">
            <text:p>15:54:37</text:p>
          </table:table-cell>
          <table:table-cell office:value-type="float" office:value="352" calcext:value-type="float">
            <text:p>35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39S" calcext:value-type="time">
            <text:p>15:54:39</text:p>
          </table:table-cell>
          <table:table-cell office:value-type="float" office:value="565" calcext:value-type="float">
            <text:p>56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41S" calcext:value-type="time">
            <text:p>15:54:41</text:p>
          </table:table-cell>
          <table:table-cell office:value-type="float" office:value="684" calcext:value-type="float">
            <text:p>68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44S" calcext:value-type="time">
            <text:p>15:54:44</text:p>
          </table:table-cell>
          <table:table-cell office:value-type="float" office:value="369" calcext:value-type="float">
            <text:p>36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46S" calcext:value-type="time">
            <text:p>15:54:46</text:p>
          </table:table-cell>
          <table:table-cell office:value-type="float" office:value="434" calcext:value-type="float">
            <text:p>434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48S" calcext:value-type="time">
            <text:p>15:54:48</text:p>
          </table:table-cell>
          <table:table-cell office:value-type="float" office:value="505" calcext:value-type="float">
            <text:p>505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51S" calcext:value-type="time">
            <text:p>15:54:51</text:p>
          </table:table-cell>
          <table:table-cell office:value-type="float" office:value="622" calcext:value-type="float">
            <text:p>62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53S" calcext:value-type="time">
            <text:p>15:54:53</text:p>
          </table:table-cell>
          <table:table-cell office:value-type="float" office:value="151" calcext:value-type="float">
            <text:p>15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55S" calcext:value-type="time">
            <text:p>15:54:55</text:p>
          </table:table-cell>
          <table:table-cell office:value-type="float" office:value="488" calcext:value-type="float">
            <text:p>48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4M58S" calcext:value-type="time">
            <text:p>15:54:58</text:p>
          </table:table-cell>
          <table:table-cell office:value-type="float" office:value="553" calcext:value-type="float">
            <text:p>553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00S" calcext:value-type="time">
            <text:p>15:55:00</text:p>
          </table:table-cell>
          <table:table-cell office:value-type="float" office:value="456" calcext:value-type="float">
            <text:p>45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02S" calcext:value-type="time">
            <text:p>15:55:02</text:p>
          </table:table-cell>
          <table:table-cell office:value-type="float" office:value="454" calcext:value-type="float">
            <text:p>454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05S" calcext:value-type="time">
            <text:p>15:55:05</text:p>
          </table:table-cell>
          <table:table-cell office:value-type="float" office:value="207" calcext:value-type="float">
            <text:p>207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07S" calcext:value-type="time">
            <text:p>15:55:07</text:p>
          </table:table-cell>
          <table:table-cell office:value-type="float" office:value="455" calcext:value-type="float">
            <text:p>45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09S" calcext:value-type="time">
            <text:p>15:55:09</text:p>
          </table:table-cell>
          <table:table-cell office:value-type="float" office:value="312" calcext:value-type="float">
            <text:p>31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12S" calcext:value-type="time">
            <text:p>15:55:12</text:p>
          </table:table-cell>
          <table:table-cell office:value-type="float" office:value="493" calcext:value-type="float">
            <text:p>49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14S" calcext:value-type="time">
            <text:p>15:55:14</text:p>
          </table:table-cell>
          <table:table-cell office:value-type="float" office:value="476" calcext:value-type="float">
            <text:p>47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17S" calcext:value-type="time">
            <text:p>15:55:17</text:p>
          </table:table-cell>
          <table:table-cell office:value-type="float" office:value="595" calcext:value-type="float">
            <text:p>59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19S" calcext:value-type="time">
            <text:p>15:55:19</text:p>
          </table:table-cell>
          <table:table-cell office:value-type="float" office:value="403" calcext:value-type="float">
            <text:p>40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21S" calcext:value-type="time">
            <text:p>15:55:21</text:p>
          </table:table-cell>
          <table:table-cell office:value-type="float" office:value="365" calcext:value-type="float">
            <text:p>36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24S" calcext:value-type="time">
            <text:p>15:55:24</text:p>
          </table:table-cell>
          <table:table-cell office:value-type="float" office:value="578" calcext:value-type="float">
            <text:p>578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26S" calcext:value-type="time">
            <text:p>15:55:26</text:p>
          </table:table-cell>
          <table:table-cell office:value-type="float" office:value="321" calcext:value-type="float">
            <text:p>32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28S" calcext:value-type="time">
            <text:p>15:55:28</text:p>
          </table:table-cell>
          <table:table-cell office:value-type="float" office:value="353" calcext:value-type="float">
            <text:p>35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31S" calcext:value-type="time">
            <text:p>15:55:31</text:p>
          </table:table-cell>
          <table:table-cell office:value-type="float" office:value="550" calcext:value-type="float">
            <text:p>55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33S" calcext:value-type="time">
            <text:p>15:55:33</text:p>
          </table:table-cell>
          <table:table-cell office:value-type="float" office:value="525" calcext:value-type="float">
            <text:p>52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35S" calcext:value-type="time">
            <text:p>15:55:35</text:p>
          </table:table-cell>
          <table:table-cell office:value-type="float" office:value="347" calcext:value-type="float">
            <text:p>347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38S" calcext:value-type="time">
            <text:p>15:55:38</text:p>
          </table:table-cell>
          <table:table-cell office:value-type="float" office:value="649" calcext:value-type="float">
            <text:p>649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40S" calcext:value-type="time">
            <text:p>15:55:40</text:p>
          </table:table-cell>
          <table:table-cell office:value-type="float" office:value="462" calcext:value-type="float">
            <text:p>46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43S" calcext:value-type="time">
            <text:p>15:55:43</text:p>
          </table:table-cell>
          <table:table-cell office:value-type="float" office:value="423" calcext:value-type="float">
            <text:p>423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45S" calcext:value-type="time">
            <text:p>15:55:45</text:p>
          </table:table-cell>
          <table:table-cell office:value-type="float" office:value="273" calcext:value-type="float">
            <text:p>273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47S" calcext:value-type="time">
            <text:p>15:55:47</text:p>
          </table:table-cell>
          <table:table-cell office:value-type="float" office:value="451" calcext:value-type="float">
            <text:p>45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50S" calcext:value-type="time">
            <text:p>15:55:50</text:p>
          </table:table-cell>
          <table:table-cell office:value-type="float" office:value="180" calcext:value-type="float">
            <text:p>18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52S" calcext:value-type="time">
            <text:p>15:55:52</text:p>
          </table:table-cell>
          <table:table-cell office:value-type="float" office:value="587" calcext:value-type="float">
            <text:p>587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54S" calcext:value-type="time">
            <text:p>15:55:54</text:p>
          </table:table-cell>
          <table:table-cell office:value-type="float" office:value="552" calcext:value-type="float">
            <text:p>552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57S" calcext:value-type="time">
            <text:p>15:55:57</text:p>
          </table:table-cell>
          <table:table-cell office:value-type="float" office:value="452" calcext:value-type="float">
            <text:p>45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5M59S" calcext:value-type="time">
            <text:p>15:55:59</text:p>
          </table:table-cell>
          <table:table-cell office:value-type="float" office:value="413" calcext:value-type="float">
            <text:p>41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02S" calcext:value-type="time">
            <text:p>15:56:02</text:p>
          </table:table-cell>
          <table:table-cell office:value-type="float" office:value="202" calcext:value-type="float">
            <text:p>202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04S" calcext:value-type="time">
            <text:p>15:56:04</text:p>
          </table:table-cell>
          <table:table-cell office:value-type="float" office:value="241" calcext:value-type="float">
            <text:p>241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06S" calcext:value-type="time">
            <text:p>15:56:06</text:p>
          </table:table-cell>
          <table:table-cell office:value-type="float" office:value="521" calcext:value-type="float">
            <text:p>52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09S" calcext:value-type="time">
            <text:p>15:56:09</text:p>
          </table:table-cell>
          <table:table-cell office:value-type="float" office:value="553" calcext:value-type="float">
            <text:p>55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11S" calcext:value-type="time">
            <text:p>15:56:11</text:p>
          </table:table-cell>
          <table:table-cell office:value-type="float" office:value="497" calcext:value-type="float">
            <text:p>49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14S" calcext:value-type="time">
            <text:p>15:56:14</text:p>
          </table:table-cell>
          <table:table-cell office:value-type="float" office:value="506" calcext:value-type="float">
            <text:p>506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16S" calcext:value-type="time">
            <text:p>15:56:16</text:p>
          </table:table-cell>
          <table:table-cell office:value-type="float" office:value="484" calcext:value-type="float">
            <text:p>48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18S" calcext:value-type="time">
            <text:p>15:56:18</text:p>
          </table:table-cell>
          <table:table-cell office:value-type="float" office:value="525" calcext:value-type="float">
            <text:p>525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21S" calcext:value-type="time">
            <text:p>15:56:21</text:p>
          </table:table-cell>
          <table:table-cell office:value-type="float" office:value="488" calcext:value-type="float">
            <text:p>488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23S" calcext:value-type="time">
            <text:p>15:56:23</text:p>
          </table:table-cell>
          <table:table-cell office:value-type="float" office:value="544" calcext:value-type="float">
            <text:p>544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25S" calcext:value-type="time">
            <text:p>15:56:25</text:p>
          </table:table-cell>
          <table:table-cell office:value-type="float" office:value="490" calcext:value-type="float">
            <text:p>49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28S" calcext:value-type="time">
            <text:p>15:56:28</text:p>
          </table:table-cell>
          <table:table-cell office:value-type="float" office:value="640" calcext:value-type="float">
            <text:p>64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30S" calcext:value-type="time">
            <text:p>15:56:30</text:p>
          </table:table-cell>
          <table:table-cell office:value-type="float" office:value="206" calcext:value-type="float">
            <text:p>206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33S" calcext:value-type="time">
            <text:p>15:56:33</text:p>
          </table:table-cell>
          <table:table-cell office:value-type="float" office:value="337" calcext:value-type="float">
            <text:p>33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35S" calcext:value-type="time">
            <text:p>15:56:35</text:p>
          </table:table-cell>
          <table:table-cell office:value-type="float" office:value="570" calcext:value-type="float">
            <text:p>57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37S" calcext:value-type="time">
            <text:p>15:56:37</text:p>
          </table:table-cell>
          <table:table-cell office:value-type="float" office:value="517" calcext:value-type="float">
            <text:p>517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40S" calcext:value-type="time">
            <text:p>15:56:40</text:p>
          </table:table-cell>
          <table:table-cell office:value-type="float" office:value="440" calcext:value-type="float">
            <text:p>44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42S" calcext:value-type="time">
            <text:p>15:56:42</text:p>
          </table:table-cell>
          <table:table-cell office:value-type="float" office:value="307" calcext:value-type="float">
            <text:p>307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45S" calcext:value-type="time">
            <text:p>15:56:45</text:p>
          </table:table-cell>
          <table:table-cell office:value-type="float" office:value="433" calcext:value-type="float">
            <text:p>43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47S" calcext:value-type="time">
            <text:p>15:56:47</text:p>
          </table:table-cell>
          <table:table-cell office:value-type="float" office:value="461" calcext:value-type="float">
            <text:p>461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49S" calcext:value-type="time">
            <text:p>15:56:49</text:p>
          </table:table-cell>
          <table:table-cell office:value-type="float" office:value="491" calcext:value-type="float">
            <text:p>49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52S" calcext:value-type="time">
            <text:p>15:56:52</text:p>
          </table:table-cell>
          <table:table-cell office:value-type="float" office:value="750" calcext:value-type="float">
            <text:p>75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54S" calcext:value-type="time">
            <text:p>15:56:54</text:p>
          </table:table-cell>
          <table:table-cell office:value-type="float" office:value="767" calcext:value-type="float">
            <text:p>76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57S" calcext:value-type="time">
            <text:p>15:56:57</text:p>
          </table:table-cell>
          <table:table-cell office:value-type="float" office:value="383" calcext:value-type="float">
            <text:p>38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6M59S" calcext:value-type="time">
            <text:p>15:56:59</text:p>
          </table:table-cell>
          <table:table-cell office:value-type="float" office:value="813" calcext:value-type="float">
            <text:p>81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office:value-type="time" office:time-value="PT15H57M01S" calcext:value-type="time">
            <text:p>15:57:01</text:p>
          </table:table-cell>
          <table:table-cell office:value-type="float" office:value="846" calcext:value-type="float">
            <text:p>846</text:p>
          </table:table-cell>
          <table:table-cell office:value-type="float" office:value="315" calcext:value-type="float">
            <text:p>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6:10:42.744223837</meta:creation-date>
    <dc:date>2022-11-19T14:35:20.719650616</dc:date>
    <meta:editing-duration>PT4H1M30S</meta:editing-duration>
    <meta:editing-cycles>2</meta:editing-cycles>
    <meta:generator>LibreOffice/7.3.6.2$Linux_X86_64 LibreOffice_project/30$Build-2</meta:generator>
    <meta:document-statistic meta:table-count="6" meta:cell-count="11568" meta:object-count="0"/>
  </office:meta>
</office:document-meta>
</file>