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3S" calcext:value-type="time">
            <text:p>11:54:03</text:p>
          </table:table-cell>
          <table:table-cell office:value-type="float" office:value="37" calcext:value-type="float">
            <text:p>3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4S" calcext:value-type="time">
            <text:p>11:54:04</text:p>
          </table:table-cell>
          <table:table-cell office:value-type="float" office:value="28" calcext:value-type="float">
            <text:p>2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5S" calcext:value-type="time">
            <text:p>11:54:05</text:p>
          </table:table-cell>
          <table:table-cell office:value-type="float" office:value="22" calcext:value-type="float">
            <text:p>2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6S" calcext:value-type="time">
            <text:p>11:54:06</text:p>
          </table:table-cell>
          <table:table-cell office:value-type="float" office:value="36" calcext:value-type="float">
            <text:p>3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7S" calcext:value-type="time">
            <text:p>11:54:07</text:p>
          </table:table-cell>
          <table:table-cell office:value-type="float" office:value="30" calcext:value-type="float">
            <text:p>3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8S" calcext:value-type="time">
            <text:p>11:54:08</text:p>
          </table:table-cell>
          <table:table-cell office:value-type="float" office:value="64" calcext:value-type="float">
            <text:p>6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9S" calcext:value-type="time">
            <text:p>11:54:09</text:p>
          </table:table-cell>
          <table:table-cell office:value-type="float" office:value="18" calcext:value-type="float">
            <text:p>1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0S" calcext:value-type="time">
            <text:p>11:54:10</text:p>
          </table:table-cell>
          <table:table-cell office:value-type="float" office:value="26" calcext:value-type="float">
            <text:p>2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2S" calcext:value-type="time">
            <text:p>11:54:12</text:p>
          </table:table-cell>
          <table:table-cell office:value-type="float" office:value="110" calcext:value-type="float">
            <text:p>11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3S" calcext:value-type="time">
            <text:p>11:54:13</text:p>
          </table:table-cell>
          <table:table-cell office:value-type="float" office:value="50" calcext:value-type="float">
            <text:p>5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4S" calcext:value-type="time">
            <text:p>11:54:14</text:p>
          </table:table-cell>
          <table:table-cell office:value-type="float" office:value="30" calcext:value-type="float">
            <text:p>3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5S" calcext:value-type="time">
            <text:p>11:54:15</text:p>
          </table:table-cell>
          <table:table-cell office:value-type="float" office:value="80" calcext:value-type="float">
            <text:p>8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6S" calcext:value-type="time">
            <text:p>11:54:16</text:p>
          </table:table-cell>
          <table:table-cell office:value-type="float" office:value="20" calcext:value-type="float">
            <text:p>20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7S" calcext:value-type="time">
            <text:p>11:54:17</text:p>
          </table:table-cell>
          <table:table-cell office:value-type="float" office:value="88" calcext:value-type="float">
            <text:p>8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8S" calcext:value-type="time">
            <text:p>11:54:18</text:p>
          </table:table-cell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0S" calcext:value-type="time">
            <text:p>11:54:2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1S" calcext:value-type="time">
            <text:p>11:54:21</text:p>
          </table:table-cell>
          <table:table-cell office:value-type="float" office:value="30" calcext:value-type="float">
            <text:p>3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2S" calcext:value-type="time">
            <text:p>11:54:22</text:p>
          </table:table-cell>
          <table:table-cell office:value-type="float" office:value="96" calcext:value-type="float">
            <text:p>9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3S" calcext:value-type="time">
            <text:p>11:54:23</text:p>
          </table:table-cell>
          <table:table-cell office:value-type="float" office:value="99" calcext:value-type="float">
            <text:p>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4S" calcext:value-type="time">
            <text:p>11:54:2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5S" calcext:value-type="time">
            <text:p>11:54:25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6S" calcext:value-type="time">
            <text:p>11:54:26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7S" calcext:value-type="time">
            <text:p>11:54:27</text:p>
          </table:table-cell>
          <table:table-cell office:value-type="float" office:value="79" calcext:value-type="float">
            <text:p>7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9S" calcext:value-type="time">
            <text:p>11:54:29</text:p>
          </table:table-cell>
          <table:table-cell office:value-type="float" office:value="1004" calcext:value-type="float">
            <text:p>10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0S" calcext:value-type="time">
            <text:p>11:54:30</text:p>
          </table:table-cell>
          <table:table-cell office:value-type="float" office:value="31" calcext:value-type="float">
            <text:p>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1S" calcext:value-type="time">
            <text:p>11:54:31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2S" calcext:value-type="time">
            <text:p>11:54:3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3S" calcext:value-type="time">
            <text:p>11:54: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4S" calcext:value-type="time">
            <text:p>11:54:3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5S" calcext:value-type="time">
            <text:p>11:54:35</text:p>
          </table:table-cell>
          <table:table-cell office:value-type="float" office:value="267" calcext:value-type="float">
            <text:p>26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6S" calcext:value-type="time">
            <text:p>11:54:36</text:p>
          </table:table-cell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8S" calcext:value-type="time">
            <text:p>11:54:3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9S" calcext:value-type="time">
            <text:p>11:54:39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0S" calcext:value-type="time">
            <text:p>11:54:4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1S" calcext:value-type="time">
            <text:p>11:54:41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2S" calcext:value-type="time">
            <text:p>11:54:4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3S" calcext:value-type="time">
            <text:p>11:54:4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4S" calcext:value-type="time">
            <text:p>11:54:44</text:p>
          </table:table-cell>
          <table:table-cell office:value-type="float" office:value="164" calcext:value-type="float">
            <text:p>16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6S" calcext:value-type="time">
            <text:p>11:54:46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7S" calcext:value-type="time">
            <text:p>11:54:47</text:p>
          </table:table-cell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8S" calcext:value-type="time">
            <text:p>11:54:48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9S" calcext:value-type="time">
            <text:p>11:54:49</text:p>
          </table:table-cell>
          <table:table-cell office:value-type="float" office:value="690" calcext:value-type="float">
            <text:p>6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0S" calcext:value-type="time">
            <text:p>11:54:50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1S" calcext:value-type="time">
            <text:p>11:54:5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2S" calcext:value-type="time">
            <text:p>11:54:52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4S" calcext:value-type="time">
            <text:p>11:54:54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5S" calcext:value-type="time">
            <text:p>11:54:55</text:p>
          </table:table-cell>
          <table:table-cell office:value-type="float" office:value="718" calcext:value-type="float">
            <text:p>7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6S" calcext:value-type="time">
            <text:p>11:54:56</text:p>
          </table:table-cell>
          <table:table-cell office:value-type="float" office:value="36" calcext:value-type="float">
            <text:p>3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7S" calcext:value-type="time">
            <text:p>11:54:57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8S" calcext:value-type="time">
            <text:p>11:54:58</text:p>
          </table:table-cell>
          <table:table-cell office:value-type="float" office:value="441" calcext:value-type="float">
            <text:p>44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9S" calcext:value-type="time">
            <text:p>11:54:59</text:p>
          </table:table-cell>
          <table:table-cell office:value-type="float" office:value="296" calcext:value-type="float">
            <text:p>29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2S" calcext:value-type="time">
            <text:p>11:55:02</text:p>
          </table:table-cell>
          <table:table-cell office:value-type="float" office:value="495" calcext:value-type="float">
            <text:p>4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3S" calcext:value-type="time">
            <text:p>11:55:0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4S" calcext:value-type="time">
            <text:p>11:55:04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5S" calcext:value-type="time">
            <text:p>11:55:0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6S" calcext:value-type="time">
            <text:p>11:55:0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7S" calcext:value-type="time">
            <text:p>11:55:07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8S" calcext:value-type="time">
            <text:p>11:55:08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0S" calcext:value-type="time">
            <text:p>11:55:10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1S" calcext:value-type="time">
            <text:p>11:55:11</text:p>
          </table:table-cell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2S" calcext:value-type="time">
            <text:p>11:55:12</text:p>
          </table:table-cell>
          <table:table-cell office:value-type="float" office:value="185" calcext:value-type="float">
            <text:p>18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3S" calcext:value-type="time">
            <text:p>11:55:1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4S" calcext:value-type="time">
            <text:p>11:55: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5S" calcext:value-type="time">
            <text:p>11:55:15</text:p>
          </table:table-cell>
          <table:table-cell office:value-type="float" office:value="207" calcext:value-type="float">
            <text:p>20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7S" calcext:value-type="time">
            <text:p>11:55:17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8S" calcext:value-type="time">
            <text:p>11:55:18</text:p>
          </table:table-cell>
          <table:table-cell office:value-type="float" office:value="64" calcext:value-type="float">
            <text:p>6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9S" calcext:value-type="time">
            <text:p>11:55:19</text:p>
          </table:table-cell>
          <table:table-cell office:value-type="float" office:value="35" calcext:value-type="float">
            <text:p>3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0S" calcext:value-type="time">
            <text:p>11:55:2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1S" calcext:value-type="time">
            <text:p>11:55:21</text:p>
          </table:table-cell>
          <table:table-cell office:value-type="float" office:value="154" calcext:value-type="float">
            <text:p>15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2S" calcext:value-type="time">
            <text:p>11:55:22</text:p>
          </table:table-cell>
          <table:table-cell office:value-type="float" office:value="106" calcext:value-type="float">
            <text:p>10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3S" calcext:value-type="time">
            <text:p>11:55:23</text:p>
          </table:table-cell>
          <table:table-cell office:value-type="float" office:value="870" calcext:value-type="float">
            <text:p>87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5S" calcext:value-type="time">
            <text:p>11:55:25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6S" calcext:value-type="time">
            <text:p>11:55:26</text:p>
          </table:table-cell>
          <table:table-cell office:value-type="float" office:value="179" calcext:value-type="float">
            <text:p>17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7S" calcext:value-type="time">
            <text:p>11:55:27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8S" calcext:value-type="time">
            <text:p>11:55:28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9S" calcext:value-type="time">
            <text:p>11:55:29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0S" calcext:value-type="time">
            <text:p>11:55:30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2S" calcext:value-type="time">
            <text:p>11:55:32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3S" calcext:value-type="time">
            <text:p>11:55:3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4S" calcext:value-type="time">
            <text:p>11:55:3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5S" calcext:value-type="time">
            <text:p>11:55:3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6S" calcext:value-type="time">
            <text:p>11:55:3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8S" calcext:value-type="time">
            <text:p>11:55:38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9S" calcext:value-type="time">
            <text:p>11:55:39</text:p>
          </table:table-cell>
          <table:table-cell office:value-type="float" office:value="41" calcext:value-type="float">
            <text:p>4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0S" calcext:value-type="time">
            <text:p>11:55:4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1S" calcext:value-type="time">
            <text:p>11:55:41</text:p>
          </table:table-cell>
          <table:table-cell office:value-type="float" office:value="488" calcext:value-type="float">
            <text:p>48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2S" calcext:value-type="time">
            <text:p>11:55:42</text:p>
          </table:table-cell>
          <table:table-cell office:value-type="float" office:value="500" calcext:value-type="float">
            <text:p>5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3S" calcext:value-type="time">
            <text:p>11:55:43</text:p>
          </table:table-cell>
          <table:table-cell office:value-type="float" office:value="535" calcext:value-type="float">
            <text:p>5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5S" calcext:value-type="time">
            <text:p>11:55:45</text:p>
          </table:table-cell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6S" calcext:value-type="time">
            <text:p>11:55:46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7S" calcext:value-type="time">
            <text:p>11:55:47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8S" calcext:value-type="time">
            <text:p>11:55:48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9S" calcext:value-type="time">
            <text:p>11:55:49</text:p>
          </table:table-cell>
          <table:table-cell office:value-type="float" office:value="170" calcext:value-type="float">
            <text:p>1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0S" calcext:value-type="time">
            <text:p>11:55:50</text:p>
          </table:table-cell>
          <table:table-cell office:value-type="float" office:value="52" calcext:value-type="float">
            <text:p>5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2S" calcext:value-type="time">
            <text:p>11:55:52</text:p>
          </table:table-cell>
          <table:table-cell office:value-type="float" office:value="47" calcext:value-type="float">
            <text:p>4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3S" calcext:value-type="time">
            <text:p>11:55:53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4S" calcext:value-type="time">
            <text:p>11:55:54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5S" calcext:value-type="time">
            <text:p>11:55:5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6S" calcext:value-type="time">
            <text:p>11:55:5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8S" calcext:value-type="time">
            <text:p>11:55:58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9S" calcext:value-type="time">
            <text:p>11:55:59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0S" calcext:value-type="time">
            <text:p>11:56:00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1S" calcext:value-type="time">
            <text:p>11:56:0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2S" calcext:value-type="time">
            <text:p>11:56:02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3S" calcext:value-type="time">
            <text:p>11:56:03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5S" calcext:value-type="time">
            <text:p>11:56:05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6S" calcext:value-type="time">
            <text:p>11:56:06</text:p>
          </table:table-cell>
          <table:table-cell office:value-type="float" office:value="52" calcext:value-type="float">
            <text:p>5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7S" calcext:value-type="time">
            <text:p>11:56:0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8S" calcext:value-type="time">
            <text:p>11:56:08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9S" calcext:value-type="time">
            <text:p>11:56:0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1S" calcext:value-type="time">
            <text:p>11:56:11</text:p>
          </table:table-cell>
          <table:table-cell office:value-type="float" office:value="19" calcext:value-type="float">
            <text:p>1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2S" calcext:value-type="time">
            <text:p>11:56:12</text:p>
          </table:table-cell>
          <table:table-cell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3S" calcext:value-type="time">
            <text:p>11:56:13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4S" calcext:value-type="time">
            <text:p>11:56:14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5S" calcext:value-type="time">
            <text:p>11:56:15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7S" calcext:value-type="time">
            <text:p>11:56:17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8S" calcext:value-type="time">
            <text:p>11:56:1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9S" calcext:value-type="time">
            <text:p>11:56:19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0S" calcext:value-type="time">
            <text:p>11:56:20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1S" calcext:value-type="time">
            <text:p>11:56:21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3S" calcext:value-type="time">
            <text:p>11:56:2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4S" calcext:value-type="time">
            <text:p>11:56:2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5S" calcext:value-type="time">
            <text:p>11:56:2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6S" calcext:value-type="time">
            <text:p>11:56: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7S" calcext:value-type="time">
            <text:p>11:56:2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9S" calcext:value-type="time">
            <text:p>11:56:29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0S" calcext:value-type="time">
            <text:p>11:56:30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1S" calcext:value-type="time">
            <text:p>11:56:31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2S" calcext:value-type="time">
            <text:p>11:56:32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3S" calcext:value-type="time">
            <text:p>11:56:33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5S" calcext:value-type="time">
            <text:p>11:56:35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6S" calcext:value-type="time">
            <text:p>11:56:36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7S" calcext:value-type="time">
            <text:p>11:56:3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8S" calcext:value-type="time">
            <text:p>11:56:38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0S" calcext:value-type="time">
            <text:p>11:56:40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1S" calcext:value-type="time">
            <text:p>11:56:41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2S" calcext:value-type="time">
            <text:p>11:56:4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3S" calcext:value-type="time">
            <text:p>11:56:43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4S" calcext:value-type="time">
            <text:p>11:56:4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6S" calcext:value-type="time">
            <text:p>11:56:46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7S" calcext:value-type="time">
            <text:p>11:56:47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8S" calcext:value-type="time">
            <text:p>11:56:48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9S" calcext:value-type="time">
            <text:p>11:56:49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0S" calcext:value-type="time">
            <text:p>11:56:50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2S" calcext:value-type="time">
            <text:p>11:56:5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3S" calcext:value-type="time">
            <text:p>11:56:53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4S" calcext:value-type="time">
            <text:p>11:56:54</text:p>
          </table:table-cell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5S" calcext:value-type="time">
            <text:p>11:56:55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7S" calcext:value-type="time">
            <text:p>11:56:57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8S" calcext:value-type="time">
            <text:p>11:56:58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9S" calcext:value-type="time">
            <text:p>11:56:59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2S" calcext:value-type="time">
            <text:p>11:57:02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3S" calcext:value-type="time">
            <text:p>11:57:0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4S" calcext:value-type="time">
            <text:p>11:57:04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5S" calcext:value-type="time">
            <text:p>11:57:0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6S" calcext:value-type="time">
            <text:p>11:57:06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8S" calcext:value-type="time">
            <text:p>11:57:08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9S" calcext:value-type="time">
            <text:p>11:57:09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0S" calcext:value-type="time">
            <text:p>11:57:1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1S" calcext:value-type="time">
            <text:p>11:57:1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3S" calcext:value-type="time">
            <text:p>11:57:1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4S" calcext:value-type="time">
            <text:p>11:57:14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5S" calcext:value-type="time">
            <text:p>11:57:15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6S" calcext:value-type="time">
            <text:p>11:57:16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8S" calcext:value-type="time">
            <text:p>11:57:18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9S" calcext:value-type="time">
            <text:p>11:57:19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0S" calcext:value-type="time">
            <text:p>11:57:2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1S" calcext:value-type="time">
            <text:p>11:57:2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3S" calcext:value-type="time">
            <text:p>11:57:23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4S" calcext:value-type="time">
            <text:p>11:57:24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5S" calcext:value-type="time">
            <text:p>11:57:2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6S" calcext:value-type="time">
            <text:p>11:57:2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7S" calcext:value-type="time">
            <text:p>11:57:27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9S" calcext:value-type="time">
            <text:p>11:57:29</text:p>
          </table:table-cell>
          <table:table-cell office:value-type="float" office:value="338" calcext:value-type="float">
            <text:p>3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0S" calcext:value-type="time">
            <text:p>11:57:30</text:p>
          </table:table-cell>
          <table:table-cell office:value-type="float" office:value="44" calcext:value-type="float">
            <text:p>4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1S" calcext:value-type="time">
            <text:p>11:57:31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2S" calcext:value-type="time">
            <text:p>11:57:3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4S" calcext:value-type="time">
            <text:p>11:57:34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5S" calcext:value-type="time">
            <text:p>11:57:35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6S" calcext:value-type="time">
            <text:p>11:57:36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7S" calcext:value-type="time">
            <text:p>11:57:3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9S" calcext:value-type="time">
            <text:p>11:57:3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0S" calcext:value-type="time">
            <text:p>11:57:4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1S" calcext:value-type="time">
            <text:p>11:57:41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2S" calcext:value-type="time">
            <text:p>11:57:42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4S" calcext:value-type="time">
            <text:p>11:57:44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5S" calcext:value-type="time">
            <text:p>11:57:45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6S" calcext:value-type="time">
            <text:p>11:57:4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7S" calcext:value-type="time">
            <text:p>11:57:4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9S" calcext:value-type="time">
            <text:p>11:57:49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0S" calcext:value-type="time">
            <text:p>11:57:50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1S" calcext:value-type="time">
            <text:p>11:57:5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3S" calcext:value-type="time">
            <text:p>11:57:5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4S" calcext:value-type="time">
            <text:p>11:57:54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5S" calcext:value-type="time">
            <text:p>11:57:55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6S" calcext:value-type="time">
            <text:p>11:57:56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8S" calcext:value-type="time">
            <text:p>11:57:58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9S" calcext:value-type="time">
            <text:p>11:57:59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0S" calcext:value-type="time">
            <text:p>11:58:00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1S" calcext:value-type="time">
            <text:p>11:58:01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3S" calcext:value-type="time">
            <text:p>11:58:03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4S" calcext:value-type="time">
            <text:p>11:58:0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5S" calcext:value-type="time">
            <text:p>11:58:05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6S" calcext:value-type="time">
            <text:p>11:58:06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8S" calcext:value-type="time">
            <text:p>11:58:08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9S" calcext:value-type="time">
            <text:p>11:58:09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0S" calcext:value-type="time">
            <text:p>11:58:10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2S" calcext:value-type="time">
            <text:p>11:58: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3S" calcext:value-type="time">
            <text:p>11:58:1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4S" calcext:value-type="time">
            <text:p>11:58:1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5S" calcext:value-type="time">
            <text:p>11:58:15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7S" calcext:value-type="time">
            <text:p>11:58:17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8S" calcext:value-type="time">
            <text:p>11:58:18</text:p>
          </table:table-cell>
          <table:table-cell office:value-type="float" office:value="19" calcext:value-type="float">
            <text:p>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9S" calcext:value-type="time">
            <text:p>11:58:19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0S" calcext:value-type="time">
            <text:p>11:58:20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2S" calcext:value-type="time">
            <text:p>11:58:22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3S" calcext:value-type="time">
            <text:p>11:58:2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4S" calcext:value-type="time">
            <text:p>11:58:24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6S" calcext:value-type="time">
            <text:p>11:58:26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7S" calcext:value-type="time">
            <text:p>11:58:2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8S" calcext:value-type="time">
            <text:p>11:58:28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9S" calcext:value-type="time">
            <text:p>11:58:29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1S" calcext:value-type="time">
            <text:p>11:58:31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2S" calcext:value-type="time">
            <text:p>11:58:32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3S" calcext:value-type="time">
            <text:p>11:58:33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5S" calcext:value-type="time">
            <text:p>11:58:35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6S" calcext:value-type="time">
            <text:p>11:58:36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7S" calcext:value-type="time">
            <text:p>11:58:3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8S" calcext:value-type="time">
            <text:p>11:58:38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0S" calcext:value-type="time">
            <text:p>11:58:40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1S" calcext:value-type="time">
            <text:p>11:58:41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2S" calcext:value-type="time">
            <text:p>11:58:42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4S" calcext:value-type="time">
            <text:p>11:58:44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5S" calcext:value-type="time">
            <text:p>11:58:4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6S" calcext:value-type="time">
            <text:p>11:58:46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7S" calcext:value-type="time">
            <text:p>11:58:47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9S" calcext:value-type="time">
            <text:p>11:58:49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0S" calcext:value-type="time">
            <text:p>11:58:50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1S" calcext:value-type="time">
            <text:p>11:58:51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3S" calcext:value-type="time">
            <text:p>11:58:53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4S" calcext:value-type="time">
            <text:p>11:58:54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5S" calcext:value-type="time">
            <text:p>11:58:55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6S" calcext:value-type="time">
            <text:p>11:58:56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8S" calcext:value-type="time">
            <text:p>11:58:5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9S" calcext:value-type="time">
            <text:p>11:58:59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0S" calcext:value-type="time">
            <text:p>11:59:00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2S" calcext:value-type="time">
            <text:p>11:59:0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3S" calcext:value-type="time">
            <text:p>11:59:03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4S" calcext:value-type="time">
            <text:p>11:59:04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6S" calcext:value-type="time">
            <text:p>11:59:06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7S" calcext:value-type="time">
            <text:p>11:59:07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8S" calcext:value-type="time">
            <text:p>11:59:08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0S" calcext:value-type="time">
            <text:p>11:59:1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1S" calcext:value-type="time">
            <text:p>11:59:11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2S" calcext:value-type="time">
            <text:p>11:59:12</text:p>
          </table:table-cell>
          <table:table-cell office:value-type="float" office:value="56" calcext:value-type="float">
            <text:p>5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3S" calcext:value-type="time">
            <text:p>11:59:13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5S" calcext:value-type="time">
            <text:p>11:59:15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6S" calcext:value-type="time">
            <text:p>11:59:16</text:p>
          </table:table-cell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7S" calcext:value-type="time">
            <text:p>11:59:1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9S" calcext:value-type="time">
            <text:p>11:59:19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0S" calcext:value-type="time">
            <text:p>11:59:20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1S" calcext:value-type="time">
            <text:p>11:59:21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3S" calcext:value-type="time">
            <text:p>11:59:23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4S" calcext:value-type="time">
            <text:p>11:59:24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5S" calcext:value-type="time">
            <text:p>11:59:25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7S" calcext:value-type="time">
            <text:p>11:59:27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8S" calcext:value-type="time">
            <text:p>11:59:28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9S" calcext:value-type="time">
            <text:p>11:59:29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1S" calcext:value-type="time">
            <text:p>11:59:31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2S" calcext:value-type="time">
            <text:p>11:59:32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3S" calcext:value-type="time">
            <text:p>11:59:3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5S" calcext:value-type="time">
            <text:p>11:59:3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6S" calcext:value-type="time">
            <text:p>11:59: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7S" calcext:value-type="time">
            <text:p>11:59:37</text:p>
          </table:table-cell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8S" calcext:value-type="time">
            <text:p>11:59:38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0S" calcext:value-type="time">
            <text:p>11:59:40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1S" calcext:value-type="time">
            <text:p>11:59:41</text:p>
          </table:table-cell>
          <table:table-cell office:value-type="float" office:value="119" calcext:value-type="float">
            <text:p>11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2S" calcext:value-type="time">
            <text:p>11:59:42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4S" calcext:value-type="time">
            <text:p>11:59:44</text:p>
          </table:table-cell>
          <table:table-cell office:value-type="float" office:value="116" calcext:value-type="float">
            <text:p>1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5S" calcext:value-type="time">
            <text:p>11:59:45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6S" calcext:value-type="time">
            <text:p>11:59:46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8S" calcext:value-type="time">
            <text:p>11:59:48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9S" calcext:value-type="time">
            <text:p>11:59:49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0S" calcext:value-type="time">
            <text:p>11:59:50</text:p>
          </table:table-cell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2S" calcext:value-type="time">
            <text:p>11:59:52</text:p>
          </table:table-cell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3S" calcext:value-type="time">
            <text:p>11:59:53</text:p>
          </table:table-cell>
          <table:table-cell office:value-type="float" office:value="41" calcext:value-type="float">
            <text:p>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4S" calcext:value-type="time">
            <text:p>11:59:54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6S" calcext:value-type="time">
            <text:p>11:59:5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7S" calcext:value-type="time">
            <text:p>11:59:57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8S" calcext:value-type="time">
            <text:p>11:59:58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1S" calcext:value-type="time">
            <text:p>12:00:01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2S" calcext:value-type="time">
            <text:p>12:00:02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4S" calcext:value-type="time">
            <text:p>12:00:04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5S" calcext:value-type="time">
            <text:p>12:00:05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6S" calcext:value-type="time">
            <text:p>12:00:06</text:p>
          </table:table-cell>
          <table:table-cell office:value-type="float" office:value="114" calcext:value-type="float">
            <text:p>11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8S" calcext:value-type="time">
            <text:p>12:00:08</text:p>
          </table:table-cell>
          <table:table-cell office:value-type="float" office:value="58" calcext:value-type="float">
            <text:p>5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9S" calcext:value-type="time">
            <text:p>12:00:09</text:p>
          </table:table-cell>
          <table:table-cell office:value-type="float" office:value="93" calcext:value-type="float">
            <text:p>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1S" calcext:value-type="time">
            <text:p>12:00:11</text:p>
          </table:table-cell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2S" calcext:value-type="time">
            <text:p>12:00:12</text:p>
          </table:table-cell>
          <table:table-cell office:value-type="float" office:value="52" calcext:value-type="float">
            <text:p>5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3S" calcext:value-type="time">
            <text:p>12:00:13</text:p>
          </table:table-cell>
          <table:table-cell office:value-type="float" office:value="18" calcext:value-type="float">
            <text:p>1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5S" calcext:value-type="time">
            <text:p>12:00:1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6S" calcext:value-type="time">
            <text:p>12:00:16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7S" calcext:value-type="time">
            <text:p>12:00:17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9S" calcext:value-type="time">
            <text:p>12:00:19</text:p>
          </table:table-cell>
          <table:table-cell office:value-type="float" office:value="69" calcext:value-type="float">
            <text:p>6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0S" calcext:value-type="time">
            <text:p>12:00:20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1S" calcext:value-type="time">
            <text:p>12:00:21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3S" calcext:value-type="time">
            <text:p>12:00:23</text:p>
          </table:table-cell>
          <table:table-cell office:value-type="float" office:value="67" calcext:value-type="float">
            <text:p>6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4S" calcext:value-type="time">
            <text:p>12:00:24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5S" calcext:value-type="time">
            <text:p>12:00:25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7S" calcext:value-type="time">
            <text:p>12:00:2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8S" calcext:value-type="time">
            <text:p>12:00:28</text:p>
          </table:table-cell>
          <table:table-cell office:value-type="float" office:value="56" calcext:value-type="float">
            <text:p>5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9S" calcext:value-type="time">
            <text:p>12:00:29</text:p>
          </table:table-cell>
          <table:table-cell office:value-type="float" office:value="41" calcext:value-type="float">
            <text:p>4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1S" calcext:value-type="time">
            <text:p>12:00:31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2S" calcext:value-type="time">
            <text:p>12:00:32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3S" calcext:value-type="time">
            <text:p>12:00:33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5S" calcext:value-type="time">
            <text:p>12:00:35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6S" calcext:value-type="time">
            <text:p>12:00:36</text:p>
          </table:table-cell>
          <table:table-cell office:value-type="float" office:value="92" calcext:value-type="float">
            <text:p>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8S" calcext:value-type="time">
            <text:p>12:00:38</text:p>
          </table:table-cell>
          <table:table-cell office:value-type="float" office:value="37" calcext:value-type="float">
            <text:p>3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9S" calcext:value-type="time">
            <text:p>12:00:3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0S" calcext:value-type="time">
            <text:p>12:00:40</text:p>
          </table:table-cell>
          <table:table-cell office:value-type="float" office:value="76" calcext:value-type="float">
            <text:p>7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2S" calcext:value-type="time">
            <text:p>12:00:42</text:p>
          </table:table-cell>
          <table:table-cell office:value-type="float" office:value="97" calcext:value-type="float">
            <text:p>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3S" calcext:value-type="time">
            <text:p>12:00:43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4S" calcext:value-type="time">
            <text:p>12:00:44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6S" calcext:value-type="time">
            <text:p>12:00:46</text:p>
          </table:table-cell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7S" calcext:value-type="time">
            <text:p>12:00:47</text:p>
          </table:table-cell>
          <table:table-cell office:value-type="float" office:value="27" calcext:value-type="float">
            <text:p>2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8S" calcext:value-type="time">
            <text:p>12:00:48</text:p>
          </table:table-cell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0S" calcext:value-type="time">
            <text:p>12:00:50</text:p>
          </table:table-cell>
          <table:table-cell office:value-type="float" office:value="91" calcext:value-type="float">
            <text:p>9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1S" calcext:value-type="time">
            <text:p>12:00:51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3S" calcext:value-type="time">
            <text:p>12:00:53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4S" calcext:value-type="time">
            <text:p>12:00:54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5S" calcext:value-type="time">
            <text:p>12:00:55</text:p>
          </table:table-cell>
          <table:table-cell office:value-type="float" office:value="87" calcext:value-type="float">
            <text:p>8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7S" calcext:value-type="time">
            <text:p>12:00:57</text:p>
          </table:table-cell>
          <table:table-cell office:value-type="float" office:value="38" calcext:value-type="float">
            <text:p>3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8S" calcext:value-type="time">
            <text:p>12:00:58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9S" calcext:value-type="time">
            <text:p>12:00:59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1S" calcext:value-type="time">
            <text:p>12:01:01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2S" calcext:value-type="time">
            <text:p>12:01:02</text:p>
          </table:table-cell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4S" calcext:value-type="time">
            <text:p>12:01:04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5S" calcext:value-type="time">
            <text:p>12:01:05</text:p>
          </table:table-cell>
          <table:table-cell office:value-type="float" office:value="45" calcext:value-type="float">
            <text:p>4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6S" calcext:value-type="time">
            <text:p>12:01:06</text:p>
          </table:table-cell>
          <table:table-cell office:value-type="float" office:value="101" calcext:value-type="float">
            <text:p>1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8S" calcext:value-type="time">
            <text:p>12:01:08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9S" calcext:value-type="time">
            <text:p>12:01:09</text:p>
          </table:table-cell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0S" calcext:value-type="time">
            <text:p>12:01:10</text:p>
          </table:table-cell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2S" calcext:value-type="time">
            <text:p>12:01:12</text:p>
          </table:table-cell>
          <table:table-cell office:value-type="float" office:value="83" calcext:value-type="float">
            <text:p>8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3S" calcext:value-type="time">
            <text:p>12:01:13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5S" calcext:value-type="time">
            <text:p>12:01:15</text:p>
          </table:table-cell>
          <table:table-cell office:value-type="float" office:value="68" calcext:value-type="float">
            <text:p>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6S" calcext:value-type="time">
            <text:p>12:01:16</text:p>
          </table:table-cell>
          <table:table-cell office:value-type="float" office:value="132" calcext:value-type="float">
            <text:p>1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7S" calcext:value-type="time">
            <text:p>12:01:17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9S" calcext:value-type="time">
            <text:p>12:01:19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0S" calcext:value-type="time">
            <text:p>12:01:20</text:p>
          </table:table-cell>
          <table:table-cell office:value-type="float" office:value="111" calcext:value-type="float">
            <text:p>11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1S" calcext:value-type="time">
            <text:p>12:01:21</text:p>
          </table:table-cell>
          <table:table-cell office:value-type="float" office:value="152" calcext:value-type="float">
            <text:p>15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3S" calcext:value-type="time">
            <text:p>12:01:23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4S" calcext:value-type="time">
            <text:p>12:01:24</text:p>
          </table:table-cell>
          <table:table-cell office:value-type="float" office:value="59" calcext:value-type="float">
            <text:p>5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6S" calcext:value-type="time">
            <text:p>12:01:26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7S" calcext:value-type="time">
            <text:p>12:01:27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8S" calcext:value-type="time">
            <text:p>12:01:28</text:p>
          </table:table-cell>
          <table:table-cell office:value-type="float" office:value="35" calcext:value-type="float">
            <text:p>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0S" calcext:value-type="time">
            <text:p>12:01:30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1S" calcext:value-type="time">
            <text:p>12:01:31</text:p>
          </table:table-cell>
          <table:table-cell office:value-type="float" office:value="38" calcext:value-type="float">
            <text:p>3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3S" calcext:value-type="time">
            <text:p>12:01:33</text:p>
          </table:table-cell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4S" calcext:value-type="time">
            <text:p>12:01:34</text:p>
          </table:table-cell>
          <table:table-cell office:value-type="float" office:value="37" calcext:value-type="float">
            <text:p>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5S" calcext:value-type="time">
            <text:p>12:01:35</text:p>
          </table:table-cell>
          <table:table-cell office:value-type="float" office:value="71" calcext:value-type="float">
            <text:p>7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7S" calcext:value-type="time">
            <text:p>12:01:37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8S" calcext:value-type="time">
            <text:p>12:01:38</text:p>
          </table:table-cell>
          <table:table-cell office:value-type="float" office:value="29" calcext:value-type="float">
            <text:p>2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0S" calcext:value-type="time">
            <text:p>12:01:40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1S" calcext:value-type="time">
            <text:p>12:01:41</text:p>
          </table:table-cell>
          <table:table-cell office:value-type="float" office:value="92" calcext:value-type="float">
            <text:p>9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2S" calcext:value-type="time">
            <text:p>12:01:42</text:p>
          </table:table-cell>
          <table:table-cell office:value-type="float" office:value="22" calcext:value-type="float">
            <text:p>2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4S" calcext:value-type="time">
            <text:p>12:01:44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5S" calcext:value-type="time">
            <text:p>12:01:45</text:p>
          </table:table-cell>
          <table:table-cell office:value-type="float" office:value="28" calcext:value-type="float">
            <text:p>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6S" calcext:value-type="time">
            <text:p>12:01:46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8S" calcext:value-type="time">
            <text:p>12:01:48</text:p>
          </table:table-cell>
          <table:table-cell office:value-type="float" office:value="34" calcext:value-type="float">
            <text:p>3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9S" calcext:value-type="time">
            <text:p>12:01:49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1S" calcext:value-type="time">
            <text:p>12:01:51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2S" calcext:value-type="time">
            <text:p>12:01:52</text:p>
          </table:table-cell>
          <table:table-cell office:value-type="float" office:value="67" calcext:value-type="float">
            <text:p>6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3S" calcext:value-type="time">
            <text:p>12:01:53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5S" calcext:value-type="time">
            <text:p>12:01:55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6S" calcext:value-type="time">
            <text:p>12:01:56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8S" calcext:value-type="time">
            <text:p>12:01:58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9S" calcext:value-type="time">
            <text:p>12:01:59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0S" calcext:value-type="time">
            <text:p>12:02:00</text:p>
          </table:table-cell>
          <table:table-cell office:value-type="float" office:value="77" calcext:value-type="float">
            <text:p>7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2S" calcext:value-type="time">
            <text:p>12:02:02</text:p>
          </table:table-cell>
          <table:table-cell office:value-type="float" office:value="72" calcext:value-type="float">
            <text:p>7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3S" calcext:value-type="time">
            <text:p>12:02:03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5S" calcext:value-type="time">
            <text:p>12:02:05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6S" calcext:value-type="time">
            <text:p>12:02:06</text:p>
          </table:table-cell>
          <table:table-cell office:value-type="float" office:value="48" calcext:value-type="float">
            <text:p>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8S" calcext:value-type="time">
            <text:p>12:02:08</text:p>
          </table:table-cell>
          <table:table-cell office:value-type="float" office:value="111" calcext:value-type="float">
            <text:p>1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9S" calcext:value-type="time">
            <text:p>12:02:09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0S" calcext:value-type="time">
            <text:p>12:02:10</text:p>
          </table:table-cell>
          <table:table-cell office:value-type="float" office:value="85" calcext:value-type="float">
            <text:p>8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2S" calcext:value-type="time">
            <text:p>12:02:12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3S" calcext:value-type="time">
            <text:p>12:02:13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5S" calcext:value-type="time">
            <text:p>12:02:15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6S" calcext:value-type="time">
            <text:p>12:02:16</text:p>
          </table:table-cell>
          <table:table-cell office:value-type="float" office:value="109" calcext:value-type="float">
            <text:p>10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7S" calcext:value-type="time">
            <text:p>12:02:17</text:p>
          </table:table-cell>
          <table:table-cell office:value-type="float" office:value="68" calcext:value-type="float">
            <text:p>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9S" calcext:value-type="time">
            <text:p>12:02:19</text:p>
          </table:table-cell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0S" calcext:value-type="time">
            <text:p>12:02:20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2S" calcext:value-type="time">
            <text:p>12:02:22</text:p>
          </table:table-cell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3S" calcext:value-type="time">
            <text:p>12:02:23</text:p>
          </table:table-cell>
          <table:table-cell office:value-type="float" office:value="36" calcext:value-type="float">
            <text:p>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4S" calcext:value-type="time">
            <text:p>12:02:24</text:p>
          </table:table-cell>
          <table:table-cell office:value-type="float" office:value="110" calcext:value-type="float">
            <text:p>11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6S" calcext:value-type="time">
            <text:p>12:02:26</text:p>
          </table:table-cell>
          <table:table-cell office:value-type="float" office:value="56" calcext:value-type="float">
            <text:p>5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7S" calcext:value-type="time">
            <text:p>12:02:27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9S" calcext:value-type="time">
            <text:p>12:02:29</text:p>
          </table:table-cell>
          <table:table-cell office:value-type="float" office:value="67" calcext:value-type="float">
            <text:p>6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0S" calcext:value-type="time">
            <text:p>12:02:30</text:p>
          </table:table-cell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2S" calcext:value-type="time">
            <text:p>12:02:32</text:p>
          </table:table-cell>
          <table:table-cell office:value-type="float" office:value="54" calcext:value-type="float">
            <text:p>5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3S" calcext:value-type="time">
            <text:p>12:02:33</text:p>
          </table:table-cell>
          <table:table-cell office:value-type="float" office:value="121" calcext:value-type="float">
            <text:p>12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4S" calcext:value-type="time">
            <text:p>12:02:34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6S" calcext:value-type="time">
            <text:p>12:02:36</text:p>
          </table:table-cell>
          <table:table-cell office:value-type="float" office:value="93" calcext:value-type="float">
            <text:p>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7S" calcext:value-type="time">
            <text:p>12:02:37</text:p>
          </table:table-cell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9S" calcext:value-type="time">
            <text:p>12:02:39</text:p>
          </table:table-cell>
          <table:table-cell office:value-type="float" office:value="63" calcext:value-type="float">
            <text:p>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0S" calcext:value-type="time">
            <text:p>12:02:40</text:p>
          </table:table-cell>
          <table:table-cell office:value-type="float" office:value="78" calcext:value-type="float">
            <text:p>7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2S" calcext:value-type="time">
            <text:p>12:02:42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3S" calcext:value-type="time">
            <text:p>12:02:43</text:p>
          </table:table-cell>
          <table:table-cell office:value-type="float" office:value="63" calcext:value-type="float">
            <text:p>6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4S" calcext:value-type="time">
            <text:p>12:02:44</text:p>
          </table:table-cell>
          <table:table-cell office:value-type="float" office:value="79" calcext:value-type="float">
            <text:p>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6S" calcext:value-type="time">
            <text:p>12:02:46</text:p>
          </table:table-cell>
          <table:table-cell office:value-type="float" office:value="41" calcext:value-type="float">
            <text:p>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7S" calcext:value-type="time">
            <text:p>12:02:47</text:p>
          </table:table-cell>
          <table:table-cell office:value-type="float" office:value="83" calcext:value-type="float">
            <text:p>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9S" calcext:value-type="time">
            <text:p>12:02:49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0S" calcext:value-type="time">
            <text:p>12:02:50</text:p>
          </table:table-cell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2S" calcext:value-type="time">
            <text:p>12:02:52</text:p>
          </table:table-cell>
          <table:table-cell office:value-type="float" office:value="112" calcext:value-type="float">
            <text:p>1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3S" calcext:value-type="time">
            <text:p>12:02:53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4S" calcext:value-type="time">
            <text:p>12:02:54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6S" calcext:value-type="time">
            <text:p>12:02:56</text:p>
          </table:table-cell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7S" calcext:value-type="time">
            <text:p>12:02:57</text:p>
          </table:table-cell>
          <table:table-cell office:value-type="float" office:value="75" calcext:value-type="float">
            <text:p>7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9S" calcext:value-type="time">
            <text:p>12:02:59</text:p>
          </table:table-cell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75" calcext:value-type="float">
            <text:p>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2S" calcext:value-type="time">
            <text:p>12:03:02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3S" calcext:value-type="time">
            <text:p>12:03:03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4S" calcext:value-type="time">
            <text:p>12:03:04</text:p>
          </table:table-cell>
          <table:table-cell office:value-type="float" office:value="49" calcext:value-type="float">
            <text:p>4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6S" calcext:value-type="time">
            <text:p>12:03:06</text:p>
          </table:table-cell>
          <table:table-cell office:value-type="float" office:value="63" calcext:value-type="float">
            <text:p>6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7S" calcext:value-type="time">
            <text:p>12:03:07</text:p>
          </table:table-cell>
          <table:table-cell office:value-type="float" office:value="143" calcext:value-type="float">
            <text:p>1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9S" calcext:value-type="time">
            <text:p>12:03:09</text:p>
          </table:table-cell>
          <table:table-cell office:value-type="float" office:value="78" calcext:value-type="float">
            <text:p>7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0S" calcext:value-type="time">
            <text:p>12:03:10</text:p>
          </table:table-cell>
          <table:table-cell office:value-type="float" office:value="108" calcext:value-type="float">
            <text:p>10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2S" calcext:value-type="time">
            <text:p>12:03:12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3S" calcext:value-type="time">
            <text:p>12:03:13</text:p>
          </table:table-cell>
          <table:table-cell office:value-type="float" office:value="107" calcext:value-type="float">
            <text:p>10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5S" calcext:value-type="time">
            <text:p>12:03:15</text:p>
          </table:table-cell>
          <table:table-cell office:value-type="float" office:value="113" calcext:value-type="float">
            <text:p>1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6S" calcext:value-type="time">
            <text:p>12:03:16</text:p>
          </table:table-cell>
          <table:table-cell office:value-type="float" office:value="45" calcext:value-type="float">
            <text:p>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8S" calcext:value-type="time">
            <text:p>12:03:18</text:p>
          </table:table-cell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9S" calcext:value-type="time">
            <text:p>12:03:19</text:p>
          </table:table-cell>
          <table:table-cell office:value-type="float" office:value="75" calcext:value-type="float">
            <text:p>7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0S" calcext:value-type="time">
            <text:p>12:03:20</text:p>
          </table:table-cell>
          <table:table-cell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2S" calcext:value-type="time">
            <text:p>12:03:22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3S" calcext:value-type="time">
            <text:p>12:03:23</text:p>
          </table:table-cell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5S" calcext:value-type="time">
            <text:p>12:03:25</text:p>
          </table:table-cell>
          <table:table-cell office:value-type="float" office:value="81" calcext:value-type="float">
            <text:p>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6S" calcext:value-type="time">
            <text:p>12:03:26</text:p>
          </table:table-cell>
          <table:table-cell office:value-type="float" office:value="54" calcext:value-type="float">
            <text:p>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8S" calcext:value-type="time">
            <text:p>12:03:28</text:p>
          </table:table-cell>
          <table:table-cell office:value-type="float" office:value="86" calcext:value-type="float">
            <text:p>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9S" calcext:value-type="time">
            <text:p>12:03:29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1S" calcext:value-type="time">
            <text:p>12:03:31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2S" calcext:value-type="time">
            <text:p>12:03:32</text:p>
          </table:table-cell>
          <table:table-cell office:value-type="float" office:value="91" calcext:value-type="float">
            <text:p>9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3S" calcext:value-type="time">
            <text:p>12:03:33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5S" calcext:value-type="time">
            <text:p>12:03:35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6S" calcext:value-type="time">
            <text:p>12:03:36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8S" calcext:value-type="time">
            <text:p>12:03:38</text:p>
          </table:table-cell>
          <table:table-cell office:value-type="float" office:value="119" calcext:value-type="float">
            <text:p>11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9S" calcext:value-type="time">
            <text:p>12:03:39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1S" calcext:value-type="time">
            <text:p>12:03:41</text:p>
          </table:table-cell>
          <table:table-cell office:value-type="float" office:value="88" calcext:value-type="float">
            <text:p>8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2S" calcext:value-type="time">
            <text:p>12:03:42</text:p>
          </table:table-cell>
          <table:table-cell office:value-type="float" office:value="79" calcext:value-type="float">
            <text:p>7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4S" calcext:value-type="time">
            <text:p>12:03:44</text:p>
          </table:table-cell>
          <table:table-cell office:value-type="float" office:value="88" calcext:value-type="float">
            <text:p>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5S" calcext:value-type="time">
            <text:p>12:03:45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7S" calcext:value-type="time">
            <text:p>12:03:47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8S" calcext:value-type="time">
            <text:p>12:03:48</text:p>
          </table:table-cell>
          <table:table-cell office:value-type="float" office:value="99" calcext:value-type="float">
            <text:p>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0S" calcext:value-type="time">
            <text:p>12:03:50</text:p>
          </table:table-cell>
          <table:table-cell office:value-type="float" office:value="83" calcext:value-type="float">
            <text:p>8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1S" calcext:value-type="time">
            <text:p>12:03:51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2S" calcext:value-type="time">
            <text:p>12:03:52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4S" calcext:value-type="time">
            <text:p>12:03:54</text:p>
          </table:table-cell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5S" calcext:value-type="time">
            <text:p>12:03:55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7S" calcext:value-type="time">
            <text:p>12:03:57</text:p>
          </table:table-cell>
          <table:table-cell office:value-type="float" office:value="121" calcext:value-type="float">
            <text:p>12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8S" calcext:value-type="time">
            <text:p>12:03:58</text:p>
          </table:table-cell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0S" calcext:value-type="time">
            <text:p>12:04:00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1S" calcext:value-type="time">
            <text:p>12:04:01</text:p>
          </table:table-cell>
          <table:table-cell office:value-type="float" office:value="144" calcext:value-type="float">
            <text:p>14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3S" calcext:value-type="time">
            <text:p>12:04:03</text:p>
          </table:table-cell>
          <table:table-cell office:value-type="float" office:value="107" calcext:value-type="float">
            <text:p>1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4S" calcext:value-type="time">
            <text:p>12:04:04</text:p>
          </table:table-cell>
          <table:table-cell office:value-type="float" office:value="76" calcext:value-type="float">
            <text:p>7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6S" calcext:value-type="time">
            <text:p>12:04:06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7S" calcext:value-type="time">
            <text:p>12:04:07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9S" calcext:value-type="time">
            <text:p>12:04:09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0S" calcext:value-type="time">
            <text:p>12:04:10</text:p>
          </table:table-cell>
          <table:table-cell office:value-type="float" office:value="82" calcext:value-type="float">
            <text:p>8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2S" calcext:value-type="time">
            <text:p>12:04:12</text:p>
          </table:table-cell>
          <table:table-cell office:value-type="float" office:value="118" calcext:value-type="float">
            <text:p>11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3S" calcext:value-type="time">
            <text:p>12:04:1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5S" calcext:value-type="time">
            <text:p>12:04:15</text:p>
          </table:table-cell>
          <table:table-cell office:value-type="float" office:value="121" calcext:value-type="float">
            <text:p>1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6S" calcext:value-type="time">
            <text:p>12:04:16</text:p>
          </table:table-cell>
          <table:table-cell office:value-type="float" office:value="159" calcext:value-type="float">
            <text:p>15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7S" calcext:value-type="time">
            <text:p>12:04:17</text:p>
          </table:table-cell>
          <table:table-cell office:value-type="float" office:value="109" calcext:value-type="float">
            <text:p>10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9S" calcext:value-type="time">
            <text:p>12:04:19</text:p>
          </table:table-cell>
          <table:table-cell office:value-type="float" office:value="118" calcext:value-type="float">
            <text:p>11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0S" calcext:value-type="time">
            <text:p>12:04:20</text:p>
          </table:table-cell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2S" calcext:value-type="time">
            <text:p>12:04:22</text:p>
          </table:table-cell>
          <table:table-cell office:value-type="float" office:value="120" calcext:value-type="float">
            <text:p>12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3S" calcext:value-type="time">
            <text:p>12:04:23</text:p>
          </table:table-cell>
          <table:table-cell office:value-type="float" office:value="133" calcext:value-type="float">
            <text:p>13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5S" calcext:value-type="time">
            <text:p>12:04:25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6S" calcext:value-type="time">
            <text:p>12:04:26</text:p>
          </table:table-cell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8S" calcext:value-type="time">
            <text:p>12:04:28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9S" calcext:value-type="time">
            <text:p>12:04:29</text:p>
          </table:table-cell>
          <table:table-cell office:value-type="float" office:value="83" calcext:value-type="float">
            <text:p>8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1S" calcext:value-type="time">
            <text:p>12:04:31</text:p>
          </table:table-cell>
          <table:table-cell office:value-type="float" office:value="61" calcext:value-type="float">
            <text:p>6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2S" calcext:value-type="time">
            <text:p>12:04:32</text:p>
          </table:table-cell>
          <table:table-cell office:value-type="float" office:value="108" calcext:value-type="float">
            <text:p>10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4S" calcext:value-type="time">
            <text:p>12:04:34</text:p>
          </table:table-cell>
          <table:table-cell office:value-type="float" office:value="88" calcext:value-type="float">
            <text:p>8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5S" calcext:value-type="time">
            <text:p>12:04:35</text:p>
          </table:table-cell>
          <table:table-cell office:value-type="float" office:value="83" calcext:value-type="float">
            <text:p>8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7S" calcext:value-type="time">
            <text:p>12:04:37</text:p>
          </table:table-cell>
          <table:table-cell office:value-type="float" office:value="81" calcext:value-type="float">
            <text:p>8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8S" calcext:value-type="time">
            <text:p>12:04:38</text:p>
          </table:table-cell>
          <table:table-cell office:value-type="float" office:value="49" calcext:value-type="float">
            <text:p>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0S" calcext:value-type="time">
            <text:p>12:04:40</text:p>
          </table:table-cell>
          <table:table-cell office:value-type="float" office:value="110" calcext:value-type="float">
            <text:p>1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1S" calcext:value-type="time">
            <text:p>12:04:41</text:p>
          </table:table-cell>
          <table:table-cell office:value-type="float" office:value="94" calcext:value-type="float">
            <text:p>9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3S" calcext:value-type="time">
            <text:p>12:04:43</text:p>
          </table:table-cell>
          <table:table-cell office:value-type="float" office:value="92" calcext:value-type="float">
            <text:p>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4S" calcext:value-type="time">
            <text:p>12:04:44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6S" calcext:value-type="time">
            <text:p>12:04:46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7S" calcext:value-type="time">
            <text:p>12:04:47</text:p>
          </table:table-cell>
          <table:table-cell office:value-type="float" office:value="96" calcext:value-type="float">
            <text:p>9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9S" calcext:value-type="time">
            <text:p>12:04:49</text:p>
          </table:table-cell>
          <table:table-cell office:value-type="float" office:value="63" calcext:value-type="float">
            <text:p>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0S" calcext:value-type="time">
            <text:p>12:04:50</text:p>
          </table:table-cell>
          <table:table-cell office:value-type="float" office:value="102" calcext:value-type="float">
            <text:p>1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2S" calcext:value-type="time">
            <text:p>12:04:52</text:p>
          </table:table-cell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3S" calcext:value-type="time">
            <text:p>12:04:53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5S" calcext:value-type="time">
            <text:p>12:04:55</text:p>
          </table:table-cell>
          <table:table-cell office:value-type="float" office:value="64" calcext:value-type="float">
            <text:p>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6S" calcext:value-type="time">
            <text:p>12:04:56</text:p>
          </table:table-cell>
          <table:table-cell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8S" calcext:value-type="time">
            <text:p>12:04:58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9S" calcext:value-type="time">
            <text:p>12:04:59</text:p>
          </table:table-cell>
          <table:table-cell office:value-type="float" office:value="98" calcext:value-type="float">
            <text:p>9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1S" calcext:value-type="time">
            <text:p>12:05:01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2S" calcext:value-type="time">
            <text:p>12:05:02</text:p>
          </table:table-cell>
          <table:table-cell office:value-type="float" office:value="131" calcext:value-type="float">
            <text:p>13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4S" calcext:value-type="time">
            <text:p>12:05:04</text:p>
          </table:table-cell>
          <table:table-cell office:value-type="float" office:value="52" calcext:value-type="float">
            <text:p>5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5S" calcext:value-type="time">
            <text:p>12:05:05</text:p>
          </table:table-cell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7S" calcext:value-type="time">
            <text:p>12:05:07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8S" calcext:value-type="time">
            <text:p>12:05:08</text:p>
          </table:table-cell>
          <table:table-cell office:value-type="float" office:value="76" calcext:value-type="float">
            <text:p>7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0S" calcext:value-type="time">
            <text:p>12:05:10</text:p>
          </table:table-cell>
          <table:table-cell office:value-type="float" office:value="84" calcext:value-type="float">
            <text:p>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1S" calcext:value-type="time">
            <text:p>12:05:11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3S" calcext:value-type="time">
            <text:p>12:05:13</text:p>
          </table:table-cell>
          <table:table-cell office:value-type="float" office:value="61" calcext:value-type="float">
            <text:p>6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4S" calcext:value-type="time">
            <text:p>12:05:14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6S" calcext:value-type="time">
            <text:p>12:05:16</text:p>
          </table:table-cell>
          <table:table-cell office:value-type="float" office:value="67" calcext:value-type="float">
            <text:p>6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7S" calcext:value-type="time">
            <text:p>12:05:17</text:p>
          </table:table-cell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9S" calcext:value-type="time">
            <text:p>12:05:19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0S" calcext:value-type="time">
            <text:p>12:05:20</text:p>
          </table:table-cell>
          <table:table-cell office:value-type="float" office:value="82" calcext:value-type="float">
            <text:p>8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2S" calcext:value-type="time">
            <text:p>12:05:22</text:p>
          </table:table-cell>
          <table:table-cell office:value-type="float" office:value="88" calcext:value-type="float">
            <text:p>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3S" calcext:value-type="time">
            <text:p>12:05:23</text:p>
          </table:table-cell>
          <table:table-cell office:value-type="float" office:value="103" calcext:value-type="float">
            <text:p>10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5S" calcext:value-type="time">
            <text:p>12:05:25</text:p>
          </table:table-cell>
          <table:table-cell office:value-type="float" office:value="92" calcext:value-type="float">
            <text:p>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6S" calcext:value-type="time">
            <text:p>12:05:26</text:p>
          </table:table-cell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8S" calcext:value-type="time">
            <text:p>12:05:28</text:p>
          </table:table-cell>
          <table:table-cell office:value-type="float" office:value="129" calcext:value-type="float">
            <text:p>1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9S" calcext:value-type="time">
            <text:p>12:05:29</text:p>
          </table:table-cell>
          <table:table-cell office:value-type="float" office:value="156" calcext:value-type="float">
            <text:p>15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1S" calcext:value-type="time">
            <text:p>12:05:31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2S" calcext:value-type="time">
            <text:p>12:05:32</text:p>
          </table:table-cell>
          <table:table-cell office:value-type="float" office:value="54" calcext:value-type="float">
            <text:p>5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4S" calcext:value-type="time">
            <text:p>12:05:34</text:p>
          </table:table-cell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5S" calcext:value-type="time">
            <text:p>12:05:35</text:p>
          </table:table-cell>
          <table:table-cell office:value-type="float" office:value="129" calcext:value-type="float">
            <text:p>12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7S" calcext:value-type="time">
            <text:p>12:05:37</text:p>
          </table:table-cell>
          <table:table-cell office:value-type="float" office:value="83" calcext:value-type="float">
            <text:p>8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8S" calcext:value-type="time">
            <text:p>12:05:38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0S" calcext:value-type="time">
            <text:p>12:05:40</text:p>
          </table:table-cell>
          <table:table-cell office:value-type="float" office:value="182" calcext:value-type="float">
            <text:p>1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1S" calcext:value-type="time">
            <text:p>12:05:41</text:p>
          </table:table-cell>
          <table:table-cell office:value-type="float" office:value="41" calcext:value-type="float">
            <text:p>4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3S" calcext:value-type="time">
            <text:p>12:05:43</text:p>
          </table:table-cell>
          <table:table-cell office:value-type="float" office:value="86" calcext:value-type="float">
            <text:p>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4S" calcext:value-type="time">
            <text:p>12:05:44</text:p>
          </table:table-cell>
          <table:table-cell office:value-type="float" office:value="123" calcext:value-type="float">
            <text:p>1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6S" calcext:value-type="time">
            <text:p>12:05:46</text:p>
          </table:table-cell>
          <table:table-cell office:value-type="float" office:value="104" calcext:value-type="float">
            <text:p>1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8S" calcext:value-type="time">
            <text:p>12:05:48</text:p>
          </table:table-cell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9S" calcext:value-type="time">
            <text:p>12:05:49</text:p>
          </table:table-cell>
          <table:table-cell office:value-type="float" office:value="85" calcext:value-type="float">
            <text:p>8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1S" calcext:value-type="time">
            <text:p>12:05:51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2S" calcext:value-type="time">
            <text:p>12:05:5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4S" calcext:value-type="time">
            <text:p>12:05:54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5S" calcext:value-type="time">
            <text:p>12:05:55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7S" calcext:value-type="time">
            <text:p>12:05:57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8S" calcext:value-type="time">
            <text:p>12:05:58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113" calcext:value-type="float">
            <text:p>11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1S" calcext:value-type="time">
            <text:p>12:06:01</text:p>
          </table:table-cell>
          <table:table-cell office:value-type="float" office:value="138" calcext:value-type="float">
            <text:p>13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3S" calcext:value-type="time">
            <text:p>12:06:03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4S" calcext:value-type="time">
            <text:p>12:06:04</text:p>
          </table:table-cell>
          <table:table-cell office:value-type="float" office:value="105" calcext:value-type="float">
            <text:p>10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6S" calcext:value-type="time">
            <text:p>12:06:06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7S" calcext:value-type="time">
            <text:p>12:06:07</text:p>
          </table:table-cell>
          <table:table-cell office:value-type="float" office:value="117" calcext:value-type="float">
            <text:p>1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9S" calcext:value-type="time">
            <text:p>12:06:09</text:p>
          </table:table-cell>
          <table:table-cell office:value-type="float" office:value="77" calcext:value-type="float">
            <text:p>7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0S" calcext:value-type="time">
            <text:p>12:06:10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2S" calcext:value-type="time">
            <text:p>12:06:12</text:p>
          </table:table-cell>
          <table:table-cell office:value-type="float" office:value="67" calcext:value-type="float">
            <text:p>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4S" calcext:value-type="time">
            <text:p>12:06:14</text:p>
          </table:table-cell>
          <table:table-cell office:value-type="float" office:value="70" calcext:value-type="float">
            <text:p>7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5S" calcext:value-type="time">
            <text:p>12:06:15</text:p>
          </table:table-cell>
          <table:table-cell office:value-type="float" office:value="90" calcext:value-type="float">
            <text:p>9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7S" calcext:value-type="time">
            <text:p>12:06:17</text:p>
          </table:table-cell>
          <table:table-cell office:value-type="float" office:value="134" calcext:value-type="float">
            <text:p>1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8S" calcext:value-type="time">
            <text:p>12:06:18</text:p>
          </table:table-cell>
          <table:table-cell office:value-type="float" office:value="95" calcext:value-type="float">
            <text:p>9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0S" calcext:value-type="time">
            <text:p>12:06:20</text:p>
          </table:table-cell>
          <table:table-cell office:value-type="float" office:value="125" calcext:value-type="float">
            <text:p>1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1S" calcext:value-type="time">
            <text:p>12:06:21</text:p>
          </table:table-cell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3S" calcext:value-type="time">
            <text:p>12:06:23</text:p>
          </table:table-cell>
          <table:table-cell office:value-type="float" office:value="42" calcext:value-type="float">
            <text:p>4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4S" calcext:value-type="time">
            <text:p>12:06:24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6S" calcext:value-type="time">
            <text:p>12:06:2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7S" calcext:value-type="time">
            <text:p>12:06:27</text:p>
          </table:table-cell>
          <table:table-cell office:value-type="float" office:value="120" calcext:value-type="float">
            <text:p>12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9S" calcext:value-type="time">
            <text:p>12:06:29</text:p>
          </table:table-cell>
          <table:table-cell office:value-type="float" office:value="79" calcext:value-type="float">
            <text:p>7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1S" calcext:value-type="time">
            <text:p>12:06:31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2S" calcext:value-type="time">
            <text:p>12:06:32</text:p>
          </table:table-cell>
          <table:table-cell office:value-type="float" office:value="137" calcext:value-type="float">
            <text:p>13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4S" calcext:value-type="time">
            <text:p>12:06:34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5S" calcext:value-type="time">
            <text:p>12:06:35</text:p>
          </table:table-cell>
          <table:table-cell office:value-type="float" office:value="149" calcext:value-type="float">
            <text:p>14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7S" calcext:value-type="time">
            <text:p>12:06:37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8S" calcext:value-type="time">
            <text:p>12:06:38</text:p>
          </table:table-cell>
          <table:table-cell office:value-type="float" office:value="68" calcext:value-type="float">
            <text:p>6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0S" calcext:value-type="time">
            <text:p>12:06:40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1S" calcext:value-type="time">
            <text:p>12:06:41</text:p>
          </table:table-cell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3S" calcext:value-type="time">
            <text:p>12:06:43</text:p>
          </table:table-cell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4S" calcext:value-type="time">
            <text:p>12:06:44</text:p>
          </table:table-cell>
          <table:table-cell office:value-type="float" office:value="74" calcext:value-type="float">
            <text:p>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6S" calcext:value-type="time">
            <text:p>12:06:46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8S" calcext:value-type="time">
            <text:p>12:06:48</text:p>
          </table:table-cell>
          <table:table-cell office:value-type="float" office:value="92" calcext:value-type="float">
            <text:p>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9S" calcext:value-type="time">
            <text:p>12:06:49</text:p>
          </table:table-cell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1S" calcext:value-type="time">
            <text:p>12:06:51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2S" calcext:value-type="time">
            <text:p>12:06:52</text:p>
          </table:table-cell>
          <table:table-cell office:value-type="float" office:value="104" calcext:value-type="float">
            <text:p>1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4S" calcext:value-type="time">
            <text:p>12:06:54</text:p>
          </table:table-cell>
          <table:table-cell office:value-type="float" office:value="105" calcext:value-type="float">
            <text:p>1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5S" calcext:value-type="time">
            <text:p>12:06:55</text:p>
          </table:table-cell>
          <table:table-cell office:value-type="float" office:value="95" calcext:value-type="float">
            <text:p>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7S" calcext:value-type="time">
            <text:p>12:06:57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8S" calcext:value-type="time">
            <text:p>12:06:58</text:p>
          </table:table-cell>
          <table:table-cell office:value-type="float" office:value="76" calcext:value-type="float">
            <text:p>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0S" calcext:value-type="time">
            <text:p>12:07:00</text:p>
          </table:table-cell>
          <table:table-cell office:value-type="float" office:value="99" calcext:value-type="float">
            <text:p>9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2S" calcext:value-type="time">
            <text:p>12:07:02</text:p>
          </table:table-cell>
          <table:table-cell office:value-type="float" office:value="118" calcext:value-type="float">
            <text:p>1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3S" calcext:value-type="time">
            <text:p>12:07:03</text:p>
          </table:table-cell>
          <table:table-cell office:value-type="float" office:value="295" calcext:value-type="float">
            <text:p>2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5S" calcext:value-type="time">
            <text:p>12:07:05</text:p>
          </table:table-cell>
          <table:table-cell office:value-type="float" office:value="111" calcext:value-type="float">
            <text:p>11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6S" calcext:value-type="time">
            <text:p>12:07:06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8S" calcext:value-type="time">
            <text:p>12:07:08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9S" calcext:value-type="time">
            <text:p>12:07:09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1S" calcext:value-type="time">
            <text:p>12:07:11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3S" calcext:value-type="time">
            <text:p>12:07:1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4S" calcext:value-type="time">
            <text:p>12:07:14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6S" calcext:value-type="time">
            <text:p>12:07:1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7S" calcext:value-type="time">
            <text:p>12:07:17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9S" calcext:value-type="time">
            <text:p>12:07:19</text:p>
          </table:table-cell>
          <table:table-cell office:value-type="float" office:value="45" calcext:value-type="float">
            <text:p>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0S" calcext:value-type="time">
            <text:p>12:07:20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2S" calcext:value-type="time">
            <text:p>12:07:22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4S" calcext:value-type="time">
            <text:p>12:07:24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5S" calcext:value-type="time">
            <text:p>12:07:25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7S" calcext:value-type="time">
            <text:p>12:07:2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8S" calcext:value-type="time">
            <text:p>12:07:28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0S" calcext:value-type="time">
            <text:p>12:07:30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1S" calcext:value-type="time">
            <text:p>12:07:31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3S" calcext:value-type="time">
            <text:p>12:07:33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5S" calcext:value-type="time">
            <text:p>12:07:3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6S" calcext:value-type="time">
            <text:p>12:07:3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8S" calcext:value-type="time">
            <text:p>12:07:3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9S" calcext:value-type="time">
            <text:p>12:07:39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1S" calcext:value-type="time">
            <text:p>12:07:41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2S" calcext:value-type="time">
            <text:p>12:07:42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4S" calcext:value-type="time">
            <text:p>12:07:4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6S" calcext:value-type="time">
            <text:p>12:07:46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7S" calcext:value-type="time">
            <text:p>12:07:4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9S" calcext:value-type="time">
            <text:p>12:07:49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0S" calcext:value-type="time">
            <text:p>12:07: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2S" calcext:value-type="time">
            <text:p>12:07:5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4S" calcext:value-type="time">
            <text:p>12:07:54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5S" calcext:value-type="time">
            <text:p>12:07: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7S" calcext:value-type="time">
            <text:p>12:07:5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8S" calcext:value-type="time">
            <text:p>12:07:58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0S" calcext:value-type="time">
            <text:p>12:08:0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2S" calcext:value-type="time">
            <text:p>12:08:02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3S" calcext:value-type="time">
            <text:p>12:08:03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5S" calcext:value-type="time">
            <text:p>12:08:0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6S" calcext:value-type="time">
            <text:p>12:08:06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8S" calcext:value-type="time">
            <text:p>12:08:08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0S" calcext:value-type="time">
            <text:p>12:08:10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1S" calcext:value-type="time">
            <text:p>12:08:1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3S" calcext:value-type="time">
            <text:p>12:08:13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4S" calcext:value-type="time">
            <text:p>12:08:14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6S" calcext:value-type="time">
            <text:p>12:08:16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7S" calcext:value-type="time">
            <text:p>12:08:17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9S" calcext:value-type="time">
            <text:p>12:08:19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1S" calcext:value-type="time">
            <text:p>12:08:2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2S" calcext:value-type="time">
            <text:p>12:08:22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4S" calcext:value-type="time">
            <text:p>12:08:24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5S" calcext:value-type="time">
            <text:p>12:08:25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7S" calcext:value-type="time">
            <text:p>12:08:27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9S" calcext:value-type="time">
            <text:p>12:08:29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0S" calcext:value-type="time">
            <text:p>12:08:3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2S" calcext:value-type="time">
            <text:p>12:08:32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4S" calcext:value-type="time">
            <text:p>12:08:34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5S" calcext:value-type="time">
            <text:p>12:08:35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7S" calcext:value-type="time">
            <text:p>12:08:37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8S" calcext:value-type="time">
            <text:p>12:08:38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0S" calcext:value-type="time">
            <text:p>12:08:40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2S" calcext:value-type="time">
            <text:p>12:08:42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3S" calcext:value-type="time">
            <text:p>12:08:43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5S" calcext:value-type="time">
            <text:p>12:08:45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6S" calcext:value-type="time">
            <text:p>12:08:46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8S" calcext:value-type="time">
            <text:p>12:08:48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0S" calcext:value-type="time">
            <text:p>12:08:50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1S" calcext:value-type="time">
            <text:p>12:08:51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3S" calcext:value-type="time">
            <text:p>12:08:53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4S" calcext:value-type="time">
            <text:p>12:08:5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6S" calcext:value-type="time">
            <text:p>12:08:56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8S" calcext:value-type="time">
            <text:p>12:08:58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9S" calcext:value-type="time">
            <text:p>12:08:59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1S" calcext:value-type="time">
            <text:p>12:09:01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3S" calcext:value-type="time">
            <text:p>12:09:03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4S" calcext:value-type="time">
            <text:p>12:09:0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6S" calcext:value-type="time">
            <text:p>12:09:06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7S" calcext:value-type="time">
            <text:p>12:09:07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9S" calcext:value-type="time">
            <text:p>12:09:09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1S" calcext:value-type="time">
            <text:p>12:09: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2S" calcext:value-type="time">
            <text:p>12:09:1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4S" calcext:value-type="time">
            <text:p>12:09:14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6S" calcext:value-type="time">
            <text:p>12:09: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7S" calcext:value-type="time">
            <text:p>12:09:17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9S" calcext:value-type="time">
            <text:p>12:09:1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0S" calcext:value-type="time">
            <text:p>12:09:20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2S" calcext:value-type="time">
            <text:p>12:09:22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4S" calcext:value-type="time">
            <text:p>12:09:24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5S" calcext:value-type="time">
            <text:p>12:09:25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7S" calcext:value-type="time">
            <text:p>12:09:2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9S" calcext:value-type="time">
            <text:p>12:09:2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0S" calcext:value-type="time">
            <text:p>12:09:3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2S" calcext:value-type="time">
            <text:p>12:09:32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4S" calcext:value-type="time">
            <text:p>12:09:34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5S" calcext:value-type="time">
            <text:p>12:09:35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7S" calcext:value-type="time">
            <text:p>12:09:37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8S" calcext:value-type="time">
            <text:p>12:09:38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0S" calcext:value-type="time">
            <text:p>12:09:4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2S" calcext:value-type="time">
            <text:p>12:09:42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3S" calcext:value-type="time">
            <text:p>12:09:43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5S" calcext:value-type="time">
            <text:p>12:09:45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7S" calcext:value-type="time">
            <text:p>12:09:47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8S" calcext:value-type="time">
            <text:p>12:09:48</text:p>
          </table:table-cell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0S" calcext:value-type="time">
            <text:p>12:09:50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2S" calcext:value-type="time">
            <text:p>12:09:52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3S" calcext:value-type="time">
            <text:p>12:09:53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5S" calcext:value-type="time">
            <text:p>12:09:55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6S" calcext:value-type="time">
            <text:p>12:09:56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8S" calcext:value-type="time">
            <text:p>12:09:58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1S" calcext:value-type="time">
            <text:p>12:10:01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3S" calcext:value-type="time">
            <text:p>12:10:03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5S" calcext:value-type="time">
            <text:p>12:10:05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6S" calcext:value-type="time">
            <text:p>12:10:06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8S" calcext:value-type="time">
            <text:p>12:10:08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0S" calcext:value-type="time">
            <text:p>12:10:10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1S" calcext:value-type="time">
            <text:p>12:10:11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3S" calcext:value-type="time">
            <text:p>12:10:13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5S" calcext:value-type="time">
            <text:p>12:10:15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6S" calcext:value-type="time">
            <text:p>12:10:16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8S" calcext:value-type="time">
            <text:p>12:10:18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0S" calcext:value-type="time">
            <text:p>12:10:20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1S" calcext:value-type="time">
            <text:p>12:10:21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3S" calcext:value-type="time">
            <text:p>12:10:23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5S" calcext:value-type="time">
            <text:p>12:10:25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6S" calcext:value-type="time">
            <text:p>12:10:26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8S" calcext:value-type="time">
            <text:p>12:10:28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0S" calcext:value-type="time">
            <text:p>12:10:30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1S" calcext:value-type="time">
            <text:p>12:10:31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3S" calcext:value-type="time">
            <text:p>12:10:33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5S" calcext:value-type="time">
            <text:p>12:10:35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6S" calcext:value-type="time">
            <text:p>12:10:36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8S" calcext:value-type="time">
            <text:p>12:10:38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0S" calcext:value-type="time">
            <text:p>12:10:40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1S" calcext:value-type="time">
            <text:p>12:10:41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3S" calcext:value-type="time">
            <text:p>12:10:4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5S" calcext:value-type="time">
            <text:p>12:10:45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6S" calcext:value-type="time">
            <text:p>12:10:46</text:p>
          </table:table-cell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8S" calcext:value-type="time">
            <text:p>12:10:48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0S" calcext:value-type="time">
            <text:p>12:10:50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1S" calcext:value-type="time">
            <text:p>12:10:51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3S" calcext:value-type="time">
            <text:p>12:10:53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5S" calcext:value-type="time">
            <text:p>12:10:55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6S" calcext:value-type="time">
            <text:p>12:10:56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8S" calcext:value-type="time">
            <text:p>12:10:58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0S" calcext:value-type="time">
            <text:p>12:11:00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1S" calcext:value-type="time">
            <text:p>12:11:01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3S" calcext:value-type="time">
            <text:p>12:11:03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5S" calcext:value-type="time">
            <text:p>12:11:05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6S" calcext:value-type="time">
            <text:p>12:11:06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8S" calcext:value-type="time">
            <text:p>12:11:0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0S" calcext:value-type="time">
            <text:p>12:11:10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1S" calcext:value-type="time">
            <text:p>12:11:11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3S" calcext:value-type="time">
            <text:p>12:11: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5S" calcext:value-type="time">
            <text:p>12:11:15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6S" calcext:value-type="time">
            <text:p>12:11:16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8S" calcext:value-type="time">
            <text:p>12:11:18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0S" calcext:value-type="time">
            <text:p>12:11: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1S" calcext:value-type="time">
            <text:p>12:11:21</text:p>
          </table:table-cell>
          <table:table-cell office:value-type="float" office:value="197" calcext:value-type="float">
            <text:p>19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3S" calcext:value-type="time">
            <text:p>12:11:23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5S" calcext:value-type="time">
            <text:p>12:11:25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7S" calcext:value-type="time">
            <text:p>12:11:27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8S" calcext:value-type="time">
            <text:p>12:11:2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0S" calcext:value-type="time">
            <text:p>12:11:30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2S" calcext:value-type="time">
            <text:p>12:11:32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3S" calcext:value-type="time">
            <text:p>12:11:3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5S" calcext:value-type="time">
            <text:p>12:11:35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7S" calcext:value-type="time">
            <text:p>12:11:37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9S" calcext:value-type="time">
            <text:p>12:11:39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0S" calcext:value-type="time">
            <text:p>12:11:4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2S" calcext:value-type="time">
            <text:p>12:11:42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4S" calcext:value-type="time">
            <text:p>12:11:44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5S" calcext:value-type="time">
            <text:p>12:11:45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7S" calcext:value-type="time">
            <text:p>12:11:4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9S" calcext:value-type="time">
            <text:p>12:11:49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0S" calcext:value-type="time">
            <text:p>12:11:5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2S" calcext:value-type="time">
            <text:p>12:11:5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4S" calcext:value-type="time">
            <text:p>12:11:5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6S" calcext:value-type="time">
            <text:p>12:11:56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7S" calcext:value-type="time">
            <text:p>12:11:5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9S" calcext:value-type="time">
            <text:p>12:11:59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1S" calcext:value-type="time">
            <text:p>12:12:0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2S" calcext:value-type="time">
            <text:p>12:12:02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4S" calcext:value-type="time">
            <text:p>12:12:04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6S" calcext:value-type="time">
            <text:p>12:12:06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7S" calcext:value-type="time">
            <text:p>12:12:07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9S" calcext:value-type="time">
            <text:p>12:12:0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1S" calcext:value-type="time">
            <text:p>12:12:11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3S" calcext:value-type="time">
            <text:p>12:12:1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4S" calcext:value-type="time">
            <text:p>12:12:14</text:p>
          </table:table-cell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6S" calcext:value-type="time">
            <text:p>12:12:16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8S" calcext:value-type="time">
            <text:p>12:12:1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9S" calcext:value-type="time">
            <text:p>12:12:19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1S" calcext:value-type="time">
            <text:p>12:12:21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3S" calcext:value-type="time">
            <text:p>12:12:23</text:p>
          </table:table-cell>
          <table:table-cell office:value-type="float" office:value="202" calcext:value-type="float">
            <text:p>2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5S" calcext:value-type="time">
            <text:p>12:12:25</text:p>
          </table:table-cell>
          <table:table-cell office:value-type="float" office:value="501" calcext:value-type="float">
            <text:p>5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6S" calcext:value-type="time">
            <text:p>12:12:26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8S" calcext:value-type="time">
            <text:p>12:12:28</text:p>
          </table:table-cell>
          <table:table-cell office:value-type="float" office:value="397" calcext:value-type="float">
            <text:p>39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0S" calcext:value-type="time">
            <text:p>12:12:30</text:p>
          </table:table-cell>
          <table:table-cell office:value-type="float" office:value="448" calcext:value-type="float">
            <text:p>44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1S" calcext:value-type="time">
            <text:p>12:12:31</text:p>
          </table:table-cell>
          <table:table-cell office:value-type="float" office:value="582" calcext:value-type="float">
            <text:p>58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3S" calcext:value-type="time">
            <text:p>12:12:33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5S" calcext:value-type="time">
            <text:p>12:12:35</text:p>
          </table:table-cell>
          <table:table-cell office:value-type="float" office:value="751" calcext:value-type="float">
            <text:p>7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7S" calcext:value-type="time">
            <text:p>12:12:37</text:p>
          </table:table-cell>
          <table:table-cell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8S" calcext:value-type="time">
            <text:p>12:12:38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0S" calcext:value-type="time">
            <text:p>12:12:40</text:p>
          </table:table-cell>
          <table:table-cell office:value-type="float" office:value="379" calcext:value-type="float">
            <text:p>37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2S" calcext:value-type="time">
            <text:p>12:12:42</text:p>
          </table:table-cell>
          <table:table-cell office:value-type="float" office:value="135" calcext:value-type="float">
            <text:p>13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4S" calcext:value-type="time">
            <text:p>12:12:44</text:p>
          </table:table-cell>
          <table:table-cell office:value-type="float" office:value="489" calcext:value-type="float">
            <text:p>48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5S" calcext:value-type="time">
            <text:p>12:12:45</text:p>
          </table:table-cell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7S" calcext:value-type="time">
            <text:p>12:12:47</text:p>
          </table:table-cell>
          <table:table-cell office:value-type="float" office:value="475" calcext:value-type="float">
            <text:p>47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9S" calcext:value-type="time">
            <text:p>12:12:49</text:p>
          </table:table-cell>
          <table:table-cell office:value-type="float" office:value="405" calcext:value-type="float">
            <text:p>40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0S" calcext:value-type="time">
            <text:p>12:12:50</text:p>
          </table:table-cell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2S" calcext:value-type="time">
            <text:p>12:12:52</text:p>
          </table:table-cell>
          <table:table-cell office:value-type="float" office:value="243" calcext:value-type="float">
            <text:p>24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4S" calcext:value-type="time">
            <text:p>12:12:54</text:p>
          </table:table-cell>
          <table:table-cell office:value-type="float" office:value="413" calcext:value-type="float">
            <text:p>41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6S" calcext:value-type="time">
            <text:p>12:12:56</text:p>
          </table:table-cell>
          <table:table-cell office:value-type="float" office:value="631" calcext:value-type="float">
            <text:p>6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7S" calcext:value-type="time">
            <text:p>12:12:57</text:p>
          </table:table-cell>
          <table:table-cell office:value-type="float" office:value="429" calcext:value-type="float">
            <text:p>42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9S" calcext:value-type="time">
            <text:p>12:12:59</text:p>
          </table:table-cell>
          <table:table-cell office:value-type="float" office:value="418" calcext:value-type="float">
            <text:p>41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1S" calcext:value-type="time">
            <text:p>12:13:01</text:p>
          </table:table-cell>
          <table:table-cell office:value-type="float" office:value="622" calcext:value-type="float">
            <text:p>62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3S" calcext:value-type="time">
            <text:p>12:13:03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4S" calcext:value-type="time">
            <text:p>12:13:04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6S" calcext:value-type="time">
            <text:p>12:13:06</text:p>
          </table:table-cell>
          <table:table-cell office:value-type="float" office:value="699" calcext:value-type="float">
            <text:p>69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8S" calcext:value-type="time">
            <text:p>12:13:08</text:p>
          </table:table-cell>
          <table:table-cell office:value-type="float" office:value="515" calcext:value-type="float">
            <text:p>5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9S" calcext:value-type="time">
            <text:p>12:13:09</text:p>
          </table:table-cell>
          <table:table-cell office:value-type="float" office:value="162" calcext:value-type="float">
            <text:p>1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1S" calcext:value-type="time">
            <text:p>12:13:11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3S" calcext:value-type="time">
            <text:p>12:13:13</text:p>
          </table:table-cell>
          <table:table-cell office:value-type="float" office:value="391" calcext:value-type="float">
            <text:p>39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5S" calcext:value-type="time">
            <text:p>12:13:15</text:p>
          </table:table-cell>
          <table:table-cell office:value-type="float" office:value="529" calcext:value-type="float">
            <text:p>52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6S" calcext:value-type="time">
            <text:p>12:13:16</text:p>
          </table:table-cell>
          <table:table-cell office:value-type="float" office:value="498" calcext:value-type="float">
            <text:p>4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8S" calcext:value-type="time">
            <text:p>12:13:18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0S" calcext:value-type="time">
            <text:p>12:13:20</text:p>
          </table:table-cell>
          <table:table-cell office:value-type="float" office:value="663" calcext:value-type="float">
            <text:p>6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2S" calcext:value-type="time">
            <text:p>12:13:22</text:p>
          </table:table-cell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3S" calcext:value-type="time">
            <text:p>12:13:23</text:p>
          </table:table-cell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5S" calcext:value-type="time">
            <text:p>12:13:25</text:p>
          </table:table-cell>
          <table:table-cell office:value-type="float" office:value="640" calcext:value-type="float">
            <text:p>6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7S" calcext:value-type="time">
            <text:p>12:13:27</text:p>
          </table:table-cell>
          <table:table-cell office:value-type="float" office:value="339" calcext:value-type="float">
            <text:p>33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9S" calcext:value-type="time">
            <text:p>12:13:29</text:p>
          </table:table-cell>
          <table:table-cell office:value-type="float" office:value="552" calcext:value-type="float">
            <text:p>55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0S" calcext:value-type="time">
            <text:p>12:13:30</text:p>
          </table:table-cell>
          <table:table-cell office:value-type="float" office:value="208" calcext:value-type="float">
            <text:p>2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2S" calcext:value-type="time">
            <text:p>12:13:32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4S" calcext:value-type="time">
            <text:p>12:13:34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6S" calcext:value-type="time">
            <text:p>12:13:36</text:p>
          </table:table-cell>
          <table:table-cell office:value-type="float" office:value="408" calcext:value-type="float">
            <text:p>40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7S" calcext:value-type="time">
            <text:p>12:13:37</text:p>
          </table:table-cell>
          <table:table-cell office:value-type="float" office:value="722" calcext:value-type="float">
            <text:p>7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9S" calcext:value-type="time">
            <text:p>12:13:39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1S" calcext:value-type="time">
            <text:p>12:13:41</text:p>
          </table:table-cell>
          <table:table-cell office:value-type="float" office:value="404" calcext:value-type="float">
            <text:p>40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3S" calcext:value-type="time">
            <text:p>12:13:43</text:p>
          </table:table-cell>
          <table:table-cell office:value-type="float" office:value="675" calcext:value-type="float">
            <text:p>6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4S" calcext:value-type="time">
            <text:p>12:13:44</text:p>
          </table:table-cell>
          <table:table-cell office:value-type="float" office:value="598" calcext:value-type="float">
            <text:p>59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6S" calcext:value-type="time">
            <text:p>12:13:46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8S" calcext:value-type="time">
            <text:p>12:13:48</text:p>
          </table:table-cell>
          <table:table-cell office:value-type="float" office:value="529" calcext:value-type="float">
            <text:p>52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0S" calcext:value-type="time">
            <text:p>12:13:5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1S" calcext:value-type="time">
            <text:p>12:13:51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3S" calcext:value-type="time">
            <text:p>12:13:53</text:p>
          </table:table-cell>
          <table:table-cell office:value-type="float" office:value="184" calcext:value-type="float">
            <text:p>1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5S" calcext:value-type="time">
            <text:p>12:13:55</text:p>
          </table:table-cell>
          <table:table-cell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7S" calcext:value-type="time">
            <text:p>12:13:57</text:p>
          </table:table-cell>
          <table:table-cell office:value-type="float" office:value="466" calcext:value-type="float">
            <text:p>4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8S" calcext:value-type="time">
            <text:p>12:13:58</text:p>
          </table:table-cell>
          <table:table-cell office:value-type="float" office:value="288" calcext:value-type="float">
            <text:p>28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0S" calcext:value-type="time">
            <text:p>12:14:00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2S" calcext:value-type="time">
            <text:p>12:14:02</text:p>
          </table:table-cell>
          <table:table-cell office:value-type="float" office:value="704" calcext:value-type="float">
            <text:p>7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4S" calcext:value-type="time">
            <text:p>12:14:04</text:p>
          </table:table-cell>
          <table:table-cell office:value-type="float" office:value="472" calcext:value-type="float">
            <text:p>4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5S" calcext:value-type="time">
            <text:p>12:14:05</text:p>
          </table:table-cell>
          <table:table-cell office:value-type="float" office:value="527" calcext:value-type="float">
            <text:p>5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7S" calcext:value-type="time">
            <text:p>12:14:07</text:p>
          </table:table-cell>
          <table:table-cell office:value-type="float" office:value="267" calcext:value-type="float">
            <text:p>26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9S" calcext:value-type="time">
            <text:p>12:14:09</text:p>
          </table:table-cell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1S" calcext:value-type="time">
            <text:p>12:14:11</text:p>
          </table:table-cell>
          <table:table-cell office:value-type="float" office:value="386" calcext:value-type="float">
            <text:p>38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3S" calcext:value-type="time">
            <text:p>12:14:13</text:p>
          </table:table-cell>
          <table:table-cell office:value-type="float" office:value="266" calcext:value-type="float">
            <text:p>2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4S" calcext:value-type="time">
            <text:p>12:14:14</text:p>
          </table:table-cell>
          <table:table-cell office:value-type="float" office:value="507" calcext:value-type="float">
            <text:p>50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6S" calcext:value-type="time">
            <text:p>12:14:16</text:p>
          </table:table-cell>
          <table:table-cell office:value-type="float" office:value="512" calcext:value-type="float">
            <text:p>5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8S" calcext:value-type="time">
            <text:p>12:14:18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0S" calcext:value-type="time">
            <text:p>12:14:20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1S" calcext:value-type="time">
            <text:p>12:14:21</text:p>
          </table:table-cell>
          <table:table-cell office:value-type="float" office:value="377" calcext:value-type="float">
            <text:p>37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3S" calcext:value-type="time">
            <text:p>12:14:23</text:p>
          </table:table-cell>
          <table:table-cell office:value-type="float" office:value="547" calcext:value-type="float">
            <text:p>54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5S" calcext:value-type="time">
            <text:p>12:14:25</text:p>
          </table:table-cell>
          <table:table-cell office:value-type="float" office:value="275" calcext:value-type="float">
            <text:p>2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7S" calcext:value-type="time">
            <text:p>12:14:27</text:p>
          </table:table-cell>
          <table:table-cell office:value-type="float" office:value="421" calcext:value-type="float">
            <text:p>42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9S" calcext:value-type="time">
            <text:p>12:14:29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0S" calcext:value-type="time">
            <text:p>12:14:30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2S" calcext:value-type="time">
            <text:p>12:14:32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4S" calcext:value-type="time">
            <text:p>12:14:34</text:p>
          </table:table-cell>
          <table:table-cell office:value-type="float" office:value="472" calcext:value-type="float">
            <text:p>47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6S" calcext:value-type="time">
            <text:p>12:14:36</text:p>
          </table:table-cell>
          <table:table-cell office:value-type="float" office:value="476" calcext:value-type="float">
            <text:p>4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7S" calcext:value-type="time">
            <text:p>12:14:37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9S" calcext:value-type="time">
            <text:p>12:14:39</text:p>
          </table:table-cell>
          <table:table-cell office:value-type="float" office:value="517" calcext:value-type="float">
            <text:p>5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1S" calcext:value-type="time">
            <text:p>12:14:41</text:p>
          </table:table-cell>
          <table:table-cell office:value-type="float" office:value="598" calcext:value-type="float">
            <text:p>5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3S" calcext:value-type="time">
            <text:p>12:14:43</text:p>
          </table:table-cell>
          <table:table-cell office:value-type="float" office:value="443" calcext:value-type="float">
            <text:p>4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5S" calcext:value-type="time">
            <text:p>12:14:45</text:p>
          </table:table-cell>
          <table:table-cell office:value-type="float" office:value="388" calcext:value-type="float">
            <text:p>3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6S" calcext:value-type="time">
            <text:p>12:14:46</text:p>
          </table:table-cell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8S" calcext:value-type="time">
            <text:p>12:14:48</text:p>
          </table:table-cell>
          <table:table-cell office:value-type="float" office:value="431" calcext:value-type="float">
            <text:p>4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0S" calcext:value-type="time">
            <text:p>12:14:50</text:p>
          </table:table-cell>
          <table:table-cell office:value-type="float" office:value="573" calcext:value-type="float">
            <text:p>5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2S" calcext:value-type="time">
            <text:p>12:14:52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3S" calcext:value-type="time">
            <text:p>12:14:53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5S" calcext:value-type="time">
            <text:p>12:14:55</text:p>
          </table:table-cell>
          <table:table-cell office:value-type="float" office:value="415" calcext:value-type="float">
            <text:p>4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7S" calcext:value-type="time">
            <text:p>12:14:57</text:p>
          </table:table-cell>
          <table:table-cell office:value-type="float" office:value="473" calcext:value-type="float">
            <text:p>47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9S" calcext:value-type="time">
            <text:p>12:14:59</text:p>
          </table:table-cell>
          <table:table-cell office:value-type="float" office:value="440" calcext:value-type="float">
            <text:p>44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1S" calcext:value-type="time">
            <text:p>12:15:01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2S" calcext:value-type="time">
            <text:p>12:15:02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4S" calcext:value-type="time">
            <text:p>12:15:04</text:p>
          </table:table-cell>
          <table:table-cell office:value-type="float" office:value="478" calcext:value-type="float">
            <text:p>47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6S" calcext:value-type="time">
            <text:p>12:15:06</text:p>
          </table:table-cell>
          <table:table-cell office:value-type="float" office:value="635" calcext:value-type="float">
            <text:p>63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8S" calcext:value-type="time">
            <text:p>12:15:08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0S" calcext:value-type="time">
            <text:p>12:15:1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1S" calcext:value-type="time">
            <text:p>12:15:11</text:p>
          </table:table-cell>
          <table:table-cell office:value-type="float" office:value="313" calcext:value-type="float">
            <text:p>3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3S" calcext:value-type="time">
            <text:p>12:15:13</text:p>
          </table:table-cell>
          <table:table-cell office:value-type="float" office:value="551" calcext:value-type="float">
            <text:p>5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5S" calcext:value-type="time">
            <text:p>12:15:15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7S" calcext:value-type="time">
            <text:p>12:15:17</text:p>
          </table:table-cell>
          <table:table-cell office:value-type="float" office:value="607" calcext:value-type="float">
            <text:p>6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9S" calcext:value-type="time">
            <text:p>12:15:19</text:p>
          </table:table-cell>
          <table:table-cell office:value-type="float" office:value="545" calcext:value-type="float">
            <text:p>54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0S" calcext:value-type="time">
            <text:p>12:15:20</text:p>
          </table:table-cell>
          <table:table-cell office:value-type="float" office:value="662" calcext:value-type="float">
            <text:p>6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2S" calcext:value-type="time">
            <text:p>12:15:22</text:p>
          </table:table-cell>
          <table:table-cell office:value-type="float" office:value="586" calcext:value-type="float">
            <text:p>58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4S" calcext:value-type="time">
            <text:p>12:15:24</text:p>
          </table:table-cell>
          <table:table-cell office:value-type="float" office:value="437" calcext:value-type="float">
            <text:p>43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6S" calcext:value-type="time">
            <text:p>12:15:26</text:p>
          </table:table-cell>
          <table:table-cell office:value-type="float" office:value="523" calcext:value-type="float">
            <text:p>5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8S" calcext:value-type="time">
            <text:p>12:15:28</text:p>
          </table:table-cell>
          <table:table-cell office:value-type="float" office:value="671" calcext:value-type="float">
            <text:p>6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9S" calcext:value-type="time">
            <text:p>12:15:29</text:p>
          </table:table-cell>
          <table:table-cell office:value-type="float" office:value="603" calcext:value-type="float">
            <text:p>60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1S" calcext:value-type="time">
            <text:p>12:15:31</text:p>
          </table:table-cell>
          <table:table-cell office:value-type="float" office:value="579" calcext:value-type="float">
            <text:p>5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3S" calcext:value-type="time">
            <text:p>12:15:33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5S" calcext:value-type="time">
            <text:p>12:15:35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7S" calcext:value-type="time">
            <text:p>12:15:37</text:p>
          </table:table-cell>
          <table:table-cell office:value-type="float" office:value="421" calcext:value-type="float">
            <text:p>42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8S" calcext:value-type="time">
            <text:p>12:15:38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0S" calcext:value-type="time">
            <text:p>12:15:40</text:p>
          </table:table-cell>
          <table:table-cell office:value-type="float" office:value="170" calcext:value-type="float">
            <text:p>17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2S" calcext:value-type="time">
            <text:p>12:15:42</text:p>
          </table:table-cell>
          <table:table-cell office:value-type="float" office:value="754" calcext:value-type="float">
            <text:p>75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4S" calcext:value-type="time">
            <text:p>12:15:44</text:p>
          </table:table-cell>
          <table:table-cell office:value-type="float" office:value="531" calcext:value-type="float">
            <text:p>5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6S" calcext:value-type="time">
            <text:p>12:15:46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7S" calcext:value-type="time">
            <text:p>12:15:47</text:p>
          </table:table-cell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9S" calcext:value-type="time">
            <text:p>12:15:49</text:p>
          </table:table-cell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1S" calcext:value-type="time">
            <text:p>12:15:51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3S" calcext:value-type="time">
            <text:p>12:15:53</text:p>
          </table:table-cell>
          <table:table-cell office:value-type="float" office:value="613" calcext:value-type="float">
            <text:p>61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5S" calcext:value-type="time">
            <text:p>12:15:55</text:p>
          </table:table-cell>
          <table:table-cell office:value-type="float" office:value="196" calcext:value-type="float">
            <text:p>1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6S" calcext:value-type="time">
            <text:p>12:15:56</text:p>
          </table:table-cell>
          <table:table-cell office:value-type="float" office:value="595" calcext:value-type="float">
            <text:p>5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8S" calcext:value-type="time">
            <text:p>12:15:58</text:p>
          </table:table-cell>
          <table:table-cell office:value-type="float" office:value="656" calcext:value-type="float">
            <text:p>6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0S" calcext:value-type="time">
            <text:p>12:16:00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2S" calcext:value-type="time">
            <text:p>12:16:02</text:p>
          </table:table-cell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4S" calcext:value-type="time">
            <text:p>12:16:04</text:p>
          </table:table-cell>
          <table:table-cell office:value-type="float" office:value="530" calcext:value-type="float">
            <text:p>5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6S" calcext:value-type="time">
            <text:p>12:16:06</text:p>
          </table:table-cell>
          <table:table-cell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7S" calcext:value-type="time">
            <text:p>12:16:07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9S" calcext:value-type="time">
            <text:p>12:16:09</text:p>
          </table:table-cell>
          <table:table-cell office:value-type="float" office:value="296" calcext:value-type="float">
            <text:p>29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1S" calcext:value-type="time">
            <text:p>12:16:11</text:p>
          </table:table-cell>
          <table:table-cell office:value-type="float" office:value="234" calcext:value-type="float">
            <text:p>23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3S" calcext:value-type="time">
            <text:p>12:16:13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5S" calcext:value-type="time">
            <text:p>12:16:15</text:p>
          </table:table-cell>
          <table:table-cell office:value-type="float" office:value="250" calcext:value-type="float">
            <text:p>25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6S" calcext:value-type="time">
            <text:p>12:16:16</text:p>
          </table:table-cell>
          <table:table-cell office:value-type="float" office:value="280" calcext:value-type="float">
            <text:p>2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8S" calcext:value-type="time">
            <text:p>12:16:18</text:p>
          </table:table-cell>
          <table:table-cell office:value-type="float" office:value="271" calcext:value-type="float">
            <text:p>2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0S" calcext:value-type="time">
            <text:p>12:16:20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2S" calcext:value-type="time">
            <text:p>12:16:22</text:p>
          </table:table-cell>
          <table:table-cell office:value-type="float" office:value="174" calcext:value-type="float">
            <text:p>17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4S" calcext:value-type="time">
            <text:p>12:16:24</text:p>
          </table:table-cell>
          <table:table-cell office:value-type="float" office:value="427" calcext:value-type="float">
            <text:p>42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6S" calcext:value-type="time">
            <text:p>12:16:26</text:p>
          </table:table-cell>
          <table:table-cell office:value-type="float" office:value="282" calcext:value-type="float">
            <text:p>2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7S" calcext:value-type="time">
            <text:p>12:16:27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9S" calcext:value-type="time">
            <text:p>12:16:29</text:p>
          </table:table-cell>
          <table:table-cell office:value-type="float" office:value="543" calcext:value-type="float">
            <text:p>54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1S" calcext:value-type="time">
            <text:p>12:16:31</text:p>
          </table:table-cell>
          <table:table-cell office:value-type="float" office:value="590" calcext:value-type="float">
            <text:p>5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3S" calcext:value-type="time">
            <text:p>12:16:3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5S" calcext:value-type="time">
            <text:p>12:16:35</text:p>
          </table:table-cell>
          <table:table-cell office:value-type="float" office:value="124" calcext:value-type="float">
            <text:p>12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7S" calcext:value-type="time">
            <text:p>12:16:37</text:p>
          </table:table-cell>
          <table:table-cell office:value-type="float" office:value="504" calcext:value-type="float">
            <text:p>5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8S" calcext:value-type="time">
            <text:p>12:16:38</text:p>
          </table:table-cell>
          <table:table-cell office:value-type="float" office:value="525" calcext:value-type="float">
            <text:p>52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0S" calcext:value-type="time">
            <text:p>12:16:40</text:p>
          </table:table-cell>
          <table:table-cell office:value-type="float" office:value="496" calcext:value-type="float">
            <text:p>4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2S" calcext:value-type="time">
            <text:p>12:16:42</text:p>
          </table:table-cell>
          <table:table-cell office:value-type="float" office:value="670" calcext:value-type="float">
            <text:p>67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4S" calcext:value-type="time">
            <text:p>12:16:44</text:p>
          </table:table-cell>
          <table:table-cell office:value-type="float" office:value="421" calcext:value-type="float">
            <text:p>42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6S" calcext:value-type="time">
            <text:p>12:16:46</text:p>
          </table:table-cell>
          <table:table-cell office:value-type="float" office:value="475" calcext:value-type="float">
            <text:p>47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8S" calcext:value-type="time">
            <text:p>12:16:48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9S" calcext:value-type="time">
            <text:p>12:16:49</text:p>
          </table:table-cell>
          <table:table-cell office:value-type="float" office:value="294" calcext:value-type="float">
            <text:p>2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1S" calcext:value-type="time">
            <text:p>12:16:51</text:p>
          </table:table-cell>
          <table:table-cell office:value-type="float" office:value="506" calcext:value-type="float">
            <text:p>50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3S" calcext:value-type="time">
            <text:p>12:16:53</text:p>
          </table:table-cell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5S" calcext:value-type="time">
            <text:p>12:16:55</text:p>
          </table:table-cell>
          <table:table-cell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7S" calcext:value-type="time">
            <text:p>12:16:57</text:p>
          </table:table-cell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9S" calcext:value-type="time">
            <text:p>12:16:59</text:p>
          </table:table-cell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1S" calcext:value-type="time">
            <text:p>12:17:01</text:p>
          </table:table-cell>
          <table:table-cell office:value-type="float" office:value="417" calcext:value-type="float">
            <text:p>41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2S" calcext:value-type="time">
            <text:p>12:17:02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4S" calcext:value-type="time">
            <text:p>12:17:04</text:p>
          </table:table-cell>
          <table:table-cell office:value-type="float" office:value="592" calcext:value-type="float">
            <text:p>5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6S" calcext:value-type="time">
            <text:p>12:17:06</text:p>
          </table:table-cell>
          <table:table-cell office:value-type="float" office:value="397" calcext:value-type="float">
            <text:p>39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8S" calcext:value-type="time">
            <text:p>12:17:08</text:p>
          </table:table-cell>
          <table:table-cell office:value-type="float" office:value="705" calcext:value-type="float">
            <text:p>70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0S" calcext:value-type="time">
            <text:p>12:17:10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2S" calcext:value-type="time">
            <text:p>12:17:12</text:p>
          </table:table-cell>
          <table:table-cell office:value-type="float" office:value="491" calcext:value-type="float">
            <text:p>49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3S" calcext:value-type="time">
            <text:p>12:17:13</text:p>
          </table:table-cell>
          <table:table-cell office:value-type="float" office:value="526" calcext:value-type="float">
            <text:p>5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5S" calcext:value-type="time">
            <text:p>12:17:15</text:p>
          </table:table-cell>
          <table:table-cell office:value-type="float" office:value="61" calcext:value-type="float">
            <text:p>6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7S" calcext:value-type="time">
            <text:p>12:17:17</text:p>
          </table:table-cell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9S" calcext:value-type="time">
            <text:p>12:17:19</text:p>
          </table:table-cell>
          <table:table-cell office:value-type="float" office:value="270" calcext:value-type="float">
            <text:p>27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1S" calcext:value-type="time">
            <text:p>12:17:21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3S" calcext:value-type="time">
            <text:p>12:17:23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5S" calcext:value-type="time">
            <text:p>12:17:25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6S" calcext:value-type="time">
            <text:p>12:17:26</text:p>
          </table:table-cell>
          <table:table-cell office:value-type="float" office:value="293" calcext:value-type="float">
            <text:p>29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8S" calcext:value-type="time">
            <text:p>12:17:28</text:p>
          </table:table-cell>
          <table:table-cell office:value-type="float" office:value="649" calcext:value-type="float">
            <text:p>6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0S" calcext:value-type="time">
            <text:p>12:17:30</text:p>
          </table:table-cell>
          <table:table-cell office:value-type="float" office:value="453" calcext:value-type="float">
            <text:p>45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2S" calcext:value-type="time">
            <text:p>12:17:32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4S" calcext:value-type="time">
            <text:p>12:17:34</text:p>
          </table:table-cell>
          <table:table-cell office:value-type="float" office:value="13" calcext:value-type="float">
            <text:p>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6S" calcext:value-type="time">
            <text:p>12:17:36</text:p>
          </table:table-cell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8S" calcext:value-type="time">
            <text:p>12:17:38</text:p>
          </table:table-cell>
          <table:table-cell office:value-type="float" office:value="715" calcext:value-type="float">
            <text:p>7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9S" calcext:value-type="time">
            <text:p>12:17:39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1S" calcext:value-type="time">
            <text:p>12:17:41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3S" calcext:value-type="time">
            <text:p>12:17:43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5S" calcext:value-type="time">
            <text:p>12:17:45</text:p>
          </table:table-cell>
          <table:table-cell office:value-type="float" office:value="365" calcext:value-type="float">
            <text:p>36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7S" calcext:value-type="time">
            <text:p>12:17:47</text:p>
          </table:table-cell>
          <table:table-cell office:value-type="float" office:value="282" calcext:value-type="float">
            <text:p>2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9S" calcext:value-type="time">
            <text:p>12:17:49</text:p>
          </table:table-cell>
          <table:table-cell office:value-type="float" office:value="724" calcext:value-type="float">
            <text:p>72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1S" calcext:value-type="time">
            <text:p>12:17:51</text:p>
          </table:table-cell>
          <table:table-cell office:value-type="float" office:value="698" calcext:value-type="float">
            <text:p>6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2S" calcext:value-type="time">
            <text:p>12:17:52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4S" calcext:value-type="time">
            <text:p>12:17:54</text:p>
          </table:table-cell>
          <table:table-cell office:value-type="float" office:value="779" calcext:value-type="float">
            <text:p>77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6S" calcext:value-type="time">
            <text:p>12:17:56</text:p>
          </table:table-cell>
          <table:table-cell office:value-type="float" office:value="470" calcext:value-type="float">
            <text:p>4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8S" calcext:value-type="time">
            <text:p>12:17:58</text:p>
          </table:table-cell>
          <table:table-cell office:value-type="float" office:value="537" calcext:value-type="float">
            <text:p>53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0S" calcext:value-type="time">
            <text:p>12:18:00</text:p>
          </table:table-cell>
          <table:table-cell office:value-type="float" office:value="534" calcext:value-type="float">
            <text:p>5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2S" calcext:value-type="time">
            <text:p>12:18:02</text:p>
          </table:table-cell>
          <table:table-cell office:value-type="float" office:value="464" calcext:value-type="float">
            <text:p>46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4S" calcext:value-type="time">
            <text:p>12:18:0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6S" calcext:value-type="time">
            <text:p>12:18:06</text:p>
          </table:table-cell>
          <table:table-cell office:value-type="float" office:value="627" calcext:value-type="float">
            <text:p>62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7S" calcext:value-type="time">
            <text:p>12:18:07</text:p>
          </table:table-cell>
          <table:table-cell office:value-type="float" office:value="519" calcext:value-type="float">
            <text:p>5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9S" calcext:value-type="time">
            <text:p>12:18:09</text:p>
          </table:table-cell>
          <table:table-cell office:value-type="float" office:value="555" calcext:value-type="float">
            <text:p>5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1S" calcext:value-type="time">
            <text:p>12:18:11</text:p>
          </table:table-cell>
          <table:table-cell office:value-type="float" office:value="546" calcext:value-type="float">
            <text:p>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3S" calcext:value-type="time">
            <text:p>12:18:13</text:p>
          </table:table-cell>
          <table:table-cell office:value-type="float" office:value="243" calcext:value-type="float">
            <text:p>2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5S" calcext:value-type="time">
            <text:p>12:18:15</text:p>
          </table:table-cell>
          <table:table-cell office:value-type="float" office:value="317" calcext:value-type="float">
            <text:p>31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7S" calcext:value-type="time">
            <text:p>12:18:17</text:p>
          </table:table-cell>
          <table:table-cell office:value-type="float" office:value="438" calcext:value-type="float">
            <text:p>4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9S" calcext:value-type="time">
            <text:p>12:18:19</text:p>
          </table:table-cell>
          <table:table-cell office:value-type="float" office:value="633" calcext:value-type="float">
            <text:p>6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1S" calcext:value-type="time">
            <text:p>12:18:21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2S" calcext:value-type="time">
            <text:p>12:18:22</text:p>
          </table:table-cell>
          <table:table-cell office:value-type="float" office:value="409" calcext:value-type="float">
            <text:p>40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4S" calcext:value-type="time">
            <text:p>12:18:24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6S" calcext:value-type="time">
            <text:p>12:18:26</text:p>
          </table:table-cell>
          <table:table-cell office:value-type="float" office:value="276" calcext:value-type="float">
            <text:p>27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8S" calcext:value-type="time">
            <text:p>12:18:28</text:p>
          </table:table-cell>
          <table:table-cell office:value-type="float" office:value="404" calcext:value-type="float">
            <text:p>4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0S" calcext:value-type="time">
            <text:p>12:18:30</text:p>
          </table:table-cell>
          <table:table-cell office:value-type="float" office:value="457" calcext:value-type="float">
            <text:p>45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2S" calcext:value-type="time">
            <text:p>12:18:32</text:p>
          </table:table-cell>
          <table:table-cell office:value-type="float" office:value="538" calcext:value-type="float">
            <text:p>5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4S" calcext:value-type="time">
            <text:p>12:18:34</text:p>
          </table:table-cell>
          <table:table-cell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6S" calcext:value-type="time">
            <text:p>12:18:36</text:p>
          </table:table-cell>
          <table:table-cell office:value-type="float" office:value="490" calcext:value-type="float">
            <text:p>49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7S" calcext:value-type="time">
            <text:p>12:18:37</text:p>
          </table:table-cell>
          <table:table-cell office:value-type="float" office:value="380" calcext:value-type="float">
            <text:p>38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9S" calcext:value-type="time">
            <text:p>12:18:39</text:p>
          </table:table-cell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1S" calcext:value-type="time">
            <text:p>12:18:41</text:p>
          </table:table-cell>
          <table:table-cell office:value-type="float" office:value="507" calcext:value-type="float">
            <text:p>50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3S" calcext:value-type="time">
            <text:p>12:18:43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5S" calcext:value-type="time">
            <text:p>12:18:45</text:p>
          </table:table-cell>
          <table:table-cell office:value-type="float" office:value="157" calcext:value-type="float">
            <text:p>15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7S" calcext:value-type="time">
            <text:p>12:18:47</text:p>
          </table:table-cell>
          <table:table-cell office:value-type="float" office:value="489" calcext:value-type="float">
            <text:p>48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9S" calcext:value-type="time">
            <text:p>12:18:49</text:p>
          </table:table-cell>
          <table:table-cell office:value-type="float" office:value="386" calcext:value-type="float">
            <text:p>38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1S" calcext:value-type="time">
            <text:p>12:18:51</text:p>
          </table:table-cell>
          <table:table-cell office:value-type="float" office:value="368" calcext:value-type="float">
            <text:p>36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3S" calcext:value-type="time">
            <text:p>12:18:53</text:p>
          </table:table-cell>
          <table:table-cell office:value-type="float" office:value="418" calcext:value-type="float">
            <text:p>41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4S" calcext:value-type="time">
            <text:p>12:18:54</text:p>
          </table:table-cell>
          <table:table-cell office:value-type="float" office:value="517" calcext:value-type="float">
            <text:p>51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6S" calcext:value-type="time">
            <text:p>12:18:56</text:p>
          </table:table-cell>
          <table:table-cell office:value-type="float" office:value="570" calcext:value-type="float">
            <text:p>5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8S" calcext:value-type="time">
            <text:p>12:18:5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0S" calcext:value-type="time">
            <text:p>12:19:00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2S" calcext:value-type="time">
            <text:p>12:19:02</text:p>
          </table:table-cell>
          <table:table-cell office:value-type="float" office:value="244" calcext:value-type="float">
            <text:p>24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4S" calcext:value-type="time">
            <text:p>12:19:04</text:p>
          </table:table-cell>
          <table:table-cell office:value-type="float" office:value="719" calcext:value-type="float">
            <text:p>7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6S" calcext:value-type="time">
            <text:p>12:19:06</text:p>
          </table:table-cell>
          <table:table-cell office:value-type="float" office:value="548" calcext:value-type="float">
            <text:p>5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8S" calcext:value-type="time">
            <text:p>12:19:08</text:p>
          </table:table-cell>
          <table:table-cell office:value-type="float" office:value="358" calcext:value-type="float">
            <text:p>3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0S" calcext:value-type="time">
            <text:p>12:19:10</text:p>
          </table:table-cell>
          <table:table-cell office:value-type="float" office:value="682" calcext:value-type="float">
            <text:p>68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2S" calcext:value-type="time">
            <text:p>12:19:12</text:p>
          </table:table-cell>
          <table:table-cell office:value-type="float" office:value="455" calcext:value-type="float">
            <text:p>4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3S" calcext:value-type="time">
            <text:p>12:19:13</text:p>
          </table:table-cell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5S" calcext:value-type="time">
            <text:p>12:19:15</text:p>
          </table:table-cell>
          <table:table-cell office:value-type="float" office:value="472" calcext:value-type="float">
            <text:p>4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7S" calcext:value-type="time">
            <text:p>12:19:1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9S" calcext:value-type="time">
            <text:p>12:19:19</text:p>
          </table:table-cell>
          <table:table-cell office:value-type="float" office:value="648" calcext:value-type="float">
            <text:p>64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1S" calcext:value-type="time">
            <text:p>12:19:21</text:p>
          </table:table-cell>
          <table:table-cell office:value-type="float" office:value="531" calcext:value-type="float">
            <text:p>5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3S" calcext:value-type="time">
            <text:p>12:19:23</text:p>
          </table:table-cell>
          <table:table-cell office:value-type="float" office:value="613" calcext:value-type="float">
            <text:p>61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5S" calcext:value-type="time">
            <text:p>12:19:25</text:p>
          </table:table-cell>
          <table:table-cell office:value-type="float" office:value="113" calcext:value-type="float">
            <text:p>1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7S" calcext:value-type="time">
            <text:p>12:19:27</text:p>
          </table:table-cell>
          <table:table-cell office:value-type="float" office:value="478" calcext:value-type="float">
            <text:p>4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9S" calcext:value-type="time">
            <text:p>12:19:2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1S" calcext:value-type="time">
            <text:p>12:19:31</text:p>
          </table:table-cell>
          <table:table-cell office:value-type="float" office:value="540" calcext:value-type="float">
            <text:p>54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3S" calcext:value-type="time">
            <text:p>12:19:33</text:p>
          </table:table-cell>
          <table:table-cell office:value-type="float" office:value="515" calcext:value-type="float">
            <text:p>51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4S" calcext:value-type="time">
            <text:p>12:19:34</text:p>
          </table:table-cell>
          <table:table-cell office:value-type="float" office:value="459" calcext:value-type="float">
            <text:p>4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6S" calcext:value-type="time">
            <text:p>12:19:36</text:p>
          </table:table-cell>
          <table:table-cell office:value-type="float" office:value="236" calcext:value-type="float">
            <text:p>23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8S" calcext:value-type="time">
            <text:p>12:19:38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0S" calcext:value-type="time">
            <text:p>12:19:40</text:p>
          </table:table-cell>
          <table:table-cell office:value-type="float" office:value="162" calcext:value-type="float">
            <text:p>1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2S" calcext:value-type="time">
            <text:p>12:19:42</text:p>
          </table:table-cell>
          <table:table-cell office:value-type="float" office:value="223" calcext:value-type="float">
            <text:p>2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4S" calcext:value-type="time">
            <text:p>12:19:44</text:p>
          </table:table-cell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6S" calcext:value-type="time">
            <text:p>12:19:46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8S" calcext:value-type="time">
            <text:p>12:19:4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0S" calcext:value-type="time">
            <text:p>12:19:50</text:p>
          </table:table-cell>
          <table:table-cell office:value-type="float" office:value="599" calcext:value-type="float">
            <text:p>59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2S" calcext:value-type="time">
            <text:p>12:19:52</text:p>
          </table:table-cell>
          <table:table-cell office:value-type="float" office:value="442" calcext:value-type="float">
            <text:p>44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4S" calcext:value-type="time">
            <text:p>12:19:54</text:p>
          </table:table-cell>
          <table:table-cell office:value-type="float" office:value="280" calcext:value-type="float">
            <text:p>28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6S" calcext:value-type="time">
            <text:p>12:19:56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7S" calcext:value-type="time">
            <text:p>12:19:57</text:p>
          </table:table-cell>
          <table:table-cell office:value-type="float" office:value="629" calcext:value-type="float">
            <text:p>6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9S" calcext:value-type="time">
            <text:p>12:19:59</text:p>
          </table:table-cell>
          <table:table-cell office:value-type="float" office:value="349" calcext:value-type="float">
            <text:p>34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1S" calcext:value-type="time">
            <text:p>12:20:01</text:p>
          </table:table-cell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3S" calcext:value-type="time">
            <text:p>12:20:03</text:p>
          </table:table-cell>
          <table:table-cell office:value-type="float" office:value="682" calcext:value-type="float">
            <text:p>6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5S" calcext:value-type="time">
            <text:p>12:20:05</text:p>
          </table:table-cell>
          <table:table-cell office:value-type="float" office:value="564" calcext:value-type="float">
            <text:p>5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7S" calcext:value-type="time">
            <text:p>12:20:07</text:p>
          </table:table-cell>
          <table:table-cell office:value-type="float" office:value="455" calcext:value-type="float">
            <text:p>4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9S" calcext:value-type="time">
            <text:p>12:20:09</text:p>
          </table:table-cell>
          <table:table-cell office:value-type="float" office:value="630" calcext:value-type="float">
            <text:p>6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1S" calcext:value-type="time">
            <text:p>12:20:11</text:p>
          </table:table-cell>
          <table:table-cell office:value-type="float" office:value="332" calcext:value-type="float">
            <text:p>3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3S" calcext:value-type="time">
            <text:p>12:20:13</text:p>
          </table:table-cell>
          <table:table-cell office:value-type="float" office:value="600" calcext:value-type="float">
            <text:p>60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5S" calcext:value-type="time">
            <text:p>12:20:15</text:p>
          </table:table-cell>
          <table:table-cell office:value-type="float" office:value="610" calcext:value-type="float">
            <text:p>6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7S" calcext:value-type="time">
            <text:p>12:20:17</text:p>
          </table:table-cell>
          <table:table-cell office:value-type="float" office:value="281" calcext:value-type="float">
            <text:p>28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9S" calcext:value-type="time">
            <text:p>12:20:19</text:p>
          </table:table-cell>
          <table:table-cell office:value-type="float" office:value="328" calcext:value-type="float">
            <text:p>32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1S" calcext:value-type="time">
            <text:p>12:20:21</text:p>
          </table:table-cell>
          <table:table-cell office:value-type="float" office:value="445" calcext:value-type="float">
            <text:p>44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2S" calcext:value-type="time">
            <text:p>12:20:22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4S" calcext:value-type="time">
            <text:p>12:20:24</text:p>
          </table:table-cell>
          <table:table-cell office:value-type="float" office:value="642" calcext:value-type="float">
            <text:p>6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6S" calcext:value-type="time">
            <text:p>12:20:26</text:p>
          </table:table-cell>
          <table:table-cell office:value-type="float" office:value="669" calcext:value-type="float">
            <text:p>6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8S" calcext:value-type="time">
            <text:p>12:20:28</text:p>
          </table:table-cell>
          <table:table-cell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0S" calcext:value-type="time">
            <text:p>12:20:30</text:p>
          </table:table-cell>
          <table:table-cell office:value-type="float" office:value="415" calcext:value-type="float">
            <text:p>4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2S" calcext:value-type="time">
            <text:p>12:20:32</text:p>
          </table:table-cell>
          <table:table-cell office:value-type="float" office:value="499" calcext:value-type="float">
            <text:p>49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4S" calcext:value-type="time">
            <text:p>12:20:34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6S" calcext:value-type="time">
            <text:p>12:20:36</text:p>
          </table:table-cell>
          <table:table-cell office:value-type="float" office:value="532" calcext:value-type="float">
            <text:p>5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8S" calcext:value-type="time">
            <text:p>12:20:38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0S" calcext:value-type="time">
            <text:p>12:20:4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2S" calcext:value-type="time">
            <text:p>12:20:42</text:p>
          </table:table-cell>
          <table:table-cell office:value-type="float" office:value="511" calcext:value-type="float">
            <text:p>5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4S" calcext:value-type="time">
            <text:p>12:20:44</text:p>
          </table:table-cell>
          <table:table-cell office:value-type="float" office:value="436" calcext:value-type="float">
            <text:p>4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6S" calcext:value-type="time">
            <text:p>12:20:46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8S" calcext:value-type="time">
            <text:p>12:20:48</text:p>
          </table:table-cell>
          <table:table-cell office:value-type="float" office:value="384" calcext:value-type="float">
            <text:p>38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0S" calcext:value-type="time">
            <text:p>12:20:50</text:p>
          </table:table-cell>
          <table:table-cell office:value-type="float" office:value="407" calcext:value-type="float">
            <text:p>40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2S" calcext:value-type="time">
            <text:p>12:20:52</text:p>
          </table:table-cell>
          <table:table-cell office:value-type="float" office:value="651" calcext:value-type="float">
            <text:p>65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3S" calcext:value-type="time">
            <text:p>12:20:53</text:p>
          </table:table-cell>
          <table:table-cell office:value-type="float" office:value="380" calcext:value-type="float">
            <text:p>38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5S" calcext:value-type="time">
            <text:p>12:20:55</text:p>
          </table:table-cell>
          <table:table-cell office:value-type="float" office:value="751" calcext:value-type="float">
            <text:p>75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7S" calcext:value-type="time">
            <text:p>12:20:57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9S" calcext:value-type="time">
            <text:p>12:20:59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1S" calcext:value-type="time">
            <text:p>12:21:01</text:p>
          </table:table-cell>
          <table:table-cell office:value-type="float" office:value="613" calcext:value-type="float">
            <text:p>61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3S" calcext:value-type="time">
            <text:p>12:21:03</text:p>
          </table:table-cell>
          <table:table-cell office:value-type="float" office:value="335" calcext:value-type="float">
            <text:p>3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5S" calcext:value-type="time">
            <text:p>12:21:05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7S" calcext:value-type="time">
            <text:p>12:21:07</text:p>
          </table:table-cell>
          <table:table-cell office:value-type="float" office:value="324" calcext:value-type="float">
            <text:p>32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9S" calcext:value-type="time">
            <text:p>12:21:0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1S" calcext:value-type="time">
            <text:p>12:21:11</text:p>
          </table:table-cell>
          <table:table-cell office:value-type="float" office:value="299" calcext:value-type="float">
            <text:p>29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3S" calcext:value-type="time">
            <text:p>12:21:13</text:p>
          </table:table-cell>
          <table:table-cell office:value-type="float" office:value="424" calcext:value-type="float">
            <text:p>42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5S" calcext:value-type="time">
            <text:p>12:21:15</text:p>
          </table:table-cell>
          <table:table-cell office:value-type="float" office:value="515" calcext:value-type="float">
            <text:p>5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7S" calcext:value-type="time">
            <text:p>12:21:17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9S" calcext:value-type="time">
            <text:p>12:21:19</text:p>
          </table:table-cell>
          <table:table-cell office:value-type="float" office:value="513" calcext:value-type="float">
            <text:p>5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1S" calcext:value-type="time">
            <text:p>12:21:21</text:p>
          </table:table-cell>
          <table:table-cell office:value-type="float" office:value="420" calcext:value-type="float">
            <text:p>4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3S" calcext:value-type="time">
            <text:p>12:21:23</text:p>
          </table:table-cell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5S" calcext:value-type="time">
            <text:p>12:21:25</text:p>
          </table:table-cell>
          <table:table-cell office:value-type="float" office:value="567" calcext:value-type="float">
            <text:p>56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7S" calcext:value-type="time">
            <text:p>12:21:27</text:p>
          </table:table-cell>
          <table:table-cell office:value-type="float" office:value="459" calcext:value-type="float">
            <text:p>45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9S" calcext:value-type="time">
            <text:p>12:21:29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1S" calcext:value-type="time">
            <text:p>12:21:31</text:p>
          </table:table-cell>
          <table:table-cell office:value-type="float" office:value="594" calcext:value-type="float">
            <text:p>59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3S" calcext:value-type="time">
            <text:p>12:21:33</text:p>
          </table:table-cell>
          <table:table-cell office:value-type="float" office:value="548" calcext:value-type="float">
            <text:p>54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5S" calcext:value-type="time">
            <text:p>12:21:35</text:p>
          </table:table-cell>
          <table:table-cell office:value-type="float" office:value="583" calcext:value-type="float">
            <text:p>58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6S" calcext:value-type="time">
            <text:p>12:21:36</text:p>
          </table:table-cell>
          <table:table-cell office:value-type="float" office:value="493" calcext:value-type="float">
            <text:p>49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8S" calcext:value-type="time">
            <text:p>12:21:38</text:p>
          </table:table-cell>
          <table:table-cell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0S" calcext:value-type="time">
            <text:p>12:21:40</text:p>
          </table:table-cell>
          <table:table-cell office:value-type="float" office:value="421" calcext:value-type="float">
            <text:p>4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2S" calcext:value-type="time">
            <text:p>12:21:42</text:p>
          </table:table-cell>
          <table:table-cell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4S" calcext:value-type="time">
            <text:p>12:21:44</text:p>
          </table:table-cell>
          <table:table-cell office:value-type="float" office:value="526" calcext:value-type="float">
            <text:p>5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6S" calcext:value-type="time">
            <text:p>12:21:46</text:p>
          </table:table-cell>
          <table:table-cell office:value-type="float" office:value="502" calcext:value-type="float">
            <text:p>50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9S" calcext:value-type="time">
            <text:p>12:21:49</text:p>
          </table:table-cell>
          <table:table-cell office:value-type="float" office:value="678" calcext:value-type="float">
            <text:p>67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1S" calcext:value-type="time">
            <text:p>12:21:51</text:p>
          </table:table-cell>
          <table:table-cell office:value-type="float" office:value="319" calcext:value-type="float">
            <text:p>31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3S" calcext:value-type="time">
            <text:p>12:21:53</text:p>
          </table:table-cell>
          <table:table-cell office:value-type="float" office:value="400" calcext:value-type="float">
            <text:p>4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5S" calcext:value-type="time">
            <text:p>12:21:55</text:p>
          </table:table-cell>
          <table:table-cell office:value-type="float" office:value="603" calcext:value-type="float">
            <text:p>60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7S" calcext:value-type="time">
            <text:p>12:21:57</text:p>
          </table:table-cell>
          <table:table-cell office:value-type="float" office:value="671" calcext:value-type="float">
            <text:p>6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9S" calcext:value-type="time">
            <text:p>12:21:59</text:p>
          </table:table-cell>
          <table:table-cell office:value-type="float" office:value="250" calcext:value-type="float">
            <text:p>2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1S" calcext:value-type="time">
            <text:p>12:22:01</text:p>
          </table:table-cell>
          <table:table-cell office:value-type="float" office:value="586" calcext:value-type="float">
            <text:p>58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3S" calcext:value-type="time">
            <text:p>12:22:03</text:p>
          </table:table-cell>
          <table:table-cell office:value-type="float" office:value="518" calcext:value-type="float">
            <text:p>5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5S" calcext:value-type="time">
            <text:p>12:22:05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7S" calcext:value-type="time">
            <text:p>12:22:07</text:p>
          </table:table-cell>
          <table:table-cell office:value-type="float" office:value="562" calcext:value-type="float">
            <text:p>56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8S" calcext:value-type="time">
            <text:p>12:22:08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0S" calcext:value-type="time">
            <text:p>12:22:10</text:p>
          </table:table-cell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2S" calcext:value-type="time">
            <text:p>12:22:12</text:p>
          </table:table-cell>
          <table:table-cell office:value-type="float" office:value="272" calcext:value-type="float">
            <text:p>27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4S" calcext:value-type="time">
            <text:p>12:22:14</text:p>
          </table:table-cell>
          <table:table-cell office:value-type="float" office:value="476" calcext:value-type="float">
            <text:p>4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6S" calcext:value-type="time">
            <text:p>12:22:16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529" calcext:value-type="float">
            <text:p>5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430" calcext:value-type="float">
            <text:p>43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2S" calcext:value-type="time">
            <text:p>12:22:22</text:p>
          </table:table-cell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4S" calcext:value-type="time">
            <text:p>12:22:24</text:p>
          </table:table-cell>
          <table:table-cell office:value-type="float" office:value="471" calcext:value-type="float">
            <text:p>47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6S" calcext:value-type="time">
            <text:p>12:22:26</text:p>
          </table:table-cell>
          <table:table-cell office:value-type="float" office:value="559" calcext:value-type="float">
            <text:p>5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380" calcext:value-type="float">
            <text:p>38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0S" calcext:value-type="time">
            <text:p>12:22:30</text:p>
          </table:table-cell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2S" calcext:value-type="time">
            <text:p>12:22:32</text:p>
          </table:table-cell>
          <table:table-cell office:value-type="float" office:value="250" calcext:value-type="float">
            <text:p>2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4S" calcext:value-type="time">
            <text:p>12:22:34</text:p>
          </table:table-cell>
          <table:table-cell office:value-type="float" office:value="656" calcext:value-type="float">
            <text:p>65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8S" calcext:value-type="time">
            <text:p>12:22:38</text:p>
          </table:table-cell>
          <table:table-cell office:value-type="float" office:value="470" calcext:value-type="float">
            <text:p>47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0S" calcext:value-type="time">
            <text:p>12:22:40</text:p>
          </table:table-cell>
          <table:table-cell office:value-type="float" office:value="212" calcext:value-type="float">
            <text:p>21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2S" calcext:value-type="time">
            <text:p>12:22:42</text:p>
          </table:table-cell>
          <table:table-cell office:value-type="float" office:value="406" calcext:value-type="float">
            <text:p>40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4S" calcext:value-type="time">
            <text:p>12:22:44</text:p>
          </table:table-cell>
          <table:table-cell office:value-type="float" office:value="512" calcext:value-type="float">
            <text:p>51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6S" calcext:value-type="time">
            <text:p>12:22:46</text:p>
          </table:table-cell>
          <table:table-cell office:value-type="float" office:value="496" calcext:value-type="float">
            <text:p>49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8S" calcext:value-type="time">
            <text:p>12:22:48</text:p>
          </table:table-cell>
          <table:table-cell office:value-type="float" office:value="527" calcext:value-type="float">
            <text:p>52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0S" calcext:value-type="time">
            <text:p>12:22:50</text:p>
          </table:table-cell>
          <table:table-cell office:value-type="float" office:value="306" calcext:value-type="float">
            <text:p>30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2S" calcext:value-type="time">
            <text:p>12:22:52</text:p>
          </table:table-cell>
          <table:table-cell office:value-type="float" office:value="465" calcext:value-type="float">
            <text:p>46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4S" calcext:value-type="time">
            <text:p>12:22:54</text:p>
          </table:table-cell>
          <table:table-cell office:value-type="float" office:value="483" calcext:value-type="float">
            <text:p>48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498" calcext:value-type="float">
            <text:p>49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8S" calcext:value-type="time">
            <text:p>12:22:58</text:p>
          </table:table-cell>
          <table:table-cell office:value-type="float" office:value="463" calcext:value-type="float">
            <text:p>46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526" calcext:value-type="float">
            <text:p>5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2S" calcext:value-type="time">
            <text:p>12:23:02</text:p>
          </table:table-cell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4S" calcext:value-type="time">
            <text:p>12:23:04</text:p>
          </table:table-cell>
          <table:table-cell office:value-type="float" office:value="629" calcext:value-type="float">
            <text:p>62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6S" calcext:value-type="time">
            <text:p>12:23:06</text:p>
          </table:table-cell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8S" calcext:value-type="time">
            <text:p>12:23:08</text:p>
          </table:table-cell>
          <table:table-cell office:value-type="float" office:value="637" calcext:value-type="float">
            <text:p>63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0S" calcext:value-type="time">
            <text:p>12:23:10</text:p>
          </table:table-cell>
          <table:table-cell office:value-type="float" office:value="391" calcext:value-type="float">
            <text:p>39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2S" calcext:value-type="time">
            <text:p>12:23:12</text:p>
          </table:table-cell>
          <table:table-cell office:value-type="float" office:value="617" calcext:value-type="float">
            <text:p>61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4S" calcext:value-type="time">
            <text:p>12:23:14</text:p>
          </table:table-cell>
          <table:table-cell office:value-type="float" office:value="408" calcext:value-type="float">
            <text:p>4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6S" calcext:value-type="time">
            <text:p>12:23:16</text:p>
          </table:table-cell>
          <table:table-cell office:value-type="float" office:value="535" calcext:value-type="float">
            <text:p>53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8S" calcext:value-type="time">
            <text:p>12:23:18</text:p>
          </table:table-cell>
          <table:table-cell office:value-type="float" office:value="513" calcext:value-type="float">
            <text:p>51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0S" calcext:value-type="time">
            <text:p>12:23:20</text:p>
          </table:table-cell>
          <table:table-cell office:value-type="float" office:value="262" calcext:value-type="float">
            <text:p>2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2S" calcext:value-type="time">
            <text:p>12:23:22</text:p>
          </table:table-cell>
          <table:table-cell office:value-type="float" office:value="516" calcext:value-type="float">
            <text:p>51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4S" calcext:value-type="time">
            <text:p>12:23:24</text:p>
          </table:table-cell>
          <table:table-cell office:value-type="float" office:value="441" calcext:value-type="float">
            <text:p>4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6S" calcext:value-type="time">
            <text:p>12:23:26</text:p>
          </table:table-cell>
          <table:table-cell office:value-type="float" office:value="653" calcext:value-type="float">
            <text:p>65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8S" calcext:value-type="time">
            <text:p>12:23:28</text:p>
          </table:table-cell>
          <table:table-cell office:value-type="float" office:value="215" calcext:value-type="float">
            <text:p>2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535" calcext:value-type="float">
            <text:p>5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2S" calcext:value-type="time">
            <text:p>12:23:32</text:p>
          </table:table-cell>
          <table:table-cell office:value-type="float" office:value="438" calcext:value-type="float">
            <text:p>43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4S" calcext:value-type="time">
            <text:p>12:23:34</text:p>
          </table:table-cell>
          <table:table-cell office:value-type="float" office:value="572" calcext:value-type="float">
            <text:p>57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6S" calcext:value-type="time">
            <text:p>12:23:36</text:p>
          </table:table-cell>
          <table:table-cell office:value-type="float" office:value="574" calcext:value-type="float">
            <text:p>57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8S" calcext:value-type="time">
            <text:p>12:23:38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0S" calcext:value-type="time">
            <text:p>12:23:40</text:p>
          </table:table-cell>
          <table:table-cell office:value-type="float" office:value="580" calcext:value-type="float">
            <text:p>58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2S" calcext:value-type="time">
            <text:p>12:23:42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4S" calcext:value-type="time">
            <text:p>12:23:44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6S" calcext:value-type="time">
            <text:p>12:23:46</text:p>
          </table:table-cell>
          <table:table-cell office:value-type="float" office:value="322" calcext:value-type="float">
            <text:p>32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8S" calcext:value-type="time">
            <text:p>12:23:48</text:p>
          </table:table-cell>
          <table:table-cell office:value-type="float" office:value="468" calcext:value-type="float">
            <text:p>46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0S" calcext:value-type="time">
            <text:p>12:23:50</text:p>
          </table:table-cell>
          <table:table-cell office:value-type="float" office:value="702" calcext:value-type="float">
            <text:p>70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2S" calcext:value-type="time">
            <text:p>12:23:52</text:p>
          </table:table-cell>
          <table:table-cell office:value-type="float" office:value="449" calcext:value-type="float">
            <text:p>44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4S" calcext:value-type="time">
            <text:p>12:23:54</text:p>
          </table:table-cell>
          <table:table-cell office:value-type="float" office:value="635" calcext:value-type="float">
            <text:p>6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8S" calcext:value-type="time">
            <text:p>12:23:58</text:p>
          </table:table-cell>
          <table:table-cell office:value-type="float" office:value="543" calcext:value-type="float">
            <text:p>5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0S" calcext:value-type="time">
            <text:p>12:24:00</text:p>
          </table:table-cell>
          <table:table-cell office:value-type="float" office:value="575" calcext:value-type="float">
            <text:p>5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2S" calcext:value-type="time">
            <text:p>12:24:02</text:p>
          </table:table-cell>
          <table:table-cell office:value-type="float" office:value="509" calcext:value-type="float">
            <text:p>50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4S" calcext:value-type="time">
            <text:p>12:24:04</text:p>
          </table:table-cell>
          <table:table-cell office:value-type="float" office:value="488" calcext:value-type="float">
            <text:p>48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6S" calcext:value-type="time">
            <text:p>12:24:06</text:p>
          </table:table-cell>
          <table:table-cell office:value-type="float" office:value="298" calcext:value-type="float">
            <text:p>29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8S" calcext:value-type="time">
            <text:p>12:24:08</text:p>
          </table:table-cell>
          <table:table-cell office:value-type="float" office:value="486" calcext:value-type="float">
            <text:p>48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0S" calcext:value-type="time">
            <text:p>12:24:10</text:p>
          </table:table-cell>
          <table:table-cell office:value-type="float" office:value="378" calcext:value-type="float">
            <text:p>3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3S" calcext:value-type="time">
            <text:p>12:24:13</text:p>
          </table:table-cell>
          <table:table-cell office:value-type="float" office:value="528" calcext:value-type="float">
            <text:p>5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5S" calcext:value-type="time">
            <text:p>12:24:15</text:p>
          </table:table-cell>
          <table:table-cell office:value-type="float" office:value="608" calcext:value-type="float">
            <text:p>60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7S" calcext:value-type="time">
            <text:p>12:24:17</text:p>
          </table:table-cell>
          <table:table-cell office:value-type="float" office:value="490" calcext:value-type="float">
            <text:p>49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9S" calcext:value-type="time">
            <text:p>12:24:19</text:p>
          </table:table-cell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1S" calcext:value-type="time">
            <text:p>12:24:2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3S" calcext:value-type="time">
            <text:p>12:24:23</text:p>
          </table:table-cell>
          <table:table-cell office:value-type="float" office:value="649" calcext:value-type="float">
            <text:p>64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5S" calcext:value-type="time">
            <text:p>12:24:25</text:p>
          </table:table-cell>
          <table:table-cell office:value-type="float" office:value="355" calcext:value-type="float">
            <text:p>3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7S" calcext:value-type="time">
            <text:p>12:24:27</text:p>
          </table:table-cell>
          <table:table-cell office:value-type="float" office:value="448" calcext:value-type="float">
            <text:p>44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9S" calcext:value-type="time">
            <text:p>12:24:29</text:p>
          </table:table-cell>
          <table:table-cell office:value-type="float" office:value="503" calcext:value-type="float">
            <text:p>50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1S" calcext:value-type="time">
            <text:p>12:24:31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3S" calcext:value-type="time">
            <text:p>12:24:33</text:p>
          </table:table-cell>
          <table:table-cell office:value-type="float" office:value="518" calcext:value-type="float">
            <text:p>51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5S" calcext:value-type="time">
            <text:p>12:24:35</text:p>
          </table:table-cell>
          <table:table-cell office:value-type="float" office:value="751" calcext:value-type="float">
            <text:p>75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7S" calcext:value-type="time">
            <text:p>12:24:37</text:p>
          </table:table-cell>
          <table:table-cell office:value-type="float" office:value="583" calcext:value-type="float">
            <text:p>58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9S" calcext:value-type="time">
            <text:p>12:24:39</text:p>
          </table:table-cell>
          <table:table-cell office:value-type="float" office:value="451" calcext:value-type="float">
            <text:p>45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1S" calcext:value-type="time">
            <text:p>12:24:41</text:p>
          </table:table-cell>
          <table:table-cell office:value-type="float" office:value="214" calcext:value-type="float">
            <text:p>2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3S" calcext:value-type="time">
            <text:p>12:24:43</text:p>
          </table:table-cell>
          <table:table-cell office:value-type="float" office:value="338" calcext:value-type="float">
            <text:p>3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5S" calcext:value-type="time">
            <text:p>12:24:45</text:p>
          </table:table-cell>
          <table:table-cell office:value-type="float" office:value="570" calcext:value-type="float">
            <text:p>57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7S" calcext:value-type="time">
            <text:p>12:24:47</text:p>
          </table:table-cell>
          <table:table-cell office:value-type="float" office:value="535" calcext:value-type="float">
            <text:p>53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9S" calcext:value-type="time">
            <text:p>12:24:49</text:p>
          </table:table-cell>
          <table:table-cell office:value-type="float" office:value="369" calcext:value-type="float">
            <text:p>36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1S" calcext:value-type="time">
            <text:p>12:24:51</text:p>
          </table:table-cell>
          <table:table-cell office:value-type="float" office:value="653" calcext:value-type="float">
            <text:p>65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3S" calcext:value-type="time">
            <text:p>12:24:53</text:p>
          </table:table-cell>
          <table:table-cell office:value-type="float" office:value="481" calcext:value-type="float">
            <text:p>48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5S" calcext:value-type="time">
            <text:p>12:24:55</text:p>
          </table:table-cell>
          <table:table-cell office:value-type="float" office:value="425" calcext:value-type="float">
            <text:p>4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7S" calcext:value-type="time">
            <text:p>12:24:57</text:p>
          </table:table-cell>
          <table:table-cell office:value-type="float" office:value="543" calcext:value-type="float">
            <text:p>54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0S" calcext:value-type="time">
            <text:p>12:25:00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2S" calcext:value-type="time">
            <text:p>12:25:02</text:p>
          </table:table-cell>
          <table:table-cell office:value-type="float" office:value="396" calcext:value-type="float">
            <text:p>39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4S" calcext:value-type="time">
            <text:p>12:25:0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6S" calcext:value-type="time">
            <text:p>12:25:06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8S" calcext:value-type="time">
            <text:p>12:25:08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0S" calcext:value-type="time">
            <text:p>12:25:10</text:p>
          </table:table-cell>
          <table:table-cell office:value-type="float" office:value="509" calcext:value-type="float">
            <text:p>50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2S" calcext:value-type="time">
            <text:p>12:25:12</text:p>
          </table:table-cell>
          <table:table-cell office:value-type="float" office:value="349" calcext:value-type="float">
            <text:p>34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4S" calcext:value-type="time">
            <text:p>12:25:14</text:p>
          </table:table-cell>
          <table:table-cell office:value-type="float" office:value="530" calcext:value-type="float">
            <text:p>5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6S" calcext:value-type="time">
            <text:p>12:25:16</text:p>
          </table:table-cell>
          <table:table-cell office:value-type="float" office:value="462" calcext:value-type="float">
            <text:p>46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8S" calcext:value-type="time">
            <text:p>12:25:18</text:p>
          </table:table-cell>
          <table:table-cell office:value-type="float" office:value="450" calcext:value-type="float">
            <text:p>4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0S" calcext:value-type="time">
            <text:p>12:25:20</text:p>
          </table:table-cell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2S" calcext:value-type="time">
            <text:p>12:25:22</text:p>
          </table:table-cell>
          <table:table-cell office:value-type="float" office:value="382" calcext:value-type="float">
            <text:p>38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4S" calcext:value-type="time">
            <text:p>12:25:24</text:p>
          </table:table-cell>
          <table:table-cell office:value-type="float" office:value="471" calcext:value-type="float">
            <text:p>47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7S" calcext:value-type="time">
            <text:p>12:25:27</text:p>
          </table:table-cell>
          <table:table-cell office:value-type="float" office:value="501" calcext:value-type="float">
            <text:p>5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9S" calcext:value-type="time">
            <text:p>12:25:29</text:p>
          </table:table-cell>
          <table:table-cell office:value-type="float" office:value="428" calcext:value-type="float">
            <text:p>4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1S" calcext:value-type="time">
            <text:p>12:25:31</text:p>
          </table:table-cell>
          <table:table-cell office:value-type="float" office:value="443" calcext:value-type="float">
            <text:p>4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3S" calcext:value-type="time">
            <text:p>12:25:33</text:p>
          </table:table-cell>
          <table:table-cell office:value-type="float" office:value="452" calcext:value-type="float">
            <text:p>4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5S" calcext:value-type="time">
            <text:p>12:25:35</text:p>
          </table:table-cell>
          <table:table-cell office:value-type="float" office:value="373" calcext:value-type="float">
            <text:p>37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7S" calcext:value-type="time">
            <text:p>12:25:37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9S" calcext:value-type="time">
            <text:p>12:25:39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1S" calcext:value-type="time">
            <text:p>12:25:41</text:p>
          </table:table-cell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3S" calcext:value-type="time">
            <text:p>12:25:43</text:p>
          </table:table-cell>
          <table:table-cell office:value-type="float" office:value="150" calcext:value-type="float">
            <text:p>15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5S" calcext:value-type="time">
            <text:p>12:25:45</text:p>
          </table:table-cell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285" calcext:value-type="float">
            <text:p>28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0S" calcext:value-type="time">
            <text:p>12:25:50</text:p>
          </table:table-cell>
          <table:table-cell office:value-type="float" office:value="651" calcext:value-type="float">
            <text:p>65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2S" calcext:value-type="time">
            <text:p>12:25:52</text:p>
          </table:table-cell>
          <table:table-cell office:value-type="float" office:value="487" calcext:value-type="float">
            <text:p>48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4S" calcext:value-type="time">
            <text:p>12:25:54</text:p>
          </table:table-cell>
          <table:table-cell office:value-type="float" office:value="596" calcext:value-type="float">
            <text:p>5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6S" calcext:value-type="time">
            <text:p>12:25:56</text:p>
          </table:table-cell>
          <table:table-cell office:value-type="float" office:value="489" calcext:value-type="float">
            <text:p>4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8S" calcext:value-type="time">
            <text:p>12:25:58</text:p>
          </table:table-cell>
          <table:table-cell office:value-type="float" office:value="455" calcext:value-type="float">
            <text:p>45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439" calcext:value-type="float">
            <text:p>43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4S" calcext:value-type="time">
            <text:p>12:26:04</text:p>
          </table:table-cell>
          <table:table-cell office:value-type="float" office:value="518" calcext:value-type="float">
            <text:p>5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6S" calcext:value-type="time">
            <text:p>12:26:06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8S" calcext:value-type="time">
            <text:p>12:26:08</text:p>
          </table:table-cell>
          <table:table-cell office:value-type="float" office:value="582" calcext:value-type="float">
            <text:p>5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0S" calcext:value-type="time">
            <text:p>12:26:10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3S" calcext:value-type="time">
            <text:p>12:26:13</text:p>
          </table:table-cell>
          <table:table-cell office:value-type="float" office:value="432" calcext:value-type="float">
            <text:p>43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5S" calcext:value-type="time">
            <text:p>12:26:15</text:p>
          </table:table-cell>
          <table:table-cell office:value-type="float" office:value="715" calcext:value-type="float">
            <text:p>7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572" calcext:value-type="float">
            <text:p>5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9S" calcext:value-type="time">
            <text:p>12:26:19</text:p>
          </table:table-cell>
          <table:table-cell office:value-type="float" office:value="497" calcext:value-type="float">
            <text:p>49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1S" calcext:value-type="time">
            <text:p>12:26:21</text:p>
          </table:table-cell>
          <table:table-cell office:value-type="float" office:value="539" calcext:value-type="float">
            <text:p>53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3S" calcext:value-type="time">
            <text:p>12:26:23</text:p>
          </table:table-cell>
          <table:table-cell office:value-type="float" office:value="657" calcext:value-type="float">
            <text:p>65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5S" calcext:value-type="time">
            <text:p>12:26:25</text:p>
          </table:table-cell>
          <table:table-cell office:value-type="float" office:value="783" calcext:value-type="float">
            <text:p>7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7S" calcext:value-type="time">
            <text:p>12:26:27</text:p>
          </table:table-cell>
          <table:table-cell office:value-type="float" office:value="414" calcext:value-type="float">
            <text:p>41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9S" calcext:value-type="time">
            <text:p>12:26:29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1S" calcext:value-type="time">
            <text:p>12:26:31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4S" calcext:value-type="time">
            <text:p>12:26:34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8S" calcext:value-type="time">
            <text:p>12:26:38</text:p>
          </table:table-cell>
          <table:table-cell office:value-type="float" office:value="628" calcext:value-type="float">
            <text:p>6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0S" calcext:value-type="time">
            <text:p>12:26:40</text:p>
          </table:table-cell>
          <table:table-cell office:value-type="float" office:value="666" calcext:value-type="float">
            <text:p>6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2S" calcext:value-type="time">
            <text:p>12:26:42</text:p>
          </table:table-cell>
          <table:table-cell office:value-type="float" office:value="765" calcext:value-type="float">
            <text:p>7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4S" calcext:value-type="time">
            <text:p>12:26:44</text:p>
          </table:table-cell>
          <table:table-cell office:value-type="float" office:value="495" calcext:value-type="float">
            <text:p>49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6S" calcext:value-type="time">
            <text:p>12:26:46</text:p>
          </table:table-cell>
          <table:table-cell office:value-type="float" office:value="569" calcext:value-type="float">
            <text:p>5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8S" calcext:value-type="time">
            <text:p>12:26:48</text:p>
          </table:table-cell>
          <table:table-cell office:value-type="float" office:value="429" calcext:value-type="float">
            <text:p>4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0S" calcext:value-type="time">
            <text:p>12:26:50</text:p>
          </table:table-cell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3S" calcext:value-type="time">
            <text:p>12:26:53</text:p>
          </table:table-cell>
          <table:table-cell office:value-type="float" office:value="556" calcext:value-type="float">
            <text:p>5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5S" calcext:value-type="time">
            <text:p>12:26:55</text:p>
          </table:table-cell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7S" calcext:value-type="time">
            <text:p>12:26:57</text:p>
          </table:table-cell>
          <table:table-cell office:value-type="float" office:value="457" calcext:value-type="float">
            <text:p>45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9S" calcext:value-type="time">
            <text:p>12:26:59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1S" calcext:value-type="time">
            <text:p>12:27:01</text:p>
          </table:table-cell>
          <table:table-cell office:value-type="float" office:value="409" calcext:value-type="float">
            <text:p>4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3S" calcext:value-type="time">
            <text:p>12:27:03</text:p>
          </table:table-cell>
          <table:table-cell office:value-type="float" office:value="605" calcext:value-type="float">
            <text:p>6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5S" calcext:value-type="time">
            <text:p>12:27:05</text:p>
          </table:table-cell>
          <table:table-cell office:value-type="float" office:value="532" calcext:value-type="float">
            <text:p>5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7S" calcext:value-type="time">
            <text:p>12:27:07</text:p>
          </table:table-cell>
          <table:table-cell office:value-type="float" office:value="547" calcext:value-type="float">
            <text:p>5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0S" calcext:value-type="time">
            <text:p>12:27:10</text:p>
          </table:table-cell>
          <table:table-cell office:value-type="float" office:value="412" calcext:value-type="float">
            <text:p>41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2S" calcext:value-type="time">
            <text:p>12:27:12</text:p>
          </table:table-cell>
          <table:table-cell office:value-type="float" office:value="499" calcext:value-type="float">
            <text:p>4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4S" calcext:value-type="time">
            <text:p>12:27:14</text:p>
          </table:table-cell>
          <table:table-cell office:value-type="float" office:value="599" calcext:value-type="float">
            <text:p>59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6S" calcext:value-type="time">
            <text:p>12:27:16</text:p>
          </table:table-cell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8S" calcext:value-type="time">
            <text:p>12:27:18</text:p>
          </table:table-cell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0S" calcext:value-type="time">
            <text:p>12:27:20</text:p>
          </table:table-cell>
          <table:table-cell office:value-type="float" office:value="216" calcext:value-type="float">
            <text:p>21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2S" calcext:value-type="time">
            <text:p>12:27:22</text:p>
          </table:table-cell>
          <table:table-cell office:value-type="float" office:value="528" calcext:value-type="float">
            <text:p>5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4S" calcext:value-type="time">
            <text:p>12:27:24</text:p>
          </table:table-cell>
          <table:table-cell office:value-type="float" office:value="502" calcext:value-type="float">
            <text:p>5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7S" calcext:value-type="time">
            <text:p>12:27:27</text:p>
          </table:table-cell>
          <table:table-cell office:value-type="float" office:value="312" calcext:value-type="float">
            <text:p>3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9S" calcext:value-type="time">
            <text:p>12:27:29</text:p>
          </table:table-cell>
          <table:table-cell office:value-type="float" office:value="495" calcext:value-type="float">
            <text:p>49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1S" calcext:value-type="time">
            <text:p>12:27:31</text:p>
          </table:table-cell>
          <table:table-cell office:value-type="float" office:value="471" calcext:value-type="float">
            <text:p>4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3S" calcext:value-type="time">
            <text:p>12:27:33</text:p>
          </table:table-cell>
          <table:table-cell office:value-type="float" office:value="785" calcext:value-type="float">
            <text:p>7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5S" calcext:value-type="time">
            <text:p>12:27:3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7S" calcext:value-type="time">
            <text:p>12:27:37</text:p>
          </table:table-cell>
          <table:table-cell office:value-type="float" office:value="413" calcext:value-type="float">
            <text:p>41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9S" calcext:value-type="time">
            <text:p>12:27:39</text:p>
          </table:table-cell>
          <table:table-cell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1S" calcext:value-type="time">
            <text:p>12:27:41</text:p>
          </table:table-cell>
          <table:table-cell office:value-type="float" office:value="567" calcext:value-type="float">
            <text:p>5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4S" calcext:value-type="time">
            <text:p>12:27:44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6S" calcext:value-type="time">
            <text:p>12:27:46</text:p>
          </table:table-cell>
          <table:table-cell office:value-type="float" office:value="367" calcext:value-type="float">
            <text:p>36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8S" calcext:value-type="time">
            <text:p>12:27:48</text:p>
          </table:table-cell>
          <table:table-cell office:value-type="float" office:value="404" calcext:value-type="float">
            <text:p>4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0S" calcext:value-type="time">
            <text:p>12:27:50</text:p>
          </table:table-cell>
          <table:table-cell office:value-type="float" office:value="425" calcext:value-type="float">
            <text:p>4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2S" calcext:value-type="time">
            <text:p>12:27:52</text:p>
          </table:table-cell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4S" calcext:value-type="time">
            <text:p>12:27:54</text:p>
          </table:table-cell>
          <table:table-cell office:value-type="float" office:value="555" calcext:value-type="float">
            <text:p>5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523" calcext:value-type="float">
            <text:p>5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9S" calcext:value-type="time">
            <text:p>12:27:59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1S" calcext:value-type="time">
            <text:p>12:28:01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3S" calcext:value-type="time">
            <text:p>12:28:03</text:p>
          </table:table-cell>
          <table:table-cell office:value-type="float" office:value="517" calcext:value-type="float">
            <text:p>51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5S" calcext:value-type="time">
            <text:p>12:28:05</text:p>
          </table:table-cell>
          <table:table-cell office:value-type="float" office:value="514" calcext:value-type="float">
            <text:p>51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7S" calcext:value-type="time">
            <text:p>12:28:07</text:p>
          </table:table-cell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9S" calcext:value-type="time">
            <text:p>12:28:09</text:p>
          </table:table-cell>
          <table:table-cell office:value-type="float" office:value="454" calcext:value-type="float">
            <text:p>4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1S" calcext:value-type="time">
            <text:p>12:28:11</text:p>
          </table:table-cell>
          <table:table-cell office:value-type="float" office:value="530" calcext:value-type="float">
            <text:p>5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4S" calcext:value-type="time">
            <text:p>12:28:14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6S" calcext:value-type="time">
            <text:p>12:28:16</text:p>
          </table:table-cell>
          <table:table-cell office:value-type="float" office:value="644" calcext:value-type="float">
            <text:p>6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8S" calcext:value-type="time">
            <text:p>12:28:18</text:p>
          </table:table-cell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0S" calcext:value-type="time">
            <text:p>12:28:20</text:p>
          </table:table-cell>
          <table:table-cell office:value-type="float" office:value="549" calcext:value-type="float">
            <text:p>54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2S" calcext:value-type="time">
            <text:p>12:28:22</text:p>
          </table:table-cell>
          <table:table-cell office:value-type="float" office:value="543" calcext:value-type="float">
            <text:p>5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4S" calcext:value-type="time">
            <text:p>12:28:24</text:p>
          </table:table-cell>
          <table:table-cell office:value-type="float" office:value="598" calcext:value-type="float">
            <text:p>59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6S" calcext:value-type="time">
            <text:p>12:28:26</text:p>
          </table:table-cell>
          <table:table-cell office:value-type="float" office:value="607" calcext:value-type="float">
            <text:p>60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9S" calcext:value-type="time">
            <text:p>12:28:29</text:p>
          </table:table-cell>
          <table:table-cell office:value-type="float" office:value="624" calcext:value-type="float">
            <text:p>6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1S" calcext:value-type="time">
            <text:p>12:28:31</text:p>
          </table:table-cell>
          <table:table-cell office:value-type="float" office:value="610" calcext:value-type="float">
            <text:p>61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3S" calcext:value-type="time">
            <text:p>12:28:33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5S" calcext:value-type="time">
            <text:p>12:28:35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7S" calcext:value-type="time">
            <text:p>12:28:37</text:p>
          </table:table-cell>
          <table:table-cell office:value-type="float" office:value="494" calcext:value-type="float">
            <text:p>49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9S" calcext:value-type="time">
            <text:p>12:28:39</text:p>
          </table:table-cell>
          <table:table-cell office:value-type="float" office:value="535" calcext:value-type="float">
            <text:p>5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2S" calcext:value-type="time">
            <text:p>12:28:42</text:p>
          </table:table-cell>
          <table:table-cell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4S" calcext:value-type="time">
            <text:p>12:28:44</text:p>
          </table:table-cell>
          <table:table-cell office:value-type="float" office:value="600" calcext:value-type="float">
            <text:p>6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6S" calcext:value-type="time">
            <text:p>12:28:46</text:p>
          </table:table-cell>
          <table:table-cell office:value-type="float" office:value="425" calcext:value-type="float">
            <text:p>4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8S" calcext:value-type="time">
            <text:p>12:28:48</text:p>
          </table:table-cell>
          <table:table-cell office:value-type="float" office:value="515" calcext:value-type="float">
            <text:p>5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0S" calcext:value-type="time">
            <text:p>12:28:50</text:p>
          </table:table-cell>
          <table:table-cell office:value-type="float" office:value="550" calcext:value-type="float">
            <text:p>5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2S" calcext:value-type="time">
            <text:p>12:28:52</text:p>
          </table:table-cell>
          <table:table-cell office:value-type="float" office:value="228" calcext:value-type="float">
            <text:p>22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4S" calcext:value-type="time">
            <text:p>12:28:54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9S" calcext:value-type="time">
            <text:p>12:28:59</text:p>
          </table:table-cell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1S" calcext:value-type="time">
            <text:p>12:29:01</text:p>
          </table:table-cell>
          <table:table-cell office:value-type="float" office:value="501" calcext:value-type="float">
            <text:p>5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3S" calcext:value-type="time">
            <text:p>12:29:03</text:p>
          </table:table-cell>
          <table:table-cell office:value-type="float" office:value="518" calcext:value-type="float">
            <text:p>5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5S" calcext:value-type="time">
            <text:p>12:29:05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7S" calcext:value-type="time">
            <text:p>12:29:07</text:p>
          </table:table-cell>
          <table:table-cell office:value-type="float" office:value="426" calcext:value-type="float">
            <text:p>4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0S" calcext:value-type="time">
            <text:p>12:29:10</text:p>
          </table:table-cell>
          <table:table-cell office:value-type="float" office:value="404" calcext:value-type="float">
            <text:p>4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2S" calcext:value-type="time">
            <text:p>12:29:12</text:p>
          </table:table-cell>
          <table:table-cell office:value-type="float" office:value="486" calcext:value-type="float">
            <text:p>48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4S" calcext:value-type="time">
            <text:p>12:29:14</text:p>
          </table:table-cell>
          <table:table-cell office:value-type="float" office:value="555" calcext:value-type="float">
            <text:p>5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6S" calcext:value-type="time">
            <text:p>12:29:16</text:p>
          </table:table-cell>
          <table:table-cell office:value-type="float" office:value="654" calcext:value-type="float">
            <text:p>6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8S" calcext:value-type="time">
            <text:p>12:29:18</text:p>
          </table:table-cell>
          <table:table-cell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1S" calcext:value-type="time">
            <text:p>12:29:21</text:p>
          </table:table-cell>
          <table:table-cell office:value-type="float" office:value="559" calcext:value-type="float">
            <text:p>5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3S" calcext:value-type="time">
            <text:p>12:29:23</text:p>
          </table:table-cell>
          <table:table-cell office:value-type="float" office:value="501" calcext:value-type="float">
            <text:p>5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5S" calcext:value-type="time">
            <text:p>12:29:25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7S" calcext:value-type="time">
            <text:p>12:29:27</text:p>
          </table:table-cell>
          <table:table-cell office:value-type="float" office:value="531" calcext:value-type="float">
            <text:p>53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9S" calcext:value-type="time">
            <text:p>12:29:29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1S" calcext:value-type="time">
            <text:p>12:29:31</text:p>
          </table:table-cell>
          <table:table-cell office:value-type="float" office:value="245" calcext:value-type="float">
            <text:p>2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4S" calcext:value-type="time">
            <text:p>12:29:34</text:p>
          </table:table-cell>
          <table:table-cell office:value-type="float" office:value="461" calcext:value-type="float">
            <text:p>46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6S" calcext:value-type="time">
            <text:p>12:29:36</text:p>
          </table:table-cell>
          <table:table-cell office:value-type="float" office:value="459" calcext:value-type="float">
            <text:p>45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8S" calcext:value-type="time">
            <text:p>12:29:38</text:p>
          </table:table-cell>
          <table:table-cell office:value-type="float" office:value="722" calcext:value-type="float">
            <text:p>72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0S" calcext:value-type="time">
            <text:p>12:29:40</text:p>
          </table:table-cell>
          <table:table-cell office:value-type="float" office:value="497" calcext:value-type="float">
            <text:p>4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2S" calcext:value-type="time">
            <text:p>12:29:42</text:p>
          </table:table-cell>
          <table:table-cell office:value-type="float" office:value="528" calcext:value-type="float">
            <text:p>5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4S" calcext:value-type="time">
            <text:p>12:29:44</text:p>
          </table:table-cell>
          <table:table-cell office:value-type="float" office:value="277" calcext:value-type="float">
            <text:p>2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7S" calcext:value-type="time">
            <text:p>12:29:47</text:p>
          </table:table-cell>
          <table:table-cell office:value-type="float" office:value="390" calcext:value-type="float">
            <text:p>3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9S" calcext:value-type="time">
            <text:p>12:29:49</text:p>
          </table:table-cell>
          <table:table-cell office:value-type="float" office:value="263" calcext:value-type="float">
            <text:p>2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1S" calcext:value-type="time">
            <text:p>12:29:51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3S" calcext:value-type="time">
            <text:p>12:29:53</text:p>
          </table:table-cell>
          <table:table-cell office:value-type="float" office:value="548" calcext:value-type="float">
            <text:p>54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5S" calcext:value-type="time">
            <text:p>12:29:55</text:p>
          </table:table-cell>
          <table:table-cell office:value-type="float" office:value="92" calcext:value-type="float">
            <text:p>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8S" calcext:value-type="time">
            <text:p>12:29:58</text:p>
          </table:table-cell>
          <table:table-cell office:value-type="float" office:value="382" calcext:value-type="float">
            <text:p>3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540" calcext:value-type="float">
            <text:p>5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2S" calcext:value-type="time">
            <text:p>12:30:02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4S" calcext:value-type="time">
            <text:p>12:30:04</text:p>
          </table:table-cell>
          <table:table-cell office:value-type="float" office:value="658" calcext:value-type="float">
            <text:p>6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6S" calcext:value-type="time">
            <text:p>12:30:06</text:p>
          </table:table-cell>
          <table:table-cell office:value-type="float" office:value="413" calcext:value-type="float">
            <text:p>4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9S" calcext:value-type="time">
            <text:p>12:30:09</text:p>
          </table:table-cell>
          <table:table-cell office:value-type="float" office:value="581" calcext:value-type="float">
            <text:p>58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1S" calcext:value-type="time">
            <text:p>12:30:11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3S" calcext:value-type="time">
            <text:p>12:30:13</text:p>
          </table:table-cell>
          <table:table-cell office:value-type="float" office:value="371" calcext:value-type="float">
            <text:p>37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5S" calcext:value-type="time">
            <text:p>12:30:15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7S" calcext:value-type="time">
            <text:p>12:30:17</text:p>
          </table:table-cell>
          <table:table-cell office:value-type="float" office:value="475" calcext:value-type="float">
            <text:p>4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9S" calcext:value-type="time">
            <text:p>12:30:19</text:p>
          </table:table-cell>
          <table:table-cell office:value-type="float" office:value="410" calcext:value-type="float">
            <text:p>4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2S" calcext:value-type="time">
            <text:p>12:30:22</text:p>
          </table:table-cell>
          <table:table-cell office:value-type="float" office:value="390" calcext:value-type="float">
            <text:p>3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5S" calcext:value-type="time">
            <text:p>12:30:25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7S" calcext:value-type="time">
            <text:p>12:30:27</text:p>
          </table:table-cell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9S" calcext:value-type="time">
            <text:p>12:30:29</text:p>
          </table:table-cell>
          <table:table-cell office:value-type="float" office:value="509" calcext:value-type="float">
            <text:p>50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1S" calcext:value-type="time">
            <text:p>12:30:31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6S" calcext:value-type="time">
            <text:p>12:30:36</text:p>
          </table:table-cell>
          <table:table-cell office:value-type="float" office:value="427" calcext:value-type="float">
            <text:p>42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8S" calcext:value-type="time">
            <text:p>12:30:38</text:p>
          </table:table-cell>
          <table:table-cell office:value-type="float" office:value="580" calcext:value-type="float">
            <text:p>58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0S" calcext:value-type="time">
            <text:p>12:30:40</text:p>
          </table:table-cell>
          <table:table-cell office:value-type="float" office:value="233" calcext:value-type="float">
            <text:p>23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2S" calcext:value-type="time">
            <text:p>12:30:42</text:p>
          </table:table-cell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4S" calcext:value-type="time">
            <text:p>12:30:44</text:p>
          </table:table-cell>
          <table:table-cell office:value-type="float" office:value="656" calcext:value-type="float">
            <text:p>65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7S" calcext:value-type="time">
            <text:p>12:30:47</text:p>
          </table:table-cell>
          <table:table-cell office:value-type="float" office:value="387" calcext:value-type="float">
            <text:p>3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9S" calcext:value-type="time">
            <text:p>12:30:49</text:p>
          </table:table-cell>
          <table:table-cell office:value-type="float" office:value="537" calcext:value-type="float">
            <text:p>53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1S" calcext:value-type="time">
            <text:p>12:30:51</text:p>
          </table:table-cell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3S" calcext:value-type="time">
            <text:p>12:30:53</text:p>
          </table:table-cell>
          <table:table-cell office:value-type="float" office:value="608" calcext:value-type="float">
            <text:p>60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5S" calcext:value-type="time">
            <text:p>12:30:55</text:p>
          </table:table-cell>
          <table:table-cell office:value-type="float" office:value="516" calcext:value-type="float">
            <text:p>5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8S" calcext:value-type="time">
            <text:p>12:30:58</text:p>
          </table:table-cell>
          <table:table-cell office:value-type="float" office:value="284" calcext:value-type="float">
            <text:p>2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0S" calcext:value-type="time">
            <text:p>12:31:00</text:p>
          </table:table-cell>
          <table:table-cell office:value-type="float" office:value="500" calcext:value-type="float">
            <text:p>5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2S" calcext:value-type="time">
            <text:p>12:31:02</text:p>
          </table:table-cell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4S" calcext:value-type="time">
            <text:p>12:31:04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6S" calcext:value-type="time">
            <text:p>12:31:06</text:p>
          </table:table-cell>
          <table:table-cell office:value-type="float" office:value="422" calcext:value-type="float">
            <text:p>42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9S" calcext:value-type="time">
            <text:p>12:31:09</text:p>
          </table:table-cell>
          <table:table-cell office:value-type="float" office:value="609" calcext:value-type="float">
            <text:p>60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1S" calcext:value-type="time">
            <text:p>12:31:11</text:p>
          </table:table-cell>
          <table:table-cell office:value-type="float" office:value="626" calcext:value-type="float">
            <text:p>6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3S" calcext:value-type="time">
            <text:p>12:31:13</text:p>
          </table:table-cell>
          <table:table-cell office:value-type="float" office:value="421" calcext:value-type="float">
            <text:p>4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5S" calcext:value-type="time">
            <text:p>12:31:15</text:p>
          </table:table-cell>
          <table:table-cell office:value-type="float" office:value="502" calcext:value-type="float">
            <text:p>5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8S" calcext:value-type="time">
            <text:p>12:31:18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0S" calcext:value-type="time">
            <text:p>12:31:20</text:p>
          </table:table-cell>
          <table:table-cell office:value-type="float" office:value="490" calcext:value-type="float">
            <text:p>49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4S" calcext:value-type="time">
            <text:p>12:31:24</text:p>
          </table:table-cell>
          <table:table-cell office:value-type="float" office:value="532" calcext:value-type="float">
            <text:p>5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6S" calcext:value-type="time">
            <text:p>12:31:26</text:p>
          </table:table-cell>
          <table:table-cell office:value-type="float" office:value="628" calcext:value-type="float">
            <text:p>62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9S" calcext:value-type="time">
            <text:p>12:31:29</text:p>
          </table:table-cell>
          <table:table-cell office:value-type="float" office:value="397" calcext:value-type="float">
            <text:p>3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1S" calcext:value-type="time">
            <text:p>12:31:31</text:p>
          </table:table-cell>
          <table:table-cell office:value-type="float" office:value="424" calcext:value-type="float">
            <text:p>42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3S" calcext:value-type="time">
            <text:p>12:31:33</text:p>
          </table:table-cell>
          <table:table-cell office:value-type="float" office:value="479" calcext:value-type="float">
            <text:p>4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5S" calcext:value-type="time">
            <text:p>12:31:35</text:p>
          </table:table-cell>
          <table:table-cell office:value-type="float" office:value="219" calcext:value-type="float">
            <text:p>21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8S" calcext:value-type="time">
            <text:p>12:31:38</text:p>
          </table:table-cell>
          <table:table-cell office:value-type="float" office:value="347" calcext:value-type="float">
            <text:p>3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0S" calcext:value-type="time">
            <text:p>12:31:40</text:p>
          </table:table-cell>
          <table:table-cell office:value-type="float" office:value="671" calcext:value-type="float">
            <text:p>67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2S" calcext:value-type="time">
            <text:p>12:31:42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4S" calcext:value-type="time">
            <text:p>12:31:44</text:p>
          </table:table-cell>
          <table:table-cell office:value-type="float" office:value="576" calcext:value-type="float">
            <text:p>5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6S" calcext:value-type="time">
            <text:p>12:31:46</text:p>
          </table:table-cell>
          <table:table-cell office:value-type="float" office:value="447" calcext:value-type="float">
            <text:p>4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9S" calcext:value-type="time">
            <text:p>12:31:49</text:p>
          </table:table-cell>
          <table:table-cell office:value-type="float" office:value="361" calcext:value-type="float">
            <text:p>3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1S" calcext:value-type="time">
            <text:p>12:31:51</text:p>
          </table:table-cell>
          <table:table-cell office:value-type="float" office:value="411" calcext:value-type="float">
            <text:p>41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3S" calcext:value-type="time">
            <text:p>12:31:53</text:p>
          </table:table-cell>
          <table:table-cell office:value-type="float" office:value="251" calcext:value-type="float">
            <text:p>25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5S" calcext:value-type="time">
            <text:p>12:31:55</text:p>
          </table:table-cell>
          <table:table-cell office:value-type="float" office:value="398" calcext:value-type="float">
            <text:p>39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8S" calcext:value-type="time">
            <text:p>12:31:58</text:p>
          </table:table-cell>
          <table:table-cell office:value-type="float" office:value="359" calcext:value-type="float">
            <text:p>35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0S" calcext:value-type="time">
            <text:p>12:32:00</text:p>
          </table:table-cell>
          <table:table-cell office:value-type="float" office:value="507" calcext:value-type="float">
            <text:p>5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2S" calcext:value-type="time">
            <text:p>12:32:02</text:p>
          </table:table-cell>
          <table:table-cell office:value-type="float" office:value="125" calcext:value-type="float">
            <text:p>12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4S" calcext:value-type="time">
            <text:p>12:32:04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7S" calcext:value-type="time">
            <text:p>12:32:07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9S" calcext:value-type="time">
            <text:p>12:32:09</text:p>
          </table:table-cell>
          <table:table-cell office:value-type="float" office:value="270" calcext:value-type="float">
            <text:p>27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1S" calcext:value-type="time">
            <text:p>12:32:11</text:p>
          </table:table-cell>
          <table:table-cell office:value-type="float" office:value="542" calcext:value-type="float">
            <text:p>54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3S" calcext:value-type="time">
            <text:p>12:32:13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5S" calcext:value-type="time">
            <text:p>12:32:15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8S" calcext:value-type="time">
            <text:p>12:32:18</text:p>
          </table:table-cell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447" calcext:value-type="float">
            <text:p>4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2S" calcext:value-type="time">
            <text:p>12:32:2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4S" calcext:value-type="time">
            <text:p>12:32:24</text:p>
          </table:table-cell>
          <table:table-cell office:value-type="float" office:value="307" calcext:value-type="float">
            <text:p>3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7S" calcext:value-type="time">
            <text:p>12:32:27</text:p>
          </table:table-cell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9S" calcext:value-type="time">
            <text:p>12:32:29</text:p>
          </table:table-cell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1S" calcext:value-type="time">
            <text:p>12:32:31</text:p>
          </table:table-cell>
          <table:table-cell office:value-type="float" office:value="351" calcext:value-type="float">
            <text:p>3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3S" calcext:value-type="time">
            <text:p>12:32:33</text:p>
          </table:table-cell>
          <table:table-cell office:value-type="float" office:value="309" calcext:value-type="float">
            <text:p>30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6S" calcext:value-type="time">
            <text:p>12:32:36</text:p>
          </table:table-cell>
          <table:table-cell office:value-type="float" office:value="540" calcext:value-type="float">
            <text:p>5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8S" calcext:value-type="time">
            <text:p>12:32:38</text:p>
          </table:table-cell>
          <table:table-cell office:value-type="float" office:value="186" calcext:value-type="float">
            <text:p>1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0S" calcext:value-type="time">
            <text:p>12:32:40</text:p>
          </table:table-cell>
          <table:table-cell office:value-type="float" office:value="370" calcext:value-type="float">
            <text:p>3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2S" calcext:value-type="time">
            <text:p>12:32:42</text:p>
          </table:table-cell>
          <table:table-cell office:value-type="float" office:value="510" calcext:value-type="float">
            <text:p>5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5S" calcext:value-type="time">
            <text:p>12:32:45</text:p>
          </table:table-cell>
          <table:table-cell office:value-type="float" office:value="373" calcext:value-type="float">
            <text:p>37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9S" calcext:value-type="time">
            <text:p>12:32:49</text:p>
          </table:table-cell>
          <table:table-cell office:value-type="float" office:value="117" calcext:value-type="float">
            <text:p>11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1S" calcext:value-type="time">
            <text:p>12:32:51</text:p>
          </table:table-cell>
          <table:table-cell office:value-type="float" office:value="164" calcext:value-type="float">
            <text:p>16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4S" calcext:value-type="time">
            <text:p>12:32:5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6S" calcext:value-type="time">
            <text:p>12:32:56</text:p>
          </table:table-cell>
          <table:table-cell office:value-type="float" office:value="81" calcext:value-type="float">
            <text:p>8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8S" calcext:value-type="time">
            <text:p>12:32:58</text:p>
          </table:table-cell>
          <table:table-cell office:value-type="float" office:value="422" calcext:value-type="float">
            <text:p>4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0S" calcext:value-type="time">
            <text:p>12:33:00</text:p>
          </table:table-cell>
          <table:table-cell office:value-type="float" office:value="195" calcext:value-type="float">
            <text:p>19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3S" calcext:value-type="time">
            <text:p>12:33:03</text:p>
          </table:table-cell>
          <table:table-cell office:value-type="float" office:value="385" calcext:value-type="float">
            <text:p>38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5S" calcext:value-type="time">
            <text:p>12:33:05</text:p>
          </table:table-cell>
          <table:table-cell office:value-type="float" office:value="257" calcext:value-type="float">
            <text:p>25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7S" calcext:value-type="time">
            <text:p>12:33:07</text:p>
          </table:table-cell>
          <table:table-cell office:value-type="float" office:value="459" calcext:value-type="float">
            <text:p>4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9S" calcext:value-type="time">
            <text:p>12:33:09</text:p>
          </table:table-cell>
          <table:table-cell office:value-type="float" office:value="27" calcext:value-type="float">
            <text:p>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2S" calcext:value-type="time">
            <text:p>12:33: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4S" calcext:value-type="time">
            <text:p>12:33:14</text:p>
          </table:table-cell>
          <table:table-cell office:value-type="float" office:value="448" calcext:value-type="float">
            <text:p>4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6S" calcext:value-type="time">
            <text:p>12:33:16</text:p>
          </table:table-cell>
          <table:table-cell office:value-type="float" office:value="373" calcext:value-type="float">
            <text:p>3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8S" calcext:value-type="time">
            <text:p>12:33:18</text:p>
          </table:table-cell>
          <table:table-cell office:value-type="float" office:value="477" calcext:value-type="float">
            <text:p>47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1S" calcext:value-type="time">
            <text:p>12:33:21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3S" calcext:value-type="time">
            <text:p>12:33:23</text:p>
          </table:table-cell>
          <table:table-cell office:value-type="float" office:value="322" calcext:value-type="float">
            <text:p>3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5S" calcext:value-type="time">
            <text:p>12:33:25</text:p>
          </table:table-cell>
          <table:table-cell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8S" calcext:value-type="time">
            <text:p>12:33:28</text:p>
          </table:table-cell>
          <table:table-cell office:value-type="float" office:value="208" calcext:value-type="float">
            <text:p>20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0S" calcext:value-type="time">
            <text:p>12:33:30</text:p>
          </table:table-cell>
          <table:table-cell office:value-type="float" office:value="385" calcext:value-type="float">
            <text:p>38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2S" calcext:value-type="time">
            <text:p>12:33:32</text:p>
          </table:table-cell>
          <table:table-cell office:value-type="float" office:value="427" calcext:value-type="float">
            <text:p>42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4S" calcext:value-type="time">
            <text:p>12:33:34</text:p>
          </table:table-cell>
          <table:table-cell office:value-type="float" office:value="597" calcext:value-type="float">
            <text:p>59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7S" calcext:value-type="time">
            <text:p>12:33:37</text:p>
          </table:table-cell>
          <table:table-cell office:value-type="float" office:value="357" calcext:value-type="float">
            <text:p>3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9S" calcext:value-type="time">
            <text:p>12:33:39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807" calcext:value-type="float">
            <text:p>80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3S" calcext:value-type="time">
            <text:p>12:33:43</text:p>
          </table:table-cell>
          <table:table-cell office:value-type="float" office:value="410" calcext:value-type="float">
            <text:p>4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6S" calcext:value-type="time">
            <text:p>12:33:46</text:p>
          </table:table-cell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8S" calcext:value-type="time">
            <text:p>12:33:48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0S" calcext:value-type="time">
            <text:p>12:33:50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2S" calcext:value-type="time">
            <text:p>12:33:52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5S" calcext:value-type="time">
            <text:p>12:33:55</text:p>
          </table:table-cell>
          <table:table-cell office:value-type="float" office:value="183" calcext:value-type="float">
            <text:p>1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7S" calcext:value-type="time">
            <text:p>12:33:57</text:p>
          </table:table-cell>
          <table:table-cell office:value-type="float" office:value="497" calcext:value-type="float">
            <text:p>4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9S" calcext:value-type="time">
            <text:p>12:33:59</text:p>
          </table:table-cell>
          <table:table-cell office:value-type="float" office:value="517" calcext:value-type="float">
            <text:p>51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2S" calcext:value-type="time">
            <text:p>12:34:02</text:p>
          </table:table-cell>
          <table:table-cell office:value-type="float" office:value="169" calcext:value-type="float">
            <text:p>16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4S" calcext:value-type="time">
            <text:p>12:34:04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6S" calcext:value-type="time">
            <text:p>12:34:06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8S" calcext:value-type="time">
            <text:p>12:34:08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1S" calcext:value-type="time">
            <text:p>12:34:11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3S" calcext:value-type="time">
            <text:p>12:34:13</text:p>
          </table:table-cell>
          <table:table-cell office:value-type="float" office:value="597" calcext:value-type="float">
            <text:p>59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5S" calcext:value-type="time">
            <text:p>12:34:15</text:p>
          </table:table-cell>
          <table:table-cell office:value-type="float" office:value="472" calcext:value-type="float">
            <text:p>4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7S" calcext:value-type="time">
            <text:p>12:34:17</text:p>
          </table:table-cell>
          <table:table-cell office:value-type="float" office:value="366" calcext:value-type="float">
            <text:p>36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0S" calcext:value-type="time">
            <text:p>12:34:20</text:p>
          </table:table-cell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2S" calcext:value-type="time">
            <text:p>12:34:22</text:p>
          </table:table-cell>
          <table:table-cell office:value-type="float" office:value="131" calcext:value-type="float">
            <text:p>1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4S" calcext:value-type="time">
            <text:p>12:34:24</text:p>
          </table:table-cell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7S" calcext:value-type="time">
            <text:p>12:34:27</text:p>
          </table:table-cell>
          <table:table-cell office:value-type="float" office:value="136" calcext:value-type="float">
            <text:p>13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9S" calcext:value-type="time">
            <text:p>12:34:29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1S" calcext:value-type="time">
            <text:p>12:34:31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3S" calcext:value-type="time">
            <text:p>12:34:33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6S" calcext:value-type="time">
            <text:p>12:34:3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8S" calcext:value-type="time">
            <text:p>12:34:38</text:p>
          </table:table-cell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0S" calcext:value-type="time">
            <text:p>12:34:40</text:p>
          </table:table-cell>
          <table:table-cell office:value-type="float" office:value="246" calcext:value-type="float">
            <text:p>24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3S" calcext:value-type="time">
            <text:p>12:34:43</text:p>
          </table:table-cell>
          <table:table-cell office:value-type="float" office:value="521" calcext:value-type="float">
            <text:p>5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5S" calcext:value-type="time">
            <text:p>12:34:45</text:p>
          </table:table-cell>
          <table:table-cell office:value-type="float" office:value="339" calcext:value-type="float">
            <text:p>33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7S" calcext:value-type="time">
            <text:p>12:34:47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9S" calcext:value-type="time">
            <text:p>12:34:4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2S" calcext:value-type="time">
            <text:p>12:34:52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4S" calcext:value-type="time">
            <text:p>12:34:54</text:p>
          </table:table-cell>
          <table:table-cell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6S" calcext:value-type="time">
            <text:p>12:34:56</text:p>
          </table:table-cell>
          <table:table-cell office:value-type="float" office:value="776" calcext:value-type="float">
            <text:p>7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9S" calcext:value-type="time">
            <text:p>12:34:59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1S" calcext:value-type="time">
            <text:p>12:35:01</text:p>
          </table:table-cell>
          <table:table-cell office:value-type="float" office:value="139" calcext:value-type="float">
            <text:p>13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3S" calcext:value-type="time">
            <text:p>12:35:03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6S" calcext:value-type="time">
            <text:p>12:35:06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8S" calcext:value-type="time">
            <text:p>12:35:08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0S" calcext:value-type="time">
            <text:p>12:35:10</text:p>
          </table:table-cell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2S" calcext:value-type="time">
            <text:p>12:35:12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5S" calcext:value-type="time">
            <text:p>12:35:15</text:p>
          </table:table-cell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7S" calcext:value-type="time">
            <text:p>12:35:17</text:p>
          </table:table-cell>
          <table:table-cell office:value-type="float" office:value="567" calcext:value-type="float">
            <text:p>5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2S" calcext:value-type="time">
            <text:p>12:35:2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4S" calcext:value-type="time">
            <text:p>12:35:24</text:p>
          </table:table-cell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6S" calcext:value-type="time">
            <text:p>12:35:26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9S" calcext:value-type="time">
            <text:p>12:35:29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1S" calcext:value-type="time">
            <text:p>12:35:31</text:p>
          </table:table-cell>
          <table:table-cell office:value-type="float" office:value="568" calcext:value-type="float">
            <text:p>56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5S" calcext:value-type="time">
            <text:p>12:35:35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8S" calcext:value-type="time">
            <text:p>12:35:38</text:p>
          </table:table-cell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0S" calcext:value-type="time">
            <text:p>12:35:40</text:p>
          </table:table-cell>
          <table:table-cell office:value-type="float" office:value="212" calcext:value-type="float">
            <text:p>21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627" calcext:value-type="float">
            <text:p>6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5S" calcext:value-type="time">
            <text:p>12:35:45</text:p>
          </table:table-cell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7S" calcext:value-type="time">
            <text:p>12:35:47</text:p>
          </table:table-cell>
          <table:table-cell office:value-type="float" office:value="282" calcext:value-type="float">
            <text:p>2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9S" calcext:value-type="time">
            <text:p>12:35:49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2S" calcext:value-type="time">
            <text:p>12:35:52</text:p>
          </table:table-cell>
          <table:table-cell office:value-type="float" office:value="353" calcext:value-type="float">
            <text:p>35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4S" calcext:value-type="time">
            <text:p>12:35:5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6S" calcext:value-type="time">
            <text:p>12:35:56</text:p>
          </table:table-cell>
          <table:table-cell office:value-type="float" office:value="96" calcext:value-type="float">
            <text:p>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9S" calcext:value-type="time">
            <text:p>12:35:59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1S" calcext:value-type="time">
            <text:p>12:36:0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3S" calcext:value-type="time">
            <text:p>12:36:03</text:p>
          </table:table-cell>
          <table:table-cell office:value-type="float" office:value="354" calcext:value-type="float">
            <text:p>3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6S" calcext:value-type="time">
            <text:p>12:36:06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8S" calcext:value-type="time">
            <text:p>12:36:08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0S" calcext:value-type="time">
            <text:p>12:36:10</text:p>
          </table:table-cell>
          <table:table-cell office:value-type="float" office:value="83" calcext:value-type="float">
            <text:p>8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3S" calcext:value-type="time">
            <text:p>12:36:13</text:p>
          </table:table-cell>
          <table:table-cell office:value-type="float" office:value="475" calcext:value-type="float">
            <text:p>47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5S" calcext:value-type="time">
            <text:p>12:36:15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7S" calcext:value-type="time">
            <text:p>12:36:17</text:p>
          </table:table-cell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0S" calcext:value-type="time">
            <text:p>12:36:2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2S" calcext:value-type="time">
            <text:p>12:36:22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4S" calcext:value-type="time">
            <text:p>12:36:24</text:p>
          </table:table-cell>
          <table:table-cell office:value-type="float" office:value="583" calcext:value-type="float">
            <text:p>58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6S" calcext:value-type="time">
            <text:p>12:36:26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143" calcext:value-type="float">
            <text:p>14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1S" calcext:value-type="time">
            <text:p>12:36:31</text:p>
          </table:table-cell>
          <table:table-cell office:value-type="float" office:value="291" calcext:value-type="float">
            <text:p>29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3S" calcext:value-type="time">
            <text:p>12:36:33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6S" calcext:value-type="time">
            <text:p>12:36:3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8S" calcext:value-type="time">
            <text:p>12:36:38</text:p>
          </table:table-cell>
          <table:table-cell office:value-type="float" office:value="39" calcext:value-type="float">
            <text:p>3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0S" calcext:value-type="time">
            <text:p>12:36:40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3S" calcext:value-type="time">
            <text:p>12:36:43</text:p>
          </table:table-cell>
          <table:table-cell office:value-type="float" office:value="149" calcext:value-type="float">
            <text:p>14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5S" calcext:value-type="time">
            <text:p>12:36:45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7S" calcext:value-type="time">
            <text:p>12:36:4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0S" calcext:value-type="time">
            <text:p>12:36:50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2S" calcext:value-type="time">
            <text:p>12:36:52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4S" calcext:value-type="time">
            <text:p>12:36:54</text:p>
          </table:table-cell>
          <table:table-cell office:value-type="float" office:value="241" calcext:value-type="float">
            <text:p>2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7S" calcext:value-type="time">
            <text:p>12:36:5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9S" calcext:value-type="time">
            <text:p>12:36:59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1S" calcext:value-type="time">
            <text:p>12:37: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4S" calcext:value-type="time">
            <text:p>12:37:04</text:p>
          </table:table-cell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6S" calcext:value-type="time">
            <text:p>12:37:06</text:p>
          </table:table-cell>
          <table:table-cell office:value-type="float" office:value="311" calcext:value-type="float">
            <text:p>3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8S" calcext:value-type="time">
            <text:p>12:37:08</text:p>
          </table:table-cell>
          <table:table-cell office:value-type="float" office:value="449" calcext:value-type="float">
            <text:p>44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1S" calcext:value-type="time">
            <text:p>12:37:11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3S" calcext:value-type="time">
            <text:p>12:37:13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5S" calcext:value-type="time">
            <text:p>12:37:15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470" calcext:value-type="float">
            <text:p>47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0S" calcext:value-type="time">
            <text:p>12:37:20</text:p>
          </table:table-cell>
          <table:table-cell office:value-type="float" office:value="316" calcext:value-type="float">
            <text:p>3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3S" calcext:value-type="time">
            <text:p>12:37:23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5S" calcext:value-type="time">
            <text:p>12:37:25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7S" calcext:value-type="time">
            <text:p>12:37:27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0S" calcext:value-type="time">
            <text:p>12:37:30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2S" calcext:value-type="time">
            <text:p>12:37:32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4S" calcext:value-type="time">
            <text:p>12:37:34</text:p>
          </table:table-cell>
          <table:table-cell office:value-type="float" office:value="773" calcext:value-type="float">
            <text:p>7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473" calcext:value-type="float">
            <text:p>47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9S" calcext:value-type="time">
            <text:p>12:37:39</text:p>
          </table:table-cell>
          <table:table-cell office:value-type="float" office:value="481" calcext:value-type="float">
            <text:p>48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1S" calcext:value-type="time">
            <text:p>12:37:41</text:p>
          </table:table-cell>
          <table:table-cell office:value-type="float" office:value="519" calcext:value-type="float">
            <text:p>51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4S" calcext:value-type="time">
            <text:p>12:37:44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6S" calcext:value-type="time">
            <text:p>12:37:4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8S" calcext:value-type="time">
            <text:p>12:37:48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1S" calcext:value-type="time">
            <text:p>12:37:51</text:p>
          </table:table-cell>
          <table:table-cell office:value-type="float" office:value="450" calcext:value-type="float">
            <text:p>4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3S" calcext:value-type="time">
            <text:p>12:37:53</text:p>
          </table:table-cell>
          <table:table-cell office:value-type="float" office:value="421" calcext:value-type="float">
            <text:p>4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5S" calcext:value-type="time">
            <text:p>12:37:55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493" calcext:value-type="float">
            <text:p>4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5S" calcext:value-type="time">
            <text:p>12:38:05</text:p>
          </table:table-cell>
          <table:table-cell office:value-type="float" office:value="548" calcext:value-type="float">
            <text:p>5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7S" calcext:value-type="time">
            <text:p>12:38:07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0S" calcext:value-type="time">
            <text:p>12:38:10</text:p>
          </table:table-cell>
          <table:table-cell office:value-type="float" office:value="783" calcext:value-type="float">
            <text:p>78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2S" calcext:value-type="time">
            <text:p>12:38:12</text:p>
          </table:table-cell>
          <table:table-cell office:value-type="float" office:value="334" calcext:value-type="float">
            <text:p>3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4S" calcext:value-type="time">
            <text:p>12:38:14</text:p>
          </table:table-cell>
          <table:table-cell office:value-type="float" office:value="849" calcext:value-type="float">
            <text:p>84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7S" calcext:value-type="time">
            <text:p>12:38:17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9S" calcext:value-type="time">
            <text:p>12:38:19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1S" calcext:value-type="time">
            <text:p>12:38:21</text:p>
          </table:table-cell>
          <table:table-cell office:value-type="float" office:value="465" calcext:value-type="float">
            <text:p>46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4S" calcext:value-type="time">
            <text:p>12:38:24</text:p>
          </table:table-cell>
          <table:table-cell office:value-type="float" office:value="381" calcext:value-type="float">
            <text:p>38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6S" calcext:value-type="time">
            <text:p>12:38:26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9S" calcext:value-type="time">
            <text:p>12:38:29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1S" calcext:value-type="time">
            <text:p>12:38:31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3S" calcext:value-type="time">
            <text:p>12:38:3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6S" calcext:value-type="time">
            <text:p>12:38:36</text:p>
          </table:table-cell>
          <table:table-cell office:value-type="float" office:value="424" calcext:value-type="float">
            <text:p>4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8S" calcext:value-type="time">
            <text:p>12:38:38</text:p>
          </table:table-cell>
          <table:table-cell office:value-type="float" office:value="641" calcext:value-type="float">
            <text:p>64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0S" calcext:value-type="time">
            <text:p>12:38:40</text:p>
          </table:table-cell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3S" calcext:value-type="time">
            <text:p>12:38:4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5S" calcext:value-type="time">
            <text:p>12:38:45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8S" calcext:value-type="time">
            <text:p>12:38:48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0S" calcext:value-type="time">
            <text:p>12:38:50</text:p>
          </table:table-cell>
          <table:table-cell office:value-type="float" office:value="21" calcext:value-type="float">
            <text:p>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2S" calcext:value-type="time">
            <text:p>12:38:5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5S" calcext:value-type="time">
            <text:p>12:38:55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7S" calcext:value-type="time">
            <text:p>12:38:5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9S" calcext:value-type="time">
            <text:p>12:38:5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2S" calcext:value-type="time">
            <text:p>12:39:02</text:p>
          </table:table-cell>
          <table:table-cell office:value-type="float" office:value="923" calcext:value-type="float">
            <text:p>92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4S" calcext:value-type="time">
            <text:p>12:39:04</text:p>
          </table:table-cell>
          <table:table-cell office:value-type="float" office:value="78" calcext:value-type="float">
            <text:p>7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7S" calcext:value-type="time">
            <text:p>12:39:07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9S" calcext:value-type="time">
            <text:p>12:39:09</text:p>
          </table:table-cell>
          <table:table-cell office:value-type="float" office:value="377" calcext:value-type="float">
            <text:p>37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1S" calcext:value-type="time">
            <text:p>12:39:11</text:p>
          </table:table-cell>
          <table:table-cell office:value-type="float" office:value="78" calcext:value-type="float">
            <text:p>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4S" calcext:value-type="time">
            <text:p>12:39:14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6S" calcext:value-type="time">
            <text:p>12:39:16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8S" calcext:value-type="time">
            <text:p>12:39:18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1S" calcext:value-type="time">
            <text:p>12:39:21</text:p>
          </table:table-cell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3S" calcext:value-type="time">
            <text:p>12:39:23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6S" calcext:value-type="time">
            <text:p>12:39:26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8S" calcext:value-type="time">
            <text:p>12:39:28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0S" calcext:value-type="time">
            <text:p>12:39:3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3S" calcext:value-type="time">
            <text:p>12:39:33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5S" calcext:value-type="time">
            <text:p>12:39:3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8S" calcext:value-type="time">
            <text:p>12:39:3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0S" calcext:value-type="time">
            <text:p>12:39:4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2S" calcext:value-type="time">
            <text:p>12:39:42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5S" calcext:value-type="time">
            <text:p>12:39:45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7S" calcext:value-type="time">
            <text:p>12:39:47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0S" calcext:value-type="time">
            <text:p>12:39:50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2S" calcext:value-type="time">
            <text:p>12:39:52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4S" calcext:value-type="time">
            <text:p>12:39:54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7S" calcext:value-type="time">
            <text:p>12:39:5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9S" calcext:value-type="time">
            <text:p>12:39:59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2S" calcext:value-type="time">
            <text:p>12:40:02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4S" calcext:value-type="time">
            <text:p>12:40:04</text:p>
          </table:table-cell>
          <table:table-cell office:value-type="float" office:value="57" calcext:value-type="float">
            <text:p>5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6S" calcext:value-type="time">
            <text:p>12:40:06</text:p>
          </table:table-cell>
          <table:table-cell office:value-type="float" office:value="87" calcext:value-type="float">
            <text:p>8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9S" calcext:value-type="time">
            <text:p>12:40:09</text:p>
          </table:table-cell>
          <table:table-cell office:value-type="float" office:value="114" calcext:value-type="float">
            <text:p>1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1S" calcext:value-type="time">
            <text:p>12:40:11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4S" calcext:value-type="time">
            <text:p>12:40:14</text:p>
          </table:table-cell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6S" calcext:value-type="time">
            <text:p>12:40:16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8S" calcext:value-type="time">
            <text:p>12:40:18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1S" calcext:value-type="time">
            <text:p>12:40:2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3S" calcext:value-type="time">
            <text:p>12:40:23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6S" calcext:value-type="time">
            <text:p>12:40:26</text:p>
          </table:table-cell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8S" calcext:value-type="time">
            <text:p>12:40:28</text:p>
          </table:table-cell>
          <table:table-cell office:value-type="float" office:value="684" calcext:value-type="float">
            <text:p>6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0S" calcext:value-type="time">
            <text:p>12:40:30</text:p>
          </table:table-cell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3S" calcext:value-type="time">
            <text:p>12:40:33</text:p>
          </table:table-cell>
          <table:table-cell office:value-type="float" office:value="478" calcext:value-type="float">
            <text:p>4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5S" calcext:value-type="time">
            <text:p>12:40:35</text:p>
          </table:table-cell>
          <table:table-cell office:value-type="float" office:value="27" calcext:value-type="float">
            <text:p>2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8S" calcext:value-type="time">
            <text:p>12:40:38</text:p>
          </table:table-cell>
          <table:table-cell office:value-type="float" office:value="486" calcext:value-type="float">
            <text:p>48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0S" calcext:value-type="time">
            <text:p>12:40:40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2S" calcext:value-type="time">
            <text:p>12:40:42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5S" calcext:value-type="time">
            <text:p>12:40:45</text:p>
          </table:table-cell>
          <table:table-cell office:value-type="float" office:value="153" calcext:value-type="float">
            <text:p>15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7S" calcext:value-type="time">
            <text:p>12:40:47</text:p>
          </table:table-cell>
          <table:table-cell office:value-type="float" office:value="61" calcext:value-type="float">
            <text:p>6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0S" calcext:value-type="time">
            <text:p>12:40:50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2S" calcext:value-type="time">
            <text:p>12:40:52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4S" calcext:value-type="time">
            <text:p>12:40:5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7S" calcext:value-type="time">
            <text:p>12:40:5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9S" calcext:value-type="time">
            <text:p>12:40:59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2S" calcext:value-type="time">
            <text:p>12:41:02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4S" calcext:value-type="time">
            <text:p>12:41:04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7S" calcext:value-type="time">
            <text:p>12:41:07</text:p>
          </table:table-cell>
          <table:table-cell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9S" calcext:value-type="time">
            <text:p>12:41:09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1S" calcext:value-type="time">
            <text:p>12:41:11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4S" calcext:value-type="time">
            <text:p>12:41:14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6S" calcext:value-type="time">
            <text:p>12:41:16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9S" calcext:value-type="time">
            <text:p>12:41:19</text:p>
          </table:table-cell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1S" calcext:value-type="time">
            <text:p>12:41:21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4S" calcext:value-type="time">
            <text:p>12:41:24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6S" calcext:value-type="time">
            <text:p>12:41:26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8S" calcext:value-type="time">
            <text:p>12:41:28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1S" calcext:value-type="time">
            <text:p>12:41:31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3S" calcext:value-type="time">
            <text:p>12:41:33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6S" calcext:value-type="time">
            <text:p>12:41:36</text:p>
          </table:table-cell>
          <table:table-cell office:value-type="float" office:value="49" calcext:value-type="float">
            <text:p>4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8S" calcext:value-type="time">
            <text:p>12:41:38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1S" calcext:value-type="time">
            <text:p>12:41:41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3S" calcext:value-type="time">
            <text:p>12:41:4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5S" calcext:value-type="time">
            <text:p>12:41:45</text:p>
          </table:table-cell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8S" calcext:value-type="time">
            <text:p>12:41:48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0S" calcext:value-type="time">
            <text:p>12:41:50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3S" calcext:value-type="time">
            <text:p>12:41:53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5S" calcext:value-type="time">
            <text:p>12:41:55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8S" calcext:value-type="time">
            <text:p>12:41:58</text:p>
          </table:table-cell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1S" calcext:value-type="time">
            <text:p>12:42:0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3S" calcext:value-type="time">
            <text:p>12:42:03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6S" calcext:value-type="time">
            <text:p>12:42:06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8S" calcext:value-type="time">
            <text:p>12:42:08</text:p>
          </table:table-cell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1S" calcext:value-type="time">
            <text:p>12:42:11</text:p>
          </table:table-cell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3S" calcext:value-type="time">
            <text:p>12:42:13</text:p>
          </table:table-cell>
          <table:table-cell office:value-type="float" office:value="49" calcext:value-type="float">
            <text:p>4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5S" calcext:value-type="time">
            <text:p>12:42:15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8S" calcext:value-type="time">
            <text:p>12:42:18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0S" calcext:value-type="time">
            <text:p>12:42:2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3S" calcext:value-type="time">
            <text:p>12:42:23</text:p>
          </table:table-cell>
          <table:table-cell office:value-type="float" office:value="51" calcext:value-type="float">
            <text:p>5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5S" calcext:value-type="time">
            <text:p>12:42:25</text:p>
          </table:table-cell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8S" calcext:value-type="time">
            <text:p>12:42:28</text:p>
          </table:table-cell>
          <table:table-cell office:value-type="float" office:value="120" calcext:value-type="float">
            <text:p>1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0S" calcext:value-type="time">
            <text:p>12:42:30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3S" calcext:value-type="time">
            <text:p>12:42:33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5S" calcext:value-type="time">
            <text:p>12:42:35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8S" calcext:value-type="time">
            <text:p>12:42:38</text:p>
          </table:table-cell>
          <table:table-cell office:value-type="float" office:value="78" calcext:value-type="float">
            <text:p>7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0S" calcext:value-type="time">
            <text:p>12:42:40</text:p>
          </table:table-cell>
          <table:table-cell office:value-type="float" office:value="68" calcext:value-type="float">
            <text:p>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2S" calcext:value-type="time">
            <text:p>12:42:42</text:p>
          </table:table-cell>
          <table:table-cell office:value-type="float" office:value="116" calcext:value-type="float">
            <text:p>1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5S" calcext:value-type="time">
            <text:p>12:42:45</text:p>
          </table:table-cell>
          <table:table-cell office:value-type="float" office:value="38" calcext:value-type="float">
            <text:p>3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7S" calcext:value-type="time">
            <text:p>12:42:47</text:p>
          </table:table-cell>
          <table:table-cell office:value-type="float" office:value="78" calcext:value-type="float">
            <text:p>7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0S" calcext:value-type="time">
            <text:p>12:42:50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2S" calcext:value-type="time">
            <text:p>12:42:52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5S" calcext:value-type="time">
            <text:p>12:42:55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7S" calcext:value-type="time">
            <text:p>12:42:57</text:p>
          </table:table-cell>
          <table:table-cell office:value-type="float" office:value="82" calcext:value-type="float">
            <text:p>8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0S" calcext:value-type="time">
            <text:p>12:43:00</text:p>
          </table:table-cell>
          <table:table-cell office:value-type="float" office:value="114" calcext:value-type="float">
            <text:p>11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2S" calcext:value-type="time">
            <text:p>12:43:0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5S" calcext:value-type="time">
            <text:p>12:43:05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7S" calcext:value-type="time">
            <text:p>12:43:07</text:p>
          </table:table-cell>
          <table:table-cell office:value-type="float" office:value="262" calcext:value-type="float">
            <text:p>26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9S" calcext:value-type="time">
            <text:p>12:43:09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2S" calcext:value-type="time">
            <text:p>12:43:12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4S" calcext:value-type="time">
            <text:p>12:43:14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7S" calcext:value-type="time">
            <text:p>12:43:1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9S" calcext:value-type="time">
            <text:p>12:43:19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2S" calcext:value-type="time">
            <text:p>12:43:22</text:p>
          </table:table-cell>
          <table:table-cell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4S" calcext:value-type="time">
            <text:p>12:43:24</text:p>
          </table:table-cell>
          <table:table-cell office:value-type="float" office:value="60" calcext:value-type="float">
            <text:p>6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7S" calcext:value-type="time">
            <text:p>12:43:2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9S" calcext:value-type="time">
            <text:p>12:43:29</text:p>
          </table:table-cell>
          <table:table-cell office:value-type="float" office:value="89" calcext:value-type="float">
            <text:p>8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2S" calcext:value-type="time">
            <text:p>12:43:32</text:p>
          </table:table-cell>
          <table:table-cell office:value-type="float" office:value="69" calcext:value-type="float">
            <text:p>6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4S" calcext:value-type="time">
            <text:p>12:43:34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7S" calcext:value-type="time">
            <text:p>12:43:37</text:p>
          </table:table-cell>
          <table:table-cell office:value-type="float" office:value="131" calcext:value-type="float">
            <text:p>13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9S" calcext:value-type="time">
            <text:p>12:43:39</text:p>
          </table:table-cell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2S" calcext:value-type="time">
            <text:p>12:43:42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4S" calcext:value-type="time">
            <text:p>12:43:44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6S" calcext:value-type="time">
            <text:p>12:43:46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9S" calcext:value-type="time">
            <text:p>12:43:4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1S" calcext:value-type="time">
            <text:p>12:43:51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4S" calcext:value-type="time">
            <text:p>12:43:54</text:p>
          </table:table-cell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6S" calcext:value-type="time">
            <text:p>12:43:5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9S" calcext:value-type="time">
            <text:p>12:43:59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1S" calcext:value-type="time">
            <text:p>12:44:01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4S" calcext:value-type="time">
            <text:p>12:44:04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6S" calcext:value-type="time">
            <text:p>12:44:06</text:p>
          </table:table-cell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9S" calcext:value-type="time">
            <text:p>12:44:09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1S" calcext:value-type="time">
            <text:p>12:44:11</text:p>
          </table:table-cell>
          <table:table-cell office:value-type="float" office:value="89" calcext:value-type="float">
            <text:p>8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4S" calcext:value-type="time">
            <text:p>12:44:14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6S" calcext:value-type="time">
            <text:p>12:44:16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9S" calcext:value-type="time">
            <text:p>12:44:1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1S" calcext:value-type="time">
            <text:p>12:44:21</text:p>
          </table:table-cell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4S" calcext:value-type="time">
            <text:p>12:44:2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6S" calcext:value-type="time">
            <text:p>12:44:2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9S" calcext:value-type="time">
            <text:p>12:44:2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1S" calcext:value-type="time">
            <text:p>12:44: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4S" calcext:value-type="time">
            <text:p>12:44:3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6S" calcext:value-type="time">
            <text:p>12:44:36</text:p>
          </table:table-cell>
          <table:table-cell office:value-type="float" office:value="498" calcext:value-type="float">
            <text:p>4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9S" calcext:value-type="time">
            <text:p>12:44:39</text:p>
          </table:table-cell>
          <table:table-cell office:value-type="float" office:value="15" calcext:value-type="float">
            <text:p>1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1S" calcext:value-type="time">
            <text:p>12:44:4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4S" calcext:value-type="time">
            <text:p>12:44:44</text:p>
          </table:table-cell>
          <table:table-cell office:value-type="float" office:value="295" calcext:value-type="float">
            <text:p>29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6S" calcext:value-type="time">
            <text:p>12:44: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9S" calcext:value-type="time">
            <text:p>12:44:49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1S" calcext:value-type="time">
            <text:p>12:44:51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4S" calcext:value-type="time">
            <text:p>12:44:54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6S" calcext:value-type="time">
            <text:p>12:44:56</text:p>
          </table:table-cell>
          <table:table-cell office:value-type="float" office:value="26" calcext:value-type="float">
            <text:p>2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9S" calcext:value-type="time">
            <text:p>12:44:59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1S" calcext:value-type="time">
            <text:p>12:45:01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4S" calcext:value-type="time">
            <text:p>12:45:04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6S" calcext:value-type="time">
            <text:p>12:45:06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9S" calcext:value-type="time">
            <text:p>12:45:09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1S" calcext:value-type="time">
            <text:p>12:45:11</text:p>
          </table:table-cell>
          <table:table-cell office:value-type="float" office:value="597" calcext:value-type="float">
            <text:p>5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18" calcext:value-type="float">
            <text:p>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6S" calcext:value-type="time">
            <text:p>12:45:1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9S" calcext:value-type="time">
            <text:p>12:45:19</text:p>
          </table:table-cell>
          <table:table-cell office:value-type="float" office:value="222" calcext:value-type="float">
            <text:p>22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1S" calcext:value-type="time">
            <text:p>12:45:21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4S" calcext:value-type="time">
            <text:p>12:45:24</text:p>
          </table:table-cell>
          <table:table-cell office:value-type="float" office:value="147" calcext:value-type="float">
            <text:p>1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6S" calcext:value-type="time">
            <text:p>12:45:26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9S" calcext:value-type="time">
            <text:p>12:45:29</text:p>
          </table:table-cell>
          <table:table-cell office:value-type="float" office:value="213" calcext:value-type="float">
            <text:p>2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4S" calcext:value-type="time">
            <text:p>12:45:34</text:p>
          </table:table-cell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6S" calcext:value-type="time">
            <text:p>12:45:36</text:p>
          </table:table-cell>
          <table:table-cell office:value-type="float" office:value="12" calcext:value-type="float">
            <text:p>1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9S" calcext:value-type="time">
            <text:p>12:45:3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1S" calcext:value-type="time">
            <text:p>12:45:4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4S" calcext:value-type="time">
            <text:p>12:45:4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6S" calcext:value-type="time">
            <text:p>12:45:46</text:p>
          </table:table-cell>
          <table:table-cell office:value-type="float" office:value="517" calcext:value-type="float">
            <text:p>51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9S" calcext:value-type="time">
            <text:p>12:45:49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1S" calcext:value-type="time">
            <text:p>12:45:51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4S" calcext:value-type="time">
            <text:p>12:45:54</text:p>
          </table:table-cell>
          <table:table-cell office:value-type="float" office:value="321" calcext:value-type="float">
            <text:p>32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6S" calcext:value-type="time">
            <text:p>12:45:56</text:p>
          </table:table-cell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9S" calcext:value-type="time">
            <text:p>12:45:59</text:p>
          </table:table-cell>
          <table:table-cell office:value-type="float" office:value="1032" calcext:value-type="float">
            <text:p>10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1S" calcext:value-type="time">
            <text:p>12:46:0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4S" calcext:value-type="time">
            <text:p>12:46:04</text:p>
          </table:table-cell>
          <table:table-cell office:value-type="float" office:value="294" calcext:value-type="float">
            <text:p>29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6S" calcext:value-type="time">
            <text:p>12:46:06</text:p>
          </table:table-cell>
          <table:table-cell office:value-type="float" office:value="274" calcext:value-type="float">
            <text:p>2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9S" calcext:value-type="time">
            <text:p>12:46:09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11S" calcext:value-type="time">
            <text:p>12:46:11</text:p>
          </table:table-cell>
          <table:table-cell office:value-type="float" office:value="50" calcext:value-type="float">
            <text:p>50</text:p>
          </table:table-cell>
          <table:table-cell office:value-type="float" office:value="379" calcext:value-type="float">
            <text:p>379</text:p>
          </table:table-cell>
        </table:table-row>
      </table:table>
      <table:table table:name="moderate_rain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1S" calcext:value-type="time">
            <text:p>12:13:01</text:p>
          </table:table-cell>
          <table:table-cell office:value-type="float" office:value="622" calcext:value-type="float">
            <text:p>62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3S" calcext:value-type="time">
            <text:p>12:13:03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4S" calcext:value-type="time">
            <text:p>12:13:04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6S" calcext:value-type="time">
            <text:p>12:13:06</text:p>
          </table:table-cell>
          <table:table-cell office:value-type="float" office:value="699" calcext:value-type="float">
            <text:p>69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8S" calcext:value-type="time">
            <text:p>12:13:08</text:p>
          </table:table-cell>
          <table:table-cell office:value-type="float" office:value="515" calcext:value-type="float">
            <text:p>5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9S" calcext:value-type="time">
            <text:p>12:13:09</text:p>
          </table:table-cell>
          <table:table-cell office:value-type="float" office:value="162" calcext:value-type="float">
            <text:p>1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1S" calcext:value-type="time">
            <text:p>12:13:11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3S" calcext:value-type="time">
            <text:p>12:13:13</text:p>
          </table:table-cell>
          <table:table-cell office:value-type="float" office:value="391" calcext:value-type="float">
            <text:p>39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5S" calcext:value-type="time">
            <text:p>12:13:15</text:p>
          </table:table-cell>
          <table:table-cell office:value-type="float" office:value="529" calcext:value-type="float">
            <text:p>52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6S" calcext:value-type="time">
            <text:p>12:13:16</text:p>
          </table:table-cell>
          <table:table-cell office:value-type="float" office:value="498" calcext:value-type="float">
            <text:p>4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8S" calcext:value-type="time">
            <text:p>12:13:18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0S" calcext:value-type="time">
            <text:p>12:13:20</text:p>
          </table:table-cell>
          <table:table-cell office:value-type="float" office:value="663" calcext:value-type="float">
            <text:p>6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2S" calcext:value-type="time">
            <text:p>12:13:22</text:p>
          </table:table-cell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3S" calcext:value-type="time">
            <text:p>12:13:23</text:p>
          </table:table-cell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5S" calcext:value-type="time">
            <text:p>12:13:25</text:p>
          </table:table-cell>
          <table:table-cell office:value-type="float" office:value="640" calcext:value-type="float">
            <text:p>6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7S" calcext:value-type="time">
            <text:p>12:13:27</text:p>
          </table:table-cell>
          <table:table-cell office:value-type="float" office:value="339" calcext:value-type="float">
            <text:p>33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9S" calcext:value-type="time">
            <text:p>12:13:29</text:p>
          </table:table-cell>
          <table:table-cell office:value-type="float" office:value="552" calcext:value-type="float">
            <text:p>55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0S" calcext:value-type="time">
            <text:p>12:13:30</text:p>
          </table:table-cell>
          <table:table-cell office:value-type="float" office:value="208" calcext:value-type="float">
            <text:p>2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2S" calcext:value-type="time">
            <text:p>12:13:32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4S" calcext:value-type="time">
            <text:p>12:13:34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6S" calcext:value-type="time">
            <text:p>12:13:36</text:p>
          </table:table-cell>
          <table:table-cell office:value-type="float" office:value="408" calcext:value-type="float">
            <text:p>40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7S" calcext:value-type="time">
            <text:p>12:13:37</text:p>
          </table:table-cell>
          <table:table-cell office:value-type="float" office:value="722" calcext:value-type="float">
            <text:p>7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9S" calcext:value-type="time">
            <text:p>12:13:39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1S" calcext:value-type="time">
            <text:p>12:13:41</text:p>
          </table:table-cell>
          <table:table-cell office:value-type="float" office:value="404" calcext:value-type="float">
            <text:p>40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3S" calcext:value-type="time">
            <text:p>12:13:43</text:p>
          </table:table-cell>
          <table:table-cell office:value-type="float" office:value="675" calcext:value-type="float">
            <text:p>6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4S" calcext:value-type="time">
            <text:p>12:13:44</text:p>
          </table:table-cell>
          <table:table-cell office:value-type="float" office:value="598" calcext:value-type="float">
            <text:p>59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6S" calcext:value-type="time">
            <text:p>12:13:46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8S" calcext:value-type="time">
            <text:p>12:13:48</text:p>
          </table:table-cell>
          <table:table-cell office:value-type="float" office:value="529" calcext:value-type="float">
            <text:p>52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0S" calcext:value-type="time">
            <text:p>12:13:5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1S" calcext:value-type="time">
            <text:p>12:13:51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3S" calcext:value-type="time">
            <text:p>12:13:53</text:p>
          </table:table-cell>
          <table:table-cell office:value-type="float" office:value="184" calcext:value-type="float">
            <text:p>1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5S" calcext:value-type="time">
            <text:p>12:13:55</text:p>
          </table:table-cell>
          <table:table-cell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7S" calcext:value-type="time">
            <text:p>12:13:57</text:p>
          </table:table-cell>
          <table:table-cell office:value-type="float" office:value="466" calcext:value-type="float">
            <text:p>4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8S" calcext:value-type="time">
            <text:p>12:13:58</text:p>
          </table:table-cell>
          <table:table-cell office:value-type="float" office:value="288" calcext:value-type="float">
            <text:p>28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0S" calcext:value-type="time">
            <text:p>12:14:00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2S" calcext:value-type="time">
            <text:p>12:14:02</text:p>
          </table:table-cell>
          <table:table-cell office:value-type="float" office:value="704" calcext:value-type="float">
            <text:p>7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4S" calcext:value-type="time">
            <text:p>12:14:04</text:p>
          </table:table-cell>
          <table:table-cell office:value-type="float" office:value="472" calcext:value-type="float">
            <text:p>4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5S" calcext:value-type="time">
            <text:p>12:14:05</text:p>
          </table:table-cell>
          <table:table-cell office:value-type="float" office:value="527" calcext:value-type="float">
            <text:p>5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7S" calcext:value-type="time">
            <text:p>12:14:07</text:p>
          </table:table-cell>
          <table:table-cell office:value-type="float" office:value="267" calcext:value-type="float">
            <text:p>26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9S" calcext:value-type="time">
            <text:p>12:14:09</text:p>
          </table:table-cell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1S" calcext:value-type="time">
            <text:p>12:14:11</text:p>
          </table:table-cell>
          <table:table-cell office:value-type="float" office:value="386" calcext:value-type="float">
            <text:p>38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3S" calcext:value-type="time">
            <text:p>12:14:13</text:p>
          </table:table-cell>
          <table:table-cell office:value-type="float" office:value="266" calcext:value-type="float">
            <text:p>2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4S" calcext:value-type="time">
            <text:p>12:14:14</text:p>
          </table:table-cell>
          <table:table-cell office:value-type="float" office:value="507" calcext:value-type="float">
            <text:p>50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6S" calcext:value-type="time">
            <text:p>12:14:16</text:p>
          </table:table-cell>
          <table:table-cell office:value-type="float" office:value="512" calcext:value-type="float">
            <text:p>5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8S" calcext:value-type="time">
            <text:p>12:14:18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0S" calcext:value-type="time">
            <text:p>12:14:20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1S" calcext:value-type="time">
            <text:p>12:14:21</text:p>
          </table:table-cell>
          <table:table-cell office:value-type="float" office:value="377" calcext:value-type="float">
            <text:p>37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3S" calcext:value-type="time">
            <text:p>12:14:23</text:p>
          </table:table-cell>
          <table:table-cell office:value-type="float" office:value="547" calcext:value-type="float">
            <text:p>54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5S" calcext:value-type="time">
            <text:p>12:14:25</text:p>
          </table:table-cell>
          <table:table-cell office:value-type="float" office:value="275" calcext:value-type="float">
            <text:p>2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7S" calcext:value-type="time">
            <text:p>12:14:27</text:p>
          </table:table-cell>
          <table:table-cell office:value-type="float" office:value="421" calcext:value-type="float">
            <text:p>42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9S" calcext:value-type="time">
            <text:p>12:14:29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0S" calcext:value-type="time">
            <text:p>12:14:30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2S" calcext:value-type="time">
            <text:p>12:14:32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4S" calcext:value-type="time">
            <text:p>12:14:34</text:p>
          </table:table-cell>
          <table:table-cell office:value-type="float" office:value="472" calcext:value-type="float">
            <text:p>47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6S" calcext:value-type="time">
            <text:p>12:14:36</text:p>
          </table:table-cell>
          <table:table-cell office:value-type="float" office:value="476" calcext:value-type="float">
            <text:p>4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7S" calcext:value-type="time">
            <text:p>12:14:37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9S" calcext:value-type="time">
            <text:p>12:14:39</text:p>
          </table:table-cell>
          <table:table-cell office:value-type="float" office:value="517" calcext:value-type="float">
            <text:p>5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1S" calcext:value-type="time">
            <text:p>12:14:41</text:p>
          </table:table-cell>
          <table:table-cell office:value-type="float" office:value="598" calcext:value-type="float">
            <text:p>5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3S" calcext:value-type="time">
            <text:p>12:14:43</text:p>
          </table:table-cell>
          <table:table-cell office:value-type="float" office:value="443" calcext:value-type="float">
            <text:p>4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5S" calcext:value-type="time">
            <text:p>12:14:45</text:p>
          </table:table-cell>
          <table:table-cell office:value-type="float" office:value="388" calcext:value-type="float">
            <text:p>3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6S" calcext:value-type="time">
            <text:p>12:14:46</text:p>
          </table:table-cell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8S" calcext:value-type="time">
            <text:p>12:14:48</text:p>
          </table:table-cell>
          <table:table-cell office:value-type="float" office:value="431" calcext:value-type="float">
            <text:p>4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0S" calcext:value-type="time">
            <text:p>12:14:50</text:p>
          </table:table-cell>
          <table:table-cell office:value-type="float" office:value="573" calcext:value-type="float">
            <text:p>5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2S" calcext:value-type="time">
            <text:p>12:14:52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3S" calcext:value-type="time">
            <text:p>12:14:53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5S" calcext:value-type="time">
            <text:p>12:14:55</text:p>
          </table:table-cell>
          <table:table-cell office:value-type="float" office:value="415" calcext:value-type="float">
            <text:p>4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7S" calcext:value-type="time">
            <text:p>12:14:57</text:p>
          </table:table-cell>
          <table:table-cell office:value-type="float" office:value="473" calcext:value-type="float">
            <text:p>47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9S" calcext:value-type="time">
            <text:p>12:14:59</text:p>
          </table:table-cell>
          <table:table-cell office:value-type="float" office:value="440" calcext:value-type="float">
            <text:p>44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1S" calcext:value-type="time">
            <text:p>12:15:01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2S" calcext:value-type="time">
            <text:p>12:15:02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4S" calcext:value-type="time">
            <text:p>12:15:04</text:p>
          </table:table-cell>
          <table:table-cell office:value-type="float" office:value="478" calcext:value-type="float">
            <text:p>47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6S" calcext:value-type="time">
            <text:p>12:15:06</text:p>
          </table:table-cell>
          <table:table-cell office:value-type="float" office:value="635" calcext:value-type="float">
            <text:p>63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8S" calcext:value-type="time">
            <text:p>12:15:08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0S" calcext:value-type="time">
            <text:p>12:15:1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1S" calcext:value-type="time">
            <text:p>12:15:11</text:p>
          </table:table-cell>
          <table:table-cell office:value-type="float" office:value="313" calcext:value-type="float">
            <text:p>3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3S" calcext:value-type="time">
            <text:p>12:15:13</text:p>
          </table:table-cell>
          <table:table-cell office:value-type="float" office:value="551" calcext:value-type="float">
            <text:p>5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5S" calcext:value-type="time">
            <text:p>12:15:15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7S" calcext:value-type="time">
            <text:p>12:15:17</text:p>
          </table:table-cell>
          <table:table-cell office:value-type="float" office:value="607" calcext:value-type="float">
            <text:p>6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9S" calcext:value-type="time">
            <text:p>12:15:19</text:p>
          </table:table-cell>
          <table:table-cell office:value-type="float" office:value="545" calcext:value-type="float">
            <text:p>54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0S" calcext:value-type="time">
            <text:p>12:15:20</text:p>
          </table:table-cell>
          <table:table-cell office:value-type="float" office:value="662" calcext:value-type="float">
            <text:p>6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2S" calcext:value-type="time">
            <text:p>12:15:22</text:p>
          </table:table-cell>
          <table:table-cell office:value-type="float" office:value="586" calcext:value-type="float">
            <text:p>58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4S" calcext:value-type="time">
            <text:p>12:15:24</text:p>
          </table:table-cell>
          <table:table-cell office:value-type="float" office:value="437" calcext:value-type="float">
            <text:p>43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6S" calcext:value-type="time">
            <text:p>12:15:26</text:p>
          </table:table-cell>
          <table:table-cell office:value-type="float" office:value="523" calcext:value-type="float">
            <text:p>5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8S" calcext:value-type="time">
            <text:p>12:15:28</text:p>
          </table:table-cell>
          <table:table-cell office:value-type="float" office:value="671" calcext:value-type="float">
            <text:p>6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9S" calcext:value-type="time">
            <text:p>12:15:29</text:p>
          </table:table-cell>
          <table:table-cell office:value-type="float" office:value="603" calcext:value-type="float">
            <text:p>60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1S" calcext:value-type="time">
            <text:p>12:15:31</text:p>
          </table:table-cell>
          <table:table-cell office:value-type="float" office:value="579" calcext:value-type="float">
            <text:p>5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3S" calcext:value-type="time">
            <text:p>12:15:33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5S" calcext:value-type="time">
            <text:p>12:15:35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7S" calcext:value-type="time">
            <text:p>12:15:37</text:p>
          </table:table-cell>
          <table:table-cell office:value-type="float" office:value="421" calcext:value-type="float">
            <text:p>42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8S" calcext:value-type="time">
            <text:p>12:15:38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0S" calcext:value-type="time">
            <text:p>12:15:40</text:p>
          </table:table-cell>
          <table:table-cell office:value-type="float" office:value="170" calcext:value-type="float">
            <text:p>17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2S" calcext:value-type="time">
            <text:p>12:15:42</text:p>
          </table:table-cell>
          <table:table-cell office:value-type="float" office:value="754" calcext:value-type="float">
            <text:p>75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4S" calcext:value-type="time">
            <text:p>12:15:44</text:p>
          </table:table-cell>
          <table:table-cell office:value-type="float" office:value="531" calcext:value-type="float">
            <text:p>5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6S" calcext:value-type="time">
            <text:p>12:15:46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7S" calcext:value-type="time">
            <text:p>12:15:47</text:p>
          </table:table-cell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9S" calcext:value-type="time">
            <text:p>12:15:49</text:p>
          </table:table-cell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1S" calcext:value-type="time">
            <text:p>12:15:51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3S" calcext:value-type="time">
            <text:p>12:15:53</text:p>
          </table:table-cell>
          <table:table-cell office:value-type="float" office:value="613" calcext:value-type="float">
            <text:p>61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5S" calcext:value-type="time">
            <text:p>12:15:55</text:p>
          </table:table-cell>
          <table:table-cell office:value-type="float" office:value="196" calcext:value-type="float">
            <text:p>1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6S" calcext:value-type="time">
            <text:p>12:15:56</text:p>
          </table:table-cell>
          <table:table-cell office:value-type="float" office:value="595" calcext:value-type="float">
            <text:p>5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8S" calcext:value-type="time">
            <text:p>12:15:58</text:p>
          </table:table-cell>
          <table:table-cell office:value-type="float" office:value="656" calcext:value-type="float">
            <text:p>6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0S" calcext:value-type="time">
            <text:p>12:16:00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2S" calcext:value-type="time">
            <text:p>12:16:02</text:p>
          </table:table-cell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4S" calcext:value-type="time">
            <text:p>12:16:04</text:p>
          </table:table-cell>
          <table:table-cell office:value-type="float" office:value="530" calcext:value-type="float">
            <text:p>5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6S" calcext:value-type="time">
            <text:p>12:16:06</text:p>
          </table:table-cell>
          <table:table-cell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7S" calcext:value-type="time">
            <text:p>12:16:07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9S" calcext:value-type="time">
            <text:p>12:16:09</text:p>
          </table:table-cell>
          <table:table-cell office:value-type="float" office:value="296" calcext:value-type="float">
            <text:p>29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1S" calcext:value-type="time">
            <text:p>12:16:11</text:p>
          </table:table-cell>
          <table:table-cell office:value-type="float" office:value="234" calcext:value-type="float">
            <text:p>23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3S" calcext:value-type="time">
            <text:p>12:16:13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5S" calcext:value-type="time">
            <text:p>12:16:15</text:p>
          </table:table-cell>
          <table:table-cell office:value-type="float" office:value="250" calcext:value-type="float">
            <text:p>25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6S" calcext:value-type="time">
            <text:p>12:16:16</text:p>
          </table:table-cell>
          <table:table-cell office:value-type="float" office:value="280" calcext:value-type="float">
            <text:p>2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8S" calcext:value-type="time">
            <text:p>12:16:18</text:p>
          </table:table-cell>
          <table:table-cell office:value-type="float" office:value="271" calcext:value-type="float">
            <text:p>2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0S" calcext:value-type="time">
            <text:p>12:16:20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2S" calcext:value-type="time">
            <text:p>12:16:22</text:p>
          </table:table-cell>
          <table:table-cell office:value-type="float" office:value="174" calcext:value-type="float">
            <text:p>17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4S" calcext:value-type="time">
            <text:p>12:16:24</text:p>
          </table:table-cell>
          <table:table-cell office:value-type="float" office:value="427" calcext:value-type="float">
            <text:p>42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6S" calcext:value-type="time">
            <text:p>12:16:26</text:p>
          </table:table-cell>
          <table:table-cell office:value-type="float" office:value="282" calcext:value-type="float">
            <text:p>2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7S" calcext:value-type="time">
            <text:p>12:16:27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9S" calcext:value-type="time">
            <text:p>12:16:29</text:p>
          </table:table-cell>
          <table:table-cell office:value-type="float" office:value="543" calcext:value-type="float">
            <text:p>54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1S" calcext:value-type="time">
            <text:p>12:16:31</text:p>
          </table:table-cell>
          <table:table-cell office:value-type="float" office:value="590" calcext:value-type="float">
            <text:p>5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3S" calcext:value-type="time">
            <text:p>12:16:3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5S" calcext:value-type="time">
            <text:p>12:16:35</text:p>
          </table:table-cell>
          <table:table-cell office:value-type="float" office:value="124" calcext:value-type="float">
            <text:p>12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7S" calcext:value-type="time">
            <text:p>12:16:37</text:p>
          </table:table-cell>
          <table:table-cell office:value-type="float" office:value="504" calcext:value-type="float">
            <text:p>5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8S" calcext:value-type="time">
            <text:p>12:16:38</text:p>
          </table:table-cell>
          <table:table-cell office:value-type="float" office:value="525" calcext:value-type="float">
            <text:p>52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0S" calcext:value-type="time">
            <text:p>12:16:40</text:p>
          </table:table-cell>
          <table:table-cell office:value-type="float" office:value="496" calcext:value-type="float">
            <text:p>4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2S" calcext:value-type="time">
            <text:p>12:16:42</text:p>
          </table:table-cell>
          <table:table-cell office:value-type="float" office:value="670" calcext:value-type="float">
            <text:p>67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4S" calcext:value-type="time">
            <text:p>12:16:44</text:p>
          </table:table-cell>
          <table:table-cell office:value-type="float" office:value="421" calcext:value-type="float">
            <text:p>42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6S" calcext:value-type="time">
            <text:p>12:16:46</text:p>
          </table:table-cell>
          <table:table-cell office:value-type="float" office:value="475" calcext:value-type="float">
            <text:p>47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8S" calcext:value-type="time">
            <text:p>12:16:48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9S" calcext:value-type="time">
            <text:p>12:16:49</text:p>
          </table:table-cell>
          <table:table-cell office:value-type="float" office:value="294" calcext:value-type="float">
            <text:p>2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1S" calcext:value-type="time">
            <text:p>12:16:51</text:p>
          </table:table-cell>
          <table:table-cell office:value-type="float" office:value="506" calcext:value-type="float">
            <text:p>50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3S" calcext:value-type="time">
            <text:p>12:16:53</text:p>
          </table:table-cell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5S" calcext:value-type="time">
            <text:p>12:16:55</text:p>
          </table:table-cell>
          <table:table-cell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7S" calcext:value-type="time">
            <text:p>12:16:57</text:p>
          </table:table-cell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9S" calcext:value-type="time">
            <text:p>12:16:59</text:p>
          </table:table-cell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1S" calcext:value-type="time">
            <text:p>12:17:01</text:p>
          </table:table-cell>
          <table:table-cell office:value-type="float" office:value="417" calcext:value-type="float">
            <text:p>41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2S" calcext:value-type="time">
            <text:p>12:17:02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4S" calcext:value-type="time">
            <text:p>12:17:04</text:p>
          </table:table-cell>
          <table:table-cell office:value-type="float" office:value="592" calcext:value-type="float">
            <text:p>5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6S" calcext:value-type="time">
            <text:p>12:17:06</text:p>
          </table:table-cell>
          <table:table-cell office:value-type="float" office:value="397" calcext:value-type="float">
            <text:p>39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8S" calcext:value-type="time">
            <text:p>12:17:08</text:p>
          </table:table-cell>
          <table:table-cell office:value-type="float" office:value="705" calcext:value-type="float">
            <text:p>70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0S" calcext:value-type="time">
            <text:p>12:17:10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2S" calcext:value-type="time">
            <text:p>12:17:12</text:p>
          </table:table-cell>
          <table:table-cell office:value-type="float" office:value="491" calcext:value-type="float">
            <text:p>49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3S" calcext:value-type="time">
            <text:p>12:17:13</text:p>
          </table:table-cell>
          <table:table-cell office:value-type="float" office:value="526" calcext:value-type="float">
            <text:p>5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5S" calcext:value-type="time">
            <text:p>12:17:15</text:p>
          </table:table-cell>
          <table:table-cell office:value-type="float" office:value="61" calcext:value-type="float">
            <text:p>6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7S" calcext:value-type="time">
            <text:p>12:17:17</text:p>
          </table:table-cell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9S" calcext:value-type="time">
            <text:p>12:17:19</text:p>
          </table:table-cell>
          <table:table-cell office:value-type="float" office:value="270" calcext:value-type="float">
            <text:p>27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1S" calcext:value-type="time">
            <text:p>12:17:21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3S" calcext:value-type="time">
            <text:p>12:17:23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5S" calcext:value-type="time">
            <text:p>12:17:25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6S" calcext:value-type="time">
            <text:p>12:17:26</text:p>
          </table:table-cell>
          <table:table-cell office:value-type="float" office:value="293" calcext:value-type="float">
            <text:p>29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8S" calcext:value-type="time">
            <text:p>12:17:28</text:p>
          </table:table-cell>
          <table:table-cell office:value-type="float" office:value="649" calcext:value-type="float">
            <text:p>6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0S" calcext:value-type="time">
            <text:p>12:17:30</text:p>
          </table:table-cell>
          <table:table-cell office:value-type="float" office:value="453" calcext:value-type="float">
            <text:p>45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2S" calcext:value-type="time">
            <text:p>12:17:32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4S" calcext:value-type="time">
            <text:p>12:17:34</text:p>
          </table:table-cell>
          <table:table-cell office:value-type="float" office:value="13" calcext:value-type="float">
            <text:p>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6S" calcext:value-type="time">
            <text:p>12:17:36</text:p>
          </table:table-cell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8S" calcext:value-type="time">
            <text:p>12:17:38</text:p>
          </table:table-cell>
          <table:table-cell office:value-type="float" office:value="715" calcext:value-type="float">
            <text:p>7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9S" calcext:value-type="time">
            <text:p>12:17:39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1S" calcext:value-type="time">
            <text:p>12:17:41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3S" calcext:value-type="time">
            <text:p>12:17:43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5S" calcext:value-type="time">
            <text:p>12:17:45</text:p>
          </table:table-cell>
          <table:table-cell office:value-type="float" office:value="365" calcext:value-type="float">
            <text:p>36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7S" calcext:value-type="time">
            <text:p>12:17:47</text:p>
          </table:table-cell>
          <table:table-cell office:value-type="float" office:value="282" calcext:value-type="float">
            <text:p>2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9S" calcext:value-type="time">
            <text:p>12:17:49</text:p>
          </table:table-cell>
          <table:table-cell office:value-type="float" office:value="724" calcext:value-type="float">
            <text:p>72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1S" calcext:value-type="time">
            <text:p>12:17:51</text:p>
          </table:table-cell>
          <table:table-cell office:value-type="float" office:value="698" calcext:value-type="float">
            <text:p>6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2S" calcext:value-type="time">
            <text:p>12:17:52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4S" calcext:value-type="time">
            <text:p>12:17:54</text:p>
          </table:table-cell>
          <table:table-cell office:value-type="float" office:value="779" calcext:value-type="float">
            <text:p>77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6S" calcext:value-type="time">
            <text:p>12:17:56</text:p>
          </table:table-cell>
          <table:table-cell office:value-type="float" office:value="470" calcext:value-type="float">
            <text:p>4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8S" calcext:value-type="time">
            <text:p>12:17:58</text:p>
          </table:table-cell>
          <table:table-cell office:value-type="float" office:value="537" calcext:value-type="float">
            <text:p>53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0S" calcext:value-type="time">
            <text:p>12:18:00</text:p>
          </table:table-cell>
          <table:table-cell office:value-type="float" office:value="534" calcext:value-type="float">
            <text:p>5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2S" calcext:value-type="time">
            <text:p>12:18:02</text:p>
          </table:table-cell>
          <table:table-cell office:value-type="float" office:value="464" calcext:value-type="float">
            <text:p>46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4S" calcext:value-type="time">
            <text:p>12:18:0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</table:table-row>
      </table:table>
      <table:table table:name="Heavy_Rain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0S" calcext:value-type="time">
            <text:p>12:25:00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2S" calcext:value-type="time">
            <text:p>12:25:02</text:p>
          </table:table-cell>
          <table:table-cell office:value-type="float" office:value="396" calcext:value-type="float">
            <text:p>39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4S" calcext:value-type="time">
            <text:p>12:25:0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6S" calcext:value-type="time">
            <text:p>12:25:06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8S" calcext:value-type="time">
            <text:p>12:25:08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0S" calcext:value-type="time">
            <text:p>12:25:10</text:p>
          </table:table-cell>
          <table:table-cell office:value-type="float" office:value="509" calcext:value-type="float">
            <text:p>50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2S" calcext:value-type="time">
            <text:p>12:25:12</text:p>
          </table:table-cell>
          <table:table-cell office:value-type="float" office:value="349" calcext:value-type="float">
            <text:p>34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4S" calcext:value-type="time">
            <text:p>12:25:14</text:p>
          </table:table-cell>
          <table:table-cell office:value-type="float" office:value="530" calcext:value-type="float">
            <text:p>5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6S" calcext:value-type="time">
            <text:p>12:25:16</text:p>
          </table:table-cell>
          <table:table-cell office:value-type="float" office:value="462" calcext:value-type="float">
            <text:p>46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8S" calcext:value-type="time">
            <text:p>12:25:18</text:p>
          </table:table-cell>
          <table:table-cell office:value-type="float" office:value="450" calcext:value-type="float">
            <text:p>4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0S" calcext:value-type="time">
            <text:p>12:25:20</text:p>
          </table:table-cell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2S" calcext:value-type="time">
            <text:p>12:25:22</text:p>
          </table:table-cell>
          <table:table-cell office:value-type="float" office:value="382" calcext:value-type="float">
            <text:p>38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4S" calcext:value-type="time">
            <text:p>12:25:24</text:p>
          </table:table-cell>
          <table:table-cell office:value-type="float" office:value="471" calcext:value-type="float">
            <text:p>47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7S" calcext:value-type="time">
            <text:p>12:25:27</text:p>
          </table:table-cell>
          <table:table-cell office:value-type="float" office:value="501" calcext:value-type="float">
            <text:p>5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9S" calcext:value-type="time">
            <text:p>12:25:29</text:p>
          </table:table-cell>
          <table:table-cell office:value-type="float" office:value="428" calcext:value-type="float">
            <text:p>4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1S" calcext:value-type="time">
            <text:p>12:25:31</text:p>
          </table:table-cell>
          <table:table-cell office:value-type="float" office:value="443" calcext:value-type="float">
            <text:p>4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3S" calcext:value-type="time">
            <text:p>12:25:33</text:p>
          </table:table-cell>
          <table:table-cell office:value-type="float" office:value="452" calcext:value-type="float">
            <text:p>4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5S" calcext:value-type="time">
            <text:p>12:25:35</text:p>
          </table:table-cell>
          <table:table-cell office:value-type="float" office:value="373" calcext:value-type="float">
            <text:p>37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7S" calcext:value-type="time">
            <text:p>12:25:37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9S" calcext:value-type="time">
            <text:p>12:25:39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1S" calcext:value-type="time">
            <text:p>12:25:41</text:p>
          </table:table-cell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3S" calcext:value-type="time">
            <text:p>12:25:43</text:p>
          </table:table-cell>
          <table:table-cell office:value-type="float" office:value="150" calcext:value-type="float">
            <text:p>15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5S" calcext:value-type="time">
            <text:p>12:25:45</text:p>
          </table:table-cell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285" calcext:value-type="float">
            <text:p>28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0S" calcext:value-type="time">
            <text:p>12:25:50</text:p>
          </table:table-cell>
          <table:table-cell office:value-type="float" office:value="651" calcext:value-type="float">
            <text:p>65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2S" calcext:value-type="time">
            <text:p>12:25:52</text:p>
          </table:table-cell>
          <table:table-cell office:value-type="float" office:value="487" calcext:value-type="float">
            <text:p>48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4S" calcext:value-type="time">
            <text:p>12:25:54</text:p>
          </table:table-cell>
          <table:table-cell office:value-type="float" office:value="596" calcext:value-type="float">
            <text:p>5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6S" calcext:value-type="time">
            <text:p>12:25:56</text:p>
          </table:table-cell>
          <table:table-cell office:value-type="float" office:value="489" calcext:value-type="float">
            <text:p>4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8S" calcext:value-type="time">
            <text:p>12:25:58</text:p>
          </table:table-cell>
          <table:table-cell office:value-type="float" office:value="455" calcext:value-type="float">
            <text:p>45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439" calcext:value-type="float">
            <text:p>43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4S" calcext:value-type="time">
            <text:p>12:26:04</text:p>
          </table:table-cell>
          <table:table-cell office:value-type="float" office:value="518" calcext:value-type="float">
            <text:p>5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6S" calcext:value-type="time">
            <text:p>12:26:06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8S" calcext:value-type="time">
            <text:p>12:26:08</text:p>
          </table:table-cell>
          <table:table-cell office:value-type="float" office:value="582" calcext:value-type="float">
            <text:p>5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0S" calcext:value-type="time">
            <text:p>12:26:10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3S" calcext:value-type="time">
            <text:p>12:26:13</text:p>
          </table:table-cell>
          <table:table-cell office:value-type="float" office:value="432" calcext:value-type="float">
            <text:p>43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5S" calcext:value-type="time">
            <text:p>12:26:15</text:p>
          </table:table-cell>
          <table:table-cell office:value-type="float" office:value="715" calcext:value-type="float">
            <text:p>7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572" calcext:value-type="float">
            <text:p>5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9S" calcext:value-type="time">
            <text:p>12:26:19</text:p>
          </table:table-cell>
          <table:table-cell office:value-type="float" office:value="497" calcext:value-type="float">
            <text:p>49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1S" calcext:value-type="time">
            <text:p>12:26:21</text:p>
          </table:table-cell>
          <table:table-cell office:value-type="float" office:value="539" calcext:value-type="float">
            <text:p>53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3S" calcext:value-type="time">
            <text:p>12:26:23</text:p>
          </table:table-cell>
          <table:table-cell office:value-type="float" office:value="657" calcext:value-type="float">
            <text:p>65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5S" calcext:value-type="time">
            <text:p>12:26:25</text:p>
          </table:table-cell>
          <table:table-cell office:value-type="float" office:value="783" calcext:value-type="float">
            <text:p>7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7S" calcext:value-type="time">
            <text:p>12:26:27</text:p>
          </table:table-cell>
          <table:table-cell office:value-type="float" office:value="414" calcext:value-type="float">
            <text:p>41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9S" calcext:value-type="time">
            <text:p>12:26:29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1S" calcext:value-type="time">
            <text:p>12:26:31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4S" calcext:value-type="time">
            <text:p>12:26:34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8S" calcext:value-type="time">
            <text:p>12:26:38</text:p>
          </table:table-cell>
          <table:table-cell office:value-type="float" office:value="628" calcext:value-type="float">
            <text:p>6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0S" calcext:value-type="time">
            <text:p>12:26:40</text:p>
          </table:table-cell>
          <table:table-cell office:value-type="float" office:value="666" calcext:value-type="float">
            <text:p>6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2S" calcext:value-type="time">
            <text:p>12:26:42</text:p>
          </table:table-cell>
          <table:table-cell office:value-type="float" office:value="765" calcext:value-type="float">
            <text:p>7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4S" calcext:value-type="time">
            <text:p>12:26:44</text:p>
          </table:table-cell>
          <table:table-cell office:value-type="float" office:value="495" calcext:value-type="float">
            <text:p>49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6S" calcext:value-type="time">
            <text:p>12:26:46</text:p>
          </table:table-cell>
          <table:table-cell office:value-type="float" office:value="569" calcext:value-type="float">
            <text:p>5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8S" calcext:value-type="time">
            <text:p>12:26:48</text:p>
          </table:table-cell>
          <table:table-cell office:value-type="float" office:value="429" calcext:value-type="float">
            <text:p>4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0S" calcext:value-type="time">
            <text:p>12:26:50</text:p>
          </table:table-cell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3S" calcext:value-type="time">
            <text:p>12:26:53</text:p>
          </table:table-cell>
          <table:table-cell office:value-type="float" office:value="556" calcext:value-type="float">
            <text:p>5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5S" calcext:value-type="time">
            <text:p>12:26:55</text:p>
          </table:table-cell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7S" calcext:value-type="time">
            <text:p>12:26:57</text:p>
          </table:table-cell>
          <table:table-cell office:value-type="float" office:value="457" calcext:value-type="float">
            <text:p>45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9S" calcext:value-type="time">
            <text:p>12:26:59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1S" calcext:value-type="time">
            <text:p>12:27:01</text:p>
          </table:table-cell>
          <table:table-cell office:value-type="float" office:value="409" calcext:value-type="float">
            <text:p>4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3S" calcext:value-type="time">
            <text:p>12:27:03</text:p>
          </table:table-cell>
          <table:table-cell office:value-type="float" office:value="605" calcext:value-type="float">
            <text:p>6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5S" calcext:value-type="time">
            <text:p>12:27:05</text:p>
          </table:table-cell>
          <table:table-cell office:value-type="float" office:value="532" calcext:value-type="float">
            <text:p>5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7S" calcext:value-type="time">
            <text:p>12:27:07</text:p>
          </table:table-cell>
          <table:table-cell office:value-type="float" office:value="547" calcext:value-type="float">
            <text:p>5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0S" calcext:value-type="time">
            <text:p>12:27:10</text:p>
          </table:table-cell>
          <table:table-cell office:value-type="float" office:value="412" calcext:value-type="float">
            <text:p>41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2S" calcext:value-type="time">
            <text:p>12:27:12</text:p>
          </table:table-cell>
          <table:table-cell office:value-type="float" office:value="499" calcext:value-type="float">
            <text:p>4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4S" calcext:value-type="time">
            <text:p>12:27:14</text:p>
          </table:table-cell>
          <table:table-cell office:value-type="float" office:value="599" calcext:value-type="float">
            <text:p>59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6S" calcext:value-type="time">
            <text:p>12:27:16</text:p>
          </table:table-cell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8S" calcext:value-type="time">
            <text:p>12:27:18</text:p>
          </table:table-cell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0S" calcext:value-type="time">
            <text:p>12:27:20</text:p>
          </table:table-cell>
          <table:table-cell office:value-type="float" office:value="216" calcext:value-type="float">
            <text:p>21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2S" calcext:value-type="time">
            <text:p>12:27:22</text:p>
          </table:table-cell>
          <table:table-cell office:value-type="float" office:value="528" calcext:value-type="float">
            <text:p>5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4S" calcext:value-type="time">
            <text:p>12:27:24</text:p>
          </table:table-cell>
          <table:table-cell office:value-type="float" office:value="502" calcext:value-type="float">
            <text:p>5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7S" calcext:value-type="time">
            <text:p>12:27:27</text:p>
          </table:table-cell>
          <table:table-cell office:value-type="float" office:value="312" calcext:value-type="float">
            <text:p>3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9S" calcext:value-type="time">
            <text:p>12:27:29</text:p>
          </table:table-cell>
          <table:table-cell office:value-type="float" office:value="495" calcext:value-type="float">
            <text:p>49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1S" calcext:value-type="time">
            <text:p>12:27:31</text:p>
          </table:table-cell>
          <table:table-cell office:value-type="float" office:value="471" calcext:value-type="float">
            <text:p>4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3S" calcext:value-type="time">
            <text:p>12:27:33</text:p>
          </table:table-cell>
          <table:table-cell office:value-type="float" office:value="785" calcext:value-type="float">
            <text:p>7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5S" calcext:value-type="time">
            <text:p>12:27:3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7S" calcext:value-type="time">
            <text:p>12:27:37</text:p>
          </table:table-cell>
          <table:table-cell office:value-type="float" office:value="413" calcext:value-type="float">
            <text:p>41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9S" calcext:value-type="time">
            <text:p>12:27:39</text:p>
          </table:table-cell>
          <table:table-cell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1S" calcext:value-type="time">
            <text:p>12:27:41</text:p>
          </table:table-cell>
          <table:table-cell office:value-type="float" office:value="567" calcext:value-type="float">
            <text:p>5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4S" calcext:value-type="time">
            <text:p>12:27:44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6S" calcext:value-type="time">
            <text:p>12:27:46</text:p>
          </table:table-cell>
          <table:table-cell office:value-type="float" office:value="367" calcext:value-type="float">
            <text:p>36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8S" calcext:value-type="time">
            <text:p>12:27:48</text:p>
          </table:table-cell>
          <table:table-cell office:value-type="float" office:value="404" calcext:value-type="float">
            <text:p>4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0S" calcext:value-type="time">
            <text:p>12:27:50</text:p>
          </table:table-cell>
          <table:table-cell office:value-type="float" office:value="425" calcext:value-type="float">
            <text:p>4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2S" calcext:value-type="time">
            <text:p>12:27:52</text:p>
          </table:table-cell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4S" calcext:value-type="time">
            <text:p>12:27:54</text:p>
          </table:table-cell>
          <table:table-cell office:value-type="float" office:value="555" calcext:value-type="float">
            <text:p>5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523" calcext:value-type="float">
            <text:p>5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9S" calcext:value-type="time">
            <text:p>12:27:59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1S" calcext:value-type="time">
            <text:p>12:28:01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3S" calcext:value-type="time">
            <text:p>12:28:03</text:p>
          </table:table-cell>
          <table:table-cell office:value-type="float" office:value="517" calcext:value-type="float">
            <text:p>51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5S" calcext:value-type="time">
            <text:p>12:28:05</text:p>
          </table:table-cell>
          <table:table-cell office:value-type="float" office:value="514" calcext:value-type="float">
            <text:p>51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7S" calcext:value-type="time">
            <text:p>12:28:07</text:p>
          </table:table-cell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9S" calcext:value-type="time">
            <text:p>12:28:09</text:p>
          </table:table-cell>
          <table:table-cell office:value-type="float" office:value="454" calcext:value-type="float">
            <text:p>4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1S" calcext:value-type="time">
            <text:p>12:28:11</text:p>
          </table:table-cell>
          <table:table-cell office:value-type="float" office:value="530" calcext:value-type="float">
            <text:p>5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4S" calcext:value-type="time">
            <text:p>12:28:14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6S" calcext:value-type="time">
            <text:p>12:28:16</text:p>
          </table:table-cell>
          <table:table-cell office:value-type="float" office:value="644" calcext:value-type="float">
            <text:p>6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8S" calcext:value-type="time">
            <text:p>12:28:18</text:p>
          </table:table-cell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0S" calcext:value-type="time">
            <text:p>12:28:20</text:p>
          </table:table-cell>
          <table:table-cell office:value-type="float" office:value="549" calcext:value-type="float">
            <text:p>54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2S" calcext:value-type="time">
            <text:p>12:28:22</text:p>
          </table:table-cell>
          <table:table-cell office:value-type="float" office:value="543" calcext:value-type="float">
            <text:p>5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4S" calcext:value-type="time">
            <text:p>12:28:24</text:p>
          </table:table-cell>
          <table:table-cell office:value-type="float" office:value="598" calcext:value-type="float">
            <text:p>59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6S" calcext:value-type="time">
            <text:p>12:28:26</text:p>
          </table:table-cell>
          <table:table-cell office:value-type="float" office:value="607" calcext:value-type="float">
            <text:p>60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9S" calcext:value-type="time">
            <text:p>12:28:29</text:p>
          </table:table-cell>
          <table:table-cell office:value-type="float" office:value="624" calcext:value-type="float">
            <text:p>6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1S" calcext:value-type="time">
            <text:p>12:28:31</text:p>
          </table:table-cell>
          <table:table-cell office:value-type="float" office:value="610" calcext:value-type="float">
            <text:p>61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3S" calcext:value-type="time">
            <text:p>12:28:33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5S" calcext:value-type="time">
            <text:p>12:28:35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7S" calcext:value-type="time">
            <text:p>12:28:37</text:p>
          </table:table-cell>
          <table:table-cell office:value-type="float" office:value="494" calcext:value-type="float">
            <text:p>49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9S" calcext:value-type="time">
            <text:p>12:28:39</text:p>
          </table:table-cell>
          <table:table-cell office:value-type="float" office:value="535" calcext:value-type="float">
            <text:p>5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2S" calcext:value-type="time">
            <text:p>12:28:42</text:p>
          </table:table-cell>
          <table:table-cell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4S" calcext:value-type="time">
            <text:p>12:28:44</text:p>
          </table:table-cell>
          <table:table-cell office:value-type="float" office:value="600" calcext:value-type="float">
            <text:p>6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6S" calcext:value-type="time">
            <text:p>12:28:46</text:p>
          </table:table-cell>
          <table:table-cell office:value-type="float" office:value="425" calcext:value-type="float">
            <text:p>4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8S" calcext:value-type="time">
            <text:p>12:28:48</text:p>
          </table:table-cell>
          <table:table-cell office:value-type="float" office:value="515" calcext:value-type="float">
            <text:p>5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0S" calcext:value-type="time">
            <text:p>12:28:50</text:p>
          </table:table-cell>
          <table:table-cell office:value-type="float" office:value="550" calcext:value-type="float">
            <text:p>5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2S" calcext:value-type="time">
            <text:p>12:28:52</text:p>
          </table:table-cell>
          <table:table-cell office:value-type="float" office:value="228" calcext:value-type="float">
            <text:p>22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4S" calcext:value-type="time">
            <text:p>12:28:54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9S" calcext:value-type="time">
            <text:p>12:28:59</text:p>
          </table:table-cell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1S" calcext:value-type="time">
            <text:p>12:29:01</text:p>
          </table:table-cell>
          <table:table-cell office:value-type="float" office:value="501" calcext:value-type="float">
            <text:p>5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3S" calcext:value-type="time">
            <text:p>12:29:03</text:p>
          </table:table-cell>
          <table:table-cell office:value-type="float" office:value="518" calcext:value-type="float">
            <text:p>5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5S" calcext:value-type="time">
            <text:p>12:29:05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7S" calcext:value-type="time">
            <text:p>12:29:07</text:p>
          </table:table-cell>
          <table:table-cell office:value-type="float" office:value="426" calcext:value-type="float">
            <text:p>4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0S" calcext:value-type="time">
            <text:p>12:29:10</text:p>
          </table:table-cell>
          <table:table-cell office:value-type="float" office:value="404" calcext:value-type="float">
            <text:p>4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2S" calcext:value-type="time">
            <text:p>12:29:12</text:p>
          </table:table-cell>
          <table:table-cell office:value-type="float" office:value="486" calcext:value-type="float">
            <text:p>48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4S" calcext:value-type="time">
            <text:p>12:29:14</text:p>
          </table:table-cell>
          <table:table-cell office:value-type="float" office:value="555" calcext:value-type="float">
            <text:p>5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6S" calcext:value-type="time">
            <text:p>12:29:16</text:p>
          </table:table-cell>
          <table:table-cell office:value-type="float" office:value="654" calcext:value-type="float">
            <text:p>6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8S" calcext:value-type="time">
            <text:p>12:29:18</text:p>
          </table:table-cell>
          <table:table-cell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1S" calcext:value-type="time">
            <text:p>12:29:21</text:p>
          </table:table-cell>
          <table:table-cell office:value-type="float" office:value="559" calcext:value-type="float">
            <text:p>5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3S" calcext:value-type="time">
            <text:p>12:29:23</text:p>
          </table:table-cell>
          <table:table-cell office:value-type="float" office:value="501" calcext:value-type="float">
            <text:p>5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5S" calcext:value-type="time">
            <text:p>12:29:25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7S" calcext:value-type="time">
            <text:p>12:29:27</text:p>
          </table:table-cell>
          <table:table-cell office:value-type="float" office:value="531" calcext:value-type="float">
            <text:p>53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9S" calcext:value-type="time">
            <text:p>12:29:29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1S" calcext:value-type="time">
            <text:p>12:29:31</text:p>
          </table:table-cell>
          <table:table-cell office:value-type="float" office:value="245" calcext:value-type="float">
            <text:p>2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4S" calcext:value-type="time">
            <text:p>12:29:34</text:p>
          </table:table-cell>
          <table:table-cell office:value-type="float" office:value="461" calcext:value-type="float">
            <text:p>46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6S" calcext:value-type="time">
            <text:p>12:29:36</text:p>
          </table:table-cell>
          <table:table-cell office:value-type="float" office:value="459" calcext:value-type="float">
            <text:p>45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8S" calcext:value-type="time">
            <text:p>12:29:38</text:p>
          </table:table-cell>
          <table:table-cell office:value-type="float" office:value="722" calcext:value-type="float">
            <text:p>72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0S" calcext:value-type="time">
            <text:p>12:29:40</text:p>
          </table:table-cell>
          <table:table-cell office:value-type="float" office:value="497" calcext:value-type="float">
            <text:p>4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2S" calcext:value-type="time">
            <text:p>12:29:42</text:p>
          </table:table-cell>
          <table:table-cell office:value-type="float" office:value="528" calcext:value-type="float">
            <text:p>5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4S" calcext:value-type="time">
            <text:p>12:29:44</text:p>
          </table:table-cell>
          <table:table-cell office:value-type="float" office:value="277" calcext:value-type="float">
            <text:p>2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7S" calcext:value-type="time">
            <text:p>12:29:47</text:p>
          </table:table-cell>
          <table:table-cell office:value-type="float" office:value="390" calcext:value-type="float">
            <text:p>3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9S" calcext:value-type="time">
            <text:p>12:29:49</text:p>
          </table:table-cell>
          <table:table-cell office:value-type="float" office:value="263" calcext:value-type="float">
            <text:p>2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1S" calcext:value-type="time">
            <text:p>12:29:51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3S" calcext:value-type="time">
            <text:p>12:29:53</text:p>
          </table:table-cell>
          <table:table-cell office:value-type="float" office:value="548" calcext:value-type="float">
            <text:p>54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5S" calcext:value-type="time">
            <text:p>12:29:55</text:p>
          </table:table-cell>
          <table:table-cell office:value-type="float" office:value="92" calcext:value-type="float">
            <text:p>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8S" calcext:value-type="time">
            <text:p>12:29:58</text:p>
          </table:table-cell>
          <table:table-cell office:value-type="float" office:value="382" calcext:value-type="float">
            <text:p>3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540" calcext:value-type="float">
            <text:p>5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2S" calcext:value-type="time">
            <text:p>12:30:02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</table:table-row>
      </table:table>
      <table:table table:name="Light_Rain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oudness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2S" calcext:value-type="time">
            <text:p>12:34:02</text:p>
          </table:table-cell>
          <table:table-cell office:value-type="float" office:value="169" calcext:value-type="float">
            <text:p>169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4S" calcext:value-type="time">
            <text:p>12:34:04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6S" calcext:value-type="time">
            <text:p>12:34:06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8S" calcext:value-type="time">
            <text:p>12:34:08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1S" calcext:value-type="time">
            <text:p>12:34:11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3S" calcext:value-type="time">
            <text:p>12:34:13</text:p>
          </table:table-cell>
          <table:table-cell office:value-type="float" office:value="597" calcext:value-type="float">
            <text:p>59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5S" calcext:value-type="time">
            <text:p>12:34:15</text:p>
          </table:table-cell>
          <table:table-cell office:value-type="float" office:value="472" calcext:value-type="float">
            <text:p>472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7S" calcext:value-type="time">
            <text:p>12:34:17</text:p>
          </table:table-cell>
          <table:table-cell office:value-type="float" office:value="366" calcext:value-type="float">
            <text:p>366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0S" calcext:value-type="time">
            <text:p>12:34:20</text:p>
          </table:table-cell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2S" calcext:value-type="time">
            <text:p>12:34:22</text:p>
          </table:table-cell>
          <table:table-cell office:value-type="float" office:value="131" calcext:value-type="float">
            <text:p>131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4S" calcext:value-type="time">
            <text:p>12:34:24</text:p>
          </table:table-cell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7S" calcext:value-type="time">
            <text:p>12:34:27</text:p>
          </table:table-cell>
          <table:table-cell office:value-type="float" office:value="136" calcext:value-type="float">
            <text:p>136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9S" calcext:value-type="time">
            <text:p>12:34:29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1S" calcext:value-type="time">
            <text:p>12:34:31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3S" calcext:value-type="time">
            <text:p>12:34:33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6S" calcext:value-type="time">
            <text:p>12:34:3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8S" calcext:value-type="time">
            <text:p>12:34:38</text:p>
          </table:table-cell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0S" calcext:value-type="time">
            <text:p>12:34:40</text:p>
          </table:table-cell>
          <table:table-cell office:value-type="float" office:value="246" calcext:value-type="float">
            <text:p>246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3S" calcext:value-type="time">
            <text:p>12:34:43</text:p>
          </table:table-cell>
          <table:table-cell office:value-type="float" office:value="521" calcext:value-type="float">
            <text:p>521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5S" calcext:value-type="time">
            <text:p>12:34:45</text:p>
          </table:table-cell>
          <table:table-cell office:value-type="float" office:value="339" calcext:value-type="float">
            <text:p>339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7S" calcext:value-type="time">
            <text:p>12:34:47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9S" calcext:value-type="time">
            <text:p>12:34:4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2S" calcext:value-type="time">
            <text:p>12:34:52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4S" calcext:value-type="time">
            <text:p>12:34:54</text:p>
          </table:table-cell>
          <table:table-cell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6S" calcext:value-type="time">
            <text:p>12:34:56</text:p>
          </table:table-cell>
          <table:table-cell office:value-type="float" office:value="776" calcext:value-type="float">
            <text:p>776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9S" calcext:value-type="time">
            <text:p>12:34:59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1S" calcext:value-type="time">
            <text:p>12:35:01</text:p>
          </table:table-cell>
          <table:table-cell office:value-type="float" office:value="139" calcext:value-type="float">
            <text:p>139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3S" calcext:value-type="time">
            <text:p>12:35:03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6S" calcext:value-type="time">
            <text:p>12:35:06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8S" calcext:value-type="time">
            <text:p>12:35:08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0S" calcext:value-type="time">
            <text:p>12:35:10</text:p>
          </table:table-cell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2S" calcext:value-type="time">
            <text:p>12:35:12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5S" calcext:value-type="time">
            <text:p>12:35:15</text:p>
          </table:table-cell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7S" calcext:value-type="time">
            <text:p>12:35:17</text:p>
          </table:table-cell>
          <table:table-cell office:value-type="float" office:value="567" calcext:value-type="float">
            <text:p>56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2S" calcext:value-type="time">
            <text:p>12:35:2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4S" calcext:value-type="time">
            <text:p>12:35:24</text:p>
          </table:table-cell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6S" calcext:value-type="time">
            <text:p>12:35:26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9S" calcext:value-type="time">
            <text:p>12:35:29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1S" calcext:value-type="time">
            <text:p>12:35:31</text:p>
          </table:table-cell>
          <table:table-cell office:value-type="float" office:value="568" calcext:value-type="float">
            <text:p>568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5S" calcext:value-type="time">
            <text:p>12:35:35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8S" calcext:value-type="time">
            <text:p>12:35:38</text:p>
          </table:table-cell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0S" calcext:value-type="time">
            <text:p>12:35:40</text:p>
          </table:table-cell>
          <table:table-cell office:value-type="float" office:value="212" calcext:value-type="float">
            <text:p>212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627" calcext:value-type="float">
            <text:p>627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5S" calcext:value-type="time">
            <text:p>12:35:45</text:p>
          </table:table-cell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7S" calcext:value-type="time">
            <text:p>12:35:47</text:p>
          </table:table-cell>
          <table:table-cell office:value-type="float" office:value="282" calcext:value-type="float">
            <text:p>282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9S" calcext:value-type="time">
            <text:p>12:35:49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2S" calcext:value-type="time">
            <text:p>12:35:52</text:p>
          </table:table-cell>
          <table:table-cell office:value-type="float" office:value="353" calcext:value-type="float">
            <text:p>35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4S" calcext:value-type="time">
            <text:p>12:35:5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6S" calcext:value-type="time">
            <text:p>12:35:56</text:p>
          </table:table-cell>
          <table:table-cell office:value-type="float" office:value="96" calcext:value-type="float">
            <text:p>96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9S" calcext:value-type="time">
            <text:p>12:35:59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1S" calcext:value-type="time">
            <text:p>12:36:0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3S" calcext:value-type="time">
            <text:p>12:36:03</text:p>
          </table:table-cell>
          <table:table-cell office:value-type="float" office:value="354" calcext:value-type="float">
            <text:p>35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6S" calcext:value-type="time">
            <text:p>12:36:06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8S" calcext:value-type="time">
            <text:p>12:36:08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0S" calcext:value-type="time">
            <text:p>12:36:10</text:p>
          </table:table-cell>
          <table:table-cell office:value-type="float" office:value="83" calcext:value-type="float">
            <text:p>83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3S" calcext:value-type="time">
            <text:p>12:36:13</text:p>
          </table:table-cell>
          <table:table-cell office:value-type="float" office:value="475" calcext:value-type="float">
            <text:p>475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5S" calcext:value-type="time">
            <text:p>12:36:15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7S" calcext:value-type="time">
            <text:p>12:36:17</text:p>
          </table:table-cell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0S" calcext:value-type="time">
            <text:p>12:36:2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2S" calcext:value-type="time">
            <text:p>12:36:22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4S" calcext:value-type="time">
            <text:p>12:36:24</text:p>
          </table:table-cell>
          <table:table-cell office:value-type="float" office:value="583" calcext:value-type="float">
            <text:p>583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6S" calcext:value-type="time">
            <text:p>12:36:26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143" calcext:value-type="float">
            <text:p>143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1S" calcext:value-type="time">
            <text:p>12:36:31</text:p>
          </table:table-cell>
          <table:table-cell office:value-type="float" office:value="291" calcext:value-type="float">
            <text:p>291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3S" calcext:value-type="time">
            <text:p>12:36:33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6S" calcext:value-type="time">
            <text:p>12:36:3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8S" calcext:value-type="time">
            <text:p>12:36:38</text:p>
          </table:table-cell>
          <table:table-cell office:value-type="float" office:value="39" calcext:value-type="float">
            <text:p>39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0S" calcext:value-type="time">
            <text:p>12:36:40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3S" calcext:value-type="time">
            <text:p>12:36:43</text:p>
          </table:table-cell>
          <table:table-cell office:value-type="float" office:value="149" calcext:value-type="float">
            <text:p>149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5S" calcext:value-type="time">
            <text:p>12:36:45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7S" calcext:value-type="time">
            <text:p>12:36:4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0S" calcext:value-type="time">
            <text:p>12:36:50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2S" calcext:value-type="time">
            <text:p>12:36:52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4S" calcext:value-type="time">
            <text:p>12:36:54</text:p>
          </table:table-cell>
          <table:table-cell office:value-type="float" office:value="241" calcext:value-type="float">
            <text:p>241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7S" calcext:value-type="time">
            <text:p>12:36:5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9S" calcext:value-type="time">
            <text:p>12:36:59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1S" calcext:value-type="time">
            <text:p>12:37: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4S" calcext:value-type="time">
            <text:p>12:37:04</text:p>
          </table:table-cell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6S" calcext:value-type="time">
            <text:p>12:37:06</text:p>
          </table:table-cell>
          <table:table-cell office:value-type="float" office:value="311" calcext:value-type="float">
            <text:p>31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8S" calcext:value-type="time">
            <text:p>12:37:08</text:p>
          </table:table-cell>
          <table:table-cell office:value-type="float" office:value="449" calcext:value-type="float">
            <text:p>449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1S" calcext:value-type="time">
            <text:p>12:37:11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3S" calcext:value-type="time">
            <text:p>12:37:13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5S" calcext:value-type="time">
            <text:p>12:37:15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470" calcext:value-type="float">
            <text:p>470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0S" calcext:value-type="time">
            <text:p>12:37:20</text:p>
          </table:table-cell>
          <table:table-cell office:value-type="float" office:value="316" calcext:value-type="float">
            <text:p>316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3S" calcext:value-type="time">
            <text:p>12:37:23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5S" calcext:value-type="time">
            <text:p>12:37:25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7S" calcext:value-type="time">
            <text:p>12:37:27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0S" calcext:value-type="time">
            <text:p>12:37:30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2S" calcext:value-type="time">
            <text:p>12:37:32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4S" calcext:value-type="time">
            <text:p>12:37:34</text:p>
          </table:table-cell>
          <table:table-cell office:value-type="float" office:value="773" calcext:value-type="float">
            <text:p>773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473" calcext:value-type="float">
            <text:p>473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9S" calcext:value-type="time">
            <text:p>12:37:39</text:p>
          </table:table-cell>
          <table:table-cell office:value-type="float" office:value="481" calcext:value-type="float">
            <text:p>481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1S" calcext:value-type="time">
            <text:p>12:37:41</text:p>
          </table:table-cell>
          <table:table-cell office:value-type="float" office:value="519" calcext:value-type="float">
            <text:p>519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4S" calcext:value-type="time">
            <text:p>12:37:44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6S" calcext:value-type="time">
            <text:p>12:37:4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8S" calcext:value-type="time">
            <text:p>12:37:48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1S" calcext:value-type="time">
            <text:p>12:37:51</text:p>
          </table:table-cell>
          <table:table-cell office:value-type="float" office:value="450" calcext:value-type="float">
            <text:p>450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3S" calcext:value-type="time">
            <text:p>12:37:53</text:p>
          </table:table-cell>
          <table:table-cell office:value-type="float" office:value="421" calcext:value-type="float">
            <text:p>421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5S" calcext:value-type="time">
            <text:p>12:37:55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493" calcext:value-type="float">
            <text:p>49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5S" calcext:value-type="time">
            <text:p>12:38:05</text:p>
          </table:table-cell>
          <table:table-cell office:value-type="float" office:value="548" calcext:value-type="float">
            <text:p>548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7S" calcext:value-type="time">
            <text:p>12:38:07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0S" calcext:value-type="time">
            <text:p>12:38:10</text:p>
          </table:table-cell>
          <table:table-cell office:value-type="float" office:value="783" calcext:value-type="float">
            <text:p>78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2S" calcext:value-type="time">
            <text:p>12:38:12</text:p>
          </table:table-cell>
          <table:table-cell office:value-type="float" office:value="334" calcext:value-type="float">
            <text:p>334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4S" calcext:value-type="time">
            <text:p>12:38:14</text:p>
          </table:table-cell>
          <table:table-cell office:value-type="float" office:value="849" calcext:value-type="float">
            <text:p>849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7S" calcext:value-type="time">
            <text:p>12:38:17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9S" calcext:value-type="time">
            <text:p>12:38:19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1S" calcext:value-type="time">
            <text:p>12:38:21</text:p>
          </table:table-cell>
          <table:table-cell office:value-type="float" office:value="465" calcext:value-type="float">
            <text:p>465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4S" calcext:value-type="time">
            <text:p>12:38:24</text:p>
          </table:table-cell>
          <table:table-cell office:value-type="float" office:value="381" calcext:value-type="float">
            <text:p>38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6S" calcext:value-type="time">
            <text:p>12:38:26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9S" calcext:value-type="time">
            <text:p>12:38:29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1S" calcext:value-type="time">
            <text:p>12:38:31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3S" calcext:value-type="time">
            <text:p>12:38:3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6S" calcext:value-type="time">
            <text:p>12:38:36</text:p>
          </table:table-cell>
          <table:table-cell office:value-type="float" office:value="424" calcext:value-type="float">
            <text:p>42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8S" calcext:value-type="time">
            <text:p>12:38:38</text:p>
          </table:table-cell>
          <table:table-cell office:value-type="float" office:value="641" calcext:value-type="float">
            <text:p>641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0S" calcext:value-type="time">
            <text:p>12:38:40</text:p>
          </table:table-cell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3S" calcext:value-type="time">
            <text:p>12:38:4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5S" calcext:value-type="time">
            <text:p>12:38:45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8S" calcext:value-type="time">
            <text:p>12:38:48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0S" calcext:value-type="time">
            <text:p>12:38:50</text:p>
          </table:table-cell>
          <table:table-cell office:value-type="float" office:value="21" calcext:value-type="float">
            <text:p>21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2S" calcext:value-type="time">
            <text:p>12:38:5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5S" calcext:value-type="time">
            <text:p>12:38:55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7S" calcext:value-type="time">
            <text:p>12:38:5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9S" calcext:value-type="time">
            <text:p>12:38:5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2S" calcext:value-type="time">
            <text:p>12:39:02</text:p>
          </table:table-cell>
          <table:table-cell office:value-type="float" office:value="923" calcext:value-type="float">
            <text:p>923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4S" calcext:value-type="time">
            <text:p>12:39:04</text:p>
          </table:table-cell>
          <table:table-cell office:value-type="float" office:value="78" calcext:value-type="float">
            <text:p>78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2:47:52.008654178</meta:creation-date>
    <dc:date>2022-11-19T17:30:53.767322897</dc:date>
    <meta:editing-duration>PT2H54M56S</meta:editing-duration>
    <meta:editing-cycles>3</meta:editing-cycles>
    <meta:generator>LibreOffice/7.3.6.2$Linux_X86_64 LibreOffice_project/30$Build-2</meta:generator>
    <meta:document-statistic meta:table-count="4" meta:cell-count="8729" meta:object-count="0"/>
  </office:meta>
</office:document-meta>
</file>