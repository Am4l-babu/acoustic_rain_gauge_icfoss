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oudness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03S" calcext:value-type="time">
            <text:p>11:54:03</text:p>
          </table:table-cell>
          <table:table-cell office:value-type="float" office:value="37" calcext:value-type="float">
            <text:p>37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04S" calcext:value-type="time">
            <text:p>11:54:04</text:p>
          </table:table-cell>
          <table:table-cell office:value-type="float" office:value="28" calcext:value-type="float">
            <text:p>28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05S" calcext:value-type="time">
            <text:p>11:54:05</text:p>
          </table:table-cell>
          <table:table-cell office:value-type="float" office:value="22" calcext:value-type="float">
            <text:p>22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06S" calcext:value-type="time">
            <text:p>11:54:06</text:p>
          </table:table-cell>
          <table:table-cell office:value-type="float" office:value="36" calcext:value-type="float">
            <text:p>36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07S" calcext:value-type="time">
            <text:p>11:54:07</text:p>
          </table:table-cell>
          <table:table-cell office:value-type="float" office:value="30" calcext:value-type="float">
            <text:p>30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08S" calcext:value-type="time">
            <text:p>11:54:08</text:p>
          </table:table-cell>
          <table:table-cell office:value-type="float" office:value="64" calcext:value-type="float">
            <text:p>64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09S" calcext:value-type="time">
            <text:p>11:54:09</text:p>
          </table:table-cell>
          <table:table-cell office:value-type="float" office:value="18" calcext:value-type="float">
            <text:p>18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10S" calcext:value-type="time">
            <text:p>11:54:10</text:p>
          </table:table-cell>
          <table:table-cell office:value-type="float" office:value="26" calcext:value-type="float">
            <text:p>26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12S" calcext:value-type="time">
            <text:p>11:54:12</text:p>
          </table:table-cell>
          <table:table-cell office:value-type="float" office:value="110" calcext:value-type="float">
            <text:p>110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13S" calcext:value-type="time">
            <text:p>11:54:13</text:p>
          </table:table-cell>
          <table:table-cell office:value-type="float" office:value="50" calcext:value-type="float">
            <text:p>50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14S" calcext:value-type="time">
            <text:p>11:54:14</text:p>
          </table:table-cell>
          <table:table-cell office:value-type="float" office:value="30" calcext:value-type="float">
            <text:p>30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15S" calcext:value-type="time">
            <text:p>11:54:15</text:p>
          </table:table-cell>
          <table:table-cell office:value-type="float" office:value="80" calcext:value-type="float">
            <text:p>80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16S" calcext:value-type="time">
            <text:p>11:54:16</text:p>
          </table:table-cell>
          <table:table-cell office:value-type="float" office:value="20" calcext:value-type="float">
            <text:p>20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17S" calcext:value-type="time">
            <text:p>11:54:17</text:p>
          </table:table-cell>
          <table:table-cell office:value-type="float" office:value="88" calcext:value-type="float">
            <text:p>88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18S" calcext:value-type="time">
            <text:p>11:54:18</text:p>
          </table:table-cell>
          <table:table-cell office:value-type="float" office:value="176" calcext:value-type="float">
            <text:p>176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20S" calcext:value-type="time">
            <text:p>11:54:20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21S" calcext:value-type="time">
            <text:p>11:54:21</text:p>
          </table:table-cell>
          <table:table-cell office:value-type="float" office:value="30" calcext:value-type="float">
            <text:p>30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22S" calcext:value-type="time">
            <text:p>11:54:22</text:p>
          </table:table-cell>
          <table:table-cell office:value-type="float" office:value="96" calcext:value-type="float">
            <text:p>96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23S" calcext:value-type="time">
            <text:p>11:54:23</text:p>
          </table:table-cell>
          <table:table-cell office:value-type="float" office:value="99" calcext:value-type="float">
            <text:p>99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24S" calcext:value-type="time">
            <text:p>11:54:24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25S" calcext:value-type="time">
            <text:p>11:54:25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26S" calcext:value-type="time">
            <text:p>11:54:26</text:p>
          </table:table-cell>
          <table:table-cell office:value-type="float" office:value="354" calcext:value-type="float">
            <text:p>35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27S" calcext:value-type="time">
            <text:p>11:54:27</text:p>
          </table:table-cell>
          <table:table-cell office:value-type="float" office:value="79" calcext:value-type="float">
            <text:p>7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29S" calcext:value-type="time">
            <text:p>11:54:29</text:p>
          </table:table-cell>
          <table:table-cell office:value-type="float" office:value="1004" calcext:value-type="float">
            <text:p>100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30S" calcext:value-type="time">
            <text:p>11:54:30</text:p>
          </table:table-cell>
          <table:table-cell office:value-type="float" office:value="31" calcext:value-type="float">
            <text:p>3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31S" calcext:value-type="time">
            <text:p>11:54:31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32S" calcext:value-type="time">
            <text:p>11:54:32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33S" calcext:value-type="time">
            <text:p>11:54:33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34S" calcext:value-type="time">
            <text:p>11:54:34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35S" calcext:value-type="time">
            <text:p>11:54:35</text:p>
          </table:table-cell>
          <table:table-cell office:value-type="float" office:value="267" calcext:value-type="float">
            <text:p>267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36S" calcext:value-type="time">
            <text:p>11:54:36</text:p>
          </table:table-cell>
          <table:table-cell office:value-type="float" office:value="8" calcext:value-type="float">
            <text:p>8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38S" calcext:value-type="time">
            <text:p>11:54:3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39S" calcext:value-type="time">
            <text:p>11:54:39</text:p>
          </table:table-cell>
          <table:table-cell office:value-type="float" office:value="54" calcext:value-type="float">
            <text:p>5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40S" calcext:value-type="time">
            <text:p>11:54:40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41S" calcext:value-type="time">
            <text:p>11:54:41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42S" calcext:value-type="time">
            <text:p>11:54:42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43S" calcext:value-type="time">
            <text:p>11:54:43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44S" calcext:value-type="time">
            <text:p>11:54:44</text:p>
          </table:table-cell>
          <table:table-cell office:value-type="float" office:value="164" calcext:value-type="float">
            <text:p>16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46S" calcext:value-type="time">
            <text:p>11:54:46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47S" calcext:value-type="time">
            <text:p>11:54:47</text:p>
          </table:table-cell>
          <table:table-cell office:value-type="float" office:value="329" calcext:value-type="float">
            <text:p>329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48S" calcext:value-type="time">
            <text:p>11:54:48</text:p>
          </table:table-cell>
          <table:table-cell office:value-type="float" office:value="10" calcext:value-type="float">
            <text:p>1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49S" calcext:value-type="time">
            <text:p>11:54:49</text:p>
          </table:table-cell>
          <table:table-cell office:value-type="float" office:value="690" calcext:value-type="float">
            <text:p>69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50S" calcext:value-type="time">
            <text:p>11:54:50</text:p>
          </table:table-cell>
          <table:table-cell office:value-type="float" office:value="21" calcext:value-type="float">
            <text:p>2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51S" calcext:value-type="time">
            <text:p>11:54:5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52S" calcext:value-type="time">
            <text:p>11:54:52</text:p>
          </table:table-cell>
          <table:table-cell office:value-type="float" office:value="44" calcext:value-type="float">
            <text:p>4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54S" calcext:value-type="time">
            <text:p>11:54:54</text:p>
          </table:table-cell>
          <table:table-cell office:value-type="float" office:value="21" calcext:value-type="float">
            <text:p>2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55S" calcext:value-type="time">
            <text:p>11:54:55</text:p>
          </table:table-cell>
          <table:table-cell office:value-type="float" office:value="718" calcext:value-type="float">
            <text:p>71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56S" calcext:value-type="time">
            <text:p>11:54:56</text:p>
          </table:table-cell>
          <table:table-cell office:value-type="float" office:value="36" calcext:value-type="float">
            <text:p>3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57S" calcext:value-type="time">
            <text:p>11:54:57</text:p>
          </table:table-cell>
          <table:table-cell office:value-type="float" office:value="203" calcext:value-type="float">
            <text:p>203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58S" calcext:value-type="time">
            <text:p>11:54:58</text:p>
          </table:table-cell>
          <table:table-cell office:value-type="float" office:value="441" calcext:value-type="float">
            <text:p>44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4M59S" calcext:value-type="time">
            <text:p>11:54:59</text:p>
          </table:table-cell>
          <table:table-cell office:value-type="float" office:value="296" calcext:value-type="float">
            <text:p>296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00S" calcext:value-type="time">
            <text:p>11:55:00</text:p>
          </table:table-cell>
          <table:table-cell office:value-type="float" office:value="301" calcext:value-type="float">
            <text:p>30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02S" calcext:value-type="time">
            <text:p>11:55:02</text:p>
          </table:table-cell>
          <table:table-cell office:value-type="float" office:value="495" calcext:value-type="float">
            <text:p>49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03S" calcext:value-type="time">
            <text:p>11:55:03</text:p>
          </table:table-cell>
          <table:table-cell office:value-type="float" office:value="234" calcext:value-type="float">
            <text:p>23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04S" calcext:value-type="time">
            <text:p>11:55:04</text:p>
          </table:table-cell>
          <table:table-cell office:value-type="float" office:value="7" calcext:value-type="float">
            <text:p>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05S" calcext:value-type="time">
            <text:p>11:55:05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06S" calcext:value-type="time">
            <text:p>11:55:06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07S" calcext:value-type="time">
            <text:p>11:55:07</text:p>
          </table:table-cell>
          <table:table-cell office:value-type="float" office:value="30" calcext:value-type="float">
            <text:p>3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08S" calcext:value-type="time">
            <text:p>11:55:08</text:p>
          </table:table-cell>
          <table:table-cell office:value-type="float" office:value="34" calcext:value-type="float">
            <text:p>3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10S" calcext:value-type="time">
            <text:p>11:55:10</text:p>
          </table:table-cell>
          <table:table-cell office:value-type="float" office:value="3" calcext:value-type="float">
            <text:p>3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11S" calcext:value-type="time">
            <text:p>11:55:11</text:p>
          </table:table-cell>
          <table:table-cell office:value-type="float" office:value="6" calcext:value-type="float">
            <text:p>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12S" calcext:value-type="time">
            <text:p>11:55:12</text:p>
          </table:table-cell>
          <table:table-cell office:value-type="float" office:value="185" calcext:value-type="float">
            <text:p>185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13S" calcext:value-type="time">
            <text:p>11:55:13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14S" calcext:value-type="time">
            <text:p>11:55: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15S" calcext:value-type="time">
            <text:p>11:55:15</text:p>
          </table:table-cell>
          <table:table-cell office:value-type="float" office:value="207" calcext:value-type="float">
            <text:p>207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17S" calcext:value-type="time">
            <text:p>11:55:17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18S" calcext:value-type="time">
            <text:p>11:55:18</text:p>
          </table:table-cell>
          <table:table-cell office:value-type="float" office:value="64" calcext:value-type="float">
            <text:p>6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19S" calcext:value-type="time">
            <text:p>11:55:19</text:p>
          </table:table-cell>
          <table:table-cell office:value-type="float" office:value="35" calcext:value-type="float">
            <text:p>3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20S" calcext:value-type="time">
            <text:p>11:55:20</text:p>
          </table:table-cell>
          <table:table-cell office:value-type="float" office:value="10" calcext:value-type="float">
            <text:p>1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21S" calcext:value-type="time">
            <text:p>11:55:21</text:p>
          </table:table-cell>
          <table:table-cell office:value-type="float" office:value="154" calcext:value-type="float">
            <text:p>15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22S" calcext:value-type="time">
            <text:p>11:55:22</text:p>
          </table:table-cell>
          <table:table-cell office:value-type="float" office:value="106" calcext:value-type="float">
            <text:p>10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23S" calcext:value-type="time">
            <text:p>11:55:23</text:p>
          </table:table-cell>
          <table:table-cell office:value-type="float" office:value="870" calcext:value-type="float">
            <text:p>87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25S" calcext:value-type="time">
            <text:p>11:55:25</text:p>
          </table:table-cell>
          <table:table-cell office:value-type="float" office:value="27" calcext:value-type="float">
            <text:p>2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26S" calcext:value-type="time">
            <text:p>11:55:26</text:p>
          </table:table-cell>
          <table:table-cell office:value-type="float" office:value="179" calcext:value-type="float">
            <text:p>17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27S" calcext:value-type="time">
            <text:p>11:55:27</text:p>
          </table:table-cell>
          <table:table-cell office:value-type="float" office:value="12" calcext:value-type="float">
            <text:p>1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28S" calcext:value-type="time">
            <text:p>11:55:28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29S" calcext:value-type="time">
            <text:p>11:55:29</text:p>
          </table:table-cell>
          <table:table-cell office:value-type="float" office:value="25" calcext:value-type="float">
            <text:p>2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30S" calcext:value-type="time">
            <text:p>11:55:30</text:p>
          </table:table-cell>
          <table:table-cell office:value-type="float" office:value="6" calcext:value-type="float">
            <text:p>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32S" calcext:value-type="time">
            <text:p>11:55:32</text:p>
          </table:table-cell>
          <table:table-cell office:value-type="float" office:value="6" calcext:value-type="float">
            <text:p>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33S" calcext:value-type="time">
            <text:p>11:55:33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34S" calcext:value-type="time">
            <text:p>11:55:34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35S" calcext:value-type="time">
            <text:p>11:55:35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36S" calcext:value-type="time">
            <text:p>11:55:36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38S" calcext:value-type="time">
            <text:p>11:55:38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39S" calcext:value-type="time">
            <text:p>11:55:39</text:p>
          </table:table-cell>
          <table:table-cell office:value-type="float" office:value="41" calcext:value-type="float">
            <text:p>41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40S" calcext:value-type="time">
            <text:p>11:55:40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41S" calcext:value-type="time">
            <text:p>11:55:41</text:p>
          </table:table-cell>
          <table:table-cell office:value-type="float" office:value="488" calcext:value-type="float">
            <text:p>48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42S" calcext:value-type="time">
            <text:p>11:55:42</text:p>
          </table:table-cell>
          <table:table-cell office:value-type="float" office:value="500" calcext:value-type="float">
            <text:p>50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43S" calcext:value-type="time">
            <text:p>11:55:43</text:p>
          </table:table-cell>
          <table:table-cell office:value-type="float" office:value="535" calcext:value-type="float">
            <text:p>535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45S" calcext:value-type="time">
            <text:p>11:55:45</text:p>
          </table:table-cell>
          <table:table-cell office:value-type="float" office:value="361" calcext:value-type="float">
            <text:p>36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46S" calcext:value-type="time">
            <text:p>11:55:46</text:p>
          </table:table-cell>
          <table:table-cell office:value-type="float" office:value="395" calcext:value-type="float">
            <text:p>39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47S" calcext:value-type="time">
            <text:p>11:55:47</text:p>
          </table:table-cell>
          <table:table-cell office:value-type="float" office:value="164" calcext:value-type="float">
            <text:p>16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48S" calcext:value-type="time">
            <text:p>11:55:48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49S" calcext:value-type="time">
            <text:p>11:55:49</text:p>
          </table:table-cell>
          <table:table-cell office:value-type="float" office:value="170" calcext:value-type="float">
            <text:p>170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50S" calcext:value-type="time">
            <text:p>11:55:50</text:p>
          </table:table-cell>
          <table:table-cell office:value-type="float" office:value="52" calcext:value-type="float">
            <text:p>52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52S" calcext:value-type="time">
            <text:p>11:55:52</text:p>
          </table:table-cell>
          <table:table-cell office:value-type="float" office:value="47" calcext:value-type="float">
            <text:p>4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53S" calcext:value-type="time">
            <text:p>11:55:53</text:p>
          </table:table-cell>
          <table:table-cell office:value-type="float" office:value="28" calcext:value-type="float">
            <text:p>2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54S" calcext:value-type="time">
            <text:p>11:55:54</text:p>
          </table:table-cell>
          <table:table-cell office:value-type="float" office:value="17" calcext:value-type="float">
            <text:p>1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55S" calcext:value-type="time">
            <text:p>11:55:55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56S" calcext:value-type="time">
            <text:p>11:55:56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58S" calcext:value-type="time">
            <text:p>11:55:58</text:p>
          </table:table-cell>
          <table:table-cell office:value-type="float" office:value="17" calcext:value-type="float">
            <text:p>1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5M59S" calcext:value-type="time">
            <text:p>11:55:59</text:p>
          </table:table-cell>
          <table:table-cell office:value-type="float" office:value="41" calcext:value-type="float">
            <text:p>4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00S" calcext:value-type="time">
            <text:p>11:56:00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01S" calcext:value-type="time">
            <text:p>11:56:0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02S" calcext:value-type="time">
            <text:p>11:56:02</text:p>
          </table:table-cell>
          <table:table-cell office:value-type="float" office:value="14" calcext:value-type="float">
            <text:p>1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03S" calcext:value-type="time">
            <text:p>11:56:03</text:p>
          </table:table-cell>
          <table:table-cell office:value-type="float" office:value="19" calcext:value-type="float">
            <text:p>1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05S" calcext:value-type="time">
            <text:p>11:56:05</text:p>
          </table:table-cell>
          <table:table-cell office:value-type="float" office:value="25" calcext:value-type="float">
            <text:p>2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06S" calcext:value-type="time">
            <text:p>11:56:06</text:p>
          </table:table-cell>
          <table:table-cell office:value-type="float" office:value="52" calcext:value-type="float">
            <text:p>5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07S" calcext:value-type="time">
            <text:p>11:56:07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08S" calcext:value-type="time">
            <text:p>11:56:08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09S" calcext:value-type="time">
            <text:p>11:56:09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11S" calcext:value-type="time">
            <text:p>11:56:11</text:p>
          </table:table-cell>
          <table:table-cell office:value-type="float" office:value="19" calcext:value-type="float">
            <text:p>19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12S" calcext:value-type="time">
            <text:p>11:56:12</text:p>
          </table:table-cell>
          <table:table-cell office:value-type="float" office:value="29" calcext:value-type="float">
            <text:p>2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13S" calcext:value-type="time">
            <text:p>11:56:13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14S" calcext:value-type="time">
            <text:p>11:56:14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15S" calcext:value-type="time">
            <text:p>11:56:15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17S" calcext:value-type="time">
            <text:p>11:56:17</text:p>
          </table:table-cell>
          <table:table-cell office:value-type="float" office:value="83" calcext:value-type="float">
            <text:p>8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18S" calcext:value-type="time">
            <text:p>11:56:18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19S" calcext:value-type="time">
            <text:p>11:56:19</text:p>
          </table:table-cell>
          <table:table-cell office:value-type="float" office:value="8" calcext:value-type="float">
            <text:p>8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20S" calcext:value-type="time">
            <text:p>11:56:20</text:p>
          </table:table-cell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21S" calcext:value-type="time">
            <text:p>11:56:21</text:p>
          </table:table-cell>
          <table:table-cell office:value-type="float" office:value="60" calcext:value-type="float">
            <text:p>6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23S" calcext:value-type="time">
            <text:p>11:56:23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24S" calcext:value-type="time">
            <text:p>11:56:24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25S" calcext:value-type="time">
            <text:p>11:56:25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26S" calcext:value-type="time">
            <text:p>11:56: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27S" calcext:value-type="time">
            <text:p>11:56:27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29S" calcext:value-type="time">
            <text:p>11:56:29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30S" calcext:value-type="time">
            <text:p>11:56:30</text:p>
          </table:table-cell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31S" calcext:value-type="time">
            <text:p>11:56:31</text:p>
          </table:table-cell>
          <table:table-cell office:value-type="float" office:value="14" calcext:value-type="float">
            <text:p>1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32S" calcext:value-type="time">
            <text:p>11:56:32</text:p>
          </table:table-cell>
          <table:table-cell office:value-type="float" office:value="58" calcext:value-type="float">
            <text:p>5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33S" calcext:value-type="time">
            <text:p>11:56:33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35S" calcext:value-type="time">
            <text:p>11:56:35</text:p>
          </table:table-cell>
          <table:table-cell office:value-type="float" office:value="28" calcext:value-type="float">
            <text:p>2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36S" calcext:value-type="time">
            <text:p>11:56:36</text:p>
          </table:table-cell>
          <table:table-cell office:value-type="float" office:value="41" calcext:value-type="float">
            <text:p>4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37S" calcext:value-type="time">
            <text:p>11:56:37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38S" calcext:value-type="time">
            <text:p>11:56:38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40S" calcext:value-type="time">
            <text:p>11:56:40</text:p>
          </table:table-cell>
          <table:table-cell office:value-type="float" office:value="81" calcext:value-type="float">
            <text:p>8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41S" calcext:value-type="time">
            <text:p>11:56:41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42S" calcext:value-type="time">
            <text:p>11:56:42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43S" calcext:value-type="time">
            <text:p>11:56:43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44S" calcext:value-type="time">
            <text:p>11:56:44</text:p>
          </table:table-cell>
          <table:table-cell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46S" calcext:value-type="time">
            <text:p>11:56:46</text:p>
          </table:table-cell>
          <table:table-cell office:value-type="float" office:value="11" calcext:value-type="float">
            <text:p>1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47S" calcext:value-type="time">
            <text:p>11:56:47</text:p>
          </table:table-cell>
          <table:table-cell office:value-type="float" office:value="32" calcext:value-type="float">
            <text:p>3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48S" calcext:value-type="time">
            <text:p>11:56:48</text:p>
          </table:table-cell>
          <table:table-cell office:value-type="float" office:value="20" calcext:value-type="float">
            <text:p>2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49S" calcext:value-type="time">
            <text:p>11:56:49</text:p>
          </table:table-cell>
          <table:table-cell office:value-type="float" office:value="20" calcext:value-type="float">
            <text:p>2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50S" calcext:value-type="time">
            <text:p>11:56:50</text:p>
          </table:table-cell>
          <table:table-cell office:value-type="float" office:value="19" calcext:value-type="float">
            <text:p>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52S" calcext:value-type="time">
            <text:p>11:56:52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53S" calcext:value-type="time">
            <text:p>11:56:53</text:p>
          </table:table-cell>
          <table:table-cell office:value-type="float" office:value="36" calcext:value-type="float">
            <text:p>3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54S" calcext:value-type="time">
            <text:p>11:56:54</text:p>
          </table:table-cell>
          <table:table-cell office:value-type="float" office:value="32" calcext:value-type="float">
            <text:p>3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55S" calcext:value-type="time">
            <text:p>11:56:55</text:p>
          </table:table-cell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57S" calcext:value-type="time">
            <text:p>11:56:57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58S" calcext:value-type="time">
            <text:p>11:56:58</text:p>
          </table:table-cell>
          <table:table-cell office:value-type="float" office:value="19" calcext:value-type="float">
            <text:p>1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6M59S" calcext:value-type="time">
            <text:p>11:56:59</text:p>
          </table:table-cell>
          <table:table-cell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00S" calcext:value-type="time">
            <text:p>11:57:00</text:p>
          </table:table-cell>
          <table:table-cell office:value-type="float" office:value="62" calcext:value-type="float">
            <text:p>6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02S" calcext:value-type="time">
            <text:p>11:57:02</text:p>
          </table:table-cell>
          <table:table-cell office:value-type="float" office:value="36" calcext:value-type="float">
            <text:p>3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03S" calcext:value-type="time">
            <text:p>11:57:03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04S" calcext:value-type="time">
            <text:p>11:57:04</text:p>
          </table:table-cell>
          <table:table-cell office:value-type="float" office:value="68" calcext:value-type="float">
            <text:p>6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05S" calcext:value-type="time">
            <text:p>11:57:05</text:p>
          </table:table-cell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06S" calcext:value-type="time">
            <text:p>11:57:06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08S" calcext:value-type="time">
            <text:p>11:57:08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09S" calcext:value-type="time">
            <text:p>11:57:09</text:p>
          </table:table-cell>
          <table:table-cell office:value-type="float" office:value="54" calcext:value-type="float">
            <text:p>5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10S" calcext:value-type="time">
            <text:p>11:57:10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11S" calcext:value-type="time">
            <text:p>11:57:1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13S" calcext:value-type="time">
            <text:p>11:57:13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14S" calcext:value-type="time">
            <text:p>11:57:14</text:p>
          </table:table-cell>
          <table:table-cell office:value-type="float" office:value="117" calcext:value-type="float">
            <text:p>11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15S" calcext:value-type="time">
            <text:p>11:57:15</text:p>
          </table:table-cell>
          <table:table-cell office:value-type="float" office:value="71" calcext:value-type="float">
            <text:p>7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16S" calcext:value-type="time">
            <text:p>11:57:16</text:p>
          </table:table-cell>
          <table:table-cell office:value-type="float" office:value="37" calcext:value-type="float">
            <text:p>3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18S" calcext:value-type="time">
            <text:p>11:57:18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19S" calcext:value-type="time">
            <text:p>11:57:19</text:p>
          </table:table-cell>
          <table:table-cell office:value-type="float" office:value="36" calcext:value-type="float">
            <text:p>3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20S" calcext:value-type="time">
            <text:p>11:57:2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21S" calcext:value-type="time">
            <text:p>11:57:21</text:p>
          </table:table-cell>
          <table:table-cell office:value-type="float" office:value="20" calcext:value-type="float">
            <text:p>2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23S" calcext:value-type="time">
            <text:p>11:57:23</text:p>
          </table:table-cell>
          <table:table-cell office:value-type="float" office:value="51" calcext:value-type="float">
            <text:p>5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24S" calcext:value-type="time">
            <text:p>11:57:24</text:p>
          </table:table-cell>
          <table:table-cell office:value-type="float" office:value="34" calcext:value-type="float">
            <text:p>3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25S" calcext:value-type="time">
            <text:p>11:57:25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26S" calcext:value-type="time">
            <text:p>11:57:26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27S" calcext:value-type="time">
            <text:p>11:57:27</text:p>
          </table:table-cell>
          <table:table-cell office:value-type="float" office:value="149" calcext:value-type="float">
            <text:p>14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29S" calcext:value-type="time">
            <text:p>11:57:29</text:p>
          </table:table-cell>
          <table:table-cell office:value-type="float" office:value="338" calcext:value-type="float">
            <text:p>33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30S" calcext:value-type="time">
            <text:p>11:57:30</text:p>
          </table:table-cell>
          <table:table-cell office:value-type="float" office:value="44" calcext:value-type="float">
            <text:p>4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31S" calcext:value-type="time">
            <text:p>11:57:31</text:p>
          </table:table-cell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32S" calcext:value-type="time">
            <text:p>11:57:32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34S" calcext:value-type="time">
            <text:p>11:57:34</text:p>
          </table:table-cell>
          <table:table-cell office:value-type="float" office:value="50" calcext:value-type="float">
            <text:p>5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35S" calcext:value-type="time">
            <text:p>11:57:35</text:p>
          </table:table-cell>
          <table:table-cell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36S" calcext:value-type="time">
            <text:p>11:57:36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37S" calcext:value-type="time">
            <text:p>11:57:37</text:p>
          </table:table-cell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39S" calcext:value-type="time">
            <text:p>11:57:39</text:p>
          </table:table-cell>
          <table:table-cell office:value-type="float" office:value="84" calcext:value-type="float">
            <text:p>8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40S" calcext:value-type="time">
            <text:p>11:57:40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41S" calcext:value-type="time">
            <text:p>11:57:41</text:p>
          </table:table-cell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42S" calcext:value-type="time">
            <text:p>11:57:42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44S" calcext:value-type="time">
            <text:p>11:57:44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45S" calcext:value-type="time">
            <text:p>11:57:45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46S" calcext:value-type="time">
            <text:p>11:57:46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47S" calcext:value-type="time">
            <text:p>11:57:47</text:p>
          </table:table-cell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49S" calcext:value-type="time">
            <text:p>11:57:49</text:p>
          </table:table-cell>
          <table:table-cell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50S" calcext:value-type="time">
            <text:p>11:57:50</text:p>
          </table:table-cell>
          <table:table-cell office:value-type="float" office:value="44" calcext:value-type="float">
            <text:p>4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51S" calcext:value-type="time">
            <text:p>11:57:51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53S" calcext:value-type="time">
            <text:p>11:57:53</text:p>
          </table:table-cell>
          <table:table-cell office:value-type="float" office:value="39" calcext:value-type="float">
            <text:p>3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54S" calcext:value-type="time">
            <text:p>11:57:54</text:p>
          </table:table-cell>
          <table:table-cell office:value-type="float" office:value="66" calcext:value-type="float">
            <text:p>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55S" calcext:value-type="time">
            <text:p>11:57:55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56S" calcext:value-type="time">
            <text:p>11:57:56</text:p>
          </table:table-cell>
          <table:table-cell office:value-type="float" office:value="112" calcext:value-type="float">
            <text:p>11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58S" calcext:value-type="time">
            <text:p>11:57:58</text:p>
          </table:table-cell>
          <table:table-cell office:value-type="float" office:value="21" calcext:value-type="float">
            <text:p>2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7M59S" calcext:value-type="time">
            <text:p>11:57:59</text:p>
          </table:table-cell>
          <table:table-cell office:value-type="float" office:value="28" calcext:value-type="float">
            <text:p>2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00S" calcext:value-type="time">
            <text:p>11:58:00</text:p>
          </table:table-cell>
          <table:table-cell office:value-type="float" office:value="41" calcext:value-type="float">
            <text:p>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01S" calcext:value-type="time">
            <text:p>11:58:01</text:p>
          </table:table-cell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03S" calcext:value-type="time">
            <text:p>11:58:03</text:p>
          </table:table-cell>
          <table:table-cell office:value-type="float" office:value="26" calcext:value-type="float">
            <text:p>2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04S" calcext:value-type="time">
            <text:p>11:58:04</text:p>
          </table:table-cell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05S" calcext:value-type="time">
            <text:p>11:58:05</text:p>
          </table:table-cell>
          <table:table-cell office:value-type="float" office:value="103" calcext:value-type="float">
            <text:p>10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06S" calcext:value-type="time">
            <text:p>11:58:06</text:p>
          </table:table-cell>
          <table:table-cell office:value-type="float" office:value="44" calcext:value-type="float">
            <text:p>4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08S" calcext:value-type="time">
            <text:p>11:58:08</text:p>
          </table:table-cell>
          <table:table-cell office:value-type="float" office:value="84" calcext:value-type="float">
            <text:p>8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09S" calcext:value-type="time">
            <text:p>11:58:09</text:p>
          </table:table-cell>
          <table:table-cell office:value-type="float" office:value="27" calcext:value-type="float">
            <text:p>2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10S" calcext:value-type="time">
            <text:p>11:58:10</text:p>
          </table:table-cell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12S" calcext:value-type="time">
            <text:p>11:58:1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13S" calcext:value-type="time">
            <text:p>11:58:13</text:p>
          </table:table-cell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14S" calcext:value-type="time">
            <text:p>11:58:14</text:p>
          </table:table-cell>
          <table:table-cell office:value-type="float" office:value="31" calcext:value-type="float">
            <text:p>3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15S" calcext:value-type="time">
            <text:p>11:58:15</text:p>
          </table:table-cell>
          <table:table-cell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17S" calcext:value-type="time">
            <text:p>11:58:17</text:p>
          </table:table-cell>
          <table:table-cell office:value-type="float" office:value="65" calcext:value-type="float">
            <text:p>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18S" calcext:value-type="time">
            <text:p>11:58:18</text:p>
          </table:table-cell>
          <table:table-cell office:value-type="float" office:value="19" calcext:value-type="float">
            <text:p>1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19S" calcext:value-type="time">
            <text:p>11:58:19</text:p>
          </table:table-cell>
          <table:table-cell office:value-type="float" office:value="81" calcext:value-type="float">
            <text:p>8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20S" calcext:value-type="time">
            <text:p>11:58:20</text:p>
          </table:table-cell>
          <table:table-cell office:value-type="float" office:value="62" calcext:value-type="float">
            <text:p>6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22S" calcext:value-type="time">
            <text:p>11:58:22</text:p>
          </table:table-cell>
          <table:table-cell office:value-type="float" office:value="140" calcext:value-type="float">
            <text:p>14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23S" calcext:value-type="time">
            <text:p>11:58:23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24S" calcext:value-type="time">
            <text:p>11:58:24</text:p>
          </table:table-cell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26S" calcext:value-type="time">
            <text:p>11:58:26</text:p>
          </table:table-cell>
          <table:table-cell office:value-type="float" office:value="75" calcext:value-type="float">
            <text:p>7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27S" calcext:value-type="time">
            <text:p>11:58:27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28S" calcext:value-type="time">
            <text:p>11:58:28</text:p>
          </table:table-cell>
          <table:table-cell office:value-type="float" office:value="71" calcext:value-type="float">
            <text:p>7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29S" calcext:value-type="time">
            <text:p>11:58:29</text:p>
          </table:table-cell>
          <table:table-cell office:value-type="float" office:value="55" calcext:value-type="float">
            <text:p>5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31S" calcext:value-type="time">
            <text:p>11:58:31</text:p>
          </table:table-cell>
          <table:table-cell office:value-type="float" office:value="98" calcext:value-type="float">
            <text:p>9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32S" calcext:value-type="time">
            <text:p>11:58:32</text:p>
          </table:table-cell>
          <table:table-cell office:value-type="float" office:value="68" calcext:value-type="float">
            <text:p>6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33S" calcext:value-type="time">
            <text:p>11:58:33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35S" calcext:value-type="time">
            <text:p>11:58:35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36S" calcext:value-type="time">
            <text:p>11:58:36</text:p>
          </table:table-cell>
          <table:table-cell office:value-type="float" office:value="73" calcext:value-type="float">
            <text:p>7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37S" calcext:value-type="time">
            <text:p>11:58:3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38S" calcext:value-type="time">
            <text:p>11:58:38</text:p>
          </table:table-cell>
          <table:table-cell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40S" calcext:value-type="time">
            <text:p>11:58:40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41S" calcext:value-type="time">
            <text:p>11:58:41</text:p>
          </table:table-cell>
          <table:table-cell office:value-type="float" office:value="53" calcext:value-type="float">
            <text:p>5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42S" calcext:value-type="time">
            <text:p>11:58:42</text:p>
          </table:table-cell>
          <table:table-cell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44S" calcext:value-type="time">
            <text:p>11:58:44</text:p>
          </table:table-cell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45S" calcext:value-type="time">
            <text:p>11:58:45</text:p>
          </table:table-cell>
          <table:table-cell office:value-type="float" office:value="89" calcext:value-type="float">
            <text:p>8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46S" calcext:value-type="time">
            <text:p>11:58:46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47S" calcext:value-type="time">
            <text:p>11:58:47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49S" calcext:value-type="time">
            <text:p>11:58:49</text:p>
          </table:table-cell>
          <table:table-cell office:value-type="float" office:value="52" calcext:value-type="float">
            <text:p>5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50S" calcext:value-type="time">
            <text:p>11:58:50</text:p>
          </table:table-cell>
          <table:table-cell office:value-type="float" office:value="52" calcext:value-type="float">
            <text:p>5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51S" calcext:value-type="time">
            <text:p>11:58:51</text:p>
          </table:table-cell>
          <table:table-cell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53S" calcext:value-type="time">
            <text:p>11:58:53</text:p>
          </table:table-cell>
          <table:table-cell office:value-type="float" office:value="54" calcext:value-type="float">
            <text:p>5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54S" calcext:value-type="time">
            <text:p>11:58:54</text:p>
          </table:table-cell>
          <table:table-cell office:value-type="float" office:value="16" calcext:value-type="float">
            <text:p>1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55S" calcext:value-type="time">
            <text:p>11:58:55</text:p>
          </table:table-cell>
          <table:table-cell office:value-type="float" office:value="133" calcext:value-type="float">
            <text:p>13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56S" calcext:value-type="time">
            <text:p>11:58:56</text:p>
          </table:table-cell>
          <table:table-cell office:value-type="float" office:value="62" calcext:value-type="float">
            <text:p>6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58S" calcext:value-type="time">
            <text:p>11:58:58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8M59S" calcext:value-type="time">
            <text:p>11:58:59</text:p>
          </table:table-cell>
          <table:table-cell office:value-type="float" office:value="78" calcext:value-type="float">
            <text:p>7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00S" calcext:value-type="time">
            <text:p>11:59:00</text:p>
          </table:table-cell>
          <table:table-cell office:value-type="float" office:value="44" calcext:value-type="float">
            <text:p>4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02S" calcext:value-type="time">
            <text:p>11:59:02</text:p>
          </table:table-cell>
          <table:table-cell office:value-type="float" office:value="81" calcext:value-type="float">
            <text:p>8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03S" calcext:value-type="time">
            <text:p>11:59:03</text:p>
          </table:table-cell>
          <table:table-cell office:value-type="float" office:value="73" calcext:value-type="float">
            <text:p>7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04S" calcext:value-type="time">
            <text:p>11:59:04</text:p>
          </table:table-cell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06S" calcext:value-type="time">
            <text:p>11:59:06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07S" calcext:value-type="time">
            <text:p>11:59:07</text:p>
          </table:table-cell>
          <table:table-cell office:value-type="float" office:value="106" calcext:value-type="float">
            <text:p>10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08S" calcext:value-type="time">
            <text:p>11:59:08</text:p>
          </table:table-cell>
          <table:table-cell office:value-type="float" office:value="20" calcext:value-type="float">
            <text:p>2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10S" calcext:value-type="time">
            <text:p>11:59:10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11S" calcext:value-type="time">
            <text:p>11:59:11</text:p>
          </table:table-cell>
          <table:table-cell office:value-type="float" office:value="56" calcext:value-type="float">
            <text:p>5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12S" calcext:value-type="time">
            <text:p>11:59:12</text:p>
          </table:table-cell>
          <table:table-cell office:value-type="float" office:value="56" calcext:value-type="float">
            <text:p>56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13S" calcext:value-type="time">
            <text:p>11:59:13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15S" calcext:value-type="time">
            <text:p>11:59:15</text:p>
          </table:table-cell>
          <table:table-cell office:value-type="float" office:value="33" calcext:value-type="float">
            <text:p>3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16S" calcext:value-type="time">
            <text:p>11:59:16</text:p>
          </table:table-cell>
          <table:table-cell office:value-type="float" office:value="29" calcext:value-type="float">
            <text:p>29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17S" calcext:value-type="time">
            <text:p>11:59:17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19S" calcext:value-type="time">
            <text:p>11:59:19</text:p>
          </table:table-cell>
          <table:table-cell office:value-type="float" office:value="51" calcext:value-type="float">
            <text:p>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20S" calcext:value-type="time">
            <text:p>11:59:20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21S" calcext:value-type="time">
            <text:p>11:59:21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23S" calcext:value-type="time">
            <text:p>11:59:23</text:p>
          </table:table-cell>
          <table:table-cell office:value-type="float" office:value="73" calcext:value-type="float">
            <text:p>7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24S" calcext:value-type="time">
            <text:p>11:59:24</text:p>
          </table:table-cell>
          <table:table-cell office:value-type="float" office:value="9" calcext:value-type="float">
            <text:p>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25S" calcext:value-type="time">
            <text:p>11:59:25</text:p>
          </table:table-cell>
          <table:table-cell office:value-type="float" office:value="93" calcext:value-type="float">
            <text:p>9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27S" calcext:value-type="time">
            <text:p>11:59:27</text:p>
          </table:table-cell>
          <table:table-cell office:value-type="float" office:value="48" calcext:value-type="float">
            <text:p>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28S" calcext:value-type="time">
            <text:p>11:59:28</text:p>
          </table:table-cell>
          <table:table-cell office:value-type="float" office:value="106" calcext:value-type="float">
            <text:p>10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29S" calcext:value-type="time">
            <text:p>11:59:29</text:p>
          </table:table-cell>
          <table:table-cell office:value-type="float" office:value="64" calcext:value-type="float">
            <text:p>6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31S" calcext:value-type="time">
            <text:p>11:59:31</text:p>
          </table:table-cell>
          <table:table-cell table:number-columns-repeated="2"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32S" calcext:value-type="time">
            <text:p>11:59:32</text:p>
          </table:table-cell>
          <table:table-cell office:value-type="float" office:value="154" calcext:value-type="float">
            <text:p>15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33S" calcext:value-type="time">
            <text:p>11:59:33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35S" calcext:value-type="time">
            <text:p>11:59:35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36S" calcext:value-type="time">
            <text:p>11:59:36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37S" calcext:value-type="time">
            <text:p>11:59:37</text:p>
          </table:table-cell>
          <table:table-cell office:value-type="float" office:value="23" calcext:value-type="float">
            <text:p>23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38S" calcext:value-type="time">
            <text:p>11:59:38</text:p>
          </table:table-cell>
          <table:table-cell office:value-type="float" office:value="8" calcext:value-type="float">
            <text:p>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40S" calcext:value-type="time">
            <text:p>11:59:40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41S" calcext:value-type="time">
            <text:p>11:59:41</text:p>
          </table:table-cell>
          <table:table-cell office:value-type="float" office:value="119" calcext:value-type="float">
            <text:p>11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42S" calcext:value-type="time">
            <text:p>11:59:42</text:p>
          </table:table-cell>
          <table:table-cell office:value-type="float" office:value="58" calcext:value-type="float">
            <text:p>58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44S" calcext:value-type="time">
            <text:p>11:59:44</text:p>
          </table:table-cell>
          <table:table-cell office:value-type="float" office:value="116" calcext:value-type="float">
            <text:p>11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45S" calcext:value-type="time">
            <text:p>11:59:45</text:p>
          </table:table-cell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46S" calcext:value-type="time">
            <text:p>11:59:46</text:p>
          </table:table-cell>
          <table:table-cell office:value-type="float" office:value="34" calcext:value-type="float">
            <text:p>3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48S" calcext:value-type="time">
            <text:p>11:59:48</text:p>
          </table:table-cell>
          <table:table-cell office:value-type="float" office:value="8" calcext:value-type="float">
            <text:p>8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49S" calcext:value-type="time">
            <text:p>11:59:49</text:p>
          </table:table-cell>
          <table:table-cell office:value-type="float" office:value="40" calcext:value-type="float">
            <text:p>4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50S" calcext:value-type="time">
            <text:p>11:59:50</text:p>
          </table:table-cell>
          <table:table-cell office:value-type="float" office:value="40" calcext:value-type="float">
            <text:p>4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52S" calcext:value-type="time">
            <text:p>11:59:52</text:p>
          </table:table-cell>
          <table:table-cell office:value-type="float" office:value="39" calcext:value-type="float">
            <text:p>3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53S" calcext:value-type="time">
            <text:p>11:59:53</text:p>
          </table:table-cell>
          <table:table-cell office:value-type="float" office:value="41" calcext:value-type="float">
            <text:p>4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54S" calcext:value-type="time">
            <text:p>11:59:54</text:p>
          </table:table-cell>
          <table:table-cell office:value-type="float" office:value="25" calcext:value-type="float">
            <text:p>2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56S" calcext:value-type="time">
            <text:p>11:59:56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57S" calcext:value-type="time">
            <text:p>11:59:57</text:p>
          </table:table-cell>
          <table:table-cell office:value-type="float" office:value="77" calcext:value-type="float">
            <text:p>77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1H59M58S" calcext:value-type="time">
            <text:p>11:59:58</text:p>
          </table:table-cell>
          <table:table-cell office:value-type="float" office:value="53" calcext:value-type="float">
            <text:p>5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41" calcext:value-type="float">
            <text:p>4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01S" calcext:value-type="time">
            <text:p>12:00:01</text:p>
          </table:table-cell>
          <table:table-cell office:value-type="float" office:value="100" calcext:value-type="float">
            <text:p>10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02S" calcext:value-type="time">
            <text:p>12:00:02</text:p>
          </table:table-cell>
          <table:table-cell office:value-type="float" office:value="29" calcext:value-type="float">
            <text:p>2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04S" calcext:value-type="time">
            <text:p>12:00:04</text:p>
          </table:table-cell>
          <table:table-cell office:value-type="float" office:value="82" calcext:value-type="float">
            <text:p>8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05S" calcext:value-type="time">
            <text:p>12:00:05</text:p>
          </table:table-cell>
          <table:table-cell office:value-type="float" office:value="29" calcext:value-type="float">
            <text:p>29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06S" calcext:value-type="time">
            <text:p>12:00:06</text:p>
          </table:table-cell>
          <table:table-cell office:value-type="float" office:value="114" calcext:value-type="float">
            <text:p>11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08S" calcext:value-type="time">
            <text:p>12:00:08</text:p>
          </table:table-cell>
          <table:table-cell office:value-type="float" office:value="58" calcext:value-type="float">
            <text:p>5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09S" calcext:value-type="time">
            <text:p>12:00:09</text:p>
          </table:table-cell>
          <table:table-cell office:value-type="float" office:value="93" calcext:value-type="float">
            <text:p>9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11S" calcext:value-type="time">
            <text:p>12:00:11</text:p>
          </table:table-cell>
          <table:table-cell office:value-type="float" office:value="79" calcext:value-type="float">
            <text:p>7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12S" calcext:value-type="time">
            <text:p>12:00:12</text:p>
          </table:table-cell>
          <table:table-cell office:value-type="float" office:value="52" calcext:value-type="float">
            <text:p>5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13S" calcext:value-type="time">
            <text:p>12:00:13</text:p>
          </table:table-cell>
          <table:table-cell office:value-type="float" office:value="18" calcext:value-type="float">
            <text:p>1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15S" calcext:value-type="time">
            <text:p>12:00:15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16S" calcext:value-type="time">
            <text:p>12:00:16</text:p>
          </table:table-cell>
          <table:table-cell office:value-type="float" office:value="19" calcext:value-type="float">
            <text:p>19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17S" calcext:value-type="time">
            <text:p>12:00:17</text:p>
          </table:table-cell>
          <table:table-cell office:value-type="float" office:value="54" calcext:value-type="float">
            <text:p>5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19S" calcext:value-type="time">
            <text:p>12:00:19</text:p>
          </table:table-cell>
          <table:table-cell office:value-type="float" office:value="69" calcext:value-type="float">
            <text:p>69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20S" calcext:value-type="time">
            <text:p>12:00:20</text:p>
          </table:table-cell>
          <table:table-cell office:value-type="float" office:value="43" calcext:value-type="float">
            <text:p>4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21S" calcext:value-type="time">
            <text:p>12:00:21</text:p>
          </table:table-cell>
          <table:table-cell office:value-type="float" office:value="64" calcext:value-type="float">
            <text:p>6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23S" calcext:value-type="time">
            <text:p>12:00:23</text:p>
          </table:table-cell>
          <table:table-cell office:value-type="float" office:value="67" calcext:value-type="float">
            <text:p>67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24S" calcext:value-type="time">
            <text:p>12:00:24</text:p>
          </table:table-cell>
          <table:table-cell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25S" calcext:value-type="time">
            <text:p>12:00:25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27S" calcext:value-type="time">
            <text:p>12:00:27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28S" calcext:value-type="time">
            <text:p>12:00:28</text:p>
          </table:table-cell>
          <table:table-cell office:value-type="float" office:value="56" calcext:value-type="float">
            <text:p>5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29S" calcext:value-type="time">
            <text:p>12:00:29</text:p>
          </table:table-cell>
          <table:table-cell office:value-type="float" office:value="41" calcext:value-type="float">
            <text:p>4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31S" calcext:value-type="time">
            <text:p>12:00:31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32S" calcext:value-type="time">
            <text:p>12:00:32</text:p>
          </table:table-cell>
          <table:table-cell office:value-type="float" office:value="65" calcext:value-type="float">
            <text:p>6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33S" calcext:value-type="time">
            <text:p>12:00:33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35S" calcext:value-type="time">
            <text:p>12:00:35</text:p>
          </table:table-cell>
          <table:table-cell office:value-type="float" office:value="53" calcext:value-type="float">
            <text:p>5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36S" calcext:value-type="time">
            <text:p>12:00:36</text:p>
          </table:table-cell>
          <table:table-cell office:value-type="float" office:value="92" calcext:value-type="float">
            <text:p>9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38S" calcext:value-type="time">
            <text:p>12:00:38</text:p>
          </table:table-cell>
          <table:table-cell office:value-type="float" office:value="37" calcext:value-type="float">
            <text:p>37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39S" calcext:value-type="time">
            <text:p>12:00:39</text:p>
          </table:table-cell>
          <table:table-cell office:value-type="float" office:value="19" calcext:value-type="float">
            <text:p>19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40S" calcext:value-type="time">
            <text:p>12:00:40</text:p>
          </table:table-cell>
          <table:table-cell office:value-type="float" office:value="76" calcext:value-type="float">
            <text:p>7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42S" calcext:value-type="time">
            <text:p>12:00:42</text:p>
          </table:table-cell>
          <table:table-cell office:value-type="float" office:value="97" calcext:value-type="float">
            <text:p>97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43S" calcext:value-type="time">
            <text:p>12:00:43</text:p>
          </table:table-cell>
          <table:table-cell office:value-type="float" office:value="10" calcext:value-type="float">
            <text:p>1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44S" calcext:value-type="time">
            <text:p>12:00:44</text:p>
          </table:table-cell>
          <table:table-cell office:value-type="float" office:value="20" calcext:value-type="float">
            <text:p>2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46S" calcext:value-type="time">
            <text:p>12:00:46</text:p>
          </table:table-cell>
          <table:table-cell office:value-type="float" office:value="48" calcext:value-type="float">
            <text:p>48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47S" calcext:value-type="time">
            <text:p>12:00:47</text:p>
          </table:table-cell>
          <table:table-cell office:value-type="float" office:value="27" calcext:value-type="float">
            <text:p>2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48S" calcext:value-type="time">
            <text:p>12:00:48</text:p>
          </table:table-cell>
          <table:table-cell office:value-type="float" office:value="46" calcext:value-type="float">
            <text:p>4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50S" calcext:value-type="time">
            <text:p>12:00:50</text:p>
          </table:table-cell>
          <table:table-cell office:value-type="float" office:value="91" calcext:value-type="float">
            <text:p>9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51S" calcext:value-type="time">
            <text:p>12:00:51</text:p>
          </table:table-cell>
          <table:table-cell office:value-type="float" office:value="81" calcext:value-type="float">
            <text:p>8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53S" calcext:value-type="time">
            <text:p>12:00:53</text:p>
          </table:table-cell>
          <table:table-cell office:value-type="float" office:value="13" calcext:value-type="float">
            <text:p>1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54S" calcext:value-type="time">
            <text:p>12:00:54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55S" calcext:value-type="time">
            <text:p>12:00:55</text:p>
          </table:table-cell>
          <table:table-cell office:value-type="float" office:value="87" calcext:value-type="float">
            <text:p>8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57S" calcext:value-type="time">
            <text:p>12:00:57</text:p>
          </table:table-cell>
          <table:table-cell office:value-type="float" office:value="38" calcext:value-type="float">
            <text:p>38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58S" calcext:value-type="time">
            <text:p>12:00:58</text:p>
          </table:table-cell>
          <table:table-cell office:value-type="float" office:value="72" calcext:value-type="float">
            <text:p>7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0M59S" calcext:value-type="time">
            <text:p>12:00:59</text:p>
          </table:table-cell>
          <table:table-cell office:value-type="float" office:value="23" calcext:value-type="float">
            <text:p>2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01S" calcext:value-type="time">
            <text:p>12:01:01</text:p>
          </table:table-cell>
          <table:table-cell office:value-type="float" office:value="76" calcext:value-type="float">
            <text:p>76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02S" calcext:value-type="time">
            <text:p>12:01:02</text:p>
          </table:table-cell>
          <table:table-cell office:value-type="float" office:value="18" calcext:value-type="float">
            <text:p>1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04S" calcext:value-type="time">
            <text:p>12:01:04</text:p>
          </table:table-cell>
          <table:table-cell office:value-type="float" office:value="18" calcext:value-type="float">
            <text:p>1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05S" calcext:value-type="time">
            <text:p>12:01:05</text:p>
          </table:table-cell>
          <table:table-cell office:value-type="float" office:value="45" calcext:value-type="float">
            <text:p>45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06S" calcext:value-type="time">
            <text:p>12:01:06</text:p>
          </table:table-cell>
          <table:table-cell office:value-type="float" office:value="101" calcext:value-type="float">
            <text:p>10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08S" calcext:value-type="time">
            <text:p>12:01:08</text:p>
          </table:table-cell>
          <table:table-cell office:value-type="float" office:value="80" calcext:value-type="float">
            <text:p>8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09S" calcext:value-type="time">
            <text:p>12:01:09</text:p>
          </table:table-cell>
          <table:table-cell office:value-type="float" office:value="26" calcext:value-type="float">
            <text:p>2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10S" calcext:value-type="time">
            <text:p>12:01:10</text:p>
          </table:table-cell>
          <table:table-cell office:value-type="float" office:value="53" calcext:value-type="float">
            <text:p>5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12S" calcext:value-type="time">
            <text:p>12:01:12</text:p>
          </table:table-cell>
          <table:table-cell office:value-type="float" office:value="83" calcext:value-type="float">
            <text:p>83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13S" calcext:value-type="time">
            <text:p>12:01:13</text:p>
          </table:table-cell>
          <table:table-cell office:value-type="float" office:value="5" calcext:value-type="float">
            <text:p>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15S" calcext:value-type="time">
            <text:p>12:01:15</text:p>
          </table:table-cell>
          <table:table-cell office:value-type="float" office:value="68" calcext:value-type="float">
            <text:p>6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16S" calcext:value-type="time">
            <text:p>12:01:16</text:p>
          </table:table-cell>
          <table:table-cell office:value-type="float" office:value="132" calcext:value-type="float">
            <text:p>13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17S" calcext:value-type="time">
            <text:p>12:01:17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19S" calcext:value-type="time">
            <text:p>12:01:19</text:p>
          </table:table-cell>
          <table:table-cell office:value-type="float" office:value="29" calcext:value-type="float">
            <text:p>29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20S" calcext:value-type="time">
            <text:p>12:01:20</text:p>
          </table:table-cell>
          <table:table-cell office:value-type="float" office:value="111" calcext:value-type="float">
            <text:p>11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21S" calcext:value-type="time">
            <text:p>12:01:21</text:p>
          </table:table-cell>
          <table:table-cell office:value-type="float" office:value="152" calcext:value-type="float">
            <text:p>152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23S" calcext:value-type="time">
            <text:p>12:01:23</text:p>
          </table:table-cell>
          <table:table-cell office:value-type="float" office:value="19" calcext:value-type="float">
            <text:p>19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24S" calcext:value-type="time">
            <text:p>12:01:24</text:p>
          </table:table-cell>
          <table:table-cell office:value-type="float" office:value="59" calcext:value-type="float">
            <text:p>59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26S" calcext:value-type="time">
            <text:p>12:01:26</text:p>
          </table:table-cell>
          <table:table-cell office:value-type="float" office:value="40" calcext:value-type="float">
            <text:p>4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27S" calcext:value-type="time">
            <text:p>12:01:27</text:p>
          </table:table-cell>
          <table:table-cell office:value-type="float" office:value="83" calcext:value-type="float">
            <text:p>83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28S" calcext:value-type="time">
            <text:p>12:01:28</text:p>
          </table:table-cell>
          <table:table-cell office:value-type="float" office:value="35" calcext:value-type="float">
            <text:p>35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30S" calcext:value-type="time">
            <text:p>12:01:30</text:p>
          </table:table-cell>
          <table:table-cell office:value-type="float" office:value="69" calcext:value-type="float">
            <text:p>69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31S" calcext:value-type="time">
            <text:p>12:01:31</text:p>
          </table:table-cell>
          <table:table-cell office:value-type="float" office:value="38" calcext:value-type="float">
            <text:p>38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33S" calcext:value-type="time">
            <text:p>12:01:33</text:p>
          </table:table-cell>
          <table:table-cell office:value-type="float" office:value="43" calcext:value-type="float">
            <text:p>4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34S" calcext:value-type="time">
            <text:p>12:01:34</text:p>
          </table:table-cell>
          <table:table-cell office:value-type="float" office:value="37" calcext:value-type="float">
            <text:p>3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35S" calcext:value-type="time">
            <text:p>12:01:35</text:p>
          </table:table-cell>
          <table:table-cell office:value-type="float" office:value="71" calcext:value-type="float">
            <text:p>7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37S" calcext:value-type="time">
            <text:p>12:01:37</text:p>
          </table:table-cell>
          <table:table-cell office:value-type="float" office:value="40" calcext:value-type="float">
            <text:p>4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38S" calcext:value-type="time">
            <text:p>12:01:38</text:p>
          </table:table-cell>
          <table:table-cell office:value-type="float" office:value="29" calcext:value-type="float">
            <text:p>2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40S" calcext:value-type="time">
            <text:p>12:01:40</text:p>
          </table:table-cell>
          <table:table-cell office:value-type="float" office:value="25" calcext:value-type="float">
            <text:p>2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41S" calcext:value-type="time">
            <text:p>12:01:41</text:p>
          </table:table-cell>
          <table:table-cell office:value-type="float" office:value="92" calcext:value-type="float">
            <text:p>92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42S" calcext:value-type="time">
            <text:p>12:01:42</text:p>
          </table:table-cell>
          <table:table-cell office:value-type="float" office:value="22" calcext:value-type="float">
            <text:p>22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44S" calcext:value-type="time">
            <text:p>12:01:44</text:p>
          </table:table-cell>
          <table:table-cell office:value-type="float" office:value="16" calcext:value-type="float">
            <text:p>16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45S" calcext:value-type="time">
            <text:p>12:01:45</text:p>
          </table:table-cell>
          <table:table-cell office:value-type="float" office:value="28" calcext:value-type="float">
            <text:p>2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46S" calcext:value-type="time">
            <text:p>12:01:46</text:p>
          </table:table-cell>
          <table:table-cell office:value-type="float" office:value="39" calcext:value-type="float">
            <text:p>39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48S" calcext:value-type="time">
            <text:p>12:01:48</text:p>
          </table:table-cell>
          <table:table-cell office:value-type="float" office:value="34" calcext:value-type="float">
            <text:p>3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49S" calcext:value-type="time">
            <text:p>12:01:49</text:p>
          </table:table-cell>
          <table:table-cell office:value-type="float" office:value="54" calcext:value-type="float">
            <text:p>5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51S" calcext:value-type="time">
            <text:p>12:01:51</text:p>
          </table:table-cell>
          <table:table-cell office:value-type="float" office:value="23" calcext:value-type="float">
            <text:p>2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52S" calcext:value-type="time">
            <text:p>12:01:52</text:p>
          </table:table-cell>
          <table:table-cell office:value-type="float" office:value="67" calcext:value-type="float">
            <text:p>67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53S" calcext:value-type="time">
            <text:p>12:01:53</text:p>
          </table:table-cell>
          <table:table-cell office:value-type="float" office:value="77" calcext:value-type="float">
            <text:p>7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55S" calcext:value-type="time">
            <text:p>12:01:55</text:p>
          </table:table-cell>
          <table:table-cell office:value-type="float" office:value="66" calcext:value-type="float">
            <text:p>6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56S" calcext:value-type="time">
            <text:p>12:01:56</text:p>
          </table:table-cell>
          <table:table-cell office:value-type="float" office:value="40" calcext:value-type="float">
            <text:p>4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58S" calcext:value-type="time">
            <text:p>12:01:58</text:p>
          </table:table-cell>
          <table:table-cell office:value-type="float" office:value="92" calcext:value-type="float">
            <text:p>92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1M59S" calcext:value-type="time">
            <text:p>12:01:59</text:p>
          </table:table-cell>
          <table:table-cell office:value-type="float" office:value="30" calcext:value-type="float">
            <text:p>3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00S" calcext:value-type="time">
            <text:p>12:02:00</text:p>
          </table:table-cell>
          <table:table-cell office:value-type="float" office:value="77" calcext:value-type="float">
            <text:p>7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02S" calcext:value-type="time">
            <text:p>12:02:02</text:p>
          </table:table-cell>
          <table:table-cell office:value-type="float" office:value="72" calcext:value-type="float">
            <text:p>7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03S" calcext:value-type="time">
            <text:p>12:02:03</text:p>
          </table:table-cell>
          <table:table-cell office:value-type="float" office:value="15" calcext:value-type="float">
            <text:p>1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05S" calcext:value-type="time">
            <text:p>12:02:05</text:p>
          </table:table-cell>
          <table:table-cell office:value-type="float" office:value="18" calcext:value-type="float">
            <text:p>18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06S" calcext:value-type="time">
            <text:p>12:02:06</text:p>
          </table:table-cell>
          <table:table-cell office:value-type="float" office:value="48" calcext:value-type="float">
            <text:p>48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08S" calcext:value-type="time">
            <text:p>12:02:08</text:p>
          </table:table-cell>
          <table:table-cell office:value-type="float" office:value="111" calcext:value-type="float">
            <text:p>11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09S" calcext:value-type="time">
            <text:p>12:02:09</text:p>
          </table:table-cell>
          <table:table-cell office:value-type="float" office:value="61" calcext:value-type="float">
            <text:p>6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10S" calcext:value-type="time">
            <text:p>12:02:10</text:p>
          </table:table-cell>
          <table:table-cell office:value-type="float" office:value="85" calcext:value-type="float">
            <text:p>8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12S" calcext:value-type="time">
            <text:p>12:02:12</text:p>
          </table:table-cell>
          <table:table-cell office:value-type="float" office:value="64" calcext:value-type="float">
            <text:p>6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13S" calcext:value-type="time">
            <text:p>12:02:13</text:p>
          </table:table-cell>
          <table:table-cell office:value-type="float" office:value="36" calcext:value-type="float">
            <text:p>3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15S" calcext:value-type="time">
            <text:p>12:02:15</text:p>
          </table:table-cell>
          <table:table-cell office:value-type="float" office:value="61" calcext:value-type="float">
            <text:p>6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16S" calcext:value-type="time">
            <text:p>12:02:16</text:p>
          </table:table-cell>
          <table:table-cell office:value-type="float" office:value="109" calcext:value-type="float">
            <text:p>10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17S" calcext:value-type="time">
            <text:p>12:02:17</text:p>
          </table:table-cell>
          <table:table-cell office:value-type="float" office:value="68" calcext:value-type="float">
            <text:p>6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19S" calcext:value-type="time">
            <text:p>12:02:19</text:p>
          </table:table-cell>
          <table:table-cell office:value-type="float" office:value="99" calcext:value-type="float">
            <text:p>99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20S" calcext:value-type="time">
            <text:p>12:02:20</text:p>
          </table:table-cell>
          <table:table-cell office:value-type="float" office:value="34" calcext:value-type="float">
            <text:p>3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22S" calcext:value-type="time">
            <text:p>12:02:22</text:p>
          </table:table-cell>
          <table:table-cell office:value-type="float" office:value="41" calcext:value-type="float">
            <text:p>4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23S" calcext:value-type="time">
            <text:p>12:02:23</text:p>
          </table:table-cell>
          <table:table-cell office:value-type="float" office:value="36" calcext:value-type="float">
            <text:p>3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24S" calcext:value-type="time">
            <text:p>12:02:24</text:p>
          </table:table-cell>
          <table:table-cell office:value-type="float" office:value="110" calcext:value-type="float">
            <text:p>11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26S" calcext:value-type="time">
            <text:p>12:02:26</text:p>
          </table:table-cell>
          <table:table-cell office:value-type="float" office:value="56" calcext:value-type="float">
            <text:p>5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27S" calcext:value-type="time">
            <text:p>12:02:27</text:p>
          </table:table-cell>
          <table:table-cell office:value-type="float" office:value="38" calcext:value-type="float">
            <text:p>38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29S" calcext:value-type="time">
            <text:p>12:02:29</text:p>
          </table:table-cell>
          <table:table-cell office:value-type="float" office:value="67" calcext:value-type="float">
            <text:p>6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30S" calcext:value-type="time">
            <text:p>12:02:30</text:p>
          </table:table-cell>
          <table:table-cell office:value-type="float" office:value="72" calcext:value-type="float">
            <text:p>7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32S" calcext:value-type="time">
            <text:p>12:02:32</text:p>
          </table:table-cell>
          <table:table-cell office:value-type="float" office:value="54" calcext:value-type="float">
            <text:p>5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33S" calcext:value-type="time">
            <text:p>12:02:33</text:p>
          </table:table-cell>
          <table:table-cell office:value-type="float" office:value="121" calcext:value-type="float">
            <text:p>12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34S" calcext:value-type="time">
            <text:p>12:02:34</text:p>
          </table:table-cell>
          <table:table-cell office:value-type="float" office:value="76" calcext:value-type="float">
            <text:p>76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36S" calcext:value-type="time">
            <text:p>12:02:36</text:p>
          </table:table-cell>
          <table:table-cell office:value-type="float" office:value="93" calcext:value-type="float">
            <text:p>9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37S" calcext:value-type="time">
            <text:p>12:02:37</text:p>
          </table:table-cell>
          <table:table-cell office:value-type="float" office:value="81" calcext:value-type="float">
            <text:p>8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39S" calcext:value-type="time">
            <text:p>12:02:39</text:p>
          </table:table-cell>
          <table:table-cell office:value-type="float" office:value="63" calcext:value-type="float">
            <text:p>6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40S" calcext:value-type="time">
            <text:p>12:02:40</text:p>
          </table:table-cell>
          <table:table-cell office:value-type="float" office:value="78" calcext:value-type="float">
            <text:p>7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42S" calcext:value-type="time">
            <text:p>12:02:42</text:p>
          </table:table-cell>
          <table:table-cell office:value-type="float" office:value="18" calcext:value-type="float">
            <text:p>18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43S" calcext:value-type="time">
            <text:p>12:02:43</text:p>
          </table:table-cell>
          <table:table-cell office:value-type="float" office:value="63" calcext:value-type="float">
            <text:p>6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44S" calcext:value-type="time">
            <text:p>12:02:44</text:p>
          </table:table-cell>
          <table:table-cell office:value-type="float" office:value="79" calcext:value-type="float">
            <text:p>7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46S" calcext:value-type="time">
            <text:p>12:02:46</text:p>
          </table:table-cell>
          <table:table-cell office:value-type="float" office:value="41" calcext:value-type="float">
            <text:p>4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47S" calcext:value-type="time">
            <text:p>12:02:47</text:p>
          </table:table-cell>
          <table:table-cell office:value-type="float" office:value="83" calcext:value-type="float">
            <text:p>8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49S" calcext:value-type="time">
            <text:p>12:02:49</text:p>
          </table:table-cell>
          <table:table-cell office:value-type="float" office:value="90" calcext:value-type="float">
            <text:p>9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50S" calcext:value-type="time">
            <text:p>12:02:50</text:p>
          </table:table-cell>
          <table:table-cell office:value-type="float" office:value="26" calcext:value-type="float">
            <text:p>2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52S" calcext:value-type="time">
            <text:p>12:02:52</text:p>
          </table:table-cell>
          <table:table-cell office:value-type="float" office:value="112" calcext:value-type="float">
            <text:p>11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53S" calcext:value-type="time">
            <text:p>12:02:53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54S" calcext:value-type="time">
            <text:p>12:02:54</text:p>
          </table:table-cell>
          <table:table-cell office:value-type="float" office:value="60" calcext:value-type="float">
            <text:p>6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56S" calcext:value-type="time">
            <text:p>12:02:56</text:p>
          </table:table-cell>
          <table:table-cell office:value-type="float" office:value="52" calcext:value-type="float">
            <text:p>5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57S" calcext:value-type="time">
            <text:p>12:02:57</text:p>
          </table:table-cell>
          <table:table-cell office:value-type="float" office:value="75" calcext:value-type="float">
            <text:p>7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2M59S" calcext:value-type="time">
            <text:p>12:02:59</text:p>
          </table:table-cell>
          <table:table-cell office:value-type="float" office:value="86" calcext:value-type="float">
            <text:p>8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00S" calcext:value-type="time">
            <text:p>12:03:00</text:p>
          </table:table-cell>
          <table:table-cell office:value-type="float" office:value="75" calcext:value-type="float">
            <text:p>7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02S" calcext:value-type="time">
            <text:p>12:03:02</text:p>
          </table:table-cell>
          <table:table-cell office:value-type="float" office:value="93" calcext:value-type="float">
            <text:p>9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03S" calcext:value-type="time">
            <text:p>12:03:03</text:p>
          </table:table-cell>
          <table:table-cell office:value-type="float" office:value="82" calcext:value-type="float">
            <text:p>8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04S" calcext:value-type="time">
            <text:p>12:03:04</text:p>
          </table:table-cell>
          <table:table-cell office:value-type="float" office:value="49" calcext:value-type="float">
            <text:p>4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06S" calcext:value-type="time">
            <text:p>12:03:06</text:p>
          </table:table-cell>
          <table:table-cell office:value-type="float" office:value="63" calcext:value-type="float">
            <text:p>6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07S" calcext:value-type="time">
            <text:p>12:03:07</text:p>
          </table:table-cell>
          <table:table-cell office:value-type="float" office:value="143" calcext:value-type="float">
            <text:p>14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09S" calcext:value-type="time">
            <text:p>12:03:09</text:p>
          </table:table-cell>
          <table:table-cell office:value-type="float" office:value="78" calcext:value-type="float">
            <text:p>7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10S" calcext:value-type="time">
            <text:p>12:03:10</text:p>
          </table:table-cell>
          <table:table-cell office:value-type="float" office:value="108" calcext:value-type="float">
            <text:p>10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12S" calcext:value-type="time">
            <text:p>12:03:12</text:p>
          </table:table-cell>
          <table:table-cell office:value-type="float" office:value="64" calcext:value-type="float">
            <text:p>6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13S" calcext:value-type="time">
            <text:p>12:03:13</text:p>
          </table:table-cell>
          <table:table-cell office:value-type="float" office:value="107" calcext:value-type="float">
            <text:p>10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15S" calcext:value-type="time">
            <text:p>12:03:15</text:p>
          </table:table-cell>
          <table:table-cell office:value-type="float" office:value="113" calcext:value-type="float">
            <text:p>11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16S" calcext:value-type="time">
            <text:p>12:03:16</text:p>
          </table:table-cell>
          <table:table-cell office:value-type="float" office:value="45" calcext:value-type="float">
            <text:p>45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18S" calcext:value-type="time">
            <text:p>12:03:18</text:p>
          </table:table-cell>
          <table:table-cell office:value-type="float" office:value="57" calcext:value-type="float">
            <text:p>5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19S" calcext:value-type="time">
            <text:p>12:03:19</text:p>
          </table:table-cell>
          <table:table-cell office:value-type="float" office:value="75" calcext:value-type="float">
            <text:p>7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20S" calcext:value-type="time">
            <text:p>12:03:20</text:p>
          </table:table-cell>
          <table:table-cell office:value-type="float" office:value="72" calcext:value-type="float">
            <text:p>72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22S" calcext:value-type="time">
            <text:p>12:03:22</text:p>
          </table:table-cell>
          <table:table-cell office:value-type="float" office:value="85" calcext:value-type="float">
            <text:p>85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23S" calcext:value-type="time">
            <text:p>12:03:23</text:p>
          </table:table-cell>
          <table:table-cell office:value-type="float" office:value="83" calcext:value-type="float">
            <text:p>83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25S" calcext:value-type="time">
            <text:p>12:03:25</text:p>
          </table:table-cell>
          <table:table-cell office:value-type="float" office:value="81" calcext:value-type="float">
            <text:p>8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26S" calcext:value-type="time">
            <text:p>12:03:26</text:p>
          </table:table-cell>
          <table:table-cell office:value-type="float" office:value="54" calcext:value-type="float">
            <text:p>5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28S" calcext:value-type="time">
            <text:p>12:03:28</text:p>
          </table:table-cell>
          <table:table-cell office:value-type="float" office:value="86" calcext:value-type="float">
            <text:p>8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29S" calcext:value-type="time">
            <text:p>12:03:29</text:p>
          </table:table-cell>
          <table:table-cell office:value-type="float" office:value="21" calcext:value-type="float">
            <text:p>2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31S" calcext:value-type="time">
            <text:p>12:03:31</text:p>
          </table:table-cell>
          <table:table-cell office:value-type="float" office:value="72" calcext:value-type="float">
            <text:p>7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32S" calcext:value-type="time">
            <text:p>12:03:32</text:p>
          </table:table-cell>
          <table:table-cell office:value-type="float" office:value="91" calcext:value-type="float">
            <text:p>9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33S" calcext:value-type="time">
            <text:p>12:03:33</text:p>
          </table:table-cell>
          <table:table-cell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35S" calcext:value-type="time">
            <text:p>12:03:35</text:p>
          </table:table-cell>
          <table:table-cell office:value-type="float" office:value="55" calcext:value-type="float">
            <text:p>5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36S" calcext:value-type="time">
            <text:p>12:03:36</text:p>
          </table:table-cell>
          <table:table-cell office:value-type="float" office:value="55" calcext:value-type="float">
            <text:p>5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38S" calcext:value-type="time">
            <text:p>12:03:38</text:p>
          </table:table-cell>
          <table:table-cell office:value-type="float" office:value="119" calcext:value-type="float">
            <text:p>119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39S" calcext:value-type="time">
            <text:p>12:03:39</text:p>
          </table:table-cell>
          <table:table-cell office:value-type="float" office:value="48" calcext:value-type="float">
            <text:p>48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41S" calcext:value-type="time">
            <text:p>12:03:41</text:p>
          </table:table-cell>
          <table:table-cell office:value-type="float" office:value="88" calcext:value-type="float">
            <text:p>8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42S" calcext:value-type="time">
            <text:p>12:03:42</text:p>
          </table:table-cell>
          <table:table-cell office:value-type="float" office:value="79" calcext:value-type="float">
            <text:p>79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44S" calcext:value-type="time">
            <text:p>12:03:44</text:p>
          </table:table-cell>
          <table:table-cell office:value-type="float" office:value="88" calcext:value-type="float">
            <text:p>88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45S" calcext:value-type="time">
            <text:p>12:03:45</text:p>
          </table:table-cell>
          <table:table-cell office:value-type="float" office:value="127" calcext:value-type="float">
            <text:p>127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47S" calcext:value-type="time">
            <text:p>12:03:47</text:p>
          </table:table-cell>
          <table:table-cell office:value-type="float" office:value="93" calcext:value-type="float">
            <text:p>9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48S" calcext:value-type="time">
            <text:p>12:03:48</text:p>
          </table:table-cell>
          <table:table-cell office:value-type="float" office:value="99" calcext:value-type="float">
            <text:p>9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50S" calcext:value-type="time">
            <text:p>12:03:50</text:p>
          </table:table-cell>
          <table:table-cell office:value-type="float" office:value="83" calcext:value-type="float">
            <text:p>83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51S" calcext:value-type="time">
            <text:p>12:03:51</text:p>
          </table:table-cell>
          <table:table-cell office:value-type="float" office:value="121" calcext:value-type="float">
            <text:p>12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52S" calcext:value-type="time">
            <text:p>12:03:52</text:p>
          </table:table-cell>
          <table:table-cell office:value-type="float" office:value="52" calcext:value-type="float">
            <text:p>5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54S" calcext:value-type="time">
            <text:p>12:03:54</text:p>
          </table:table-cell>
          <table:table-cell office:value-type="float" office:value="103" calcext:value-type="float">
            <text:p>10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55S" calcext:value-type="time">
            <text:p>12:03:55</text:p>
          </table:table-cell>
          <table:table-cell office:value-type="float" office:value="68" calcext:value-type="float">
            <text:p>6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57S" calcext:value-type="time">
            <text:p>12:03:57</text:p>
          </table:table-cell>
          <table:table-cell office:value-type="float" office:value="121" calcext:value-type="float">
            <text:p>121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3M58S" calcext:value-type="time">
            <text:p>12:03:58</text:p>
          </table:table-cell>
          <table:table-cell office:value-type="float" office:value="73" calcext:value-type="float">
            <text:p>7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00S" calcext:value-type="time">
            <text:p>12:04:00</text:p>
          </table:table-cell>
          <table:table-cell office:value-type="float" office:value="35" calcext:value-type="float">
            <text:p>3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01S" calcext:value-type="time">
            <text:p>12:04:01</text:p>
          </table:table-cell>
          <table:table-cell office:value-type="float" office:value="144" calcext:value-type="float">
            <text:p>14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03S" calcext:value-type="time">
            <text:p>12:04:03</text:p>
          </table:table-cell>
          <table:table-cell office:value-type="float" office:value="107" calcext:value-type="float">
            <text:p>10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04S" calcext:value-type="time">
            <text:p>12:04:04</text:p>
          </table:table-cell>
          <table:table-cell office:value-type="float" office:value="76" calcext:value-type="float">
            <text:p>7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06S" calcext:value-type="time">
            <text:p>12:04:06</text:p>
          </table:table-cell>
          <table:table-cell office:value-type="float" office:value="76" calcext:value-type="float">
            <text:p>7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07S" calcext:value-type="time">
            <text:p>12:04:07</text:p>
          </table:table-cell>
          <table:table-cell office:value-type="float" office:value="90" calcext:value-type="float">
            <text:p>9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09S" calcext:value-type="time">
            <text:p>12:04:09</text:p>
          </table:table-cell>
          <table:table-cell office:value-type="float" office:value="107" calcext:value-type="float">
            <text:p>10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10S" calcext:value-type="time">
            <text:p>12:04:10</text:p>
          </table:table-cell>
          <table:table-cell office:value-type="float" office:value="82" calcext:value-type="float">
            <text:p>8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12S" calcext:value-type="time">
            <text:p>12:04:12</text:p>
          </table:table-cell>
          <table:table-cell office:value-type="float" office:value="118" calcext:value-type="float">
            <text:p>11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13S" calcext:value-type="time">
            <text:p>12:04:13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15S" calcext:value-type="time">
            <text:p>12:04:15</text:p>
          </table:table-cell>
          <table:table-cell office:value-type="float" office:value="121" calcext:value-type="float">
            <text:p>12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16S" calcext:value-type="time">
            <text:p>12:04:16</text:p>
          </table:table-cell>
          <table:table-cell office:value-type="float" office:value="159" calcext:value-type="float">
            <text:p>15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17S" calcext:value-type="time">
            <text:p>12:04:17</text:p>
          </table:table-cell>
          <table:table-cell office:value-type="float" office:value="109" calcext:value-type="float">
            <text:p>10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19S" calcext:value-type="time">
            <text:p>12:04:19</text:p>
          </table:table-cell>
          <table:table-cell office:value-type="float" office:value="118" calcext:value-type="float">
            <text:p>11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20S" calcext:value-type="time">
            <text:p>12:04:20</text:p>
          </table:table-cell>
          <table:table-cell office:value-type="float" office:value="121" calcext:value-type="float">
            <text:p>12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22S" calcext:value-type="time">
            <text:p>12:04:22</text:p>
          </table:table-cell>
          <table:table-cell office:value-type="float" office:value="120" calcext:value-type="float">
            <text:p>12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23S" calcext:value-type="time">
            <text:p>12:04:23</text:p>
          </table:table-cell>
          <table:table-cell office:value-type="float" office:value="133" calcext:value-type="float">
            <text:p>133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25S" calcext:value-type="time">
            <text:p>12:04:25</text:p>
          </table:table-cell>
          <table:table-cell office:value-type="float" office:value="90" calcext:value-type="float">
            <text:p>9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26S" calcext:value-type="time">
            <text:p>12:04:26</text:p>
          </table:table-cell>
          <table:table-cell office:value-type="float" office:value="95" calcext:value-type="float">
            <text:p>9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28S" calcext:value-type="time">
            <text:p>12:04:28</text:p>
          </table:table-cell>
          <table:table-cell office:value-type="float" office:value="76" calcext:value-type="float">
            <text:p>7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29S" calcext:value-type="time">
            <text:p>12:04:29</text:p>
          </table:table-cell>
          <table:table-cell office:value-type="float" office:value="83" calcext:value-type="float">
            <text:p>83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31S" calcext:value-type="time">
            <text:p>12:04:31</text:p>
          </table:table-cell>
          <table:table-cell office:value-type="float" office:value="61" calcext:value-type="float">
            <text:p>6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32S" calcext:value-type="time">
            <text:p>12:04:32</text:p>
          </table:table-cell>
          <table:table-cell office:value-type="float" office:value="108" calcext:value-type="float">
            <text:p>10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34S" calcext:value-type="time">
            <text:p>12:04:34</text:p>
          </table:table-cell>
          <table:table-cell office:value-type="float" office:value="88" calcext:value-type="float">
            <text:p>8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35S" calcext:value-type="time">
            <text:p>12:04:35</text:p>
          </table:table-cell>
          <table:table-cell office:value-type="float" office:value="83" calcext:value-type="float">
            <text:p>83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37S" calcext:value-type="time">
            <text:p>12:04:37</text:p>
          </table:table-cell>
          <table:table-cell office:value-type="float" office:value="81" calcext:value-type="float">
            <text:p>8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38S" calcext:value-type="time">
            <text:p>12:04:38</text:p>
          </table:table-cell>
          <table:table-cell office:value-type="float" office:value="49" calcext:value-type="float">
            <text:p>49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40S" calcext:value-type="time">
            <text:p>12:04:40</text:p>
          </table:table-cell>
          <table:table-cell office:value-type="float" office:value="110" calcext:value-type="float">
            <text:p>11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41S" calcext:value-type="time">
            <text:p>12:04:41</text:p>
          </table:table-cell>
          <table:table-cell office:value-type="float" office:value="94" calcext:value-type="float">
            <text:p>9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43S" calcext:value-type="time">
            <text:p>12:04:43</text:p>
          </table:table-cell>
          <table:table-cell office:value-type="float" office:value="92" calcext:value-type="float">
            <text:p>9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44S" calcext:value-type="time">
            <text:p>12:04:44</text:p>
          </table:table-cell>
          <table:table-cell office:value-type="float" office:value="97" calcext:value-type="float">
            <text:p>9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46S" calcext:value-type="time">
            <text:p>12:04:46</text:p>
          </table:table-cell>
          <table:table-cell office:value-type="float" office:value="82" calcext:value-type="float">
            <text:p>8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47S" calcext:value-type="time">
            <text:p>12:04:47</text:p>
          </table:table-cell>
          <table:table-cell office:value-type="float" office:value="96" calcext:value-type="float">
            <text:p>9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49S" calcext:value-type="time">
            <text:p>12:04:49</text:p>
          </table:table-cell>
          <table:table-cell office:value-type="float" office:value="63" calcext:value-type="float">
            <text:p>6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50S" calcext:value-type="time">
            <text:p>12:04:50</text:p>
          </table:table-cell>
          <table:table-cell office:value-type="float" office:value="102" calcext:value-type="float">
            <text:p>10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52S" calcext:value-type="time">
            <text:p>12:04:52</text:p>
          </table:table-cell>
          <table:table-cell office:value-type="float" office:value="70" calcext:value-type="float">
            <text:p>7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53S" calcext:value-type="time">
            <text:p>12:04:53</text:p>
          </table:table-cell>
          <table:table-cell office:value-type="float" office:value="131" calcext:value-type="float">
            <text:p>13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55S" calcext:value-type="time">
            <text:p>12:04:55</text:p>
          </table:table-cell>
          <table:table-cell office:value-type="float" office:value="64" calcext:value-type="float">
            <text:p>6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56S" calcext:value-type="time">
            <text:p>12:04:56</text:p>
          </table:table-cell>
          <table:table-cell office:value-type="float" office:value="184" calcext:value-type="float">
            <text:p>184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58S" calcext:value-type="time">
            <text:p>12:04:58</text:p>
          </table:table-cell>
          <table:table-cell office:value-type="float" office:value="75" calcext:value-type="float">
            <text:p>7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4M59S" calcext:value-type="time">
            <text:p>12:04:59</text:p>
          </table:table-cell>
          <table:table-cell office:value-type="float" office:value="98" calcext:value-type="float">
            <text:p>9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01S" calcext:value-type="time">
            <text:p>12:05:01</text:p>
          </table:table-cell>
          <table:table-cell office:value-type="float" office:value="105" calcext:value-type="float">
            <text:p>10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02S" calcext:value-type="time">
            <text:p>12:05:02</text:p>
          </table:table-cell>
          <table:table-cell office:value-type="float" office:value="131" calcext:value-type="float">
            <text:p>13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04S" calcext:value-type="time">
            <text:p>12:05:04</text:p>
          </table:table-cell>
          <table:table-cell office:value-type="float" office:value="52" calcext:value-type="float">
            <text:p>52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05S" calcext:value-type="time">
            <text:p>12:05:05</text:p>
          </table:table-cell>
          <table:table-cell office:value-type="float" office:value="97" calcext:value-type="float">
            <text:p>97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07S" calcext:value-type="time">
            <text:p>12:05:07</text:p>
          </table:table-cell>
          <table:table-cell office:value-type="float" office:value="143" calcext:value-type="float">
            <text:p>1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08S" calcext:value-type="time">
            <text:p>12:05:08</text:p>
          </table:table-cell>
          <table:table-cell office:value-type="float" office:value="76" calcext:value-type="float">
            <text:p>7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10S" calcext:value-type="time">
            <text:p>12:05:10</text:p>
          </table:table-cell>
          <table:table-cell office:value-type="float" office:value="84" calcext:value-type="float">
            <text:p>8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11S" calcext:value-type="time">
            <text:p>12:05:11</text:p>
          </table:table-cell>
          <table:table-cell office:value-type="float" office:value="81" calcext:value-type="float">
            <text:p>8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13S" calcext:value-type="time">
            <text:p>12:05:13</text:p>
          </table:table-cell>
          <table:table-cell office:value-type="float" office:value="61" calcext:value-type="float">
            <text:p>6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14S" calcext:value-type="time">
            <text:p>12:05:14</text:p>
          </table:table-cell>
          <table:table-cell office:value-type="float" office:value="110" calcext:value-type="float">
            <text:p>11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16S" calcext:value-type="time">
            <text:p>12:05:16</text:p>
          </table:table-cell>
          <table:table-cell office:value-type="float" office:value="67" calcext:value-type="float">
            <text:p>6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17S" calcext:value-type="time">
            <text:p>12:05:17</text:p>
          </table:table-cell>
          <table:table-cell office:value-type="float" office:value="204" calcext:value-type="float">
            <text:p>204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19S" calcext:value-type="time">
            <text:p>12:05:19</text:p>
          </table:table-cell>
          <table:table-cell office:value-type="float" office:value="131" calcext:value-type="float">
            <text:p>13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20S" calcext:value-type="time">
            <text:p>12:05:20</text:p>
          </table:table-cell>
          <table:table-cell office:value-type="float" office:value="82" calcext:value-type="float">
            <text:p>8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22S" calcext:value-type="time">
            <text:p>12:05:22</text:p>
          </table:table-cell>
          <table:table-cell office:value-type="float" office:value="88" calcext:value-type="float">
            <text:p>8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23S" calcext:value-type="time">
            <text:p>12:05:23</text:p>
          </table:table-cell>
          <table:table-cell office:value-type="float" office:value="103" calcext:value-type="float">
            <text:p>10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25S" calcext:value-type="time">
            <text:p>12:05:25</text:p>
          </table:table-cell>
          <table:table-cell office:value-type="float" office:value="92" calcext:value-type="float">
            <text:p>9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26S" calcext:value-type="time">
            <text:p>12:05:26</text:p>
          </table:table-cell>
          <table:table-cell office:value-type="float" office:value="42" calcext:value-type="float">
            <text:p>4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28S" calcext:value-type="time">
            <text:p>12:05:28</text:p>
          </table:table-cell>
          <table:table-cell office:value-type="float" office:value="129" calcext:value-type="float">
            <text:p>129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29S" calcext:value-type="time">
            <text:p>12:05:29</text:p>
          </table:table-cell>
          <table:table-cell office:value-type="float" office:value="156" calcext:value-type="float">
            <text:p>15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31S" calcext:value-type="time">
            <text:p>12:05:31</text:p>
          </table:table-cell>
          <table:table-cell office:value-type="float" office:value="56" calcext:value-type="float">
            <text:p>56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32S" calcext:value-type="time">
            <text:p>12:05:32</text:p>
          </table:table-cell>
          <table:table-cell office:value-type="float" office:value="54" calcext:value-type="float">
            <text:p>5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34S" calcext:value-type="time">
            <text:p>12:05:34</text:p>
          </table:table-cell>
          <table:table-cell office:value-type="float" office:value="124" calcext:value-type="float">
            <text:p>12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35S" calcext:value-type="time">
            <text:p>12:05:35</text:p>
          </table:table-cell>
          <table:table-cell office:value-type="float" office:value="129" calcext:value-type="float">
            <text:p>129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37S" calcext:value-type="time">
            <text:p>12:05:37</text:p>
          </table:table-cell>
          <table:table-cell office:value-type="float" office:value="83" calcext:value-type="float">
            <text:p>83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38S" calcext:value-type="time">
            <text:p>12:05:38</text:p>
          </table:table-cell>
          <table:table-cell office:value-type="float" office:value="80" calcext:value-type="float">
            <text:p>8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40S" calcext:value-type="time">
            <text:p>12:05:40</text:p>
          </table:table-cell>
          <table:table-cell office:value-type="float" office:value="182" calcext:value-type="float">
            <text:p>182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41S" calcext:value-type="time">
            <text:p>12:05:41</text:p>
          </table:table-cell>
          <table:table-cell office:value-type="float" office:value="41" calcext:value-type="float">
            <text:p>4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43S" calcext:value-type="time">
            <text:p>12:05:43</text:p>
          </table:table-cell>
          <table:table-cell office:value-type="float" office:value="86" calcext:value-type="float">
            <text:p>8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44S" calcext:value-type="time">
            <text:p>12:05:44</text:p>
          </table:table-cell>
          <table:table-cell office:value-type="float" office:value="123" calcext:value-type="float">
            <text:p>123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46S" calcext:value-type="time">
            <text:p>12:05:46</text:p>
          </table:table-cell>
          <table:table-cell office:value-type="float" office:value="104" calcext:value-type="float">
            <text:p>10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48S" calcext:value-type="time">
            <text:p>12:05:48</text:p>
          </table:table-cell>
          <table:table-cell office:value-type="float" office:value="119" calcext:value-type="float">
            <text:p>11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49S" calcext:value-type="time">
            <text:p>12:05:49</text:p>
          </table:table-cell>
          <table:table-cell office:value-type="float" office:value="85" calcext:value-type="float">
            <text:p>8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51S" calcext:value-type="time">
            <text:p>12:05:51</text:p>
          </table:table-cell>
          <table:table-cell office:value-type="float" office:value="82" calcext:value-type="float">
            <text:p>8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52S" calcext:value-type="time">
            <text:p>12:05:52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54S" calcext:value-type="time">
            <text:p>12:05:54</text:p>
          </table:table-cell>
          <table:table-cell office:value-type="float" office:value="140" calcext:value-type="float">
            <text:p>14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55S" calcext:value-type="time">
            <text:p>12:05:55</text:p>
          </table:table-cell>
          <table:table-cell office:value-type="float" office:value="77" calcext:value-type="float">
            <text:p>77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57S" calcext:value-type="time">
            <text:p>12:05:57</text:p>
          </table:table-cell>
          <table:table-cell office:value-type="float" office:value="91" calcext:value-type="float">
            <text:p>91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5M58S" calcext:value-type="time">
            <text:p>12:05:58</text:p>
          </table:table-cell>
          <table:table-cell office:value-type="float" office:value="65" calcext:value-type="float">
            <text:p>6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00S" calcext:value-type="time">
            <text:p>12:06:00</text:p>
          </table:table-cell>
          <table:table-cell office:value-type="float" office:value="113" calcext:value-type="float">
            <text:p>113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01S" calcext:value-type="time">
            <text:p>12:06:01</text:p>
          </table:table-cell>
          <table:table-cell office:value-type="float" office:value="138" calcext:value-type="float">
            <text:p>13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03S" calcext:value-type="time">
            <text:p>12:06:03</text:p>
          </table:table-cell>
          <table:table-cell office:value-type="float" office:value="101" calcext:value-type="float">
            <text:p>101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04S" calcext:value-type="time">
            <text:p>12:06:04</text:p>
          </table:table-cell>
          <table:table-cell office:value-type="float" office:value="105" calcext:value-type="float">
            <text:p>105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06S" calcext:value-type="time">
            <text:p>12:06:06</text:p>
          </table:table-cell>
          <table:table-cell office:value-type="float" office:value="42" calcext:value-type="float">
            <text:p>42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07S" calcext:value-type="time">
            <text:p>12:06:07</text:p>
          </table:table-cell>
          <table:table-cell office:value-type="float" office:value="117" calcext:value-type="float">
            <text:p>117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09S" calcext:value-type="time">
            <text:p>12:06:09</text:p>
          </table:table-cell>
          <table:table-cell office:value-type="float" office:value="77" calcext:value-type="float">
            <text:p>77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10S" calcext:value-type="time">
            <text:p>12:06:10</text:p>
          </table:table-cell>
          <table:table-cell office:value-type="float" office:value="77" calcext:value-type="float">
            <text:p>77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12S" calcext:value-type="time">
            <text:p>12:06:12</text:p>
          </table:table-cell>
          <table:table-cell office:value-type="float" office:value="67" calcext:value-type="float">
            <text:p>6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14S" calcext:value-type="time">
            <text:p>12:06:14</text:p>
          </table:table-cell>
          <table:table-cell office:value-type="float" office:value="70" calcext:value-type="float">
            <text:p>7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15S" calcext:value-type="time">
            <text:p>12:06:15</text:p>
          </table:table-cell>
          <table:table-cell office:value-type="float" office:value="90" calcext:value-type="float">
            <text:p>9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17S" calcext:value-type="time">
            <text:p>12:06:17</text:p>
          </table:table-cell>
          <table:table-cell office:value-type="float" office:value="134" calcext:value-type="float">
            <text:p>13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18S" calcext:value-type="time">
            <text:p>12:06:18</text:p>
          </table:table-cell>
          <table:table-cell office:value-type="float" office:value="95" calcext:value-type="float">
            <text:p>95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20S" calcext:value-type="time">
            <text:p>12:06:20</text:p>
          </table:table-cell>
          <table:table-cell office:value-type="float" office:value="125" calcext:value-type="float">
            <text:p>125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21S" calcext:value-type="time">
            <text:p>12:06:21</text:p>
          </table:table-cell>
          <table:table-cell office:value-type="float" office:value="88" calcext:value-type="float">
            <text:p>8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23S" calcext:value-type="time">
            <text:p>12:06:23</text:p>
          </table:table-cell>
          <table:table-cell office:value-type="float" office:value="42" calcext:value-type="float">
            <text:p>42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24S" calcext:value-type="time">
            <text:p>12:06:24</text:p>
          </table:table-cell>
          <table:table-cell office:value-type="float" office:value="43" calcext:value-type="float">
            <text:p>4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26S" calcext:value-type="time">
            <text:p>12:06:26</text:p>
          </table:table-cell>
          <table:table-cell office:value-type="float" office:value="112" calcext:value-type="float">
            <text:p>11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27S" calcext:value-type="time">
            <text:p>12:06:27</text:p>
          </table:table-cell>
          <table:table-cell office:value-type="float" office:value="120" calcext:value-type="float">
            <text:p>12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29S" calcext:value-type="time">
            <text:p>12:06:29</text:p>
          </table:table-cell>
          <table:table-cell office:value-type="float" office:value="79" calcext:value-type="float">
            <text:p>79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31S" calcext:value-type="time">
            <text:p>12:06:31</text:p>
          </table:table-cell>
          <table:table-cell office:value-type="float" office:value="56" calcext:value-type="float">
            <text:p>56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32S" calcext:value-type="time">
            <text:p>12:06:32</text:p>
          </table:table-cell>
          <table:table-cell office:value-type="float" office:value="137" calcext:value-type="float">
            <text:p>137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34S" calcext:value-type="time">
            <text:p>12:06:34</text:p>
          </table:table-cell>
          <table:table-cell office:value-type="float" office:value="55" calcext:value-type="float">
            <text:p>5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35S" calcext:value-type="time">
            <text:p>12:06:35</text:p>
          </table:table-cell>
          <table:table-cell office:value-type="float" office:value="149" calcext:value-type="float">
            <text:p>149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37S" calcext:value-type="time">
            <text:p>12:06:37</text:p>
          </table:table-cell>
          <table:table-cell office:value-type="float" office:value="85" calcext:value-type="float">
            <text:p>85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38S" calcext:value-type="time">
            <text:p>12:06:38</text:p>
          </table:table-cell>
          <table:table-cell office:value-type="float" office:value="68" calcext:value-type="float">
            <text:p>6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40S" calcext:value-type="time">
            <text:p>12:06:40</text:p>
          </table:table-cell>
          <table:table-cell office:value-type="float" office:value="66" calcext:value-type="float">
            <text:p>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41S" calcext:value-type="time">
            <text:p>12:06:41</text:p>
          </table:table-cell>
          <table:table-cell office:value-type="float" office:value="41" calcext:value-type="float">
            <text:p>41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43S" calcext:value-type="time">
            <text:p>12:06:43</text:p>
          </table:table-cell>
          <table:table-cell office:value-type="float" office:value="159" calcext:value-type="float">
            <text:p>15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44S" calcext:value-type="time">
            <text:p>12:06:44</text:p>
          </table:table-cell>
          <table:table-cell office:value-type="float" office:value="74" calcext:value-type="float">
            <text:p>7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46S" calcext:value-type="time">
            <text:p>12:06:46</text:p>
          </table:table-cell>
          <table:table-cell office:value-type="float" office:value="66" calcext:value-type="float">
            <text:p>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48S" calcext:value-type="time">
            <text:p>12:06:48</text:p>
          </table:table-cell>
          <table:table-cell office:value-type="float" office:value="92" calcext:value-type="float">
            <text:p>9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49S" calcext:value-type="time">
            <text:p>12:06:49</text:p>
          </table:table-cell>
          <table:table-cell office:value-type="float" office:value="32" calcext:value-type="float">
            <text:p>32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51S" calcext:value-type="time">
            <text:p>12:06:51</text:p>
          </table:table-cell>
          <table:table-cell office:value-type="float" office:value="62" calcext:value-type="float">
            <text:p>62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52S" calcext:value-type="time">
            <text:p>12:06:52</text:p>
          </table:table-cell>
          <table:table-cell office:value-type="float" office:value="104" calcext:value-type="float">
            <text:p>10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54S" calcext:value-type="time">
            <text:p>12:06:54</text:p>
          </table:table-cell>
          <table:table-cell office:value-type="float" office:value="105" calcext:value-type="float">
            <text:p>10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55S" calcext:value-type="time">
            <text:p>12:06:55</text:p>
          </table:table-cell>
          <table:table-cell office:value-type="float" office:value="95" calcext:value-type="float">
            <text:p>9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57S" calcext:value-type="time">
            <text:p>12:06:57</text:p>
          </table:table-cell>
          <table:table-cell office:value-type="float" office:value="29" calcext:value-type="float">
            <text:p>29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6M58S" calcext:value-type="time">
            <text:p>12:06:58</text:p>
          </table:table-cell>
          <table:table-cell office:value-type="float" office:value="76" calcext:value-type="float">
            <text:p>7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00S" calcext:value-type="time">
            <text:p>12:07:00</text:p>
          </table:table-cell>
          <table:table-cell office:value-type="float" office:value="99" calcext:value-type="float">
            <text:p>99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02S" calcext:value-type="time">
            <text:p>12:07:02</text:p>
          </table:table-cell>
          <table:table-cell office:value-type="float" office:value="118" calcext:value-type="float">
            <text:p>11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03S" calcext:value-type="time">
            <text:p>12:07:03</text:p>
          </table:table-cell>
          <table:table-cell office:value-type="float" office:value="295" calcext:value-type="float">
            <text:p>295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05S" calcext:value-type="time">
            <text:p>12:07:05</text:p>
          </table:table-cell>
          <table:table-cell office:value-type="float" office:value="111" calcext:value-type="float">
            <text:p>111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06S" calcext:value-type="time">
            <text:p>12:07:06</text:p>
          </table:table-cell>
          <table:table-cell office:value-type="float" office:value="7" calcext:value-type="float">
            <text:p>7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08S" calcext:value-type="time">
            <text:p>12:07:08</text:p>
          </table:table-cell>
          <table:table-cell office:value-type="float" office:value="103" calcext:value-type="float">
            <text:p>103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09S" calcext:value-type="time">
            <text:p>12:07:09</text:p>
          </table:table-cell>
          <table:table-cell office:value-type="float" office:value="149" calcext:value-type="float">
            <text:p>14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11S" calcext:value-type="time">
            <text:p>12:07:11</text:p>
          </table:table-cell>
          <table:table-cell office:value-type="float" office:value="85" calcext:value-type="float">
            <text:p>8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13S" calcext:value-type="time">
            <text:p>12:07:13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14S" calcext:value-type="time">
            <text:p>12:07:14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16S" calcext:value-type="time">
            <text:p>12:07:16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17S" calcext:value-type="time">
            <text:p>12:07:17</text:p>
          </table:table-cell>
          <table:table-cell office:value-type="float" office:value="81" calcext:value-type="float">
            <text:p>8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19S" calcext:value-type="time">
            <text:p>12:07:19</text:p>
          </table:table-cell>
          <table:table-cell office:value-type="float" office:value="45" calcext:value-type="float">
            <text:p>4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20S" calcext:value-type="time">
            <text:p>12:07:20</text:p>
          </table:table-cell>
          <table:table-cell office:value-type="float" office:value="51" calcext:value-type="float">
            <text:p>5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22S" calcext:value-type="time">
            <text:p>12:07:22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24S" calcext:value-type="time">
            <text:p>12:07:24</text:p>
          </table:table-cell>
          <table:table-cell office:value-type="float" office:value="58" calcext:value-type="float">
            <text:p>5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25S" calcext:value-type="time">
            <text:p>12:07:25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27S" calcext:value-type="time">
            <text:p>12:07:27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28S" calcext:value-type="time">
            <text:p>12:07:28</text:p>
          </table:table-cell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30S" calcext:value-type="time">
            <text:p>12:07:30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31S" calcext:value-type="time">
            <text:p>12:07:31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33S" calcext:value-type="time">
            <text:p>12:07:33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35S" calcext:value-type="time">
            <text:p>12:07:35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36S" calcext:value-type="time">
            <text:p>12:07:36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38S" calcext:value-type="time">
            <text:p>12:07:38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39S" calcext:value-type="time">
            <text:p>12:07:39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41S" calcext:value-type="time">
            <text:p>12:07:41</text:p>
          </table:table-cell>
          <table:table-cell office:value-type="float" office:value="51" calcext:value-type="float">
            <text:p>5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42S" calcext:value-type="time">
            <text:p>12:07:42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44S" calcext:value-type="time">
            <text:p>12:07:44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46S" calcext:value-type="time">
            <text:p>12:07:46</text:p>
          </table:table-cell>
          <table:table-cell office:value-type="float" office:value="53" calcext:value-type="float">
            <text:p>5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47S" calcext:value-type="time">
            <text:p>12:07:47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49S" calcext:value-type="time">
            <text:p>12:07:49</text:p>
          </table:table-cell>
          <table:table-cell office:value-type="float" office:value="73" calcext:value-type="float">
            <text:p>7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50S" calcext:value-type="time">
            <text:p>12:07:5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52S" calcext:value-type="time">
            <text:p>12:07:52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54S" calcext:value-type="time">
            <text:p>12:07:54</text:p>
          </table:table-cell>
          <table:table-cell office:value-type="float" office:value="71" calcext:value-type="float">
            <text:p>7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55S" calcext:value-type="time">
            <text:p>12:07:55</text:p>
          </table:table-cell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57S" calcext:value-type="time">
            <text:p>12:07:57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7M58S" calcext:value-type="time">
            <text:p>12:07:58</text:p>
          </table:table-cell>
          <table:table-cell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00S" calcext:value-type="time">
            <text:p>12:08:00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02S" calcext:value-type="time">
            <text:p>12:08:02</text:p>
          </table:table-cell>
          <table:table-cell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03S" calcext:value-type="time">
            <text:p>12:08:03</text:p>
          </table:table-cell>
          <table:table-cell office:value-type="float" office:value="77" calcext:value-type="float">
            <text:p>7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05S" calcext:value-type="time">
            <text:p>12:08:05</text:p>
          </table:table-cell>
          <table:table-cell office:value-type="float" office:value="68" calcext:value-type="float">
            <text:p>6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06S" calcext:value-type="time">
            <text:p>12:08:06</text:p>
          </table:table-cell>
          <table:table-cell office:value-type="float" office:value="50" calcext:value-type="float">
            <text:p>5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08S" calcext:value-type="time">
            <text:p>12:08:08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10S" calcext:value-type="time">
            <text:p>12:08:10</text:p>
          </table:table-cell>
          <table:table-cell office:value-type="float" office:value="58" calcext:value-type="float">
            <text:p>5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11S" calcext:value-type="time">
            <text:p>12:08:11</text:p>
          </table:table-cell>
          <table:table-cell office:value-type="float" office:value="55" calcext:value-type="float">
            <text:p>5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13S" calcext:value-type="time">
            <text:p>12:08:13</text:p>
          </table:table-cell>
          <table:table-cell office:value-type="float" office:value="66" calcext:value-type="float">
            <text:p>6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14S" calcext:value-type="time">
            <text:p>12:08:14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16S" calcext:value-type="time">
            <text:p>12:08:16</text:p>
          </table:table-cell>
          <table:table-cell office:value-type="float" office:value="75" calcext:value-type="float">
            <text:p>7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17S" calcext:value-type="time">
            <text:p>12:08:17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19S" calcext:value-type="time">
            <text:p>12:08:19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21S" calcext:value-type="time">
            <text:p>12:08:21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22S" calcext:value-type="time">
            <text:p>12:08:22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24S" calcext:value-type="time">
            <text:p>12:08:24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25S" calcext:value-type="time">
            <text:p>12:08:25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27S" calcext:value-type="time">
            <text:p>12:08:27</text:p>
          </table:table-cell>
          <table:table-cell office:value-type="float" office:value="48" calcext:value-type="float">
            <text:p>4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29S" calcext:value-type="time">
            <text:p>12:08:29</text:p>
          </table:table-cell>
          <table:table-cell office:value-type="float" office:value="83" calcext:value-type="float">
            <text:p>8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30S" calcext:value-type="time">
            <text:p>12:08:30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32S" calcext:value-type="time">
            <text:p>12:08:32</text:p>
          </table:table-cell>
          <table:table-cell office:value-type="float" office:value="32" calcext:value-type="float">
            <text:p>3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34S" calcext:value-type="time">
            <text:p>12:08:34</text:p>
          </table:table-cell>
          <table:table-cell office:value-type="float" office:value="51" calcext:value-type="float">
            <text:p>5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35S" calcext:value-type="time">
            <text:p>12:08:35</text:p>
          </table:table-cell>
          <table:table-cell office:value-type="float" office:value="67" calcext:value-type="float">
            <text:p>6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37S" calcext:value-type="time">
            <text:p>12:08:37</text:p>
          </table:table-cell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38S" calcext:value-type="time">
            <text:p>12:08:38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40S" calcext:value-type="time">
            <text:p>12:08:40</text:p>
          </table:table-cell>
          <table:table-cell office:value-type="float" office:value="57" calcext:value-type="float">
            <text:p>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42S" calcext:value-type="time">
            <text:p>12:08:42</text:p>
          </table:table-cell>
          <table:table-cell office:value-type="float" office:value="65" calcext:value-type="float">
            <text:p>6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43S" calcext:value-type="time">
            <text:p>12:08:43</text:p>
          </table:table-cell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45S" calcext:value-type="time">
            <text:p>12:08:45</text:p>
          </table:table-cell>
          <table:table-cell office:value-type="float" office:value="37" calcext:value-type="float">
            <text:p>3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46S" calcext:value-type="time">
            <text:p>12:08:46</text:p>
          </table:table-cell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48S" calcext:value-type="time">
            <text:p>12:08:48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50S" calcext:value-type="time">
            <text:p>12:08:50</text:p>
          </table:table-cell>
          <table:table-cell office:value-type="float" office:value="83" calcext:value-type="float">
            <text:p>8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51S" calcext:value-type="time">
            <text:p>12:08:51</text:p>
          </table:table-cell>
          <table:table-cell office:value-type="float" office:value="32" calcext:value-type="float">
            <text:p>3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53S" calcext:value-type="time">
            <text:p>12:08:53</text:p>
          </table:table-cell>
          <table:table-cell office:value-type="float" office:value="55" calcext:value-type="float">
            <text:p>5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54S" calcext:value-type="time">
            <text:p>12:08:54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56S" calcext:value-type="time">
            <text:p>12:08:56</text:p>
          </table:table-cell>
          <table:table-cell office:value-type="float" office:value="63" calcext:value-type="float">
            <text:p>6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58S" calcext:value-type="time">
            <text:p>12:08:58</text:p>
          </table:table-cell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8M59S" calcext:value-type="time">
            <text:p>12:08:59</text:p>
          </table:table-cell>
          <table:table-cell office:value-type="float" office:value="51" calcext:value-type="float">
            <text:p>5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01S" calcext:value-type="time">
            <text:p>12:09:01</text:p>
          </table:table-cell>
          <table:table-cell office:value-type="float" office:value="64" calcext:value-type="float">
            <text:p>6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03S" calcext:value-type="time">
            <text:p>12:09:03</text:p>
          </table:table-cell>
          <table:table-cell office:value-type="float" office:value="57" calcext:value-type="float">
            <text:p>5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04S" calcext:value-type="time">
            <text:p>12:09:04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06S" calcext:value-type="time">
            <text:p>12:09:06</text:p>
          </table:table-cell>
          <table:table-cell office:value-type="float" office:value="88" calcext:value-type="float">
            <text:p>8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07S" calcext:value-type="time">
            <text:p>12:09:07</text:p>
          </table:table-cell>
          <table:table-cell office:value-type="float" office:value="36" calcext:value-type="float">
            <text:p>3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09S" calcext:value-type="time">
            <text:p>12:09:09</text:p>
          </table:table-cell>
          <table:table-cell office:value-type="float" office:value="49" calcext:value-type="float">
            <text:p>4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11S" calcext:value-type="time">
            <text:p>12:09:11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12S" calcext:value-type="time">
            <text:p>12:09:12</text:p>
          </table:table-cell>
          <table:table-cell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14S" calcext:value-type="time">
            <text:p>12:09:14</text:p>
          </table:table-cell>
          <table:table-cell office:value-type="float" office:value="87" calcext:value-type="float">
            <text:p>8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16S" calcext:value-type="time">
            <text:p>12:09:16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17S" calcext:value-type="time">
            <text:p>12:09:17</text:p>
          </table:table-cell>
          <table:table-cell office:value-type="float" office:value="62" calcext:value-type="float">
            <text:p>6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19S" calcext:value-type="time">
            <text:p>12:09:19</text:p>
          </table:table-cell>
          <table:table-cell office:value-type="float" office:value="109" calcext:value-type="float">
            <text:p>10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20S" calcext:value-type="time">
            <text:p>12:09:20</text:p>
          </table:table-cell>
          <table:table-cell office:value-type="float" office:value="76" calcext:value-type="float">
            <text:p>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22S" calcext:value-type="time">
            <text:p>12:09:22</text:p>
          </table:table-cell>
          <table:table-cell office:value-type="float" office:value="55" calcext:value-type="float">
            <text:p>5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24S" calcext:value-type="time">
            <text:p>12:09:24</text:p>
          </table:table-cell>
          <table:table-cell office:value-type="float" office:value="69" calcext:value-type="float">
            <text:p>6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25S" calcext:value-type="time">
            <text:p>12:09:25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27S" calcext:value-type="time">
            <text:p>12:09:27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29S" calcext:value-type="time">
            <text:p>12:09:2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30S" calcext:value-type="time">
            <text:p>12:09:30</text:p>
          </table:table-cell>
          <table:table-cell office:value-type="float" office:value="103" calcext:value-type="float">
            <text:p>10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32S" calcext:value-type="time">
            <text:p>12:09:32</text:p>
          </table:table-cell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34S" calcext:value-type="time">
            <text:p>12:09:34</text:p>
          </table:table-cell>
          <table:table-cell office:value-type="float" office:value="34" calcext:value-type="float">
            <text:p>3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35S" calcext:value-type="time">
            <text:p>12:09:35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37S" calcext:value-type="time">
            <text:p>12:09:37</text:p>
          </table:table-cell>
          <table:table-cell office:value-type="float" office:value="62" calcext:value-type="float">
            <text:p>6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38S" calcext:value-type="time">
            <text:p>12:09:38</text:p>
          </table:table-cell>
          <table:table-cell office:value-type="float" office:value="93" calcext:value-type="float">
            <text:p>9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40S" calcext:value-type="time">
            <text:p>12:09:40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42S" calcext:value-type="time">
            <text:p>12:09:42</text:p>
          </table:table-cell>
          <table:table-cell office:value-type="float" office:value="69" calcext:value-type="float">
            <text:p>6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43S" calcext:value-type="time">
            <text:p>12:09:43</text:p>
          </table:table-cell>
          <table:table-cell office:value-type="float" office:value="98" calcext:value-type="float">
            <text:p>9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45S" calcext:value-type="time">
            <text:p>12:09:45</text:p>
          </table:table-cell>
          <table:table-cell office:value-type="float" office:value="101" calcext:value-type="float">
            <text:p>10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47S" calcext:value-type="time">
            <text:p>12:09:47</text:p>
          </table:table-cell>
          <table:table-cell office:value-type="float" office:value="72" calcext:value-type="float">
            <text:p>7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48S" calcext:value-type="time">
            <text:p>12:09:48</text:p>
          </table:table-cell>
          <table:table-cell office:value-type="float" office:value="35" calcext:value-type="float">
            <text:p>3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50S" calcext:value-type="time">
            <text:p>12:09:50</text:p>
          </table:table-cell>
          <table:table-cell office:value-type="float" office:value="54" calcext:value-type="float">
            <text:p>5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52S" calcext:value-type="time">
            <text:p>12:09:52</text:p>
          </table:table-cell>
          <table:table-cell office:value-type="float" office:value="51" calcext:value-type="float">
            <text:p>5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53S" calcext:value-type="time">
            <text:p>12:09:53</text:p>
          </table:table-cell>
          <table:table-cell office:value-type="float" office:value="77" calcext:value-type="float">
            <text:p>7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55S" calcext:value-type="time">
            <text:p>12:09:55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56S" calcext:value-type="time">
            <text:p>12:09:56</text:p>
          </table:table-cell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09M58S" calcext:value-type="time">
            <text:p>12:09:58</text:p>
          </table:table-cell>
          <table:table-cell office:value-type="float" office:value="168" calcext:value-type="float">
            <text:p>16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00S" calcext:value-type="time">
            <text:p>12:10:00</text:p>
          </table:table-cell>
          <table:table-cell office:value-type="float" office:value="169" calcext:value-type="float">
            <text:p>16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01S" calcext:value-type="time">
            <text:p>12:10:01</text:p>
          </table:table-cell>
          <table:table-cell office:value-type="float" office:value="87" calcext:value-type="float">
            <text:p>8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03S" calcext:value-type="time">
            <text:p>12:10:03</text:p>
          </table:table-cell>
          <table:table-cell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05S" calcext:value-type="time">
            <text:p>12:10:05</text:p>
          </table:table-cell>
          <table:table-cell office:value-type="float" office:value="86" calcext:value-type="float">
            <text:p>8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06S" calcext:value-type="time">
            <text:p>12:10:06</text:p>
          </table:table-cell>
          <table:table-cell office:value-type="float" office:value="84" calcext:value-type="float">
            <text:p>8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08S" calcext:value-type="time">
            <text:p>12:10:08</text:p>
          </table:table-cell>
          <table:table-cell office:value-type="float" office:value="71" calcext:value-type="float">
            <text:p>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10S" calcext:value-type="time">
            <text:p>12:10:10</text:p>
          </table:table-cell>
          <table:table-cell office:value-type="float" office:value="99" calcext:value-type="float">
            <text:p>9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11S" calcext:value-type="time">
            <text:p>12:10:11</text:p>
          </table:table-cell>
          <table:table-cell office:value-type="float" office:value="65" calcext:value-type="float">
            <text:p>6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13S" calcext:value-type="time">
            <text:p>12:10:13</text:p>
          </table:table-cell>
          <table:table-cell office:value-type="float" office:value="36" calcext:value-type="float">
            <text:p>3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15S" calcext:value-type="time">
            <text:p>12:10:15</text:p>
          </table:table-cell>
          <table:table-cell office:value-type="float" office:value="39" calcext:value-type="float">
            <text:p>3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16S" calcext:value-type="time">
            <text:p>12:10:16</text:p>
          </table:table-cell>
          <table:table-cell office:value-type="float" office:value="92" calcext:value-type="float">
            <text:p>9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18S" calcext:value-type="time">
            <text:p>12:10:18</text:p>
          </table:table-cell>
          <table:table-cell office:value-type="float" office:value="52" calcext:value-type="float">
            <text:p>5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20S" calcext:value-type="time">
            <text:p>12:10:20</text:p>
          </table:table-cell>
          <table:table-cell office:value-type="float" office:value="45" calcext:value-type="float">
            <text:p>4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21S" calcext:value-type="time">
            <text:p>12:10:21</text:p>
          </table:table-cell>
          <table:table-cell office:value-type="float" office:value="71" calcext:value-type="float">
            <text:p>7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23S" calcext:value-type="time">
            <text:p>12:10:23</text:p>
          </table:table-cell>
          <table:table-cell office:value-type="float" office:value="63" calcext:value-type="float">
            <text:p>6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25S" calcext:value-type="time">
            <text:p>12:10:25</text:p>
          </table:table-cell>
          <table:table-cell office:value-type="float" office:value="95" calcext:value-type="float">
            <text:p>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26S" calcext:value-type="time">
            <text:p>12:10:26</text:p>
          </table:table-cell>
          <table:table-cell office:value-type="float" office:value="24" calcext:value-type="float">
            <text:p>2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28S" calcext:value-type="time">
            <text:p>12:10:28</text:p>
          </table:table-cell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30S" calcext:value-type="time">
            <text:p>12:10:30</text:p>
          </table:table-cell>
          <table:table-cell office:value-type="float" office:value="66" calcext:value-type="float">
            <text:p>6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31S" calcext:value-type="time">
            <text:p>12:10:31</text:p>
          </table:table-cell>
          <table:table-cell office:value-type="float" office:value="96" calcext:value-type="float">
            <text:p>9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33S" calcext:value-type="time">
            <text:p>12:10:33</text:p>
          </table:table-cell>
          <table:table-cell office:value-type="float" office:value="72" calcext:value-type="float">
            <text:p>7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35S" calcext:value-type="time">
            <text:p>12:10:35</text:p>
          </table:table-cell>
          <table:table-cell office:value-type="float" office:value="128" calcext:value-type="float">
            <text:p>12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36S" calcext:value-type="time">
            <text:p>12:10:36</text:p>
          </table:table-cell>
          <table:table-cell office:value-type="float" office:value="95" calcext:value-type="float">
            <text:p>9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38S" calcext:value-type="time">
            <text:p>12:10:38</text:p>
          </table:table-cell>
          <table:table-cell office:value-type="float" office:value="71" calcext:value-type="float">
            <text:p>7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40S" calcext:value-type="time">
            <text:p>12:10:40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41S" calcext:value-type="time">
            <text:p>12:10:41</text:p>
          </table:table-cell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43S" calcext:value-type="time">
            <text:p>12:10:43</text:p>
          </table:table-cell>
          <table:table-cell office:value-type="float" office:value="116" calcext:value-type="float">
            <text:p>11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45S" calcext:value-type="time">
            <text:p>12:10:45</text:p>
          </table:table-cell>
          <table:table-cell office:value-type="float" office:value="103" calcext:value-type="float">
            <text:p>10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46S" calcext:value-type="time">
            <text:p>12:10:46</text:p>
          </table:table-cell>
          <table:table-cell office:value-type="float" office:value="88" calcext:value-type="float">
            <text:p>8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48S" calcext:value-type="time">
            <text:p>12:10:48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50S" calcext:value-type="time">
            <text:p>12:10:50</text:p>
          </table:table-cell>
          <table:table-cell office:value-type="float" office:value="87" calcext:value-type="float">
            <text:p>8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51S" calcext:value-type="time">
            <text:p>12:10:51</text:p>
          </table:table-cell>
          <table:table-cell office:value-type="float" office:value="96" calcext:value-type="float">
            <text:p>9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53S" calcext:value-type="time">
            <text:p>12:10:53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55S" calcext:value-type="time">
            <text:p>12:10:55</text:p>
          </table:table-cell>
          <table:table-cell office:value-type="float" office:value="64" calcext:value-type="float">
            <text:p>6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56S" calcext:value-type="time">
            <text:p>12:10:56</text:p>
          </table:table-cell>
          <table:table-cell office:value-type="float" office:value="87" calcext:value-type="float">
            <text:p>8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0M58S" calcext:value-type="time">
            <text:p>12:10:58</text:p>
          </table:table-cell>
          <table:table-cell office:value-type="float" office:value="63" calcext:value-type="float">
            <text:p>6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00S" calcext:value-type="time">
            <text:p>12:11:00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01S" calcext:value-type="time">
            <text:p>12:11:01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03S" calcext:value-type="time">
            <text:p>12:11:03</text:p>
          </table:table-cell>
          <table:table-cell office:value-type="float" office:value="128" calcext:value-type="float">
            <text:p>12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05S" calcext:value-type="time">
            <text:p>12:11:05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06S" calcext:value-type="time">
            <text:p>12:11:06</text:p>
          </table:table-cell>
          <table:table-cell office:value-type="float" office:value="71" calcext:value-type="float">
            <text:p>7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08S" calcext:value-type="time">
            <text:p>12:11:08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10S" calcext:value-type="time">
            <text:p>12:11:10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11S" calcext:value-type="time">
            <text:p>12:11:11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13S" calcext:value-type="time">
            <text:p>12:11:13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15S" calcext:value-type="time">
            <text:p>12:11:15</text:p>
          </table:table-cell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16S" calcext:value-type="time">
            <text:p>12:11:16</text:p>
          </table:table-cell>
          <table:table-cell office:value-type="float" office:value="105" calcext:value-type="float">
            <text:p>10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18S" calcext:value-type="time">
            <text:p>12:11:18</text:p>
          </table:table-cell>
          <table:table-cell office:value-type="float" office:value="116" calcext:value-type="float">
            <text:p>11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20S" calcext:value-type="time">
            <text:p>12:11:20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21S" calcext:value-type="time">
            <text:p>12:11:21</text:p>
          </table:table-cell>
          <table:table-cell office:value-type="float" office:value="197" calcext:value-type="float">
            <text:p>19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23S" calcext:value-type="time">
            <text:p>12:11:23</text:p>
          </table:table-cell>
          <table:table-cell office:value-type="float" office:value="100" calcext:value-type="float">
            <text:p>10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25S" calcext:value-type="time">
            <text:p>12:11:25</text:p>
          </table:table-cell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27S" calcext:value-type="time">
            <text:p>12:11:27</text:p>
          </table:table-cell>
          <table:table-cell office:value-type="float" office:value="99" calcext:value-type="float">
            <text:p>9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28S" calcext:value-type="time">
            <text:p>12:11:28</text:p>
          </table:table-cell>
          <table:table-cell office:value-type="float" office:value="139" calcext:value-type="float">
            <text:p>13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30S" calcext:value-type="time">
            <text:p>12:11:30</text:p>
          </table:table-cell>
          <table:table-cell office:value-type="float" office:value="80" calcext:value-type="float">
            <text:p>8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32S" calcext:value-type="time">
            <text:p>12:11:32</text:p>
          </table:table-cell>
          <table:table-cell office:value-type="float" office:value="78" calcext:value-type="float">
            <text:p>7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33S" calcext:value-type="time">
            <text:p>12:11:33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35S" calcext:value-type="time">
            <text:p>12:11:35</text:p>
          </table:table-cell>
          <table:table-cell office:value-type="float" office:value="175" calcext:value-type="float">
            <text:p>17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37S" calcext:value-type="time">
            <text:p>12:11:37</text:p>
          </table:table-cell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39S" calcext:value-type="time">
            <text:p>12:11:39</text:p>
          </table:table-cell>
          <table:table-cell office:value-type="float" office:value="94" calcext:value-type="float">
            <text:p>9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40S" calcext:value-type="time">
            <text:p>12:11:40</text:p>
          </table:table-cell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42S" calcext:value-type="time">
            <text:p>12:11:42</text:p>
          </table:table-cell>
          <table:table-cell office:value-type="float" office:value="163" calcext:value-type="float">
            <text:p>16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44S" calcext:value-type="time">
            <text:p>12:11:44</text:p>
          </table:table-cell>
          <table:table-cell office:value-type="float" office:value="94" calcext:value-type="float">
            <text:p>9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45S" calcext:value-type="time">
            <text:p>12:11:45</text:p>
          </table:table-cell>
          <table:table-cell office:value-type="float" office:value="86" calcext:value-type="float">
            <text:p>8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47S" calcext:value-type="time">
            <text:p>12:11:47</text:p>
          </table:table-cell>
          <table:table-cell office:value-type="float" office:value="52" calcext:value-type="float">
            <text:p>5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49S" calcext:value-type="time">
            <text:p>12:11:49</text:p>
          </table:table-cell>
          <table:table-cell office:value-type="float" office:value="89" calcext:value-type="float">
            <text:p>8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50S" calcext:value-type="time">
            <text:p>12:11:50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52S" calcext:value-type="time">
            <text:p>12:11:5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54S" calcext:value-type="time">
            <text:p>12:11:54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56S" calcext:value-type="time">
            <text:p>12:11:56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57S" calcext:value-type="time">
            <text:p>12:11:57</text:p>
          </table:table-cell>
          <table:table-cell office:value-type="float" office:value="76" calcext:value-type="float">
            <text:p>7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1M59S" calcext:value-type="time">
            <text:p>12:11:59</text:p>
          </table:table-cell>
          <table:table-cell office:value-type="float" office:value="53" calcext:value-type="float">
            <text:p>5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01S" calcext:value-type="time">
            <text:p>12:12:01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02S" calcext:value-type="time">
            <text:p>12:12:02</text:p>
          </table:table-cell>
          <table:table-cell office:value-type="float" office:value="64" calcext:value-type="float">
            <text:p>6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04S" calcext:value-type="time">
            <text:p>12:12:04</text:p>
          </table:table-cell>
          <table:table-cell office:value-type="float" office:value="49" calcext:value-type="float">
            <text:p>4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06S" calcext:value-type="time">
            <text:p>12:12:06</text:p>
          </table:table-cell>
          <table:table-cell office:value-type="float" office:value="96" calcext:value-type="float">
            <text:p>9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07S" calcext:value-type="time">
            <text:p>12:12:07</text:p>
          </table:table-cell>
          <table:table-cell office:value-type="float" office:value="33" calcext:value-type="float">
            <text:p>3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09S" calcext:value-type="time">
            <text:p>12:12:09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11S" calcext:value-type="time">
            <text:p>12:12:11</text:p>
          </table:table-cell>
          <table:table-cell office:value-type="float" office:value="110" calcext:value-type="float">
            <text:p>11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13S" calcext:value-type="time">
            <text:p>12:12:13</text:p>
          </table:table-cell>
          <table:table-cell office:value-type="float" office:value="83" calcext:value-type="float">
            <text:p>8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14S" calcext:value-type="time">
            <text:p>12:12:14</text:p>
          </table:table-cell>
          <table:table-cell office:value-type="float" office:value="89" calcext:value-type="float">
            <text:p>8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16S" calcext:value-type="time">
            <text:p>12:12:16</text:p>
          </table:table-cell>
          <table:table-cell office:value-type="float" office:value="92" calcext:value-type="float">
            <text:p>9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18S" calcext:value-type="time">
            <text:p>12:12:18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19S" calcext:value-type="time">
            <text:p>12:12:19</text:p>
          </table:table-cell>
          <table:table-cell office:value-type="float" office:value="50" calcext:value-type="float">
            <text:p>5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21S" calcext:value-type="time">
            <text:p>12:12:21</text:p>
          </table:table-cell>
          <table:table-cell office:value-type="float" office:value="163" calcext:value-type="float">
            <text:p>16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23S" calcext:value-type="time">
            <text:p>12:12:23</text:p>
          </table:table-cell>
          <table:table-cell office:value-type="float" office:value="202" calcext:value-type="float">
            <text:p>20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25S" calcext:value-type="time">
            <text:p>12:12:25</text:p>
          </table:table-cell>
          <table:table-cell office:value-type="float" office:value="501" calcext:value-type="float">
            <text:p>501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26S" calcext:value-type="time">
            <text:p>12:12:26</text:p>
          </table:table-cell>
          <table:table-cell office:value-type="float" office:value="444" calcext:value-type="float">
            <text:p>444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28S" calcext:value-type="time">
            <text:p>12:12:28</text:p>
          </table:table-cell>
          <table:table-cell office:value-type="float" office:value="397" calcext:value-type="float">
            <text:p>397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30S" calcext:value-type="time">
            <text:p>12:12:30</text:p>
          </table:table-cell>
          <table:table-cell office:value-type="float" office:value="448" calcext:value-type="float">
            <text:p>448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31S" calcext:value-type="time">
            <text:p>12:12:31</text:p>
          </table:table-cell>
          <table:table-cell office:value-type="float" office:value="582" calcext:value-type="float">
            <text:p>58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33S" calcext:value-type="time">
            <text:p>12:12:33</text:p>
          </table:table-cell>
          <table:table-cell office:value-type="float" office:value="324" calcext:value-type="float">
            <text:p>32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35S" calcext:value-type="time">
            <text:p>12:12:35</text:p>
          </table:table-cell>
          <table:table-cell office:value-type="float" office:value="751" calcext:value-type="float">
            <text:p>75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37S" calcext:value-type="time">
            <text:p>12:12:37</text:p>
          </table:table-cell>
          <table:table-cell office:value-type="float" office:value="400" calcext:value-type="float">
            <text:p>40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38S" calcext:value-type="time">
            <text:p>12:12:38</text:p>
          </table:table-cell>
          <table:table-cell office:value-type="float" office:value="643" calcext:value-type="float">
            <text:p>643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40S" calcext:value-type="time">
            <text:p>12:12:40</text:p>
          </table:table-cell>
          <table:table-cell office:value-type="float" office:value="379" calcext:value-type="float">
            <text:p>379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42S" calcext:value-type="time">
            <text:p>12:12:42</text:p>
          </table:table-cell>
          <table:table-cell office:value-type="float" office:value="135" calcext:value-type="float">
            <text:p>13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44S" calcext:value-type="time">
            <text:p>12:12:44</text:p>
          </table:table-cell>
          <table:table-cell office:value-type="float" office:value="489" calcext:value-type="float">
            <text:p>48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45S" calcext:value-type="time">
            <text:p>12:12:45</text:p>
          </table:table-cell>
          <table:table-cell office:value-type="float" office:value="357" calcext:value-type="float">
            <text:p>35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47S" calcext:value-type="time">
            <text:p>12:12:47</text:p>
          </table:table-cell>
          <table:table-cell office:value-type="float" office:value="475" calcext:value-type="float">
            <text:p>475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49S" calcext:value-type="time">
            <text:p>12:12:49</text:p>
          </table:table-cell>
          <table:table-cell office:value-type="float" office:value="405" calcext:value-type="float">
            <text:p>40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50S" calcext:value-type="time">
            <text:p>12:12:50</text:p>
          </table:table-cell>
          <table:table-cell office:value-type="float" office:value="77" calcext:value-type="float">
            <text:p>77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52S" calcext:value-type="time">
            <text:p>12:12:52</text:p>
          </table:table-cell>
          <table:table-cell office:value-type="float" office:value="243" calcext:value-type="float">
            <text:p>243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54S" calcext:value-type="time">
            <text:p>12:12:54</text:p>
          </table:table-cell>
          <table:table-cell office:value-type="float" office:value="413" calcext:value-type="float">
            <text:p>41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56S" calcext:value-type="time">
            <text:p>12:12:56</text:p>
          </table:table-cell>
          <table:table-cell office:value-type="float" office:value="631" calcext:value-type="float">
            <text:p>63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57S" calcext:value-type="time">
            <text:p>12:12:57</text:p>
          </table:table-cell>
          <table:table-cell office:value-type="float" office:value="429" calcext:value-type="float">
            <text:p>42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2M59S" calcext:value-type="time">
            <text:p>12:12:59</text:p>
          </table:table-cell>
          <table:table-cell office:value-type="float" office:value="418" calcext:value-type="float">
            <text:p>418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01S" calcext:value-type="time">
            <text:p>12:13:01</text:p>
          </table:table-cell>
          <table:table-cell office:value-type="float" office:value="622" calcext:value-type="float">
            <text:p>62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03S" calcext:value-type="time">
            <text:p>12:13:03</text:p>
          </table:table-cell>
          <table:table-cell office:value-type="float" office:value="290" calcext:value-type="float">
            <text:p>29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04S" calcext:value-type="time">
            <text:p>12:13:04</text:p>
          </table:table-cell>
          <table:table-cell office:value-type="float" office:value="376" calcext:value-type="float">
            <text:p>37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06S" calcext:value-type="time">
            <text:p>12:13:06</text:p>
          </table:table-cell>
          <table:table-cell office:value-type="float" office:value="699" calcext:value-type="float">
            <text:p>69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08S" calcext:value-type="time">
            <text:p>12:13:08</text:p>
          </table:table-cell>
          <table:table-cell office:value-type="float" office:value="515" calcext:value-type="float">
            <text:p>515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09S" calcext:value-type="time">
            <text:p>12:13:09</text:p>
          </table:table-cell>
          <table:table-cell office:value-type="float" office:value="162" calcext:value-type="float">
            <text:p>162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11S" calcext:value-type="time">
            <text:p>12:13:11</text:p>
          </table:table-cell>
          <table:table-cell office:value-type="float" office:value="473" calcext:value-type="float">
            <text:p>47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13S" calcext:value-type="time">
            <text:p>12:13:13</text:p>
          </table:table-cell>
          <table:table-cell office:value-type="float" office:value="391" calcext:value-type="float">
            <text:p>39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15S" calcext:value-type="time">
            <text:p>12:13:15</text:p>
          </table:table-cell>
          <table:table-cell office:value-type="float" office:value="529" calcext:value-type="float">
            <text:p>52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16S" calcext:value-type="time">
            <text:p>12:13:16</text:p>
          </table:table-cell>
          <table:table-cell office:value-type="float" office:value="498" calcext:value-type="float">
            <text:p>49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18S" calcext:value-type="time">
            <text:p>12:13:18</text:p>
          </table:table-cell>
          <table:table-cell office:value-type="float" office:value="336" calcext:value-type="float">
            <text:p>33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20S" calcext:value-type="time">
            <text:p>12:13:20</text:p>
          </table:table-cell>
          <table:table-cell office:value-type="float" office:value="663" calcext:value-type="float">
            <text:p>663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22S" calcext:value-type="time">
            <text:p>12:13:22</text:p>
          </table:table-cell>
          <table:table-cell office:value-type="float" office:value="346" calcext:value-type="float">
            <text:p>346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23S" calcext:value-type="time">
            <text:p>12:13:23</text:p>
          </table:table-cell>
          <table:table-cell office:value-type="float" office:value="85" calcext:value-type="float">
            <text:p>8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25S" calcext:value-type="time">
            <text:p>12:13:25</text:p>
          </table:table-cell>
          <table:table-cell office:value-type="float" office:value="640" calcext:value-type="float">
            <text:p>64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27S" calcext:value-type="time">
            <text:p>12:13:27</text:p>
          </table:table-cell>
          <table:table-cell office:value-type="float" office:value="339" calcext:value-type="float">
            <text:p>339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29S" calcext:value-type="time">
            <text:p>12:13:29</text:p>
          </table:table-cell>
          <table:table-cell office:value-type="float" office:value="552" calcext:value-type="float">
            <text:p>55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30S" calcext:value-type="time">
            <text:p>12:13:30</text:p>
          </table:table-cell>
          <table:table-cell office:value-type="float" office:value="208" calcext:value-type="float">
            <text:p>20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32S" calcext:value-type="time">
            <text:p>12:13:32</text:p>
          </table:table-cell>
          <table:table-cell office:value-type="float" office:value="582" calcext:value-type="float">
            <text:p>58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34S" calcext:value-type="time">
            <text:p>12:13:34</text:p>
          </table:table-cell>
          <table:table-cell office:value-type="float" office:value="300" calcext:value-type="float">
            <text:p>300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36S" calcext:value-type="time">
            <text:p>12:13:36</text:p>
          </table:table-cell>
          <table:table-cell office:value-type="float" office:value="408" calcext:value-type="float">
            <text:p>408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37S" calcext:value-type="time">
            <text:p>12:13:37</text:p>
          </table:table-cell>
          <table:table-cell office:value-type="float" office:value="722" calcext:value-type="float">
            <text:p>72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39S" calcext:value-type="time">
            <text:p>12:13:39</text:p>
          </table:table-cell>
          <table:table-cell office:value-type="float" office:value="337" calcext:value-type="float">
            <text:p>337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41S" calcext:value-type="time">
            <text:p>12:13:41</text:p>
          </table:table-cell>
          <table:table-cell office:value-type="float" office:value="404" calcext:value-type="float">
            <text:p>404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43S" calcext:value-type="time">
            <text:p>12:13:43</text:p>
          </table:table-cell>
          <table:table-cell office:value-type="float" office:value="675" calcext:value-type="float">
            <text:p>67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44S" calcext:value-type="time">
            <text:p>12:13:44</text:p>
          </table:table-cell>
          <table:table-cell office:value-type="float" office:value="598" calcext:value-type="float">
            <text:p>59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46S" calcext:value-type="time">
            <text:p>12:13:46</text:p>
          </table:table-cell>
          <table:table-cell office:value-type="float" office:value="545" calcext:value-type="float">
            <text:p>54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48S" calcext:value-type="time">
            <text:p>12:13:48</text:p>
          </table:table-cell>
          <table:table-cell office:value-type="float" office:value="529" calcext:value-type="float">
            <text:p>52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50S" calcext:value-type="time">
            <text:p>12:13:50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51S" calcext:value-type="time">
            <text:p>12:13:51</text:p>
          </table:table-cell>
          <table:table-cell office:value-type="float" office:value="53" calcext:value-type="float">
            <text:p>5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53S" calcext:value-type="time">
            <text:p>12:13:53</text:p>
          </table:table-cell>
          <table:table-cell office:value-type="float" office:value="184" calcext:value-type="float">
            <text:p>18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55S" calcext:value-type="time">
            <text:p>12:13:55</text:p>
          </table:table-cell>
          <table:table-cell office:value-type="float" office:value="313" calcext:value-type="float">
            <text:p>31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57S" calcext:value-type="time">
            <text:p>12:13:57</text:p>
          </table:table-cell>
          <table:table-cell office:value-type="float" office:value="466" calcext:value-type="float">
            <text:p>466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3M58S" calcext:value-type="time">
            <text:p>12:13:58</text:p>
          </table:table-cell>
          <table:table-cell office:value-type="float" office:value="288" calcext:value-type="float">
            <text:p>288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00S" calcext:value-type="time">
            <text:p>12:14:00</text:p>
          </table:table-cell>
          <table:table-cell office:value-type="float" office:value="403" calcext:value-type="float">
            <text:p>40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02S" calcext:value-type="time">
            <text:p>12:14:02</text:p>
          </table:table-cell>
          <table:table-cell office:value-type="float" office:value="704" calcext:value-type="float">
            <text:p>70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04S" calcext:value-type="time">
            <text:p>12:14:04</text:p>
          </table:table-cell>
          <table:table-cell office:value-type="float" office:value="472" calcext:value-type="float">
            <text:p>47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05S" calcext:value-type="time">
            <text:p>12:14:05</text:p>
          </table:table-cell>
          <table:table-cell office:value-type="float" office:value="527" calcext:value-type="float">
            <text:p>52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07S" calcext:value-type="time">
            <text:p>12:14:07</text:p>
          </table:table-cell>
          <table:table-cell office:value-type="float" office:value="267" calcext:value-type="float">
            <text:p>26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09S" calcext:value-type="time">
            <text:p>12:14:09</text:p>
          </table:table-cell>
          <table:table-cell office:value-type="float" office:value="41" calcext:value-type="float">
            <text:p>4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11S" calcext:value-type="time">
            <text:p>12:14:11</text:p>
          </table:table-cell>
          <table:table-cell office:value-type="float" office:value="386" calcext:value-type="float">
            <text:p>38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13S" calcext:value-type="time">
            <text:p>12:14:13</text:p>
          </table:table-cell>
          <table:table-cell office:value-type="float" office:value="266" calcext:value-type="float">
            <text:p>266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14S" calcext:value-type="time">
            <text:p>12:14:14</text:p>
          </table:table-cell>
          <table:table-cell office:value-type="float" office:value="507" calcext:value-type="float">
            <text:p>50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16S" calcext:value-type="time">
            <text:p>12:14:16</text:p>
          </table:table-cell>
          <table:table-cell office:value-type="float" office:value="512" calcext:value-type="float">
            <text:p>51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18S" calcext:value-type="time">
            <text:p>12:14:18</text:p>
          </table:table-cell>
          <table:table-cell office:value-type="float" office:value="627" calcext:value-type="float">
            <text:p>627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20S" calcext:value-type="time">
            <text:p>12:14:20</text:p>
          </table:table-cell>
          <table:table-cell office:value-type="float" office:value="657" calcext:value-type="float">
            <text:p>65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21S" calcext:value-type="time">
            <text:p>12:14:21</text:p>
          </table:table-cell>
          <table:table-cell office:value-type="float" office:value="377" calcext:value-type="float">
            <text:p>37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23S" calcext:value-type="time">
            <text:p>12:14:23</text:p>
          </table:table-cell>
          <table:table-cell office:value-type="float" office:value="547" calcext:value-type="float">
            <text:p>54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25S" calcext:value-type="time">
            <text:p>12:14:25</text:p>
          </table:table-cell>
          <table:table-cell office:value-type="float" office:value="275" calcext:value-type="float">
            <text:p>27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27S" calcext:value-type="time">
            <text:p>12:14:27</text:p>
          </table:table-cell>
          <table:table-cell office:value-type="float" office:value="421" calcext:value-type="float">
            <text:p>42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29S" calcext:value-type="time">
            <text:p>12:14:29</text:p>
          </table:table-cell>
          <table:table-cell office:value-type="float" office:value="415" calcext:value-type="float">
            <text:p>415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30S" calcext:value-type="time">
            <text:p>12:14:30</text:p>
          </table:table-cell>
          <table:table-cell office:value-type="float" office:value="226" calcext:value-type="float">
            <text:p>22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32S" calcext:value-type="time">
            <text:p>12:14:32</text:p>
          </table:table-cell>
          <table:table-cell office:value-type="float" office:value="415" calcext:value-type="float">
            <text:p>41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34S" calcext:value-type="time">
            <text:p>12:14:34</text:p>
          </table:table-cell>
          <table:table-cell office:value-type="float" office:value="472" calcext:value-type="float">
            <text:p>472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36S" calcext:value-type="time">
            <text:p>12:14:36</text:p>
          </table:table-cell>
          <table:table-cell office:value-type="float" office:value="476" calcext:value-type="float">
            <text:p>47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37S" calcext:value-type="time">
            <text:p>12:14:37</text:p>
          </table:table-cell>
          <table:table-cell office:value-type="float" office:value="509" calcext:value-type="float">
            <text:p>50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39S" calcext:value-type="time">
            <text:p>12:14:39</text:p>
          </table:table-cell>
          <table:table-cell office:value-type="float" office:value="517" calcext:value-type="float">
            <text:p>51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41S" calcext:value-type="time">
            <text:p>12:14:41</text:p>
          </table:table-cell>
          <table:table-cell office:value-type="float" office:value="598" calcext:value-type="float">
            <text:p>59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43S" calcext:value-type="time">
            <text:p>12:14:43</text:p>
          </table:table-cell>
          <table:table-cell office:value-type="float" office:value="443" calcext:value-type="float">
            <text:p>44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45S" calcext:value-type="time">
            <text:p>12:14:45</text:p>
          </table:table-cell>
          <table:table-cell office:value-type="float" office:value="388" calcext:value-type="float">
            <text:p>38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46S" calcext:value-type="time">
            <text:p>12:14:46</text:p>
          </table:table-cell>
          <table:table-cell office:value-type="float" office:value="331" calcext:value-type="float">
            <text:p>33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48S" calcext:value-type="time">
            <text:p>12:14:48</text:p>
          </table:table-cell>
          <table:table-cell office:value-type="float" office:value="431" calcext:value-type="float">
            <text:p>43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50S" calcext:value-type="time">
            <text:p>12:14:50</text:p>
          </table:table-cell>
          <table:table-cell office:value-type="float" office:value="573" calcext:value-type="float">
            <text:p>573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52S" calcext:value-type="time">
            <text:p>12:14:52</text:p>
          </table:table-cell>
          <table:table-cell office:value-type="float" office:value="435" calcext:value-type="float">
            <text:p>43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53S" calcext:value-type="time">
            <text:p>12:14:53</text:p>
          </table:table-cell>
          <table:table-cell office:value-type="float" office:value="365" calcext:value-type="float">
            <text:p>36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55S" calcext:value-type="time">
            <text:p>12:14:55</text:p>
          </table:table-cell>
          <table:table-cell office:value-type="float" office:value="415" calcext:value-type="float">
            <text:p>41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57S" calcext:value-type="time">
            <text:p>12:14:57</text:p>
          </table:table-cell>
          <table:table-cell office:value-type="float" office:value="473" calcext:value-type="float">
            <text:p>473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4M59S" calcext:value-type="time">
            <text:p>12:14:59</text:p>
          </table:table-cell>
          <table:table-cell office:value-type="float" office:value="440" calcext:value-type="float">
            <text:p>44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01S" calcext:value-type="time">
            <text:p>12:15:01</text:p>
          </table:table-cell>
          <table:table-cell office:value-type="float" office:value="299" calcext:value-type="float">
            <text:p>299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02S" calcext:value-type="time">
            <text:p>12:15:02</text:p>
          </table:table-cell>
          <table:table-cell office:value-type="float" office:value="271" calcext:value-type="float">
            <text:p>27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04S" calcext:value-type="time">
            <text:p>12:15:04</text:p>
          </table:table-cell>
          <table:table-cell office:value-type="float" office:value="478" calcext:value-type="float">
            <text:p>47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06S" calcext:value-type="time">
            <text:p>12:15:06</text:p>
          </table:table-cell>
          <table:table-cell office:value-type="float" office:value="635" calcext:value-type="float">
            <text:p>635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08S" calcext:value-type="time">
            <text:p>12:15:08</text:p>
          </table:table-cell>
          <table:table-cell office:value-type="float" office:value="489" calcext:value-type="float">
            <text:p>48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10S" calcext:value-type="time">
            <text:p>12:15:10</text:p>
          </table:table-cell>
          <table:table-cell office:value-type="float" office:value="507" calcext:value-type="float">
            <text:p>50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11S" calcext:value-type="time">
            <text:p>12:15:11</text:p>
          </table:table-cell>
          <table:table-cell office:value-type="float" office:value="313" calcext:value-type="float">
            <text:p>31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13S" calcext:value-type="time">
            <text:p>12:15:13</text:p>
          </table:table-cell>
          <table:table-cell office:value-type="float" office:value="551" calcext:value-type="float">
            <text:p>55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15S" calcext:value-type="time">
            <text:p>12:15:15</text:p>
          </table:table-cell>
          <table:table-cell office:value-type="float" office:value="411" calcext:value-type="float">
            <text:p>41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17S" calcext:value-type="time">
            <text:p>12:15:17</text:p>
          </table:table-cell>
          <table:table-cell office:value-type="float" office:value="607" calcext:value-type="float">
            <text:p>60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19S" calcext:value-type="time">
            <text:p>12:15:19</text:p>
          </table:table-cell>
          <table:table-cell office:value-type="float" office:value="545" calcext:value-type="float">
            <text:p>54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20S" calcext:value-type="time">
            <text:p>12:15:20</text:p>
          </table:table-cell>
          <table:table-cell office:value-type="float" office:value="662" calcext:value-type="float">
            <text:p>66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22S" calcext:value-type="time">
            <text:p>12:15:22</text:p>
          </table:table-cell>
          <table:table-cell office:value-type="float" office:value="586" calcext:value-type="float">
            <text:p>58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24S" calcext:value-type="time">
            <text:p>12:15:24</text:p>
          </table:table-cell>
          <table:table-cell office:value-type="float" office:value="437" calcext:value-type="float">
            <text:p>43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26S" calcext:value-type="time">
            <text:p>12:15:26</text:p>
          </table:table-cell>
          <table:table-cell office:value-type="float" office:value="523" calcext:value-type="float">
            <text:p>52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28S" calcext:value-type="time">
            <text:p>12:15:28</text:p>
          </table:table-cell>
          <table:table-cell office:value-type="float" office:value="671" calcext:value-type="float">
            <text:p>67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29S" calcext:value-type="time">
            <text:p>12:15:29</text:p>
          </table:table-cell>
          <table:table-cell office:value-type="float" office:value="603" calcext:value-type="float">
            <text:p>603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31S" calcext:value-type="time">
            <text:p>12:15:31</text:p>
          </table:table-cell>
          <table:table-cell office:value-type="float" office:value="579" calcext:value-type="float">
            <text:p>57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33S" calcext:value-type="time">
            <text:p>12:15:33</text:p>
          </table:table-cell>
          <table:table-cell office:value-type="float" office:value="419" calcext:value-type="float">
            <text:p>41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35S" calcext:value-type="time">
            <text:p>12:15:35</text:p>
          </table:table-cell>
          <table:table-cell office:value-type="float" office:value="370" calcext:value-type="float">
            <text:p>37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37S" calcext:value-type="time">
            <text:p>12:15:37</text:p>
          </table:table-cell>
          <table:table-cell office:value-type="float" office:value="421" calcext:value-type="float">
            <text:p>42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38S" calcext:value-type="time">
            <text:p>12:15:38</text:p>
          </table:table-cell>
          <table:table-cell office:value-type="float" office:value="361" calcext:value-type="float">
            <text:p>36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40S" calcext:value-type="time">
            <text:p>12:15:40</text:p>
          </table:table-cell>
          <table:table-cell office:value-type="float" office:value="170" calcext:value-type="float">
            <text:p>17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42S" calcext:value-type="time">
            <text:p>12:15:42</text:p>
          </table:table-cell>
          <table:table-cell office:value-type="float" office:value="754" calcext:value-type="float">
            <text:p>75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44S" calcext:value-type="time">
            <text:p>12:15:44</text:p>
          </table:table-cell>
          <table:table-cell office:value-type="float" office:value="531" calcext:value-type="float">
            <text:p>53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46S" calcext:value-type="time">
            <text:p>12:15:46</text:p>
          </table:table-cell>
          <table:table-cell office:value-type="float" office:value="459" calcext:value-type="float">
            <text:p>45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47S" calcext:value-type="time">
            <text:p>12:15:47</text:p>
          </table:table-cell>
          <table:table-cell office:value-type="float" office:value="478" calcext:value-type="float">
            <text:p>478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49S" calcext:value-type="time">
            <text:p>12:15:49</text:p>
          </table:table-cell>
          <table:table-cell office:value-type="float" office:value="572" calcext:value-type="float">
            <text:p>57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51S" calcext:value-type="time">
            <text:p>12:15:51</text:p>
          </table:table-cell>
          <table:table-cell office:value-type="float" office:value="354" calcext:value-type="float">
            <text:p>35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53S" calcext:value-type="time">
            <text:p>12:15:53</text:p>
          </table:table-cell>
          <table:table-cell office:value-type="float" office:value="613" calcext:value-type="float">
            <text:p>61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55S" calcext:value-type="time">
            <text:p>12:15:55</text:p>
          </table:table-cell>
          <table:table-cell office:value-type="float" office:value="196" calcext:value-type="float">
            <text:p>196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56S" calcext:value-type="time">
            <text:p>12:15:56</text:p>
          </table:table-cell>
          <table:table-cell office:value-type="float" office:value="595" calcext:value-type="float">
            <text:p>59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5M58S" calcext:value-type="time">
            <text:p>12:15:58</text:p>
          </table:table-cell>
          <table:table-cell office:value-type="float" office:value="656" calcext:value-type="float">
            <text:p>65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00S" calcext:value-type="time">
            <text:p>12:16:00</text:p>
          </table:table-cell>
          <table:table-cell office:value-type="float" office:value="342" calcext:value-type="float">
            <text:p>342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02S" calcext:value-type="time">
            <text:p>12:16:02</text:p>
          </table:table-cell>
          <table:table-cell office:value-type="float" office:value="491" calcext:value-type="float">
            <text:p>49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04S" calcext:value-type="time">
            <text:p>12:16:04</text:p>
          </table:table-cell>
          <table:table-cell office:value-type="float" office:value="530" calcext:value-type="float">
            <text:p>53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06S" calcext:value-type="time">
            <text:p>12:16:06</text:p>
          </table:table-cell>
          <table:table-cell office:value-type="float" office:value="400" calcext:value-type="float">
            <text:p>40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07S" calcext:value-type="time">
            <text:p>12:16:07</text:p>
          </table:table-cell>
          <table:table-cell office:value-type="float" office:value="395" calcext:value-type="float">
            <text:p>395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09S" calcext:value-type="time">
            <text:p>12:16:09</text:p>
          </table:table-cell>
          <table:table-cell office:value-type="float" office:value="296" calcext:value-type="float">
            <text:p>296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11S" calcext:value-type="time">
            <text:p>12:16:11</text:p>
          </table:table-cell>
          <table:table-cell office:value-type="float" office:value="234" calcext:value-type="float">
            <text:p>23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13S" calcext:value-type="time">
            <text:p>12:16:13</text:p>
          </table:table-cell>
          <table:table-cell office:value-type="float" office:value="589" calcext:value-type="float">
            <text:p>58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15S" calcext:value-type="time">
            <text:p>12:16:15</text:p>
          </table:table-cell>
          <table:table-cell office:value-type="float" office:value="250" calcext:value-type="float">
            <text:p>250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16S" calcext:value-type="time">
            <text:p>12:16:16</text:p>
          </table:table-cell>
          <table:table-cell office:value-type="float" office:value="280" calcext:value-type="float">
            <text:p>28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18S" calcext:value-type="time">
            <text:p>12:16:18</text:p>
          </table:table-cell>
          <table:table-cell office:value-type="float" office:value="271" calcext:value-type="float">
            <text:p>27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20S" calcext:value-type="time">
            <text:p>12:16:20</text:p>
          </table:table-cell>
          <table:table-cell office:value-type="float" office:value="416" calcext:value-type="float">
            <text:p>41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22S" calcext:value-type="time">
            <text:p>12:16:22</text:p>
          </table:table-cell>
          <table:table-cell office:value-type="float" office:value="174" calcext:value-type="float">
            <text:p>17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24S" calcext:value-type="time">
            <text:p>12:16:24</text:p>
          </table:table-cell>
          <table:table-cell office:value-type="float" office:value="427" calcext:value-type="float">
            <text:p>42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26S" calcext:value-type="time">
            <text:p>12:16:26</text:p>
          </table:table-cell>
          <table:table-cell office:value-type="float" office:value="282" calcext:value-type="float">
            <text:p>28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27S" calcext:value-type="time">
            <text:p>12:16:27</text:p>
          </table:table-cell>
          <table:table-cell office:value-type="float" office:value="348" calcext:value-type="float">
            <text:p>34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29S" calcext:value-type="time">
            <text:p>12:16:29</text:p>
          </table:table-cell>
          <table:table-cell office:value-type="float" office:value="543" calcext:value-type="float">
            <text:p>543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31S" calcext:value-type="time">
            <text:p>12:16:31</text:p>
          </table:table-cell>
          <table:table-cell office:value-type="float" office:value="590" calcext:value-type="float">
            <text:p>59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33S" calcext:value-type="time">
            <text:p>12:16:33</text:p>
          </table:table-cell>
          <table:table-cell office:value-type="float" office:value="313" calcext:value-type="float">
            <text:p>31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35S" calcext:value-type="time">
            <text:p>12:16:35</text:p>
          </table:table-cell>
          <table:table-cell office:value-type="float" office:value="124" calcext:value-type="float">
            <text:p>12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37S" calcext:value-type="time">
            <text:p>12:16:37</text:p>
          </table:table-cell>
          <table:table-cell office:value-type="float" office:value="504" calcext:value-type="float">
            <text:p>50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38S" calcext:value-type="time">
            <text:p>12:16:38</text:p>
          </table:table-cell>
          <table:table-cell office:value-type="float" office:value="525" calcext:value-type="float">
            <text:p>525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40S" calcext:value-type="time">
            <text:p>12:16:40</text:p>
          </table:table-cell>
          <table:table-cell office:value-type="float" office:value="496" calcext:value-type="float">
            <text:p>49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42S" calcext:value-type="time">
            <text:p>12:16:42</text:p>
          </table:table-cell>
          <table:table-cell office:value-type="float" office:value="670" calcext:value-type="float">
            <text:p>67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44S" calcext:value-type="time">
            <text:p>12:16:44</text:p>
          </table:table-cell>
          <table:table-cell office:value-type="float" office:value="421" calcext:value-type="float">
            <text:p>42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46S" calcext:value-type="time">
            <text:p>12:16:46</text:p>
          </table:table-cell>
          <table:table-cell office:value-type="float" office:value="475" calcext:value-type="float">
            <text:p>475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48S" calcext:value-type="time">
            <text:p>12:16:48</text:p>
          </table:table-cell>
          <table:table-cell office:value-type="float" office:value="375" calcext:value-type="float">
            <text:p>375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49S" calcext:value-type="time">
            <text:p>12:16:49</text:p>
          </table:table-cell>
          <table:table-cell office:value-type="float" office:value="294" calcext:value-type="float">
            <text:p>29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51S" calcext:value-type="time">
            <text:p>12:16:51</text:p>
          </table:table-cell>
          <table:table-cell office:value-type="float" office:value="506" calcext:value-type="float">
            <text:p>506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53S" calcext:value-type="time">
            <text:p>12:16:53</text:p>
          </table:table-cell>
          <table:table-cell office:value-type="float" office:value="341" calcext:value-type="float">
            <text:p>34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55S" calcext:value-type="time">
            <text:p>12:16:55</text:p>
          </table:table-cell>
          <table:table-cell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57S" calcext:value-type="time">
            <text:p>12:16:57</text:p>
          </table:table-cell>
          <table:table-cell office:value-type="float" office:value="425" calcext:value-type="float">
            <text:p>42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6M59S" calcext:value-type="time">
            <text:p>12:16:59</text:p>
          </table:table-cell>
          <table:table-cell office:value-type="float" office:value="278" calcext:value-type="float">
            <text:p>27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01S" calcext:value-type="time">
            <text:p>12:17:01</text:p>
          </table:table-cell>
          <table:table-cell office:value-type="float" office:value="417" calcext:value-type="float">
            <text:p>41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02S" calcext:value-type="time">
            <text:p>12:17:02</text:p>
          </table:table-cell>
          <table:table-cell office:value-type="float" office:value="312" calcext:value-type="float">
            <text:p>31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04S" calcext:value-type="time">
            <text:p>12:17:04</text:p>
          </table:table-cell>
          <table:table-cell office:value-type="float" office:value="592" calcext:value-type="float">
            <text:p>59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06S" calcext:value-type="time">
            <text:p>12:17:06</text:p>
          </table:table-cell>
          <table:table-cell office:value-type="float" office:value="397" calcext:value-type="float">
            <text:p>397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08S" calcext:value-type="time">
            <text:p>12:17:08</text:p>
          </table:table-cell>
          <table:table-cell office:value-type="float" office:value="705" calcext:value-type="float">
            <text:p>70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10S" calcext:value-type="time">
            <text:p>12:17:10</text:p>
          </table:table-cell>
          <table:table-cell table:number-columns-repeated="2"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12S" calcext:value-type="time">
            <text:p>12:17:12</text:p>
          </table:table-cell>
          <table:table-cell office:value-type="float" office:value="491" calcext:value-type="float">
            <text:p>49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13S" calcext:value-type="time">
            <text:p>12:17:13</text:p>
          </table:table-cell>
          <table:table-cell office:value-type="float" office:value="526" calcext:value-type="float">
            <text:p>52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15S" calcext:value-type="time">
            <text:p>12:17:15</text:p>
          </table:table-cell>
          <table:table-cell office:value-type="float" office:value="61" calcext:value-type="float">
            <text:p>6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17S" calcext:value-type="time">
            <text:p>12:17:17</text:p>
          </table:table-cell>
          <table:table-cell office:value-type="float" office:value="347" calcext:value-type="float">
            <text:p>347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19S" calcext:value-type="time">
            <text:p>12:17:19</text:p>
          </table:table-cell>
          <table:table-cell office:value-type="float" office:value="270" calcext:value-type="float">
            <text:p>27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21S" calcext:value-type="time">
            <text:p>12:17:21</text:p>
          </table:table-cell>
          <table:table-cell office:value-type="float" office:value="349" calcext:value-type="float">
            <text:p>349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23S" calcext:value-type="time">
            <text:p>12:17:23</text:p>
          </table:table-cell>
          <table:table-cell office:value-type="float" office:value="514" calcext:value-type="float">
            <text:p>51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25S" calcext:value-type="time">
            <text:p>12:17:25</text:p>
          </table:table-cell>
          <table:table-cell office:value-type="float" office:value="343" calcext:value-type="float">
            <text:p>34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26S" calcext:value-type="time">
            <text:p>12:17:26</text:p>
          </table:table-cell>
          <table:table-cell office:value-type="float" office:value="293" calcext:value-type="float">
            <text:p>293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28S" calcext:value-type="time">
            <text:p>12:17:28</text:p>
          </table:table-cell>
          <table:table-cell office:value-type="float" office:value="649" calcext:value-type="float">
            <text:p>649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30S" calcext:value-type="time">
            <text:p>12:17:30</text:p>
          </table:table-cell>
          <table:table-cell office:value-type="float" office:value="453" calcext:value-type="float">
            <text:p>45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32S" calcext:value-type="time">
            <text:p>12:17:32</text:p>
          </table:table-cell>
          <table:table-cell office:value-type="float" office:value="331" calcext:value-type="float">
            <text:p>33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34S" calcext:value-type="time">
            <text:p>12:17:34</text:p>
          </table:table-cell>
          <table:table-cell office:value-type="float" office:value="13" calcext:value-type="float">
            <text:p>1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36S" calcext:value-type="time">
            <text:p>12:17:36</text:p>
          </table:table-cell>
          <table:table-cell office:value-type="float" office:value="317" calcext:value-type="float">
            <text:p>317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38S" calcext:value-type="time">
            <text:p>12:17:38</text:p>
          </table:table-cell>
          <table:table-cell office:value-type="float" office:value="715" calcext:value-type="float">
            <text:p>71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39S" calcext:value-type="time">
            <text:p>12:17:39</text:p>
          </table:table-cell>
          <table:table-cell office:value-type="float" office:value="263" calcext:value-type="float">
            <text:p>26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41S" calcext:value-type="time">
            <text:p>12:17:41</text:p>
          </table:table-cell>
          <table:table-cell office:value-type="float" office:value="333" calcext:value-type="float">
            <text:p>33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43S" calcext:value-type="time">
            <text:p>12:17:43</text:p>
          </table:table-cell>
          <table:table-cell office:value-type="float" office:value="284" calcext:value-type="float">
            <text:p>28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45S" calcext:value-type="time">
            <text:p>12:17:45</text:p>
          </table:table-cell>
          <table:table-cell office:value-type="float" office:value="365" calcext:value-type="float">
            <text:p>36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47S" calcext:value-type="time">
            <text:p>12:17:47</text:p>
          </table:table-cell>
          <table:table-cell office:value-type="float" office:value="282" calcext:value-type="float">
            <text:p>28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49S" calcext:value-type="time">
            <text:p>12:17:49</text:p>
          </table:table-cell>
          <table:table-cell office:value-type="float" office:value="724" calcext:value-type="float">
            <text:p>724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51S" calcext:value-type="time">
            <text:p>12:17:51</text:p>
          </table:table-cell>
          <table:table-cell office:value-type="float" office:value="698" calcext:value-type="float">
            <text:p>69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52S" calcext:value-type="time">
            <text:p>12:17:52</text:p>
          </table:table-cell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54S" calcext:value-type="time">
            <text:p>12:17:54</text:p>
          </table:table-cell>
          <table:table-cell office:value-type="float" office:value="779" calcext:value-type="float">
            <text:p>77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56S" calcext:value-type="time">
            <text:p>12:17:56</text:p>
          </table:table-cell>
          <table:table-cell office:value-type="float" office:value="470" calcext:value-type="float">
            <text:p>47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7M58S" calcext:value-type="time">
            <text:p>12:17:58</text:p>
          </table:table-cell>
          <table:table-cell office:value-type="float" office:value="537" calcext:value-type="float">
            <text:p>53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00S" calcext:value-type="time">
            <text:p>12:18:00</text:p>
          </table:table-cell>
          <table:table-cell office:value-type="float" office:value="534" calcext:value-type="float">
            <text:p>53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02S" calcext:value-type="time">
            <text:p>12:18:02</text:p>
          </table:table-cell>
          <table:table-cell office:value-type="float" office:value="464" calcext:value-type="float">
            <text:p>46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04S" calcext:value-type="time">
            <text:p>12:18:04</text:p>
          </table:table-cell>
          <table:table-cell office:value-type="float" office:value="415" calcext:value-type="float">
            <text:p>41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06S" calcext:value-type="time">
            <text:p>12:18:06</text:p>
          </table:table-cell>
          <table:table-cell office:value-type="float" office:value="627" calcext:value-type="float">
            <text:p>62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07S" calcext:value-type="time">
            <text:p>12:18:07</text:p>
          </table:table-cell>
          <table:table-cell office:value-type="float" office:value="519" calcext:value-type="float">
            <text:p>51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09S" calcext:value-type="time">
            <text:p>12:18:09</text:p>
          </table:table-cell>
          <table:table-cell office:value-type="float" office:value="555" calcext:value-type="float">
            <text:p>55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11S" calcext:value-type="time">
            <text:p>12:18:11</text:p>
          </table:table-cell>
          <table:table-cell office:value-type="float" office:value="546" calcext:value-type="float">
            <text:p>54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13S" calcext:value-type="time">
            <text:p>12:18:13</text:p>
          </table:table-cell>
          <table:table-cell office:value-type="float" office:value="243" calcext:value-type="float">
            <text:p>243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15S" calcext:value-type="time">
            <text:p>12:18:15</text:p>
          </table:table-cell>
          <table:table-cell office:value-type="float" office:value="317" calcext:value-type="float">
            <text:p>317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17S" calcext:value-type="time">
            <text:p>12:18:17</text:p>
          </table:table-cell>
          <table:table-cell office:value-type="float" office:value="438" calcext:value-type="float">
            <text:p>43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19S" calcext:value-type="time">
            <text:p>12:18:19</text:p>
          </table:table-cell>
          <table:table-cell office:value-type="float" office:value="633" calcext:value-type="float">
            <text:p>63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21S" calcext:value-type="time">
            <text:p>12:18:21</text:p>
          </table:table-cell>
          <table:table-cell office:value-type="float" office:value="300" calcext:value-type="float">
            <text:p>30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22S" calcext:value-type="time">
            <text:p>12:18:22</text:p>
          </table:table-cell>
          <table:table-cell office:value-type="float" office:value="409" calcext:value-type="float">
            <text:p>409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24S" calcext:value-type="time">
            <text:p>12:18:24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26S" calcext:value-type="time">
            <text:p>12:18:26</text:p>
          </table:table-cell>
          <table:table-cell office:value-type="float" office:value="276" calcext:value-type="float">
            <text:p>27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28S" calcext:value-type="time">
            <text:p>12:18:28</text:p>
          </table:table-cell>
          <table:table-cell office:value-type="float" office:value="404" calcext:value-type="float">
            <text:p>40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30S" calcext:value-type="time">
            <text:p>12:18:30</text:p>
          </table:table-cell>
          <table:table-cell office:value-type="float" office:value="457" calcext:value-type="float">
            <text:p>457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32S" calcext:value-type="time">
            <text:p>12:18:32</text:p>
          </table:table-cell>
          <table:table-cell office:value-type="float" office:value="538" calcext:value-type="float">
            <text:p>53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34S" calcext:value-type="time">
            <text:p>12:18:34</text:p>
          </table:table-cell>
          <table:table-cell office:value-type="float" office:value="511" calcext:value-type="float">
            <text:p>51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36S" calcext:value-type="time">
            <text:p>12:18:36</text:p>
          </table:table-cell>
          <table:table-cell office:value-type="float" office:value="490" calcext:value-type="float">
            <text:p>49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37S" calcext:value-type="time">
            <text:p>12:18:37</text:p>
          </table:table-cell>
          <table:table-cell office:value-type="float" office:value="380" calcext:value-type="float">
            <text:p>38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39S" calcext:value-type="time">
            <text:p>12:18:39</text:p>
          </table:table-cell>
          <table:table-cell office:value-type="float" office:value="493" calcext:value-type="float">
            <text:p>493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41S" calcext:value-type="time">
            <text:p>12:18:41</text:p>
          </table:table-cell>
          <table:table-cell office:value-type="float" office:value="507" calcext:value-type="float">
            <text:p>50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43S" calcext:value-type="time">
            <text:p>12:18:43</text:p>
          </table:table-cell>
          <table:table-cell office:value-type="float" office:value="380" calcext:value-type="float">
            <text:p>380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45S" calcext:value-type="time">
            <text:p>12:18:45</text:p>
          </table:table-cell>
          <table:table-cell office:value-type="float" office:value="157" calcext:value-type="float">
            <text:p>157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47S" calcext:value-type="time">
            <text:p>12:18:47</text:p>
          </table:table-cell>
          <table:table-cell office:value-type="float" office:value="489" calcext:value-type="float">
            <text:p>48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49S" calcext:value-type="time">
            <text:p>12:18:49</text:p>
          </table:table-cell>
          <table:table-cell office:value-type="float" office:value="386" calcext:value-type="float">
            <text:p>38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51S" calcext:value-type="time">
            <text:p>12:18:51</text:p>
          </table:table-cell>
          <table:table-cell office:value-type="float" office:value="368" calcext:value-type="float">
            <text:p>36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53S" calcext:value-type="time">
            <text:p>12:18:53</text:p>
          </table:table-cell>
          <table:table-cell office:value-type="float" office:value="418" calcext:value-type="float">
            <text:p>418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54S" calcext:value-type="time">
            <text:p>12:18:54</text:p>
          </table:table-cell>
          <table:table-cell office:value-type="float" office:value="517" calcext:value-type="float">
            <text:p>51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56S" calcext:value-type="time">
            <text:p>12:18:56</text:p>
          </table:table-cell>
          <table:table-cell office:value-type="float" office:value="570" calcext:value-type="float">
            <text:p>570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8M58S" calcext:value-type="time">
            <text:p>12:18:58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00S" calcext:value-type="time">
            <text:p>12:19:00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02S" calcext:value-type="time">
            <text:p>12:19:02</text:p>
          </table:table-cell>
          <table:table-cell office:value-type="float" office:value="244" calcext:value-type="float">
            <text:p>24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04S" calcext:value-type="time">
            <text:p>12:19:04</text:p>
          </table:table-cell>
          <table:table-cell office:value-type="float" office:value="719" calcext:value-type="float">
            <text:p>71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06S" calcext:value-type="time">
            <text:p>12:19:06</text:p>
          </table:table-cell>
          <table:table-cell office:value-type="float" office:value="548" calcext:value-type="float">
            <text:p>54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08S" calcext:value-type="time">
            <text:p>12:19:08</text:p>
          </table:table-cell>
          <table:table-cell office:value-type="float" office:value="358" calcext:value-type="float">
            <text:p>35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10S" calcext:value-type="time">
            <text:p>12:19:10</text:p>
          </table:table-cell>
          <table:table-cell office:value-type="float" office:value="682" calcext:value-type="float">
            <text:p>682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12S" calcext:value-type="time">
            <text:p>12:19:12</text:p>
          </table:table-cell>
          <table:table-cell office:value-type="float" office:value="455" calcext:value-type="float">
            <text:p>45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13S" calcext:value-type="time">
            <text:p>12:19:13</text:p>
          </table:table-cell>
          <table:table-cell office:value-type="float" office:value="441" calcext:value-type="float">
            <text:p>441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15S" calcext:value-type="time">
            <text:p>12:19:15</text:p>
          </table:table-cell>
          <table:table-cell office:value-type="float" office:value="472" calcext:value-type="float">
            <text:p>47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17S" calcext:value-type="time">
            <text:p>12:19:17</text:p>
          </table:table-cell>
          <table:table-cell office:value-type="float" office:value="361" calcext:value-type="float">
            <text:p>36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19S" calcext:value-type="time">
            <text:p>12:19:19</text:p>
          </table:table-cell>
          <table:table-cell office:value-type="float" office:value="648" calcext:value-type="float">
            <text:p>64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21S" calcext:value-type="time">
            <text:p>12:19:21</text:p>
          </table:table-cell>
          <table:table-cell office:value-type="float" office:value="531" calcext:value-type="float">
            <text:p>53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23S" calcext:value-type="time">
            <text:p>12:19:23</text:p>
          </table:table-cell>
          <table:table-cell office:value-type="float" office:value="613" calcext:value-type="float">
            <text:p>61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25S" calcext:value-type="time">
            <text:p>12:19:25</text:p>
          </table:table-cell>
          <table:table-cell office:value-type="float" office:value="113" calcext:value-type="float">
            <text:p>11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27S" calcext:value-type="time">
            <text:p>12:19:27</text:p>
          </table:table-cell>
          <table:table-cell office:value-type="float" office:value="478" calcext:value-type="float">
            <text:p>47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29S" calcext:value-type="time">
            <text:p>12:19:29</text:p>
          </table:table-cell>
          <table:table-cell office:value-type="float" office:value="322" calcext:value-type="float">
            <text:p>32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31S" calcext:value-type="time">
            <text:p>12:19:31</text:p>
          </table:table-cell>
          <table:table-cell office:value-type="float" office:value="540" calcext:value-type="float">
            <text:p>54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33S" calcext:value-type="time">
            <text:p>12:19:33</text:p>
          </table:table-cell>
          <table:table-cell office:value-type="float" office:value="515" calcext:value-type="float">
            <text:p>51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34S" calcext:value-type="time">
            <text:p>12:19:34</text:p>
          </table:table-cell>
          <table:table-cell office:value-type="float" office:value="459" calcext:value-type="float">
            <text:p>45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36S" calcext:value-type="time">
            <text:p>12:19:36</text:p>
          </table:table-cell>
          <table:table-cell office:value-type="float" office:value="236" calcext:value-type="float">
            <text:p>23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38S" calcext:value-type="time">
            <text:p>12:19:38</text:p>
          </table:table-cell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40S" calcext:value-type="time">
            <text:p>12:19:40</text:p>
          </table:table-cell>
          <table:table-cell office:value-type="float" office:value="162" calcext:value-type="float">
            <text:p>16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42S" calcext:value-type="time">
            <text:p>12:19:42</text:p>
          </table:table-cell>
          <table:table-cell office:value-type="float" office:value="223" calcext:value-type="float">
            <text:p>22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44S" calcext:value-type="time">
            <text:p>12:19:44</text:p>
          </table:table-cell>
          <table:table-cell office:value-type="float" office:value="110" calcext:value-type="float">
            <text:p>11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46S" calcext:value-type="time">
            <text:p>12:19:46</text:p>
          </table:table-cell>
          <table:table-cell office:value-type="float" office:value="122" calcext:value-type="float">
            <text:p>122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48S" calcext:value-type="time">
            <text:p>12:19:48</text:p>
          </table:table-cell>
          <table:table-cell office:value-type="float" office:value="319" calcext:value-type="float">
            <text:p>31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50S" calcext:value-type="time">
            <text:p>12:19:50</text:p>
          </table:table-cell>
          <table:table-cell office:value-type="float" office:value="599" calcext:value-type="float">
            <text:p>599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52S" calcext:value-type="time">
            <text:p>12:19:52</text:p>
          </table:table-cell>
          <table:table-cell office:value-type="float" office:value="442" calcext:value-type="float">
            <text:p>44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54S" calcext:value-type="time">
            <text:p>12:19:54</text:p>
          </table:table-cell>
          <table:table-cell office:value-type="float" office:value="280" calcext:value-type="float">
            <text:p>28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56S" calcext:value-type="time">
            <text:p>12:19:56</text:p>
          </table:table-cell>
          <table:table-cell office:value-type="float" office:value="461" calcext:value-type="float">
            <text:p>461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57S" calcext:value-type="time">
            <text:p>12:19:57</text:p>
          </table:table-cell>
          <table:table-cell office:value-type="float" office:value="629" calcext:value-type="float">
            <text:p>629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19M59S" calcext:value-type="time">
            <text:p>12:19:59</text:p>
          </table:table-cell>
          <table:table-cell office:value-type="float" office:value="349" calcext:value-type="float">
            <text:p>349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01S" calcext:value-type="time">
            <text:p>12:20:01</text:p>
          </table:table-cell>
          <table:table-cell office:value-type="float" office:value="291" calcext:value-type="float">
            <text:p>29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03S" calcext:value-type="time">
            <text:p>12:20:03</text:p>
          </table:table-cell>
          <table:table-cell office:value-type="float" office:value="682" calcext:value-type="float">
            <text:p>68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05S" calcext:value-type="time">
            <text:p>12:20:05</text:p>
          </table:table-cell>
          <table:table-cell office:value-type="float" office:value="564" calcext:value-type="float">
            <text:p>56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07S" calcext:value-type="time">
            <text:p>12:20:07</text:p>
          </table:table-cell>
          <table:table-cell office:value-type="float" office:value="455" calcext:value-type="float">
            <text:p>45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09S" calcext:value-type="time">
            <text:p>12:20:09</text:p>
          </table:table-cell>
          <table:table-cell office:value-type="float" office:value="630" calcext:value-type="float">
            <text:p>63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11S" calcext:value-type="time">
            <text:p>12:20:11</text:p>
          </table:table-cell>
          <table:table-cell office:value-type="float" office:value="332" calcext:value-type="float">
            <text:p>33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13S" calcext:value-type="time">
            <text:p>12:20:13</text:p>
          </table:table-cell>
          <table:table-cell office:value-type="float" office:value="600" calcext:value-type="float">
            <text:p>60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15S" calcext:value-type="time">
            <text:p>12:20:15</text:p>
          </table:table-cell>
          <table:table-cell office:value-type="float" office:value="610" calcext:value-type="float">
            <text:p>61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17S" calcext:value-type="time">
            <text:p>12:20:17</text:p>
          </table:table-cell>
          <table:table-cell office:value-type="float" office:value="281" calcext:value-type="float">
            <text:p>281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19S" calcext:value-type="time">
            <text:p>12:20:19</text:p>
          </table:table-cell>
          <table:table-cell office:value-type="float" office:value="328" calcext:value-type="float">
            <text:p>328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21S" calcext:value-type="time">
            <text:p>12:20:21</text:p>
          </table:table-cell>
          <table:table-cell office:value-type="float" office:value="445" calcext:value-type="float">
            <text:p>445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22S" calcext:value-type="time">
            <text:p>12:20:22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24S" calcext:value-type="time">
            <text:p>12:20:24</text:p>
          </table:table-cell>
          <table:table-cell office:value-type="float" office:value="642" calcext:value-type="float">
            <text:p>642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26S" calcext:value-type="time">
            <text:p>12:20:26</text:p>
          </table:table-cell>
          <table:table-cell office:value-type="float" office:value="669" calcext:value-type="float">
            <text:p>66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28S" calcext:value-type="time">
            <text:p>12:20:28</text:p>
          </table:table-cell>
          <table:table-cell office:value-type="float" office:value="438" calcext:value-type="float">
            <text:p>43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30S" calcext:value-type="time">
            <text:p>12:20:30</text:p>
          </table:table-cell>
          <table:table-cell office:value-type="float" office:value="415" calcext:value-type="float">
            <text:p>41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32S" calcext:value-type="time">
            <text:p>12:20:32</text:p>
          </table:table-cell>
          <table:table-cell office:value-type="float" office:value="499" calcext:value-type="float">
            <text:p>499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34S" calcext:value-type="time">
            <text:p>12:20:34</text:p>
          </table:table-cell>
          <table:table-cell office:value-type="float" office:value="328" calcext:value-type="float">
            <text:p>32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36S" calcext:value-type="time">
            <text:p>12:20:36</text:p>
          </table:table-cell>
          <table:table-cell office:value-type="float" office:value="532" calcext:value-type="float">
            <text:p>53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38S" calcext:value-type="time">
            <text:p>12:20:38</text:p>
          </table:table-cell>
          <table:table-cell office:value-type="float" office:value="385" calcext:value-type="float">
            <text:p>38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40S" calcext:value-type="time">
            <text:p>12:20:40</text:p>
          </table:table-cell>
          <table:table-cell office:value-type="float" office:value="480" calcext:value-type="float">
            <text:p>480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42S" calcext:value-type="time">
            <text:p>12:20:42</text:p>
          </table:table-cell>
          <table:table-cell office:value-type="float" office:value="511" calcext:value-type="float">
            <text:p>51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44S" calcext:value-type="time">
            <text:p>12:20:44</text:p>
          </table:table-cell>
          <table:table-cell office:value-type="float" office:value="436" calcext:value-type="float">
            <text:p>43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46S" calcext:value-type="time">
            <text:p>12:20:46</text:p>
          </table:table-cell>
          <table:table-cell office:value-type="float" office:value="314" calcext:value-type="float">
            <text:p>31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48S" calcext:value-type="time">
            <text:p>12:20:48</text:p>
          </table:table-cell>
          <table:table-cell office:value-type="float" office:value="384" calcext:value-type="float">
            <text:p>38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50S" calcext:value-type="time">
            <text:p>12:20:50</text:p>
          </table:table-cell>
          <table:table-cell office:value-type="float" office:value="407" calcext:value-type="float">
            <text:p>407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52S" calcext:value-type="time">
            <text:p>12:20:52</text:p>
          </table:table-cell>
          <table:table-cell office:value-type="float" office:value="651" calcext:value-type="float">
            <text:p>65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53S" calcext:value-type="time">
            <text:p>12:20:53</text:p>
          </table:table-cell>
          <table:table-cell office:value-type="float" office:value="380" calcext:value-type="float">
            <text:p>38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55S" calcext:value-type="time">
            <text:p>12:20:55</text:p>
          </table:table-cell>
          <table:table-cell office:value-type="float" office:value="751" calcext:value-type="float">
            <text:p>75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57S" calcext:value-type="time">
            <text:p>12:20:57</text:p>
          </table:table-cell>
          <table:table-cell office:value-type="float" office:value="339" calcext:value-type="float">
            <text:p>33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0M59S" calcext:value-type="time">
            <text:p>12:20:59</text:p>
          </table:table-cell>
          <table:table-cell office:value-type="float" office:value="317" calcext:value-type="float">
            <text:p>317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01S" calcext:value-type="time">
            <text:p>12:21:01</text:p>
          </table:table-cell>
          <table:table-cell office:value-type="float" office:value="613" calcext:value-type="float">
            <text:p>61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03S" calcext:value-type="time">
            <text:p>12:21:03</text:p>
          </table:table-cell>
          <table:table-cell office:value-type="float" office:value="335" calcext:value-type="float">
            <text:p>335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05S" calcext:value-type="time">
            <text:p>12:21:05</text:p>
          </table:table-cell>
          <table:table-cell office:value-type="float" office:value="347" calcext:value-type="float">
            <text:p>347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07S" calcext:value-type="time">
            <text:p>12:21:07</text:p>
          </table:table-cell>
          <table:table-cell office:value-type="float" office:value="324" calcext:value-type="float">
            <text:p>32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09S" calcext:value-type="time">
            <text:p>12:21:09</text:p>
          </table:table-cell>
          <table:table-cell office:value-type="float" office:value="440" calcext:value-type="float">
            <text:p>44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11S" calcext:value-type="time">
            <text:p>12:21:11</text:p>
          </table:table-cell>
          <table:table-cell office:value-type="float" office:value="299" calcext:value-type="float">
            <text:p>299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13S" calcext:value-type="time">
            <text:p>12:21:13</text:p>
          </table:table-cell>
          <table:table-cell office:value-type="float" office:value="424" calcext:value-type="float">
            <text:p>42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15S" calcext:value-type="time">
            <text:p>12:21:15</text:p>
          </table:table-cell>
          <table:table-cell office:value-type="float" office:value="515" calcext:value-type="float">
            <text:p>51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17S" calcext:value-type="time">
            <text:p>12:21:17</text:p>
          </table:table-cell>
          <table:table-cell office:value-type="float" office:value="442" calcext:value-type="float">
            <text:p>44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19S" calcext:value-type="time">
            <text:p>12:21:19</text:p>
          </table:table-cell>
          <table:table-cell office:value-type="float" office:value="513" calcext:value-type="float">
            <text:p>51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21S" calcext:value-type="time">
            <text:p>12:21:21</text:p>
          </table:table-cell>
          <table:table-cell office:value-type="float" office:value="420" calcext:value-type="float">
            <text:p>42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23S" calcext:value-type="time">
            <text:p>12:21:23</text:p>
          </table:table-cell>
          <table:table-cell office:value-type="float" office:value="323" calcext:value-type="float">
            <text:p>323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25S" calcext:value-type="time">
            <text:p>12:21:25</text:p>
          </table:table-cell>
          <table:table-cell office:value-type="float" office:value="567" calcext:value-type="float">
            <text:p>56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27S" calcext:value-type="time">
            <text:p>12:21:27</text:p>
          </table:table-cell>
          <table:table-cell office:value-type="float" office:value="459" calcext:value-type="float">
            <text:p>459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29S" calcext:value-type="time">
            <text:p>12:21:29</text:p>
          </table:table-cell>
          <table:table-cell office:value-type="float" office:value="287" calcext:value-type="float">
            <text:p>287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31S" calcext:value-type="time">
            <text:p>12:21:31</text:p>
          </table:table-cell>
          <table:table-cell office:value-type="float" office:value="594" calcext:value-type="float">
            <text:p>59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33S" calcext:value-type="time">
            <text:p>12:21:33</text:p>
          </table:table-cell>
          <table:table-cell office:value-type="float" office:value="548" calcext:value-type="float">
            <text:p>548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35S" calcext:value-type="time">
            <text:p>12:21:35</text:p>
          </table:table-cell>
          <table:table-cell office:value-type="float" office:value="583" calcext:value-type="float">
            <text:p>58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36S" calcext:value-type="time">
            <text:p>12:21:36</text:p>
          </table:table-cell>
          <table:table-cell office:value-type="float" office:value="493" calcext:value-type="float">
            <text:p>493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38S" calcext:value-type="time">
            <text:p>12:21:38</text:p>
          </table:table-cell>
          <table:table-cell office:value-type="float" office:value="294" calcext:value-type="float">
            <text:p>29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40S" calcext:value-type="time">
            <text:p>12:21:40</text:p>
          </table:table-cell>
          <table:table-cell office:value-type="float" office:value="421" calcext:value-type="float">
            <text:p>42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42S" calcext:value-type="time">
            <text:p>12:21:42</text:p>
          </table:table-cell>
          <table:table-cell office:value-type="float" office:value="174" calcext:value-type="float">
            <text:p>17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44S" calcext:value-type="time">
            <text:p>12:21:44</text:p>
          </table:table-cell>
          <table:table-cell office:value-type="float" office:value="526" calcext:value-type="float">
            <text:p>52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46S" calcext:value-type="time">
            <text:p>12:21:46</text:p>
          </table:table-cell>
          <table:table-cell office:value-type="float" office:value="502" calcext:value-type="float">
            <text:p>502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49S" calcext:value-type="time">
            <text:p>12:21:49</text:p>
          </table:table-cell>
          <table:table-cell office:value-type="float" office:value="678" calcext:value-type="float">
            <text:p>67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51S" calcext:value-type="time">
            <text:p>12:21:51</text:p>
          </table:table-cell>
          <table:table-cell office:value-type="float" office:value="319" calcext:value-type="float">
            <text:p>319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53S" calcext:value-type="time">
            <text:p>12:21:53</text:p>
          </table:table-cell>
          <table:table-cell office:value-type="float" office:value="400" calcext:value-type="float">
            <text:p>40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55S" calcext:value-type="time">
            <text:p>12:21:55</text:p>
          </table:table-cell>
          <table:table-cell office:value-type="float" office:value="603" calcext:value-type="float">
            <text:p>603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57S" calcext:value-type="time">
            <text:p>12:21:57</text:p>
          </table:table-cell>
          <table:table-cell office:value-type="float" office:value="671" calcext:value-type="float">
            <text:p>67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1M59S" calcext:value-type="time">
            <text:p>12:21:59</text:p>
          </table:table-cell>
          <table:table-cell office:value-type="float" office:value="250" calcext:value-type="float">
            <text:p>25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01S" calcext:value-type="time">
            <text:p>12:22:01</text:p>
          </table:table-cell>
          <table:table-cell office:value-type="float" office:value="586" calcext:value-type="float">
            <text:p>58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03S" calcext:value-type="time">
            <text:p>12:22:03</text:p>
          </table:table-cell>
          <table:table-cell office:value-type="float" office:value="518" calcext:value-type="float">
            <text:p>51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05S" calcext:value-type="time">
            <text:p>12:22:05</text:p>
          </table:table-cell>
          <table:table-cell office:value-type="float" office:value="403" calcext:value-type="float">
            <text:p>403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07S" calcext:value-type="time">
            <text:p>12:22:07</text:p>
          </table:table-cell>
          <table:table-cell office:value-type="float" office:value="562" calcext:value-type="float">
            <text:p>56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08S" calcext:value-type="time">
            <text:p>12:22:08</text:p>
          </table:table-cell>
          <table:table-cell office:value-type="float" office:value="442" calcext:value-type="float">
            <text:p>44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10S" calcext:value-type="time">
            <text:p>12:22:10</text:p>
          </table:table-cell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12S" calcext:value-type="time">
            <text:p>12:22:12</text:p>
          </table:table-cell>
          <table:table-cell office:value-type="float" office:value="272" calcext:value-type="float">
            <text:p>27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14S" calcext:value-type="time">
            <text:p>12:22:14</text:p>
          </table:table-cell>
          <table:table-cell office:value-type="float" office:value="476" calcext:value-type="float">
            <text:p>476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16S" calcext:value-type="time">
            <text:p>12:22:16</text:p>
          </table:table-cell>
          <table:table-cell office:value-type="float" office:value="524" calcext:value-type="float">
            <text:p>524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18S" calcext:value-type="time">
            <text:p>12:22:18</text:p>
          </table:table-cell>
          <table:table-cell office:value-type="float" office:value="529" calcext:value-type="float">
            <text:p>52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20S" calcext:value-type="time">
            <text:p>12:22:20</text:p>
          </table:table-cell>
          <table:table-cell office:value-type="float" office:value="430" calcext:value-type="float">
            <text:p>43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22S" calcext:value-type="time">
            <text:p>12:22:22</text:p>
          </table:table-cell>
          <table:table-cell office:value-type="float" office:value="620" calcext:value-type="float">
            <text:p>62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24S" calcext:value-type="time">
            <text:p>12:22:24</text:p>
          </table:table-cell>
          <table:table-cell office:value-type="float" office:value="471" calcext:value-type="float">
            <text:p>47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26S" calcext:value-type="time">
            <text:p>12:22:26</text:p>
          </table:table-cell>
          <table:table-cell office:value-type="float" office:value="559" calcext:value-type="float">
            <text:p>55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28S" calcext:value-type="time">
            <text:p>12:22:28</text:p>
          </table:table-cell>
          <table:table-cell office:value-type="float" office:value="380" calcext:value-type="float">
            <text:p>38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30S" calcext:value-type="time">
            <text:p>12:22:30</text:p>
          </table:table-cell>
          <table:table-cell office:value-type="float" office:value="302" calcext:value-type="float">
            <text:p>30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32S" calcext:value-type="time">
            <text:p>12:22:32</text:p>
          </table:table-cell>
          <table:table-cell office:value-type="float" office:value="250" calcext:value-type="float">
            <text:p>25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34S" calcext:value-type="time">
            <text:p>12:22:34</text:p>
          </table:table-cell>
          <table:table-cell office:value-type="float" office:value="656" calcext:value-type="float">
            <text:p>65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36S" calcext:value-type="time">
            <text:p>12:22:36</text:p>
          </table:table-cell>
          <table:table-cell office:value-type="float" office:value="442" calcext:value-type="float">
            <text:p>44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38S" calcext:value-type="time">
            <text:p>12:22:38</text:p>
          </table:table-cell>
          <table:table-cell office:value-type="float" office:value="470" calcext:value-type="float">
            <text:p>47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40S" calcext:value-type="time">
            <text:p>12:22:40</text:p>
          </table:table-cell>
          <table:table-cell office:value-type="float" office:value="212" calcext:value-type="float">
            <text:p>212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42S" calcext:value-type="time">
            <text:p>12:22:42</text:p>
          </table:table-cell>
          <table:table-cell office:value-type="float" office:value="406" calcext:value-type="float">
            <text:p>406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44S" calcext:value-type="time">
            <text:p>12:22:44</text:p>
          </table:table-cell>
          <table:table-cell office:value-type="float" office:value="512" calcext:value-type="float">
            <text:p>51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46S" calcext:value-type="time">
            <text:p>12:22:46</text:p>
          </table:table-cell>
          <table:table-cell office:value-type="float" office:value="496" calcext:value-type="float">
            <text:p>49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48S" calcext:value-type="time">
            <text:p>12:22:48</text:p>
          </table:table-cell>
          <table:table-cell office:value-type="float" office:value="527" calcext:value-type="float">
            <text:p>52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50S" calcext:value-type="time">
            <text:p>12:22:50</text:p>
          </table:table-cell>
          <table:table-cell office:value-type="float" office:value="306" calcext:value-type="float">
            <text:p>30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52S" calcext:value-type="time">
            <text:p>12:22:52</text:p>
          </table:table-cell>
          <table:table-cell office:value-type="float" office:value="465" calcext:value-type="float">
            <text:p>46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54S" calcext:value-type="time">
            <text:p>12:22:54</text:p>
          </table:table-cell>
          <table:table-cell office:value-type="float" office:value="483" calcext:value-type="float">
            <text:p>483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56S" calcext:value-type="time">
            <text:p>12:22:56</text:p>
          </table:table-cell>
          <table:table-cell office:value-type="float" office:value="498" calcext:value-type="float">
            <text:p>49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2M58S" calcext:value-type="time">
            <text:p>12:22:58</text:p>
          </table:table-cell>
          <table:table-cell office:value-type="float" office:value="463" calcext:value-type="float">
            <text:p>463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00S" calcext:value-type="time">
            <text:p>12:23:00</text:p>
          </table:table-cell>
          <table:table-cell office:value-type="float" office:value="526" calcext:value-type="float">
            <text:p>52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02S" calcext:value-type="time">
            <text:p>12:23:02</text:p>
          </table:table-cell>
          <table:table-cell office:value-type="float" office:value="439" calcext:value-type="float">
            <text:p>43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04S" calcext:value-type="time">
            <text:p>12:23:04</text:p>
          </table:table-cell>
          <table:table-cell office:value-type="float" office:value="629" calcext:value-type="float">
            <text:p>62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06S" calcext:value-type="time">
            <text:p>12:23:06</text:p>
          </table:table-cell>
          <table:table-cell office:value-type="float" office:value="352" calcext:value-type="float">
            <text:p>35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08S" calcext:value-type="time">
            <text:p>12:23:08</text:p>
          </table:table-cell>
          <table:table-cell office:value-type="float" office:value="637" calcext:value-type="float">
            <text:p>637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10S" calcext:value-type="time">
            <text:p>12:23:10</text:p>
          </table:table-cell>
          <table:table-cell office:value-type="float" office:value="391" calcext:value-type="float">
            <text:p>39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12S" calcext:value-type="time">
            <text:p>12:23:12</text:p>
          </table:table-cell>
          <table:table-cell office:value-type="float" office:value="617" calcext:value-type="float">
            <text:p>61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14S" calcext:value-type="time">
            <text:p>12:23:14</text:p>
          </table:table-cell>
          <table:table-cell office:value-type="float" office:value="408" calcext:value-type="float">
            <text:p>40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16S" calcext:value-type="time">
            <text:p>12:23:16</text:p>
          </table:table-cell>
          <table:table-cell office:value-type="float" office:value="535" calcext:value-type="float">
            <text:p>53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18S" calcext:value-type="time">
            <text:p>12:23:18</text:p>
          </table:table-cell>
          <table:table-cell office:value-type="float" office:value="513" calcext:value-type="float">
            <text:p>513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20S" calcext:value-type="time">
            <text:p>12:23:20</text:p>
          </table:table-cell>
          <table:table-cell office:value-type="float" office:value="262" calcext:value-type="float">
            <text:p>262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22S" calcext:value-type="time">
            <text:p>12:23:22</text:p>
          </table:table-cell>
          <table:table-cell office:value-type="float" office:value="516" calcext:value-type="float">
            <text:p>51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24S" calcext:value-type="time">
            <text:p>12:23:24</text:p>
          </table:table-cell>
          <table:table-cell office:value-type="float" office:value="441" calcext:value-type="float">
            <text:p>44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26S" calcext:value-type="time">
            <text:p>12:23:26</text:p>
          </table:table-cell>
          <table:table-cell office:value-type="float" office:value="653" calcext:value-type="float">
            <text:p>653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28S" calcext:value-type="time">
            <text:p>12:23:28</text:p>
          </table:table-cell>
          <table:table-cell office:value-type="float" office:value="215" calcext:value-type="float">
            <text:p>215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30S" calcext:value-type="time">
            <text:p>12:23:30</text:p>
          </table:table-cell>
          <table:table-cell office:value-type="float" office:value="535" calcext:value-type="float">
            <text:p>53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32S" calcext:value-type="time">
            <text:p>12:23:32</text:p>
          </table:table-cell>
          <table:table-cell office:value-type="float" office:value="438" calcext:value-type="float">
            <text:p>438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34S" calcext:value-type="time">
            <text:p>12:23:34</text:p>
          </table:table-cell>
          <table:table-cell office:value-type="float" office:value="572" calcext:value-type="float">
            <text:p>572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36S" calcext:value-type="time">
            <text:p>12:23:36</text:p>
          </table:table-cell>
          <table:table-cell office:value-type="float" office:value="574" calcext:value-type="float">
            <text:p>57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38S" calcext:value-type="time">
            <text:p>12:23:38</text:p>
          </table:table-cell>
          <table:table-cell office:value-type="float" office:value="364" calcext:value-type="float">
            <text:p>36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40S" calcext:value-type="time">
            <text:p>12:23:40</text:p>
          </table:table-cell>
          <table:table-cell office:value-type="float" office:value="580" calcext:value-type="float">
            <text:p>58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42S" calcext:value-type="time">
            <text:p>12:23:42</text:p>
          </table:table-cell>
          <table:table-cell office:value-type="float" office:value="544" calcext:value-type="float">
            <text:p>54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44S" calcext:value-type="time">
            <text:p>12:23:44</text:p>
          </table:table-cell>
          <table:table-cell office:value-type="float" office:value="341" calcext:value-type="float">
            <text:p>34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46S" calcext:value-type="time">
            <text:p>12:23:46</text:p>
          </table:table-cell>
          <table:table-cell office:value-type="float" office:value="322" calcext:value-type="float">
            <text:p>32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48S" calcext:value-type="time">
            <text:p>12:23:48</text:p>
          </table:table-cell>
          <table:table-cell office:value-type="float" office:value="468" calcext:value-type="float">
            <text:p>46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50S" calcext:value-type="time">
            <text:p>12:23:50</text:p>
          </table:table-cell>
          <table:table-cell office:value-type="float" office:value="702" calcext:value-type="float">
            <text:p>70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52S" calcext:value-type="time">
            <text:p>12:23:52</text:p>
          </table:table-cell>
          <table:table-cell office:value-type="float" office:value="449" calcext:value-type="float">
            <text:p>449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54S" calcext:value-type="time">
            <text:p>12:23:54</text:p>
          </table:table-cell>
          <table:table-cell office:value-type="float" office:value="635" calcext:value-type="float">
            <text:p>63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56S" calcext:value-type="time">
            <text:p>12:23:56</text:p>
          </table:table-cell>
          <table:table-cell office:value-type="float" office:value="454" calcext:value-type="float">
            <text:p>45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3M58S" calcext:value-type="time">
            <text:p>12:23:58</text:p>
          </table:table-cell>
          <table:table-cell office:value-type="float" office:value="543" calcext:value-type="float">
            <text:p>543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00S" calcext:value-type="time">
            <text:p>12:24:00</text:p>
          </table:table-cell>
          <table:table-cell office:value-type="float" office:value="575" calcext:value-type="float">
            <text:p>57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02S" calcext:value-type="time">
            <text:p>12:24:02</text:p>
          </table:table-cell>
          <table:table-cell office:value-type="float" office:value="509" calcext:value-type="float">
            <text:p>509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04S" calcext:value-type="time">
            <text:p>12:24:04</text:p>
          </table:table-cell>
          <table:table-cell office:value-type="float" office:value="488" calcext:value-type="float">
            <text:p>488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06S" calcext:value-type="time">
            <text:p>12:24:06</text:p>
          </table:table-cell>
          <table:table-cell office:value-type="float" office:value="298" calcext:value-type="float">
            <text:p>298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08S" calcext:value-type="time">
            <text:p>12:24:08</text:p>
          </table:table-cell>
          <table:table-cell office:value-type="float" office:value="486" calcext:value-type="float">
            <text:p>48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10S" calcext:value-type="time">
            <text:p>12:24:10</text:p>
          </table:table-cell>
          <table:table-cell office:value-type="float" office:value="378" calcext:value-type="float">
            <text:p>37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13S" calcext:value-type="time">
            <text:p>12:24:13</text:p>
          </table:table-cell>
          <table:table-cell office:value-type="float" office:value="528" calcext:value-type="float">
            <text:p>52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15S" calcext:value-type="time">
            <text:p>12:24:15</text:p>
          </table:table-cell>
          <table:table-cell office:value-type="float" office:value="608" calcext:value-type="float">
            <text:p>60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17S" calcext:value-type="time">
            <text:p>12:24:17</text:p>
          </table:table-cell>
          <table:table-cell office:value-type="float" office:value="490" calcext:value-type="float">
            <text:p>49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19S" calcext:value-type="time">
            <text:p>12:24:19</text:p>
          </table:table-cell>
          <table:table-cell office:value-type="float" office:value="419" calcext:value-type="float">
            <text:p>41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21S" calcext:value-type="time">
            <text:p>12:24:21</text:p>
          </table:table-cell>
          <table:table-cell office:value-type="float" office:value="542" calcext:value-type="float">
            <text:p>542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23S" calcext:value-type="time">
            <text:p>12:24:23</text:p>
          </table:table-cell>
          <table:table-cell office:value-type="float" office:value="649" calcext:value-type="float">
            <text:p>64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25S" calcext:value-type="time">
            <text:p>12:24:25</text:p>
          </table:table-cell>
          <table:table-cell office:value-type="float" office:value="355" calcext:value-type="float">
            <text:p>35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27S" calcext:value-type="time">
            <text:p>12:24:27</text:p>
          </table:table-cell>
          <table:table-cell office:value-type="float" office:value="448" calcext:value-type="float">
            <text:p>448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29S" calcext:value-type="time">
            <text:p>12:24:29</text:p>
          </table:table-cell>
          <table:table-cell office:value-type="float" office:value="503" calcext:value-type="float">
            <text:p>50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31S" calcext:value-type="time">
            <text:p>12:24:31</text:p>
          </table:table-cell>
          <table:table-cell office:value-type="float" office:value="377" calcext:value-type="float">
            <text:p>377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33S" calcext:value-type="time">
            <text:p>12:24:33</text:p>
          </table:table-cell>
          <table:table-cell office:value-type="float" office:value="518" calcext:value-type="float">
            <text:p>518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35S" calcext:value-type="time">
            <text:p>12:24:35</text:p>
          </table:table-cell>
          <table:table-cell office:value-type="float" office:value="751" calcext:value-type="float">
            <text:p>751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37S" calcext:value-type="time">
            <text:p>12:24:37</text:p>
          </table:table-cell>
          <table:table-cell office:value-type="float" office:value="583" calcext:value-type="float">
            <text:p>58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39S" calcext:value-type="time">
            <text:p>12:24:39</text:p>
          </table:table-cell>
          <table:table-cell office:value-type="float" office:value="451" calcext:value-type="float">
            <text:p>45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41S" calcext:value-type="time">
            <text:p>12:24:41</text:p>
          </table:table-cell>
          <table:table-cell office:value-type="float" office:value="214" calcext:value-type="float">
            <text:p>21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43S" calcext:value-type="time">
            <text:p>12:24:43</text:p>
          </table:table-cell>
          <table:table-cell office:value-type="float" office:value="338" calcext:value-type="float">
            <text:p>33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45S" calcext:value-type="time">
            <text:p>12:24:45</text:p>
          </table:table-cell>
          <table:table-cell office:value-type="float" office:value="570" calcext:value-type="float">
            <text:p>57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47S" calcext:value-type="time">
            <text:p>12:24:47</text:p>
          </table:table-cell>
          <table:table-cell office:value-type="float" office:value="535" calcext:value-type="float">
            <text:p>53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49S" calcext:value-type="time">
            <text:p>12:24:49</text:p>
          </table:table-cell>
          <table:table-cell office:value-type="float" office:value="369" calcext:value-type="float">
            <text:p>369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51S" calcext:value-type="time">
            <text:p>12:24:51</text:p>
          </table:table-cell>
          <table:table-cell office:value-type="float" office:value="653" calcext:value-type="float">
            <text:p>653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53S" calcext:value-type="time">
            <text:p>12:24:53</text:p>
          </table:table-cell>
          <table:table-cell office:value-type="float" office:value="481" calcext:value-type="float">
            <text:p>48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55S" calcext:value-type="time">
            <text:p>12:24:55</text:p>
          </table:table-cell>
          <table:table-cell office:value-type="float" office:value="425" calcext:value-type="float">
            <text:p>42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4M57S" calcext:value-type="time">
            <text:p>12:24:57</text:p>
          </table:table-cell>
          <table:table-cell office:value-type="float" office:value="543" calcext:value-type="float">
            <text:p>54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00S" calcext:value-type="time">
            <text:p>12:25:00</text:p>
          </table:table-cell>
          <table:table-cell office:value-type="float" office:value="355" calcext:value-type="float">
            <text:p>35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02S" calcext:value-type="time">
            <text:p>12:25:02</text:p>
          </table:table-cell>
          <table:table-cell office:value-type="float" office:value="396" calcext:value-type="float">
            <text:p>39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04S" calcext:value-type="time">
            <text:p>12:25:04</text:p>
          </table:table-cell>
          <table:table-cell office:value-type="float" office:value="450" calcext:value-type="float">
            <text:p>45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06S" calcext:value-type="time">
            <text:p>12:25:06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08S" calcext:value-type="time">
            <text:p>12:25:08</text:p>
          </table:table-cell>
          <table:table-cell office:value-type="float" office:value="382" calcext:value-type="float">
            <text:p>382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10S" calcext:value-type="time">
            <text:p>12:25:10</text:p>
          </table:table-cell>
          <table:table-cell office:value-type="float" office:value="509" calcext:value-type="float">
            <text:p>509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12S" calcext:value-type="time">
            <text:p>12:25:12</text:p>
          </table:table-cell>
          <table:table-cell office:value-type="float" office:value="349" calcext:value-type="float">
            <text:p>349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14S" calcext:value-type="time">
            <text:p>12:25:14</text:p>
          </table:table-cell>
          <table:table-cell office:value-type="float" office:value="530" calcext:value-type="float">
            <text:p>5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16S" calcext:value-type="time">
            <text:p>12:25:16</text:p>
          </table:table-cell>
          <table:table-cell office:value-type="float" office:value="462" calcext:value-type="float">
            <text:p>46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18S" calcext:value-type="time">
            <text:p>12:25:18</text:p>
          </table:table-cell>
          <table:table-cell office:value-type="float" office:value="450" calcext:value-type="float">
            <text:p>45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20S" calcext:value-type="time">
            <text:p>12:25:20</text:p>
          </table:table-cell>
          <table:table-cell office:value-type="float" office:value="529" calcext:value-type="float">
            <text:p>52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22S" calcext:value-type="time">
            <text:p>12:25:22</text:p>
          </table:table-cell>
          <table:table-cell office:value-type="float" office:value="382" calcext:value-type="float">
            <text:p>382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24S" calcext:value-type="time">
            <text:p>12:25:24</text:p>
          </table:table-cell>
          <table:table-cell office:value-type="float" office:value="471" calcext:value-type="float">
            <text:p>47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27S" calcext:value-type="time">
            <text:p>12:25:27</text:p>
          </table:table-cell>
          <table:table-cell office:value-type="float" office:value="501" calcext:value-type="float">
            <text:p>50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29S" calcext:value-type="time">
            <text:p>12:25:29</text:p>
          </table:table-cell>
          <table:table-cell office:value-type="float" office:value="428" calcext:value-type="float">
            <text:p>42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31S" calcext:value-type="time">
            <text:p>12:25:31</text:p>
          </table:table-cell>
          <table:table-cell office:value-type="float" office:value="443" calcext:value-type="float">
            <text:p>443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33S" calcext:value-type="time">
            <text:p>12:25:33</text:p>
          </table:table-cell>
          <table:table-cell office:value-type="float" office:value="452" calcext:value-type="float">
            <text:p>45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35S" calcext:value-type="time">
            <text:p>12:25:35</text:p>
          </table:table-cell>
          <table:table-cell office:value-type="float" office:value="373" calcext:value-type="float">
            <text:p>37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37S" calcext:value-type="time">
            <text:p>12:25:37</text:p>
          </table:table-cell>
          <table:table-cell office:value-type="float" office:value="380" calcext:value-type="float">
            <text:p>38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39S" calcext:value-type="time">
            <text:p>12:25:39</text:p>
          </table:table-cell>
          <table:table-cell office:value-type="float" office:value="399" calcext:value-type="float">
            <text:p>39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41S" calcext:value-type="time">
            <text:p>12:25:41</text:p>
          </table:table-cell>
          <table:table-cell office:value-type="float" office:value="359" calcext:value-type="float">
            <text:p>35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43S" calcext:value-type="time">
            <text:p>12:25:43</text:p>
          </table:table-cell>
          <table:table-cell office:value-type="float" office:value="150" calcext:value-type="float">
            <text:p>15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45S" calcext:value-type="time">
            <text:p>12:25:45</text:p>
          </table:table-cell>
          <table:table-cell office:value-type="float" office:value="495" calcext:value-type="float">
            <text:p>49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47S" calcext:value-type="time">
            <text:p>12:25:47</text:p>
          </table:table-cell>
          <table:table-cell office:value-type="float" office:value="285" calcext:value-type="float">
            <text:p>285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50S" calcext:value-type="time">
            <text:p>12:25:50</text:p>
          </table:table-cell>
          <table:table-cell office:value-type="float" office:value="651" calcext:value-type="float">
            <text:p>65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52S" calcext:value-type="time">
            <text:p>12:25:52</text:p>
          </table:table-cell>
          <table:table-cell office:value-type="float" office:value="487" calcext:value-type="float">
            <text:p>48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54S" calcext:value-type="time">
            <text:p>12:25:54</text:p>
          </table:table-cell>
          <table:table-cell office:value-type="float" office:value="596" calcext:value-type="float">
            <text:p>596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56S" calcext:value-type="time">
            <text:p>12:25:56</text:p>
          </table:table-cell>
          <table:table-cell office:value-type="float" office:value="489" calcext:value-type="float">
            <text:p>489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5M58S" calcext:value-type="time">
            <text:p>12:25:58</text:p>
          </table:table-cell>
          <table:table-cell office:value-type="float" office:value="455" calcext:value-type="float">
            <text:p>45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00S" calcext:value-type="time">
            <text:p>12:26:00</text:p>
          </table:table-cell>
          <table:table-cell office:value-type="float" office:value="560" calcext:value-type="float">
            <text:p>56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02S" calcext:value-type="time">
            <text:p>12:26:02</text:p>
          </table:table-cell>
          <table:table-cell office:value-type="float" office:value="439" calcext:value-type="float">
            <text:p>439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04S" calcext:value-type="time">
            <text:p>12:26:04</text:p>
          </table:table-cell>
          <table:table-cell office:value-type="float" office:value="518" calcext:value-type="float">
            <text:p>51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06S" calcext:value-type="time">
            <text:p>12:26:06</text:p>
          </table:table-cell>
          <table:table-cell office:value-type="float" office:value="267" calcext:value-type="float">
            <text:p>26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08S" calcext:value-type="time">
            <text:p>12:26:08</text:p>
          </table:table-cell>
          <table:table-cell office:value-type="float" office:value="582" calcext:value-type="float">
            <text:p>58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10S" calcext:value-type="time">
            <text:p>12:26:10</text:p>
          </table:table-cell>
          <table:table-cell office:value-type="float" office:value="22" calcext:value-type="float">
            <text:p>2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13S" calcext:value-type="time">
            <text:p>12:26:13</text:p>
          </table:table-cell>
          <table:table-cell office:value-type="float" office:value="432" calcext:value-type="float">
            <text:p>43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15S" calcext:value-type="time">
            <text:p>12:26:15</text:p>
          </table:table-cell>
          <table:table-cell office:value-type="float" office:value="715" calcext:value-type="float">
            <text:p>71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17S" calcext:value-type="time">
            <text:p>12:26:17</text:p>
          </table:table-cell>
          <table:table-cell office:value-type="float" office:value="572" calcext:value-type="float">
            <text:p>57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19S" calcext:value-type="time">
            <text:p>12:26:19</text:p>
          </table:table-cell>
          <table:table-cell office:value-type="float" office:value="497" calcext:value-type="float">
            <text:p>49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21S" calcext:value-type="time">
            <text:p>12:26:21</text:p>
          </table:table-cell>
          <table:table-cell office:value-type="float" office:value="539" calcext:value-type="float">
            <text:p>539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23S" calcext:value-type="time">
            <text:p>12:26:23</text:p>
          </table:table-cell>
          <table:table-cell office:value-type="float" office:value="657" calcext:value-type="float">
            <text:p>65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25S" calcext:value-type="time">
            <text:p>12:26:25</text:p>
          </table:table-cell>
          <table:table-cell office:value-type="float" office:value="783" calcext:value-type="float">
            <text:p>78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27S" calcext:value-type="time">
            <text:p>12:26:27</text:p>
          </table:table-cell>
          <table:table-cell office:value-type="float" office:value="414" calcext:value-type="float">
            <text:p>41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29S" calcext:value-type="time">
            <text:p>12:26:29</text:p>
          </table:table-cell>
          <table:table-cell office:value-type="float" office:value="503" calcext:value-type="float">
            <text:p>503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31S" calcext:value-type="time">
            <text:p>12:26:31</text:p>
          </table:table-cell>
          <table:table-cell office:value-type="float" office:value="435" calcext:value-type="float">
            <text:p>43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34S" calcext:value-type="time">
            <text:p>12:26:34</text:p>
          </table:table-cell>
          <table:table-cell office:value-type="float" office:value="367" calcext:value-type="float">
            <text:p>36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36S" calcext:value-type="time">
            <text:p>12:26:36</text:p>
          </table:table-cell>
          <table:table-cell office:value-type="float" office:value="365" calcext:value-type="float">
            <text:p>36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38S" calcext:value-type="time">
            <text:p>12:26:38</text:p>
          </table:table-cell>
          <table:table-cell office:value-type="float" office:value="628" calcext:value-type="float">
            <text:p>62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40S" calcext:value-type="time">
            <text:p>12:26:40</text:p>
          </table:table-cell>
          <table:table-cell office:value-type="float" office:value="666" calcext:value-type="float">
            <text:p>66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42S" calcext:value-type="time">
            <text:p>12:26:42</text:p>
          </table:table-cell>
          <table:table-cell office:value-type="float" office:value="765" calcext:value-type="float">
            <text:p>765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44S" calcext:value-type="time">
            <text:p>12:26:44</text:p>
          </table:table-cell>
          <table:table-cell office:value-type="float" office:value="495" calcext:value-type="float">
            <text:p>49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46S" calcext:value-type="time">
            <text:p>12:26:46</text:p>
          </table:table-cell>
          <table:table-cell office:value-type="float" office:value="569" calcext:value-type="float">
            <text:p>56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48S" calcext:value-type="time">
            <text:p>12:26:48</text:p>
          </table:table-cell>
          <table:table-cell office:value-type="float" office:value="429" calcext:value-type="float">
            <text:p>429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50S" calcext:value-type="time">
            <text:p>12:26:50</text:p>
          </table:table-cell>
          <table:table-cell office:value-type="float" office:value="477" calcext:value-type="float">
            <text:p>477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53S" calcext:value-type="time">
            <text:p>12:26:53</text:p>
          </table:table-cell>
          <table:table-cell office:value-type="float" office:value="556" calcext:value-type="float">
            <text:p>55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55S" calcext:value-type="time">
            <text:p>12:26:55</text:p>
          </table:table-cell>
          <table:table-cell office:value-type="float" office:value="395" calcext:value-type="float">
            <text:p>395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57S" calcext:value-type="time">
            <text:p>12:26:57</text:p>
          </table:table-cell>
          <table:table-cell office:value-type="float" office:value="457" calcext:value-type="float">
            <text:p>45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6M59S" calcext:value-type="time">
            <text:p>12:26:59</text:p>
          </table:table-cell>
          <table:table-cell office:value-type="float" office:value="335" calcext:value-type="float">
            <text:p>33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01S" calcext:value-type="time">
            <text:p>12:27:01</text:p>
          </table:table-cell>
          <table:table-cell office:value-type="float" office:value="409" calcext:value-type="float">
            <text:p>40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03S" calcext:value-type="time">
            <text:p>12:27:03</text:p>
          </table:table-cell>
          <table:table-cell office:value-type="float" office:value="605" calcext:value-type="float">
            <text:p>60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05S" calcext:value-type="time">
            <text:p>12:27:05</text:p>
          </table:table-cell>
          <table:table-cell office:value-type="float" office:value="532" calcext:value-type="float">
            <text:p>53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07S" calcext:value-type="time">
            <text:p>12:27:07</text:p>
          </table:table-cell>
          <table:table-cell office:value-type="float" office:value="547" calcext:value-type="float">
            <text:p>547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10S" calcext:value-type="time">
            <text:p>12:27:10</text:p>
          </table:table-cell>
          <table:table-cell office:value-type="float" office:value="412" calcext:value-type="float">
            <text:p>41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12S" calcext:value-type="time">
            <text:p>12:27:12</text:p>
          </table:table-cell>
          <table:table-cell office:value-type="float" office:value="499" calcext:value-type="float">
            <text:p>499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14S" calcext:value-type="time">
            <text:p>12:27:14</text:p>
          </table:table-cell>
          <table:table-cell office:value-type="float" office:value="599" calcext:value-type="float">
            <text:p>599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16S" calcext:value-type="time">
            <text:p>12:27:16</text:p>
          </table:table-cell>
          <table:table-cell office:value-type="float" office:value="343" calcext:value-type="float">
            <text:p>34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18S" calcext:value-type="time">
            <text:p>12:27:18</text:p>
          </table:table-cell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20S" calcext:value-type="time">
            <text:p>12:27:20</text:p>
          </table:table-cell>
          <table:table-cell office:value-type="float" office:value="216" calcext:value-type="float">
            <text:p>21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22S" calcext:value-type="time">
            <text:p>12:27:22</text:p>
          </table:table-cell>
          <table:table-cell office:value-type="float" office:value="528" calcext:value-type="float">
            <text:p>528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24S" calcext:value-type="time">
            <text:p>12:27:24</text:p>
          </table:table-cell>
          <table:table-cell office:value-type="float" office:value="502" calcext:value-type="float">
            <text:p>50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27S" calcext:value-type="time">
            <text:p>12:27:27</text:p>
          </table:table-cell>
          <table:table-cell office:value-type="float" office:value="312" calcext:value-type="float">
            <text:p>312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29S" calcext:value-type="time">
            <text:p>12:27:29</text:p>
          </table:table-cell>
          <table:table-cell office:value-type="float" office:value="495" calcext:value-type="float">
            <text:p>495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31S" calcext:value-type="time">
            <text:p>12:27:31</text:p>
          </table:table-cell>
          <table:table-cell office:value-type="float" office:value="471" calcext:value-type="float">
            <text:p>47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33S" calcext:value-type="time">
            <text:p>12:27:33</text:p>
          </table:table-cell>
          <table:table-cell office:value-type="float" office:value="785" calcext:value-type="float">
            <text:p>78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35S" calcext:value-type="time">
            <text:p>12:27:35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37S" calcext:value-type="time">
            <text:p>12:27:37</text:p>
          </table:table-cell>
          <table:table-cell office:value-type="float" office:value="413" calcext:value-type="float">
            <text:p>41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39S" calcext:value-type="time">
            <text:p>12:27:39</text:p>
          </table:table-cell>
          <table:table-cell office:value-type="float" office:value="261" calcext:value-type="float">
            <text:p>26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41S" calcext:value-type="time">
            <text:p>12:27:41</text:p>
          </table:table-cell>
          <table:table-cell office:value-type="float" office:value="567" calcext:value-type="float">
            <text:p>56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44S" calcext:value-type="time">
            <text:p>12:27:44</text:p>
          </table:table-cell>
          <table:table-cell office:value-type="float" office:value="362" calcext:value-type="float">
            <text:p>362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46S" calcext:value-type="time">
            <text:p>12:27:46</text:p>
          </table:table-cell>
          <table:table-cell office:value-type="float" office:value="367" calcext:value-type="float">
            <text:p>367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48S" calcext:value-type="time">
            <text:p>12:27:48</text:p>
          </table:table-cell>
          <table:table-cell office:value-type="float" office:value="404" calcext:value-type="float">
            <text:p>404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50S" calcext:value-type="time">
            <text:p>12:27:50</text:p>
          </table:table-cell>
          <table:table-cell office:value-type="float" office:value="425" calcext:value-type="float">
            <text:p>42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52S" calcext:value-type="time">
            <text:p>12:27:52</text:p>
          </table:table-cell>
          <table:table-cell office:value-type="float" office:value="344" calcext:value-type="float">
            <text:p>34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54S" calcext:value-type="time">
            <text:p>12:27:54</text:p>
          </table:table-cell>
          <table:table-cell office:value-type="float" office:value="555" calcext:value-type="float">
            <text:p>555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56S" calcext:value-type="time">
            <text:p>12:27:56</text:p>
          </table:table-cell>
          <table:table-cell office:value-type="float" office:value="523" calcext:value-type="float">
            <text:p>52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7M59S" calcext:value-type="time">
            <text:p>12:27:59</text:p>
          </table:table-cell>
          <table:table-cell office:value-type="float" office:value="480" calcext:value-type="float">
            <text:p>48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01S" calcext:value-type="time">
            <text:p>12:28:01</text:p>
          </table:table-cell>
          <table:table-cell office:value-type="float" office:value="345" calcext:value-type="float">
            <text:p>34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03S" calcext:value-type="time">
            <text:p>12:28:03</text:p>
          </table:table-cell>
          <table:table-cell office:value-type="float" office:value="517" calcext:value-type="float">
            <text:p>51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05S" calcext:value-type="time">
            <text:p>12:28:05</text:p>
          </table:table-cell>
          <table:table-cell office:value-type="float" office:value="514" calcext:value-type="float">
            <text:p>51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07S" calcext:value-type="time">
            <text:p>12:28:07</text:p>
          </table:table-cell>
          <table:table-cell office:value-type="float" office:value="345" calcext:value-type="float">
            <text:p>345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09S" calcext:value-type="time">
            <text:p>12:28:09</text:p>
          </table:table-cell>
          <table:table-cell office:value-type="float" office:value="454" calcext:value-type="float">
            <text:p>45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11S" calcext:value-type="time">
            <text:p>12:28:11</text:p>
          </table:table-cell>
          <table:table-cell office:value-type="float" office:value="530" calcext:value-type="float">
            <text:p>53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14S" calcext:value-type="time">
            <text:p>12:28:14</text:p>
          </table:table-cell>
          <table:table-cell office:value-type="float" office:value="421" calcext:value-type="float">
            <text:p>42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16S" calcext:value-type="time">
            <text:p>12:28:16</text:p>
          </table:table-cell>
          <table:table-cell office:value-type="float" office:value="644" calcext:value-type="float">
            <text:p>64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18S" calcext:value-type="time">
            <text:p>12:28:18</text:p>
          </table:table-cell>
          <table:table-cell office:value-type="float" office:value="347" calcext:value-type="float">
            <text:p>34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20S" calcext:value-type="time">
            <text:p>12:28:20</text:p>
          </table:table-cell>
          <table:table-cell office:value-type="float" office:value="549" calcext:value-type="float">
            <text:p>549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22S" calcext:value-type="time">
            <text:p>12:28:22</text:p>
          </table:table-cell>
          <table:table-cell office:value-type="float" office:value="543" calcext:value-type="float">
            <text:p>543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24S" calcext:value-type="time">
            <text:p>12:28:24</text:p>
          </table:table-cell>
          <table:table-cell office:value-type="float" office:value="598" calcext:value-type="float">
            <text:p>59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26S" calcext:value-type="time">
            <text:p>12:28:26</text:p>
          </table:table-cell>
          <table:table-cell office:value-type="float" office:value="607" calcext:value-type="float">
            <text:p>60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29S" calcext:value-type="time">
            <text:p>12:28:29</text:p>
          </table:table-cell>
          <table:table-cell office:value-type="float" office:value="624" calcext:value-type="float">
            <text:p>62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31S" calcext:value-type="time">
            <text:p>12:28:31</text:p>
          </table:table-cell>
          <table:table-cell office:value-type="float" office:value="610" calcext:value-type="float">
            <text:p>610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33S" calcext:value-type="time">
            <text:p>12:28:33</text:p>
          </table:table-cell>
          <table:table-cell office:value-type="float" office:value="313" calcext:value-type="float">
            <text:p>31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35S" calcext:value-type="time">
            <text:p>12:28:35</text:p>
          </table:table-cell>
          <table:table-cell office:value-type="float" office:value="338" calcext:value-type="float">
            <text:p>33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37S" calcext:value-type="time">
            <text:p>12:28:37</text:p>
          </table:table-cell>
          <table:table-cell office:value-type="float" office:value="494" calcext:value-type="float">
            <text:p>49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39S" calcext:value-type="time">
            <text:p>12:28:39</text:p>
          </table:table-cell>
          <table:table-cell office:value-type="float" office:value="535" calcext:value-type="float">
            <text:p>535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42S" calcext:value-type="time">
            <text:p>12:28:42</text:p>
          </table:table-cell>
          <table:table-cell office:value-type="float" office:value="354" calcext:value-type="float">
            <text:p>354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44S" calcext:value-type="time">
            <text:p>12:28:44</text:p>
          </table:table-cell>
          <table:table-cell office:value-type="float" office:value="600" calcext:value-type="float">
            <text:p>60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46S" calcext:value-type="time">
            <text:p>12:28:46</text:p>
          </table:table-cell>
          <table:table-cell office:value-type="float" office:value="425" calcext:value-type="float">
            <text:p>42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48S" calcext:value-type="time">
            <text:p>12:28:48</text:p>
          </table:table-cell>
          <table:table-cell office:value-type="float" office:value="515" calcext:value-type="float">
            <text:p>51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50S" calcext:value-type="time">
            <text:p>12:28:50</text:p>
          </table:table-cell>
          <table:table-cell office:value-type="float" office:value="550" calcext:value-type="float">
            <text:p>55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52S" calcext:value-type="time">
            <text:p>12:28:52</text:p>
          </table:table-cell>
          <table:table-cell office:value-type="float" office:value="228" calcext:value-type="float">
            <text:p>22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54S" calcext:value-type="time">
            <text:p>12:28:54</text:p>
          </table:table-cell>
          <table:table-cell office:value-type="float" office:value="552" calcext:value-type="float">
            <text:p>55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57S" calcext:value-type="time">
            <text:p>12:28:57</text:p>
          </table:table-cell>
          <table:table-cell office:value-type="float" office:value="437" calcext:value-type="float">
            <text:p>437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8M59S" calcext:value-type="time">
            <text:p>12:28:59</text:p>
          </table:table-cell>
          <table:table-cell office:value-type="float" office:value="483" calcext:value-type="float">
            <text:p>48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01S" calcext:value-type="time">
            <text:p>12:29:01</text:p>
          </table:table-cell>
          <table:table-cell office:value-type="float" office:value="501" calcext:value-type="float">
            <text:p>50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03S" calcext:value-type="time">
            <text:p>12:29:03</text:p>
          </table:table-cell>
          <table:table-cell office:value-type="float" office:value="518" calcext:value-type="float">
            <text:p>51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05S" calcext:value-type="time">
            <text:p>12:29:05</text:p>
          </table:table-cell>
          <table:table-cell office:value-type="float" office:value="344" calcext:value-type="float">
            <text:p>34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07S" calcext:value-type="time">
            <text:p>12:29:07</text:p>
          </table:table-cell>
          <table:table-cell office:value-type="float" office:value="426" calcext:value-type="float">
            <text:p>426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10S" calcext:value-type="time">
            <text:p>12:29:10</text:p>
          </table:table-cell>
          <table:table-cell office:value-type="float" office:value="404" calcext:value-type="float">
            <text:p>40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12S" calcext:value-type="time">
            <text:p>12:29:12</text:p>
          </table:table-cell>
          <table:table-cell office:value-type="float" office:value="486" calcext:value-type="float">
            <text:p>48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14S" calcext:value-type="time">
            <text:p>12:29:14</text:p>
          </table:table-cell>
          <table:table-cell office:value-type="float" office:value="555" calcext:value-type="float">
            <text:p>555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16S" calcext:value-type="time">
            <text:p>12:29:16</text:p>
          </table:table-cell>
          <table:table-cell office:value-type="float" office:value="654" calcext:value-type="float">
            <text:p>65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18S" calcext:value-type="time">
            <text:p>12:29:18</text:p>
          </table:table-cell>
          <table:table-cell office:value-type="float" office:value="504" calcext:value-type="float">
            <text:p>50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21S" calcext:value-type="time">
            <text:p>12:29:21</text:p>
          </table:table-cell>
          <table:table-cell office:value-type="float" office:value="559" calcext:value-type="float">
            <text:p>55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23S" calcext:value-type="time">
            <text:p>12:29:23</text:p>
          </table:table-cell>
          <table:table-cell office:value-type="float" office:value="501" calcext:value-type="float">
            <text:p>50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25S" calcext:value-type="time">
            <text:p>12:29:25</text:p>
          </table:table-cell>
          <table:table-cell office:value-type="float" office:value="506" calcext:value-type="float">
            <text:p>506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27S" calcext:value-type="time">
            <text:p>12:29:27</text:p>
          </table:table-cell>
          <table:table-cell office:value-type="float" office:value="531" calcext:value-type="float">
            <text:p>53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29S" calcext:value-type="time">
            <text:p>12:29:29</text:p>
          </table:table-cell>
          <table:table-cell office:value-type="float" office:value="354" calcext:value-type="float">
            <text:p>35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31S" calcext:value-type="time">
            <text:p>12:29:31</text:p>
          </table:table-cell>
          <table:table-cell office:value-type="float" office:value="245" calcext:value-type="float">
            <text:p>245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34S" calcext:value-type="time">
            <text:p>12:29:34</text:p>
          </table:table-cell>
          <table:table-cell office:value-type="float" office:value="461" calcext:value-type="float">
            <text:p>46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36S" calcext:value-type="time">
            <text:p>12:29:36</text:p>
          </table:table-cell>
          <table:table-cell office:value-type="float" office:value="459" calcext:value-type="float">
            <text:p>459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38S" calcext:value-type="time">
            <text:p>12:29:38</text:p>
          </table:table-cell>
          <table:table-cell office:value-type="float" office:value="722" calcext:value-type="float">
            <text:p>722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40S" calcext:value-type="time">
            <text:p>12:29:40</text:p>
          </table:table-cell>
          <table:table-cell office:value-type="float" office:value="497" calcext:value-type="float">
            <text:p>497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42S" calcext:value-type="time">
            <text:p>12:29:42</text:p>
          </table:table-cell>
          <table:table-cell office:value-type="float" office:value="528" calcext:value-type="float">
            <text:p>52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44S" calcext:value-type="time">
            <text:p>12:29:44</text:p>
          </table:table-cell>
          <table:table-cell office:value-type="float" office:value="277" calcext:value-type="float">
            <text:p>27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47S" calcext:value-type="time">
            <text:p>12:29:47</text:p>
          </table:table-cell>
          <table:table-cell office:value-type="float" office:value="390" calcext:value-type="float">
            <text:p>39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49S" calcext:value-type="time">
            <text:p>12:29:49</text:p>
          </table:table-cell>
          <table:table-cell office:value-type="float" office:value="263" calcext:value-type="float">
            <text:p>263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51S" calcext:value-type="time">
            <text:p>12:29:51</text:p>
          </table:table-cell>
          <table:table-cell office:value-type="float" office:value="319" calcext:value-type="float">
            <text:p>31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53S" calcext:value-type="time">
            <text:p>12:29:53</text:p>
          </table:table-cell>
          <table:table-cell office:value-type="float" office:value="548" calcext:value-type="float">
            <text:p>54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55S" calcext:value-type="time">
            <text:p>12:29:55</text:p>
          </table:table-cell>
          <table:table-cell office:value-type="float" office:value="92" calcext:value-type="float">
            <text:p>9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29M58S" calcext:value-type="time">
            <text:p>12:29:58</text:p>
          </table:table-cell>
          <table:table-cell office:value-type="float" office:value="382" calcext:value-type="float">
            <text:p>38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00S" calcext:value-type="time">
            <text:p>12:30:00</text:p>
          </table:table-cell>
          <table:table-cell office:value-type="float" office:value="540" calcext:value-type="float">
            <text:p>54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02S" calcext:value-type="time">
            <text:p>12:30:02</text:p>
          </table:table-cell>
          <table:table-cell office:value-type="float" office:value="342" calcext:value-type="float">
            <text:p>34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04S" calcext:value-type="time">
            <text:p>12:30:04</text:p>
          </table:table-cell>
          <table:table-cell office:value-type="float" office:value="658" calcext:value-type="float">
            <text:p>65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06S" calcext:value-type="time">
            <text:p>12:30:06</text:p>
          </table:table-cell>
          <table:table-cell office:value-type="float" office:value="413" calcext:value-type="float">
            <text:p>41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09S" calcext:value-type="time">
            <text:p>12:30:09</text:p>
          </table:table-cell>
          <table:table-cell office:value-type="float" office:value="581" calcext:value-type="float">
            <text:p>58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11S" calcext:value-type="time">
            <text:p>12:30:11</text:p>
          </table:table-cell>
          <table:table-cell office:value-type="float" office:value="359" calcext:value-type="float">
            <text:p>359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13S" calcext:value-type="time">
            <text:p>12:30:13</text:p>
          </table:table-cell>
          <table:table-cell office:value-type="float" office:value="371" calcext:value-type="float">
            <text:p>37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15S" calcext:value-type="time">
            <text:p>12:30:15</text:p>
          </table:table-cell>
          <table:table-cell office:value-type="float" office:value="378" calcext:value-type="float">
            <text:p>37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17S" calcext:value-type="time">
            <text:p>12:30:17</text:p>
          </table:table-cell>
          <table:table-cell office:value-type="float" office:value="475" calcext:value-type="float">
            <text:p>47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19S" calcext:value-type="time">
            <text:p>12:30:19</text:p>
          </table:table-cell>
          <table:table-cell office:value-type="float" office:value="410" calcext:value-type="float">
            <text:p>41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22S" calcext:value-type="time">
            <text:p>12:30:22</text:p>
          </table:table-cell>
          <table:table-cell office:value-type="float" office:value="390" calcext:value-type="float">
            <text:p>39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25S" calcext:value-type="time">
            <text:p>12:30:25</text:p>
          </table:table-cell>
          <table:table-cell office:value-type="float" office:value="560" calcext:value-type="float">
            <text:p>56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27S" calcext:value-type="time">
            <text:p>12:30:27</text:p>
          </table:table-cell>
          <table:table-cell office:value-type="float" office:value="340" calcext:value-type="float">
            <text:p>340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29S" calcext:value-type="time">
            <text:p>12:30:29</text:p>
          </table:table-cell>
          <table:table-cell office:value-type="float" office:value="509" calcext:value-type="float">
            <text:p>509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31S" calcext:value-type="time">
            <text:p>12:30:31</text:p>
          </table:table-cell>
          <table:table-cell office:value-type="float" office:value="589" calcext:value-type="float">
            <text:p>58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33S" calcext:value-type="time">
            <text:p>12:30:33</text:p>
          </table:table-cell>
          <table:table-cell office:value-type="float" office:value="352" calcext:value-type="float">
            <text:p>35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36S" calcext:value-type="time">
            <text:p>12:30:36</text:p>
          </table:table-cell>
          <table:table-cell office:value-type="float" office:value="427" calcext:value-type="float">
            <text:p>427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38S" calcext:value-type="time">
            <text:p>12:30:38</text:p>
          </table:table-cell>
          <table:table-cell office:value-type="float" office:value="580" calcext:value-type="float">
            <text:p>58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40S" calcext:value-type="time">
            <text:p>12:30:40</text:p>
          </table:table-cell>
          <table:table-cell office:value-type="float" office:value="233" calcext:value-type="float">
            <text:p>233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42S" calcext:value-type="time">
            <text:p>12:30:42</text:p>
          </table:table-cell>
          <table:table-cell office:value-type="float" office:value="471" calcext:value-type="float">
            <text:p>47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44S" calcext:value-type="time">
            <text:p>12:30:44</text:p>
          </table:table-cell>
          <table:table-cell office:value-type="float" office:value="656" calcext:value-type="float">
            <text:p>65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47S" calcext:value-type="time">
            <text:p>12:30:47</text:p>
          </table:table-cell>
          <table:table-cell office:value-type="float" office:value="387" calcext:value-type="float">
            <text:p>38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49S" calcext:value-type="time">
            <text:p>12:30:49</text:p>
          </table:table-cell>
          <table:table-cell office:value-type="float" office:value="537" calcext:value-type="float">
            <text:p>53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51S" calcext:value-type="time">
            <text:p>12:30:51</text:p>
          </table:table-cell>
          <table:table-cell office:value-type="float" office:value="393" calcext:value-type="float">
            <text:p>393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53S" calcext:value-type="time">
            <text:p>12:30:53</text:p>
          </table:table-cell>
          <table:table-cell office:value-type="float" office:value="608" calcext:value-type="float">
            <text:p>60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55S" calcext:value-type="time">
            <text:p>12:30:55</text:p>
          </table:table-cell>
          <table:table-cell office:value-type="float" office:value="516" calcext:value-type="float">
            <text:p>51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0M58S" calcext:value-type="time">
            <text:p>12:30:58</text:p>
          </table:table-cell>
          <table:table-cell office:value-type="float" office:value="284" calcext:value-type="float">
            <text:p>28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00S" calcext:value-type="time">
            <text:p>12:31:00</text:p>
          </table:table-cell>
          <table:table-cell office:value-type="float" office:value="500" calcext:value-type="float">
            <text:p>50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02S" calcext:value-type="time">
            <text:p>12:31:02</text:p>
          </table:table-cell>
          <table:table-cell office:value-type="float" office:value="444" calcext:value-type="float">
            <text:p>44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04S" calcext:value-type="time">
            <text:p>12:31:04</text:p>
          </table:table-cell>
          <table:table-cell office:value-type="float" office:value="306" calcext:value-type="float">
            <text:p>30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06S" calcext:value-type="time">
            <text:p>12:31:06</text:p>
          </table:table-cell>
          <table:table-cell office:value-type="float" office:value="422" calcext:value-type="float">
            <text:p>42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09S" calcext:value-type="time">
            <text:p>12:31:09</text:p>
          </table:table-cell>
          <table:table-cell office:value-type="float" office:value="609" calcext:value-type="float">
            <text:p>60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11S" calcext:value-type="time">
            <text:p>12:31:11</text:p>
          </table:table-cell>
          <table:table-cell office:value-type="float" office:value="626" calcext:value-type="float">
            <text:p>62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13S" calcext:value-type="time">
            <text:p>12:31:13</text:p>
          </table:table-cell>
          <table:table-cell office:value-type="float" office:value="421" calcext:value-type="float">
            <text:p>42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15S" calcext:value-type="time">
            <text:p>12:31:15</text:p>
          </table:table-cell>
          <table:table-cell office:value-type="float" office:value="502" calcext:value-type="float">
            <text:p>502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18S" calcext:value-type="time">
            <text:p>12:31:18</text:p>
          </table:table-cell>
          <table:table-cell office:value-type="float" office:value="304" calcext:value-type="float">
            <text:p>30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20S" calcext:value-type="time">
            <text:p>12:31:20</text:p>
          </table:table-cell>
          <table:table-cell office:value-type="float" office:value="490" calcext:value-type="float">
            <text:p>49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22S" calcext:value-type="time">
            <text:p>12:31:22</text:p>
          </table:table-cell>
          <table:table-cell office:value-type="float" office:value="430" calcext:value-type="float">
            <text:p>43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24S" calcext:value-type="time">
            <text:p>12:31:24</text:p>
          </table:table-cell>
          <table:table-cell office:value-type="float" office:value="532" calcext:value-type="float">
            <text:p>53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26S" calcext:value-type="time">
            <text:p>12:31:26</text:p>
          </table:table-cell>
          <table:table-cell office:value-type="float" office:value="628" calcext:value-type="float">
            <text:p>628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29S" calcext:value-type="time">
            <text:p>12:31:29</text:p>
          </table:table-cell>
          <table:table-cell office:value-type="float" office:value="397" calcext:value-type="float">
            <text:p>397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31S" calcext:value-type="time">
            <text:p>12:31:31</text:p>
          </table:table-cell>
          <table:table-cell office:value-type="float" office:value="424" calcext:value-type="float">
            <text:p>42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33S" calcext:value-type="time">
            <text:p>12:31:33</text:p>
          </table:table-cell>
          <table:table-cell office:value-type="float" office:value="479" calcext:value-type="float">
            <text:p>479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35S" calcext:value-type="time">
            <text:p>12:31:35</text:p>
          </table:table-cell>
          <table:table-cell office:value-type="float" office:value="219" calcext:value-type="float">
            <text:p>21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38S" calcext:value-type="time">
            <text:p>12:31:38</text:p>
          </table:table-cell>
          <table:table-cell office:value-type="float" office:value="347" calcext:value-type="float">
            <text:p>34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40S" calcext:value-type="time">
            <text:p>12:31:40</text:p>
          </table:table-cell>
          <table:table-cell office:value-type="float" office:value="671" calcext:value-type="float">
            <text:p>67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42S" calcext:value-type="time">
            <text:p>12:31:42</text:p>
          </table:table-cell>
          <table:table-cell office:value-type="float" office:value="307" calcext:value-type="float">
            <text:p>30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44S" calcext:value-type="time">
            <text:p>12:31:44</text:p>
          </table:table-cell>
          <table:table-cell office:value-type="float" office:value="576" calcext:value-type="float">
            <text:p>576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46S" calcext:value-type="time">
            <text:p>12:31:46</text:p>
          </table:table-cell>
          <table:table-cell office:value-type="float" office:value="447" calcext:value-type="float">
            <text:p>44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49S" calcext:value-type="time">
            <text:p>12:31:49</text:p>
          </table:table-cell>
          <table:table-cell office:value-type="float" office:value="361" calcext:value-type="float">
            <text:p>36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51S" calcext:value-type="time">
            <text:p>12:31:51</text:p>
          </table:table-cell>
          <table:table-cell office:value-type="float" office:value="411" calcext:value-type="float">
            <text:p>411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53S" calcext:value-type="time">
            <text:p>12:31:53</text:p>
          </table:table-cell>
          <table:table-cell office:value-type="float" office:value="251" calcext:value-type="float">
            <text:p>25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55S" calcext:value-type="time">
            <text:p>12:31:55</text:p>
          </table:table-cell>
          <table:table-cell office:value-type="float" office:value="398" calcext:value-type="float">
            <text:p>398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1M58S" calcext:value-type="time">
            <text:p>12:31:58</text:p>
          </table:table-cell>
          <table:table-cell office:value-type="float" office:value="359" calcext:value-type="float">
            <text:p>359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00S" calcext:value-type="time">
            <text:p>12:32:00</text:p>
          </table:table-cell>
          <table:table-cell office:value-type="float" office:value="507" calcext:value-type="float">
            <text:p>50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02S" calcext:value-type="time">
            <text:p>12:32:02</text:p>
          </table:table-cell>
          <table:table-cell office:value-type="float" office:value="125" calcext:value-type="float">
            <text:p>125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04S" calcext:value-type="time">
            <text:p>12:32:04</text:p>
          </table:table-cell>
          <table:table-cell office:value-type="float" office:value="368" calcext:value-type="float">
            <text:p>36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07S" calcext:value-type="time">
            <text:p>12:32:07</text:p>
          </table:table-cell>
          <table:table-cell table:number-columns-repeated="2"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09S" calcext:value-type="time">
            <text:p>12:32:09</text:p>
          </table:table-cell>
          <table:table-cell office:value-type="float" office:value="270" calcext:value-type="float">
            <text:p>27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11S" calcext:value-type="time">
            <text:p>12:32:11</text:p>
          </table:table-cell>
          <table:table-cell office:value-type="float" office:value="542" calcext:value-type="float">
            <text:p>54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13S" calcext:value-type="time">
            <text:p>12:32:13</text:p>
          </table:table-cell>
          <table:table-cell office:value-type="float" office:value="277" calcext:value-type="float">
            <text:p>27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15S" calcext:value-type="time">
            <text:p>12:32:15</text:p>
          </table:table-cell>
          <table:table-cell office:value-type="float" office:value="38" calcext:value-type="float">
            <text:p>3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18S" calcext:value-type="time">
            <text:p>12:32:18</text:p>
          </table:table-cell>
          <table:table-cell office:value-type="float" office:value="282" calcext:value-type="float">
            <text:p>28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20S" calcext:value-type="time">
            <text:p>12:32:20</text:p>
          </table:table-cell>
          <table:table-cell office:value-type="float" office:value="447" calcext:value-type="float">
            <text:p>44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22S" calcext:value-type="time">
            <text:p>12:32:2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24S" calcext:value-type="time">
            <text:p>12:32:24</text:p>
          </table:table-cell>
          <table:table-cell office:value-type="float" office:value="307" calcext:value-type="float">
            <text:p>30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27S" calcext:value-type="time">
            <text:p>12:32:27</text:p>
          </table:table-cell>
          <table:table-cell office:value-type="float" office:value="212" calcext:value-type="float">
            <text:p>21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29S" calcext:value-type="time">
            <text:p>12:32:29</text:p>
          </table:table-cell>
          <table:table-cell office:value-type="float" office:value="225" calcext:value-type="float">
            <text:p>22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31S" calcext:value-type="time">
            <text:p>12:32:31</text:p>
          </table:table-cell>
          <table:table-cell office:value-type="float" office:value="351" calcext:value-type="float">
            <text:p>35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33S" calcext:value-type="time">
            <text:p>12:32:33</text:p>
          </table:table-cell>
          <table:table-cell office:value-type="float" office:value="309" calcext:value-type="float">
            <text:p>30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36S" calcext:value-type="time">
            <text:p>12:32:36</text:p>
          </table:table-cell>
          <table:table-cell office:value-type="float" office:value="540" calcext:value-type="float">
            <text:p>54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38S" calcext:value-type="time">
            <text:p>12:32:38</text:p>
          </table:table-cell>
          <table:table-cell office:value-type="float" office:value="186" calcext:value-type="float">
            <text:p>18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40S" calcext:value-type="time">
            <text:p>12:32:40</text:p>
          </table:table-cell>
          <table:table-cell office:value-type="float" office:value="370" calcext:value-type="float">
            <text:p>37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42S" calcext:value-type="time">
            <text:p>12:32:42</text:p>
          </table:table-cell>
          <table:table-cell office:value-type="float" office:value="510" calcext:value-type="float">
            <text:p>51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45S" calcext:value-type="time">
            <text:p>12:32:45</text:p>
          </table:table-cell>
          <table:table-cell office:value-type="float" office:value="373" calcext:value-type="float">
            <text:p>37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47S" calcext:value-type="time">
            <text:p>12:32:47</text:p>
          </table:table-cell>
          <table:table-cell office:value-type="float" office:value="73" calcext:value-type="float">
            <text:p>73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49S" calcext:value-type="time">
            <text:p>12:32:49</text:p>
          </table:table-cell>
          <table:table-cell office:value-type="float" office:value="117" calcext:value-type="float">
            <text:p>117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51S" calcext:value-type="time">
            <text:p>12:32:51</text:p>
          </table:table-cell>
          <table:table-cell office:value-type="float" office:value="164" calcext:value-type="float">
            <text:p>164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54S" calcext:value-type="time">
            <text:p>12:32:54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56S" calcext:value-type="time">
            <text:p>12:32:56</text:p>
          </table:table-cell>
          <table:table-cell office:value-type="float" office:value="81" calcext:value-type="float">
            <text:p>8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2M58S" calcext:value-type="time">
            <text:p>12:32:58</text:p>
          </table:table-cell>
          <table:table-cell office:value-type="float" office:value="422" calcext:value-type="float">
            <text:p>42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00S" calcext:value-type="time">
            <text:p>12:33:00</text:p>
          </table:table-cell>
          <table:table-cell office:value-type="float" office:value="195" calcext:value-type="float">
            <text:p>19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03S" calcext:value-type="time">
            <text:p>12:33:03</text:p>
          </table:table-cell>
          <table:table-cell office:value-type="float" office:value="385" calcext:value-type="float">
            <text:p>38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05S" calcext:value-type="time">
            <text:p>12:33:05</text:p>
          </table:table-cell>
          <table:table-cell office:value-type="float" office:value="257" calcext:value-type="float">
            <text:p>257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07S" calcext:value-type="time">
            <text:p>12:33:07</text:p>
          </table:table-cell>
          <table:table-cell office:value-type="float" office:value="459" calcext:value-type="float">
            <text:p>459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09S" calcext:value-type="time">
            <text:p>12:33:09</text:p>
          </table:table-cell>
          <table:table-cell office:value-type="float" office:value="27" calcext:value-type="float">
            <text:p>2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12S" calcext:value-type="time">
            <text:p>12:33:12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14S" calcext:value-type="time">
            <text:p>12:33:14</text:p>
          </table:table-cell>
          <table:table-cell office:value-type="float" office:value="448" calcext:value-type="float">
            <text:p>44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16S" calcext:value-type="time">
            <text:p>12:33:16</text:p>
          </table:table-cell>
          <table:table-cell office:value-type="float" office:value="373" calcext:value-type="float">
            <text:p>3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18S" calcext:value-type="time">
            <text:p>12:33:18</text:p>
          </table:table-cell>
          <table:table-cell office:value-type="float" office:value="477" calcext:value-type="float">
            <text:p>477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21S" calcext:value-type="time">
            <text:p>12:33:21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23S" calcext:value-type="time">
            <text:p>12:33:23</text:p>
          </table:table-cell>
          <table:table-cell office:value-type="float" office:value="322" calcext:value-type="float">
            <text:p>32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25S" calcext:value-type="time">
            <text:p>12:33:25</text:p>
          </table:table-cell>
          <table:table-cell office:value-type="float" office:value="535" calcext:value-type="float">
            <text:p>53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28S" calcext:value-type="time">
            <text:p>12:33:28</text:p>
          </table:table-cell>
          <table:table-cell office:value-type="float" office:value="208" calcext:value-type="float">
            <text:p>208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30S" calcext:value-type="time">
            <text:p>12:33:30</text:p>
          </table:table-cell>
          <table:table-cell office:value-type="float" office:value="385" calcext:value-type="float">
            <text:p>38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32S" calcext:value-type="time">
            <text:p>12:33:32</text:p>
          </table:table-cell>
          <table:table-cell office:value-type="float" office:value="427" calcext:value-type="float">
            <text:p>42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34S" calcext:value-type="time">
            <text:p>12:33:34</text:p>
          </table:table-cell>
          <table:table-cell office:value-type="float" office:value="597" calcext:value-type="float">
            <text:p>59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37S" calcext:value-type="time">
            <text:p>12:33:37</text:p>
          </table:table-cell>
          <table:table-cell office:value-type="float" office:value="357" calcext:value-type="float">
            <text:p>35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39S" calcext:value-type="time">
            <text:p>12:33:39</text:p>
          </table:table-cell>
          <table:table-cell office:value-type="float" office:value="205" calcext:value-type="float">
            <text:p>20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41S" calcext:value-type="time">
            <text:p>12:33:41</text:p>
          </table:table-cell>
          <table:table-cell office:value-type="float" office:value="807" calcext:value-type="float">
            <text:p>807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43S" calcext:value-type="time">
            <text:p>12:33:43</text:p>
          </table:table-cell>
          <table:table-cell office:value-type="float" office:value="410" calcext:value-type="float">
            <text:p>41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46S" calcext:value-type="time">
            <text:p>12:33:46</text:p>
          </table:table-cell>
          <table:table-cell office:value-type="float" office:value="115" calcext:value-type="float">
            <text:p>11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48S" calcext:value-type="time">
            <text:p>12:33:48</text:p>
          </table:table-cell>
          <table:table-cell office:value-type="float" office:value="149" calcext:value-type="float">
            <text:p>14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50S" calcext:value-type="time">
            <text:p>12:33:50</text:p>
          </table:table-cell>
          <table:table-cell office:value-type="float" office:value="106" calcext:value-type="float">
            <text:p>10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52S" calcext:value-type="time">
            <text:p>12:33:52</text:p>
          </table:table-cell>
          <table:table-cell office:value-type="float" office:value="18" calcext:value-type="float">
            <text:p>18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55S" calcext:value-type="time">
            <text:p>12:33:55</text:p>
          </table:table-cell>
          <table:table-cell office:value-type="float" office:value="183" calcext:value-type="float">
            <text:p>183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57S" calcext:value-type="time">
            <text:p>12:33:57</text:p>
          </table:table-cell>
          <table:table-cell office:value-type="float" office:value="497" calcext:value-type="float">
            <text:p>49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3M59S" calcext:value-type="time">
            <text:p>12:33:59</text:p>
          </table:table-cell>
          <table:table-cell office:value-type="float" office:value="517" calcext:value-type="float">
            <text:p>51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02S" calcext:value-type="time">
            <text:p>12:34:02</text:p>
          </table:table-cell>
          <table:table-cell office:value-type="float" office:value="169" calcext:value-type="float">
            <text:p>169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04S" calcext:value-type="time">
            <text:p>12:34:04</text:p>
          </table:table-cell>
          <table:table-cell office:value-type="float" office:value="297" calcext:value-type="float">
            <text:p>297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06S" calcext:value-type="time">
            <text:p>12:34:06</text:p>
          </table:table-cell>
          <table:table-cell office:value-type="float" office:value="60" calcext:value-type="float">
            <text:p>6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08S" calcext:value-type="time">
            <text:p>12:34:08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11S" calcext:value-type="time">
            <text:p>12:34:11</text:p>
          </table:table-cell>
          <table:table-cell office:value-type="float" office:value="380" calcext:value-type="float">
            <text:p>38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13S" calcext:value-type="time">
            <text:p>12:34:13</text:p>
          </table:table-cell>
          <table:table-cell office:value-type="float" office:value="597" calcext:value-type="float">
            <text:p>59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15S" calcext:value-type="time">
            <text:p>12:34:15</text:p>
          </table:table-cell>
          <table:table-cell office:value-type="float" office:value="472" calcext:value-type="float">
            <text:p>47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17S" calcext:value-type="time">
            <text:p>12:34:17</text:p>
          </table:table-cell>
          <table:table-cell office:value-type="float" office:value="366" calcext:value-type="float">
            <text:p>36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20S" calcext:value-type="time">
            <text:p>12:34:20</text:p>
          </table:table-cell>
          <table:table-cell office:value-type="float" office:value="232" calcext:value-type="float">
            <text:p>23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22S" calcext:value-type="time">
            <text:p>12:34:22</text:p>
          </table:table-cell>
          <table:table-cell office:value-type="float" office:value="131" calcext:value-type="float">
            <text:p>13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24S" calcext:value-type="time">
            <text:p>12:34:24</text:p>
          </table:table-cell>
          <table:table-cell office:value-type="float" office:value="196" calcext:value-type="float">
            <text:p>19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27S" calcext:value-type="time">
            <text:p>12:34:27</text:p>
          </table:table-cell>
          <table:table-cell office:value-type="float" office:value="136" calcext:value-type="float">
            <text:p>13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29S" calcext:value-type="time">
            <text:p>12:34:29</text:p>
          </table:table-cell>
          <table:table-cell office:value-type="float" office:value="300" calcext:value-type="float">
            <text:p>30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31S" calcext:value-type="time">
            <text:p>12:34:31</text:p>
          </table:table-cell>
          <table:table-cell office:value-type="float" office:value="196" calcext:value-type="float">
            <text:p>19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33S" calcext:value-type="time">
            <text:p>12:34:33</text:p>
          </table:table-cell>
          <table:table-cell office:value-type="float" office:value="38" calcext:value-type="float">
            <text:p>3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36S" calcext:value-type="time">
            <text:p>12:34:36</text:p>
          </table:table-cell>
          <table:table-cell office:value-type="float" office:value="35" calcext:value-type="float">
            <text:p>3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38S" calcext:value-type="time">
            <text:p>12:34:38</text:p>
          </table:table-cell>
          <table:table-cell office:value-type="float" office:value="340" calcext:value-type="float">
            <text:p>34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40S" calcext:value-type="time">
            <text:p>12:34:40</text:p>
          </table:table-cell>
          <table:table-cell office:value-type="float" office:value="246" calcext:value-type="float">
            <text:p>24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43S" calcext:value-type="time">
            <text:p>12:34:43</text:p>
          </table:table-cell>
          <table:table-cell office:value-type="float" office:value="521" calcext:value-type="float">
            <text:p>52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45S" calcext:value-type="time">
            <text:p>12:34:45</text:p>
          </table:table-cell>
          <table:table-cell office:value-type="float" office:value="339" calcext:value-type="float">
            <text:p>33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47S" calcext:value-type="time">
            <text:p>12:34:47</text:p>
          </table:table-cell>
          <table:table-cell office:value-type="float" office:value="19" calcext:value-type="float">
            <text:p>19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49S" calcext:value-type="time">
            <text:p>12:34:49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52S" calcext:value-type="time">
            <text:p>12:34:52</text:p>
          </table:table-cell>
          <table:table-cell office:value-type="float" office:value="283" calcext:value-type="float">
            <text:p>283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54S" calcext:value-type="time">
            <text:p>12:34:54</text:p>
          </table:table-cell>
          <table:table-cell office:value-type="float" office:value="148" calcext:value-type="float">
            <text:p>14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56S" calcext:value-type="time">
            <text:p>12:34:56</text:p>
          </table:table-cell>
          <table:table-cell office:value-type="float" office:value="776" calcext:value-type="float">
            <text:p>77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4M59S" calcext:value-type="time">
            <text:p>12:34:59</text:p>
          </table:table-cell>
          <table:table-cell office:value-type="float" office:value="533" calcext:value-type="float">
            <text:p>533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01S" calcext:value-type="time">
            <text:p>12:35:01</text:p>
          </table:table-cell>
          <table:table-cell office:value-type="float" office:value="139" calcext:value-type="float">
            <text:p>139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03S" calcext:value-type="time">
            <text:p>12:35:03</text:p>
          </table:table-cell>
          <table:table-cell office:value-type="float" office:value="212" calcext:value-type="float">
            <text:p>21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06S" calcext:value-type="time">
            <text:p>12:35:06</text:p>
          </table:table-cell>
          <table:table-cell office:value-type="float" office:value="166" calcext:value-type="float">
            <text:p>1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08S" calcext:value-type="time">
            <text:p>12:35:08</text:p>
          </table:table-cell>
          <table:table-cell office:value-type="float" office:value="282" calcext:value-type="float">
            <text:p>28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10S" calcext:value-type="time">
            <text:p>12:35:10</text:p>
          </table:table-cell>
          <table:table-cell office:value-type="float" office:value="358" calcext:value-type="float">
            <text:p>35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12S" calcext:value-type="time">
            <text:p>12:35:12</text:p>
          </table:table-cell>
          <table:table-cell office:value-type="float" office:value="418" calcext:value-type="float">
            <text:p>41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15S" calcext:value-type="time">
            <text:p>12:35:15</text:p>
          </table:table-cell>
          <table:table-cell office:value-type="float" office:value="596" calcext:value-type="float">
            <text:p>59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17S" calcext:value-type="time">
            <text:p>12:35:17</text:p>
          </table:table-cell>
          <table:table-cell office:value-type="float" office:value="567" calcext:value-type="float">
            <text:p>56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19S" calcext:value-type="time">
            <text:p>12:35:19</text:p>
          </table:table-cell>
          <table:table-cell office:value-type="float" office:value="60" calcext:value-type="float">
            <text:p>6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22S" calcext:value-type="time">
            <text:p>12:35:22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24S" calcext:value-type="time">
            <text:p>12:35:24</text:p>
          </table:table-cell>
          <table:table-cell office:value-type="float" office:value="204" calcext:value-type="float">
            <text:p>20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26S" calcext:value-type="time">
            <text:p>12:35:26</text:p>
          </table:table-cell>
          <table:table-cell office:value-type="float" office:value="42" calcext:value-type="float">
            <text:p>4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29S" calcext:value-type="time">
            <text:p>12:35:29</text:p>
          </table:table-cell>
          <table:table-cell office:value-type="float" office:value="287" calcext:value-type="float">
            <text:p>28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31S" calcext:value-type="time">
            <text:p>12:35:31</text:p>
          </table:table-cell>
          <table:table-cell office:value-type="float" office:value="568" calcext:value-type="float">
            <text:p>56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33S" calcext:value-type="time">
            <text:p>12:35:33</text:p>
          </table:table-cell>
          <table:table-cell office:value-type="float" office:value="232" calcext:value-type="float">
            <text:p>23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35S" calcext:value-type="time">
            <text:p>12:35:35</text:p>
          </table:table-cell>
          <table:table-cell office:value-type="float" office:value="133" calcext:value-type="float">
            <text:p>13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38S" calcext:value-type="time">
            <text:p>12:35:38</text:p>
          </table:table-cell>
          <table:table-cell office:value-type="float" office:value="128" calcext:value-type="float">
            <text:p>128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40S" calcext:value-type="time">
            <text:p>12:35:40</text:p>
          </table:table-cell>
          <table:table-cell office:value-type="float" office:value="212" calcext:value-type="float">
            <text:p>21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42S" calcext:value-type="time">
            <text:p>12:35:42</text:p>
          </table:table-cell>
          <table:table-cell office:value-type="float" office:value="627" calcext:value-type="float">
            <text:p>627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45S" calcext:value-type="time">
            <text:p>12:35:45</text:p>
          </table:table-cell>
          <table:table-cell office:value-type="float" office:value="137" calcext:value-type="float">
            <text:p>13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47S" calcext:value-type="time">
            <text:p>12:35:47</text:p>
          </table:table-cell>
          <table:table-cell office:value-type="float" office:value="282" calcext:value-type="float">
            <text:p>28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49S" calcext:value-type="time">
            <text:p>12:35:49</text:p>
          </table:table-cell>
          <table:table-cell office:value-type="float" office:value="268" calcext:value-type="float">
            <text:p>26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52S" calcext:value-type="time">
            <text:p>12:35:52</text:p>
          </table:table-cell>
          <table:table-cell office:value-type="float" office:value="353" calcext:value-type="float">
            <text:p>353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54S" calcext:value-type="time">
            <text:p>12:35:54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56S" calcext:value-type="time">
            <text:p>12:35:56</text:p>
          </table:table-cell>
          <table:table-cell office:value-type="float" office:value="96" calcext:value-type="float">
            <text:p>9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5M59S" calcext:value-type="time">
            <text:p>12:35:59</text:p>
          </table:table-cell>
          <table:table-cell office:value-type="float" office:value="114" calcext:value-type="float">
            <text:p>11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01S" calcext:value-type="time">
            <text:p>12:36:01</text:p>
          </table:table-cell>
          <table:table-cell office:value-type="float" office:value="255" calcext:value-type="float">
            <text:p>25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03S" calcext:value-type="time">
            <text:p>12:36:03</text:p>
          </table:table-cell>
          <table:table-cell office:value-type="float" office:value="354" calcext:value-type="float">
            <text:p>35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06S" calcext:value-type="time">
            <text:p>12:36:06</text:p>
          </table:table-cell>
          <table:table-cell office:value-type="float" office:value="121" calcext:value-type="float">
            <text:p>12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08S" calcext:value-type="time">
            <text:p>12:36:08</text:p>
          </table:table-cell>
          <table:table-cell office:value-type="float" office:value="432" calcext:value-type="float">
            <text:p>43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10S" calcext:value-type="time">
            <text:p>12:36:10</text:p>
          </table:table-cell>
          <table:table-cell office:value-type="float" office:value="83" calcext:value-type="float">
            <text:p>83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13S" calcext:value-type="time">
            <text:p>12:36:13</text:p>
          </table:table-cell>
          <table:table-cell office:value-type="float" office:value="475" calcext:value-type="float">
            <text:p>47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15S" calcext:value-type="time">
            <text:p>12:36:15</text:p>
          </table:table-cell>
          <table:table-cell office:value-type="float" office:value="394" calcext:value-type="float">
            <text:p>39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17S" calcext:value-type="time">
            <text:p>12:36:17</text:p>
          </table:table-cell>
          <table:table-cell office:value-type="float" office:value="97" calcext:value-type="float">
            <text:p>97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20S" calcext:value-type="time">
            <text:p>12:36:20</text:p>
          </table:table-cell>
          <table:table-cell office:value-type="float" office:value="252" calcext:value-type="float">
            <text:p>25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22S" calcext:value-type="time">
            <text:p>12:36:22</text:p>
          </table:table-cell>
          <table:table-cell table:number-columns-repeated="2"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24S" calcext:value-type="time">
            <text:p>12:36:24</text:p>
          </table:table-cell>
          <table:table-cell office:value-type="float" office:value="583" calcext:value-type="float">
            <text:p>58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26S" calcext:value-type="time">
            <text:p>12:36:26</text:p>
          </table:table-cell>
          <table:table-cell office:value-type="float" office:value="171" calcext:value-type="float">
            <text:p>17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29S" calcext:value-type="time">
            <text:p>12:36:29</text:p>
          </table:table-cell>
          <table:table-cell office:value-type="float" office:value="143" calcext:value-type="float">
            <text:p>143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31S" calcext:value-type="time">
            <text:p>12:36:31</text:p>
          </table:table-cell>
          <table:table-cell office:value-type="float" office:value="291" calcext:value-type="float">
            <text:p>29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33S" calcext:value-type="time">
            <text:p>12:36:33</text:p>
          </table:table-cell>
          <table:table-cell office:value-type="float" office:value="226" calcext:value-type="float">
            <text:p>22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36S" calcext:value-type="time">
            <text:p>12:36:36</text:p>
          </table:table-cell>
          <table:table-cell office:value-type="float" office:value="278" calcext:value-type="float">
            <text:p>27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38S" calcext:value-type="time">
            <text:p>12:36:38</text:p>
          </table:table-cell>
          <table:table-cell office:value-type="float" office:value="39" calcext:value-type="float">
            <text:p>39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40S" calcext:value-type="time">
            <text:p>12:36:40</text:p>
          </table:table-cell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43S" calcext:value-type="time">
            <text:p>12:36:43</text:p>
          </table:table-cell>
          <table:table-cell office:value-type="float" office:value="149" calcext:value-type="float">
            <text:p>149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45S" calcext:value-type="time">
            <text:p>12:36:45</text:p>
          </table:table-cell>
          <table:table-cell office:value-type="float" office:value="16" calcext:value-type="float">
            <text:p>16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47S" calcext:value-type="time">
            <text:p>12:36:47</text:p>
          </table:table-cell>
          <table:table-cell office:value-type="float" office:value="85" calcext:value-type="float">
            <text:p>8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50S" calcext:value-type="time">
            <text:p>12:36:50</text:p>
          </table:table-cell>
          <table:table-cell office:value-type="float" office:value="6" calcext:value-type="float">
            <text:p>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52S" calcext:value-type="time">
            <text:p>12:36:52</text:p>
          </table:table-cell>
          <table:table-cell office:value-type="float" office:value="66" calcext:value-type="float">
            <text:p>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54S" calcext:value-type="time">
            <text:p>12:36:54</text:p>
          </table:table-cell>
          <table:table-cell office:value-type="float" office:value="241" calcext:value-type="float">
            <text:p>24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57S" calcext:value-type="time">
            <text:p>12:36:57</text:p>
          </table:table-cell>
          <table:table-cell office:value-type="float" office:value="66" calcext:value-type="float">
            <text:p>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6M59S" calcext:value-type="time">
            <text:p>12:36:59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01S" calcext:value-type="time">
            <text:p>12:37:01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04S" calcext:value-type="time">
            <text:p>12:37:04</text:p>
          </table:table-cell>
          <table:table-cell office:value-type="float" office:value="121" calcext:value-type="float">
            <text:p>121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06S" calcext:value-type="time">
            <text:p>12:37:06</text:p>
          </table:table-cell>
          <table:table-cell office:value-type="float" office:value="311" calcext:value-type="float">
            <text:p>31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08S" calcext:value-type="time">
            <text:p>12:37:08</text:p>
          </table:table-cell>
          <table:table-cell office:value-type="float" office:value="449" calcext:value-type="float">
            <text:p>449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11S" calcext:value-type="time">
            <text:p>12:37:11</text:p>
          </table:table-cell>
          <table:table-cell office:value-type="float" office:value="22" calcext:value-type="float">
            <text:p>2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13S" calcext:value-type="time">
            <text:p>12:37:13</text:p>
          </table:table-cell>
          <table:table-cell office:value-type="float" office:value="13" calcext:value-type="float">
            <text:p>1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15S" calcext:value-type="time">
            <text:p>12:37:15</text:p>
          </table:table-cell>
          <table:table-cell office:value-type="float" office:value="403" calcext:value-type="float">
            <text:p>40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18S" calcext:value-type="time">
            <text:p>12:37:18</text:p>
          </table:table-cell>
          <table:table-cell office:value-type="float" office:value="470" calcext:value-type="float">
            <text:p>47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20S" calcext:value-type="time">
            <text:p>12:37:20</text:p>
          </table:table-cell>
          <table:table-cell office:value-type="float" office:value="316" calcext:value-type="float">
            <text:p>31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23S" calcext:value-type="time">
            <text:p>12:37:23</text:p>
          </table:table-cell>
          <table:table-cell office:value-type="float" office:value="109" calcext:value-type="float">
            <text:p>10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25S" calcext:value-type="time">
            <text:p>12:37:25</text:p>
          </table:table-cell>
          <table:table-cell office:value-type="float" office:value="50" calcext:value-type="float">
            <text:p>5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27S" calcext:value-type="time">
            <text:p>12:37:27</text:p>
          </table:table-cell>
          <table:table-cell office:value-type="float" office:value="32" calcext:value-type="float">
            <text:p>3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30S" calcext:value-type="time">
            <text:p>12:37:30</text:p>
          </table:table-cell>
          <table:table-cell office:value-type="float" office:value="32" calcext:value-type="float">
            <text:p>3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32S" calcext:value-type="time">
            <text:p>12:37:32</text:p>
          </table:table-cell>
          <table:table-cell office:value-type="float" office:value="75" calcext:value-type="float">
            <text:p>7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34S" calcext:value-type="time">
            <text:p>12:37:34</text:p>
          </table:table-cell>
          <table:table-cell office:value-type="float" office:value="773" calcext:value-type="float">
            <text:p>773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37S" calcext:value-type="time">
            <text:p>12:37:37</text:p>
          </table:table-cell>
          <table:table-cell office:value-type="float" office:value="473" calcext:value-type="float">
            <text:p>473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39S" calcext:value-type="time">
            <text:p>12:37:39</text:p>
          </table:table-cell>
          <table:table-cell office:value-type="float" office:value="481" calcext:value-type="float">
            <text:p>48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41S" calcext:value-type="time">
            <text:p>12:37:41</text:p>
          </table:table-cell>
          <table:table-cell office:value-type="float" office:value="519" calcext:value-type="float">
            <text:p>519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44S" calcext:value-type="time">
            <text:p>12:37:44</text:p>
          </table:table-cell>
          <table:table-cell office:value-type="float" office:value="89" calcext:value-type="float">
            <text:p>8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46S" calcext:value-type="time">
            <text:p>12:37:46</text:p>
          </table:table-cell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48S" calcext:value-type="time">
            <text:p>12:37:48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51S" calcext:value-type="time">
            <text:p>12:37:51</text:p>
          </table:table-cell>
          <table:table-cell office:value-type="float" office:value="450" calcext:value-type="float">
            <text:p>45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53S" calcext:value-type="time">
            <text:p>12:37:53</text:p>
          </table:table-cell>
          <table:table-cell office:value-type="float" office:value="421" calcext:value-type="float">
            <text:p>42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55S" calcext:value-type="time">
            <text:p>12:37:55</text:p>
          </table:table-cell>
          <table:table-cell office:value-type="float" office:value="13" calcext:value-type="float">
            <text:p>13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7M58S" calcext:value-type="time">
            <text:p>12:37:58</text:p>
          </table:table-cell>
          <table:table-cell office:value-type="float" office:value="493" calcext:value-type="float">
            <text:p>49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00S" calcext:value-type="time">
            <text:p>12:38:00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03S" calcext:value-type="time">
            <text:p>12:38:03</text:p>
          </table:table-cell>
          <table:table-cell office:value-type="float" office:value="142" calcext:value-type="float">
            <text:p>14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05S" calcext:value-type="time">
            <text:p>12:38:05</text:p>
          </table:table-cell>
          <table:table-cell office:value-type="float" office:value="548" calcext:value-type="float">
            <text:p>54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07S" calcext:value-type="time">
            <text:p>12:38:07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10S" calcext:value-type="time">
            <text:p>12:38:10</text:p>
          </table:table-cell>
          <table:table-cell office:value-type="float" office:value="783" calcext:value-type="float">
            <text:p>78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12S" calcext:value-type="time">
            <text:p>12:38:12</text:p>
          </table:table-cell>
          <table:table-cell office:value-type="float" office:value="334" calcext:value-type="float">
            <text:p>33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14S" calcext:value-type="time">
            <text:p>12:38:14</text:p>
          </table:table-cell>
          <table:table-cell office:value-type="float" office:value="849" calcext:value-type="float">
            <text:p>84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17S" calcext:value-type="time">
            <text:p>12:38:17</text:p>
          </table:table-cell>
          <table:table-cell office:value-type="float" office:value="74" calcext:value-type="float">
            <text:p>7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19S" calcext:value-type="time">
            <text:p>12:38:19</text:p>
          </table:table-cell>
          <table:table-cell office:value-type="float" office:value="25" calcext:value-type="float">
            <text:p>2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21S" calcext:value-type="time">
            <text:p>12:38:21</text:p>
          </table:table-cell>
          <table:table-cell office:value-type="float" office:value="465" calcext:value-type="float">
            <text:p>465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24S" calcext:value-type="time">
            <text:p>12:38:24</text:p>
          </table:table-cell>
          <table:table-cell office:value-type="float" office:value="381" calcext:value-type="float">
            <text:p>38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26S" calcext:value-type="time">
            <text:p>12:38:26</text:p>
          </table:table-cell>
          <table:table-cell office:value-type="float" office:value="151" calcext:value-type="float">
            <text:p>15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29S" calcext:value-type="time">
            <text:p>12:38:29</text:p>
          </table:table-cell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31S" calcext:value-type="time">
            <text:p>12:38:31</text:p>
          </table:table-cell>
          <table:table-cell office:value-type="float" office:value="267" calcext:value-type="float">
            <text:p>26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33S" calcext:value-type="time">
            <text:p>12:38:33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36S" calcext:value-type="time">
            <text:p>12:38:36</text:p>
          </table:table-cell>
          <table:table-cell office:value-type="float" office:value="424" calcext:value-type="float">
            <text:p>42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38S" calcext:value-type="time">
            <text:p>12:38:38</text:p>
          </table:table-cell>
          <table:table-cell office:value-type="float" office:value="641" calcext:value-type="float">
            <text:p>64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40S" calcext:value-type="time">
            <text:p>12:38:40</text:p>
          </table:table-cell>
          <table:table-cell office:value-type="float" office:value="137" calcext:value-type="float">
            <text:p>13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43S" calcext:value-type="time">
            <text:p>12:38:43</text:p>
          </table:table-cell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45S" calcext:value-type="time">
            <text:p>12:38:45</text:p>
          </table:table-cell>
          <table:table-cell office:value-type="float" office:value="150" calcext:value-type="float">
            <text:p>15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48S" calcext:value-type="time">
            <text:p>12:38:48</text:p>
          </table:table-cell>
          <table:table-cell office:value-type="float" office:value="327" calcext:value-type="float">
            <text:p>32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50S" calcext:value-type="time">
            <text:p>12:38:50</text:p>
          </table:table-cell>
          <table:table-cell office:value-type="float" office:value="21" calcext:value-type="float">
            <text:p>2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52S" calcext:value-type="time">
            <text:p>12:38:52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55S" calcext:value-type="time">
            <text:p>12:38:55</text:p>
          </table:table-cell>
          <table:table-cell office:value-type="float" office:value="9" calcext:value-type="float">
            <text:p>9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57S" calcext:value-type="time">
            <text:p>12:38:57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8M59S" calcext:value-type="time">
            <text:p>12:38:59</text:p>
          </table:table-cell>
          <table:table-cell office:value-type="float" office:value="270" calcext:value-type="float">
            <text:p>27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02S" calcext:value-type="time">
            <text:p>12:39:02</text:p>
          </table:table-cell>
          <table:table-cell office:value-type="float" office:value="923" calcext:value-type="float">
            <text:p>923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04S" calcext:value-type="time">
            <text:p>12:39:04</text:p>
          </table:table-cell>
          <table:table-cell office:value-type="float" office:value="78" calcext:value-type="float">
            <text:p>7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07S" calcext:value-type="time">
            <text:p>12:39:07</text:p>
          </table:table-cell>
          <table:table-cell office:value-type="float" office:value="58" calcext:value-type="float">
            <text:p>5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09S" calcext:value-type="time">
            <text:p>12:39:09</text:p>
          </table:table-cell>
          <table:table-cell office:value-type="float" office:value="377" calcext:value-type="float">
            <text:p>37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11S" calcext:value-type="time">
            <text:p>12:39:11</text:p>
          </table:table-cell>
          <table:table-cell office:value-type="float" office:value="78" calcext:value-type="float">
            <text:p>78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14S" calcext:value-type="time">
            <text:p>12:39:14</text:p>
          </table:table-cell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16S" calcext:value-type="time">
            <text:p>12:39:16</text:p>
          </table:table-cell>
          <table:table-cell office:value-type="float" office:value="31" calcext:value-type="float">
            <text:p>3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18S" calcext:value-type="time">
            <text:p>12:39:18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21S" calcext:value-type="time">
            <text:p>12:39:21</text:p>
          </table:table-cell>
          <table:table-cell office:value-type="float" office:value="136" calcext:value-type="float">
            <text:p>13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23S" calcext:value-type="time">
            <text:p>12:39:23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26S" calcext:value-type="time">
            <text:p>12:39:26</text:p>
          </table:table-cell>
          <table:table-cell office:value-type="float" office:value="40" calcext:value-type="float">
            <text:p>4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28S" calcext:value-type="time">
            <text:p>12:39:28</text:p>
          </table:table-cell>
          <table:table-cell office:value-type="float" office:value="86" calcext:value-type="float">
            <text:p>8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30S" calcext:value-type="time">
            <text:p>12:39:30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33S" calcext:value-type="time">
            <text:p>12:39:33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35S" calcext:value-type="time">
            <text:p>12:39:35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38S" calcext:value-type="time">
            <text:p>12:39:38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40S" calcext:value-type="time">
            <text:p>12:39:40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42S" calcext:value-type="time">
            <text:p>12:39:42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45S" calcext:value-type="time">
            <text:p>12:39:45</text:p>
          </table:table-cell>
          <table:table-cell office:value-type="float" office:value="175" calcext:value-type="float">
            <text:p>17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47S" calcext:value-type="time">
            <text:p>12:39:47</text:p>
          </table:table-cell>
          <table:table-cell office:value-type="float" office:value="43" calcext:value-type="float">
            <text:p>4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50S" calcext:value-type="time">
            <text:p>12:39:50</text:p>
          </table:table-cell>
          <table:table-cell office:value-type="float" office:value="155" calcext:value-type="float">
            <text:p>15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52S" calcext:value-type="time">
            <text:p>12:39:52</text:p>
          </table:table-cell>
          <table:table-cell office:value-type="float" office:value="171" calcext:value-type="float">
            <text:p>1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54S" calcext:value-type="time">
            <text:p>12:39:54</text:p>
          </table:table-cell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57S" calcext:value-type="time">
            <text:p>12:39:57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39M59S" calcext:value-type="time">
            <text:p>12:39:59</text:p>
          </table:table-cell>
          <table:table-cell office:value-type="float" office:value="61" calcext:value-type="float">
            <text:p>6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02S" calcext:value-type="time">
            <text:p>12:40:02</text:p>
          </table:table-cell>
          <table:table-cell office:value-type="float" office:value="56" calcext:value-type="float">
            <text:p>5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04S" calcext:value-type="time">
            <text:p>12:40:04</text:p>
          </table:table-cell>
          <table:table-cell office:value-type="float" office:value="57" calcext:value-type="float">
            <text:p>57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06S" calcext:value-type="time">
            <text:p>12:40:06</text:p>
          </table:table-cell>
          <table:table-cell office:value-type="float" office:value="87" calcext:value-type="float">
            <text:p>87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09S" calcext:value-type="time">
            <text:p>12:40:09</text:p>
          </table:table-cell>
          <table:table-cell office:value-type="float" office:value="114" calcext:value-type="float">
            <text:p>11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11S" calcext:value-type="time">
            <text:p>12:40:11</text:p>
          </table:table-cell>
          <table:table-cell office:value-type="float" office:value="209" calcext:value-type="float">
            <text:p>20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14S" calcext:value-type="time">
            <text:p>12:40:14</text:p>
          </table:table-cell>
          <table:table-cell office:value-type="float" office:value="253" calcext:value-type="float">
            <text:p>25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16S" calcext:value-type="time">
            <text:p>12:40:16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18S" calcext:value-type="time">
            <text:p>12:40:18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21S" calcext:value-type="time">
            <text:p>12:40:2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23S" calcext:value-type="time">
            <text:p>12:40:23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26S" calcext:value-type="time">
            <text:p>12:40:26</text:p>
          </table:table-cell>
          <table:table-cell office:value-type="float" office:value="27" calcext:value-type="float">
            <text:p>2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28S" calcext:value-type="time">
            <text:p>12:40:28</text:p>
          </table:table-cell>
          <table:table-cell office:value-type="float" office:value="684" calcext:value-type="float">
            <text:p>68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30S" calcext:value-type="time">
            <text:p>12:40:30</text:p>
          </table:table-cell>
          <table:table-cell office:value-type="float" office:value="28" calcext:value-type="float">
            <text:p>28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33S" calcext:value-type="time">
            <text:p>12:40:33</text:p>
          </table:table-cell>
          <table:table-cell office:value-type="float" office:value="478" calcext:value-type="float">
            <text:p>47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35S" calcext:value-type="time">
            <text:p>12:40:35</text:p>
          </table:table-cell>
          <table:table-cell office:value-type="float" office:value="27" calcext:value-type="float">
            <text:p>27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38S" calcext:value-type="time">
            <text:p>12:40:38</text:p>
          </table:table-cell>
          <table:table-cell office:value-type="float" office:value="486" calcext:value-type="float">
            <text:p>48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40S" calcext:value-type="time">
            <text:p>12:40:40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42S" calcext:value-type="time">
            <text:p>12:40:42</text:p>
          </table:table-cell>
          <table:table-cell office:value-type="float" office:value="11" calcext:value-type="float">
            <text:p>1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45S" calcext:value-type="time">
            <text:p>12:40:45</text:p>
          </table:table-cell>
          <table:table-cell office:value-type="float" office:value="153" calcext:value-type="float">
            <text:p>153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47S" calcext:value-type="time">
            <text:p>12:40:47</text:p>
          </table:table-cell>
          <table:table-cell office:value-type="float" office:value="61" calcext:value-type="float">
            <text:p>61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50S" calcext:value-type="time">
            <text:p>12:40:50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52S" calcext:value-type="time">
            <text:p>12:40:52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54S" calcext:value-type="time">
            <text:p>12:40:54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57S" calcext:value-type="time">
            <text:p>12:40:57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0M59S" calcext:value-type="time">
            <text:p>12:40:59</text:p>
          </table:table-cell>
          <table:table-cell office:value-type="float" office:value="205" calcext:value-type="float">
            <text:p>20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02S" calcext:value-type="time">
            <text:p>12:41:02</text:p>
          </table:table-cell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04S" calcext:value-type="time">
            <text:p>12:41:04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07S" calcext:value-type="time">
            <text:p>12:41:07</text:p>
          </table:table-cell>
          <table:table-cell office:value-type="float" office:value="214" calcext:value-type="float">
            <text:p>21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09S" calcext:value-type="time">
            <text:p>12:41:09</text:p>
          </table:table-cell>
          <table:table-cell office:value-type="float" office:value="37" calcext:value-type="float">
            <text:p>3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11S" calcext:value-type="time">
            <text:p>12:41:11</text:p>
          </table:table-cell>
          <table:table-cell office:value-type="float" office:value="38" calcext:value-type="float">
            <text:p>38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14S" calcext:value-type="time">
            <text:p>12:41:14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16S" calcext:value-type="time">
            <text:p>12:41:16</text:p>
          </table:table-cell>
          <table:table-cell office:value-type="float" office:value="41" calcext:value-type="float">
            <text:p>4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19S" calcext:value-type="time">
            <text:p>12:41:19</text:p>
          </table:table-cell>
          <table:table-cell office:value-type="float" office:value="74" calcext:value-type="float">
            <text:p>7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21S" calcext:value-type="time">
            <text:p>12:41:21</text:p>
          </table:table-cell>
          <table:table-cell office:value-type="float" office:value="155" calcext:value-type="float">
            <text:p>15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24S" calcext:value-type="time">
            <text:p>12:41:24</text:p>
          </table:table-cell>
          <table:table-cell office:value-type="float" office:value="53" calcext:value-type="float">
            <text:p>5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26S" calcext:value-type="time">
            <text:p>12:41:26</text:p>
          </table:table-cell>
          <table:table-cell office:value-type="float" office:value="123" calcext:value-type="float">
            <text:p>12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28S" calcext:value-type="time">
            <text:p>12:41:28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31S" calcext:value-type="time">
            <text:p>12:41:31</text:p>
          </table:table-cell>
          <table:table-cell office:value-type="float" office:value="79" calcext:value-type="float">
            <text:p>7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33S" calcext:value-type="time">
            <text:p>12:41:33</text:p>
          </table:table-cell>
          <table:table-cell office:value-type="float" office:value="24" calcext:value-type="float">
            <text:p>2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36S" calcext:value-type="time">
            <text:p>12:41:36</text:p>
          </table:table-cell>
          <table:table-cell office:value-type="float" office:value="49" calcext:value-type="float">
            <text:p>49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38S" calcext:value-type="time">
            <text:p>12:41:38</text:p>
          </table:table-cell>
          <table:table-cell office:value-type="float" office:value="47" calcext:value-type="float">
            <text:p>4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41S" calcext:value-type="time">
            <text:p>12:41:41</text:p>
          </table:table-cell>
          <table:table-cell office:value-type="float" office:value="69" calcext:value-type="float">
            <text:p>69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43S" calcext:value-type="time">
            <text:p>12:41:43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45S" calcext:value-type="time">
            <text:p>12:41:45</text:p>
          </table:table-cell>
          <table:table-cell office:value-type="float" office:value="68" calcext:value-type="float">
            <text:p>6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48S" calcext:value-type="time">
            <text:p>12:41:48</text:p>
          </table:table-cell>
          <table:table-cell office:value-type="float" office:value="84" calcext:value-type="float">
            <text:p>8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50S" calcext:value-type="time">
            <text:p>12:41:50</text:p>
          </table:table-cell>
          <table:table-cell office:value-type="float" office:value="88" calcext:value-type="float">
            <text:p>8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53S" calcext:value-type="time">
            <text:p>12:41:53</text:p>
          </table:table-cell>
          <table:table-cell office:value-type="float" office:value="128" calcext:value-type="float">
            <text:p>12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55S" calcext:value-type="time">
            <text:p>12:41:55</text:p>
          </table:table-cell>
          <table:table-cell office:value-type="float" office:value="65" calcext:value-type="float">
            <text:p>6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1M58S" calcext:value-type="time">
            <text:p>12:41:58</text:p>
          </table:table-cell>
          <table:table-cell office:value-type="float" office:value="263" calcext:value-type="float">
            <text:p>26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01S" calcext:value-type="time">
            <text:p>12:42:01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03S" calcext:value-type="time">
            <text:p>12:42:03</text:p>
          </table:table-cell>
          <table:table-cell office:value-type="float" office:value="43" calcext:value-type="float">
            <text:p>43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06S" calcext:value-type="time">
            <text:p>12:42:06</text:p>
          </table:table-cell>
          <table:table-cell office:value-type="float" office:value="25" calcext:value-type="float">
            <text:p>25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08S" calcext:value-type="time">
            <text:p>12:42:08</text:p>
          </table:table-cell>
          <table:table-cell office:value-type="float" office:value="75" calcext:value-type="float">
            <text:p>7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11S" calcext:value-type="time">
            <text:p>12:42:11</text:p>
          </table:table-cell>
          <table:table-cell office:value-type="float" office:value="84" calcext:value-type="float">
            <text:p>84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13S" calcext:value-type="time">
            <text:p>12:42:13</text:p>
          </table:table-cell>
          <table:table-cell office:value-type="float" office:value="49" calcext:value-type="float">
            <text:p>49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15S" calcext:value-type="time">
            <text:p>12:42:15</text:p>
          </table:table-cell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18S" calcext:value-type="time">
            <text:p>12:42:18</text:p>
          </table:table-cell>
          <table:table-cell office:value-type="float" office:value="41" calcext:value-type="float">
            <text:p>4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20S" calcext:value-type="time">
            <text:p>12:42:20</text:p>
          </table:table-cell>
          <table:table-cell office:value-type="float" office:value="69" calcext:value-type="float">
            <text:p>69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23S" calcext:value-type="time">
            <text:p>12:42:23</text:p>
          </table:table-cell>
          <table:table-cell office:value-type="float" office:value="51" calcext:value-type="float">
            <text:p>5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25S" calcext:value-type="time">
            <text:p>12:42:25</text:p>
          </table:table-cell>
          <table:table-cell office:value-type="float" office:value="25" calcext:value-type="float">
            <text:p>2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28S" calcext:value-type="time">
            <text:p>12:42:28</text:p>
          </table:table-cell>
          <table:table-cell office:value-type="float" office:value="120" calcext:value-type="float">
            <text:p>12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30S" calcext:value-type="time">
            <text:p>12:42:30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33S" calcext:value-type="time">
            <text:p>12:42:33</text:p>
          </table:table-cell>
          <table:table-cell office:value-type="float" office:value="36" calcext:value-type="float">
            <text:p>3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35S" calcext:value-type="time">
            <text:p>12:42:35</text:p>
          </table:table-cell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38S" calcext:value-type="time">
            <text:p>12:42:38</text:p>
          </table:table-cell>
          <table:table-cell office:value-type="float" office:value="78" calcext:value-type="float">
            <text:p>78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40S" calcext:value-type="time">
            <text:p>12:42:40</text:p>
          </table:table-cell>
          <table:table-cell office:value-type="float" office:value="68" calcext:value-type="float">
            <text:p>6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42S" calcext:value-type="time">
            <text:p>12:42:42</text:p>
          </table:table-cell>
          <table:table-cell office:value-type="float" office:value="116" calcext:value-type="float">
            <text:p>11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45S" calcext:value-type="time">
            <text:p>12:42:45</text:p>
          </table:table-cell>
          <table:table-cell office:value-type="float" office:value="38" calcext:value-type="float">
            <text:p>3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47S" calcext:value-type="time">
            <text:p>12:42:47</text:p>
          </table:table-cell>
          <table:table-cell office:value-type="float" office:value="78" calcext:value-type="float">
            <text:p>78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50S" calcext:value-type="time">
            <text:p>12:42:50</text:p>
          </table:table-cell>
          <table:table-cell office:value-type="float" office:value="86" calcext:value-type="float">
            <text:p>8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52S" calcext:value-type="time">
            <text:p>12:42:52</text:p>
          </table:table-cell>
          <table:table-cell office:value-type="float" office:value="92" calcext:value-type="float">
            <text:p>9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55S" calcext:value-type="time">
            <text:p>12:42:55</text:p>
          </table:table-cell>
          <table:table-cell office:value-type="float" office:value="71" calcext:value-type="float">
            <text:p>7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2M57S" calcext:value-type="time">
            <text:p>12:42:57</text:p>
          </table:table-cell>
          <table:table-cell office:value-type="float" office:value="82" calcext:value-type="float">
            <text:p>82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00S" calcext:value-type="time">
            <text:p>12:43:00</text:p>
          </table:table-cell>
          <table:table-cell office:value-type="float" office:value="114" calcext:value-type="float">
            <text:p>114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02S" calcext:value-type="time">
            <text:p>12:43:02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05S" calcext:value-type="time">
            <text:p>12:43:05</text:p>
          </table:table-cell>
          <table:table-cell office:value-type="float" office:value="109" calcext:value-type="float">
            <text:p>10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07S" calcext:value-type="time">
            <text:p>12:43:07</text:p>
          </table:table-cell>
          <table:table-cell office:value-type="float" office:value="262" calcext:value-type="float">
            <text:p>26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09S" calcext:value-type="time">
            <text:p>12:43:09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12S" calcext:value-type="time">
            <text:p>12:43:12</text:p>
          </table:table-cell>
          <table:table-cell office:value-type="float" office:value="63" calcext:value-type="float">
            <text:p>6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14S" calcext:value-type="time">
            <text:p>12:43:14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17S" calcext:value-type="time">
            <text:p>12:43:17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19S" calcext:value-type="time">
            <text:p>12:43:19</text:p>
          </table:table-cell>
          <table:table-cell office:value-type="float" office:value="434" calcext:value-type="float">
            <text:p>43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22S" calcext:value-type="time">
            <text:p>12:43:22</text:p>
          </table:table-cell>
          <table:table-cell office:value-type="float" office:value="328" calcext:value-type="float">
            <text:p>32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24S" calcext:value-type="time">
            <text:p>12:43:24</text:p>
          </table:table-cell>
          <table:table-cell office:value-type="float" office:value="60" calcext:value-type="float">
            <text:p>6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27S" calcext:value-type="time">
            <text:p>12:43:27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29S" calcext:value-type="time">
            <text:p>12:43:29</text:p>
          </table:table-cell>
          <table:table-cell office:value-type="float" office:value="89" calcext:value-type="float">
            <text:p>89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32S" calcext:value-type="time">
            <text:p>12:43:32</text:p>
          </table:table-cell>
          <table:table-cell office:value-type="float" office:value="69" calcext:value-type="float">
            <text:p>69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34S" calcext:value-type="time">
            <text:p>12:43:34</text:p>
          </table:table-cell>
          <table:table-cell office:value-type="float" office:value="47" calcext:value-type="float">
            <text:p>4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37S" calcext:value-type="time">
            <text:p>12:43:37</text:p>
          </table:table-cell>
          <table:table-cell office:value-type="float" office:value="131" calcext:value-type="float">
            <text:p>13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39S" calcext:value-type="time">
            <text:p>12:43:39</text:p>
          </table:table-cell>
          <table:table-cell office:value-type="float" office:value="83" calcext:value-type="float">
            <text:p>8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42S" calcext:value-type="time">
            <text:p>12:43:42</text:p>
          </table:table-cell>
          <table:table-cell office:value-type="float" office:value="24" calcext:value-type="float">
            <text:p>2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44S" calcext:value-type="time">
            <text:p>12:43:44</text:p>
          </table:table-cell>
          <table:table-cell office:value-type="float" office:value="38" calcext:value-type="float">
            <text:p>3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46S" calcext:value-type="time">
            <text:p>12:43:46</text:p>
          </table:table-cell>
          <table:table-cell office:value-type="float" office:value="8" calcext:value-type="float">
            <text:p>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49S" calcext:value-type="time">
            <text:p>12:43:49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51S" calcext:value-type="time">
            <text:p>12:43:51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54S" calcext:value-type="time">
            <text:p>12:43:54</text:p>
          </table:table-cell>
          <table:table-cell office:value-type="float" office:value="13" calcext:value-type="float">
            <text:p>13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56S" calcext:value-type="time">
            <text:p>12:43:56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3M59S" calcext:value-type="time">
            <text:p>12:43:59</text:p>
          </table:table-cell>
          <table:table-cell office:value-type="float" office:value="203" calcext:value-type="float">
            <text:p>2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01S" calcext:value-type="time">
            <text:p>12:44:01</text:p>
          </table:table-cell>
          <table:table-cell office:value-type="float" office:value="79" calcext:value-type="float">
            <text:p>79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04S" calcext:value-type="time">
            <text:p>12:44:04</text:p>
          </table:table-cell>
          <table:table-cell office:value-type="float" office:value="8" calcext:value-type="float">
            <text:p>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06S" calcext:value-type="time">
            <text:p>12:44:06</text:p>
          </table:table-cell>
          <table:table-cell office:value-type="float" office:value="567" calcext:value-type="float">
            <text:p>56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09S" calcext:value-type="time">
            <text:p>12:44:09</text:p>
          </table:table-cell>
          <table:table-cell office:value-type="float" office:value="17" calcext:value-type="float">
            <text:p>17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11S" calcext:value-type="time">
            <text:p>12:44:11</text:p>
          </table:table-cell>
          <table:table-cell office:value-type="float" office:value="89" calcext:value-type="float">
            <text:p>89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14S" calcext:value-type="time">
            <text:p>12:44:14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16S" calcext:value-type="time">
            <text:p>12:44:16</text:p>
          </table:table-cell>
          <table:table-cell office:value-type="float" office:value="286" calcext:value-type="float">
            <text:p>28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19S" calcext:value-type="time">
            <text:p>12:44:19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21S" calcext:value-type="time">
            <text:p>12:44:21</text:p>
          </table:table-cell>
          <table:table-cell office:value-type="float" office:value="13" calcext:value-type="float">
            <text:p>1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24S" calcext:value-type="time">
            <text:p>12:44:24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26S" calcext:value-type="time">
            <text:p>12:44:2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29S" calcext:value-type="time">
            <text:p>12:44:29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31S" calcext:value-type="time">
            <text:p>12:44:3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34S" calcext:value-type="time">
            <text:p>12:44:34</text:p>
          </table:table-cell>
          <table:table-cell office:value-type="float" office:value="59" calcext:value-type="float">
            <text:p>5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36S" calcext:value-type="time">
            <text:p>12:44:36</text:p>
          </table:table-cell>
          <table:table-cell office:value-type="float" office:value="498" calcext:value-type="float">
            <text:p>49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39S" calcext:value-type="time">
            <text:p>12:44:39</text:p>
          </table:table-cell>
          <table:table-cell office:value-type="float" office:value="15" calcext:value-type="float">
            <text:p>15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41S" calcext:value-type="time">
            <text:p>12:44:41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44S" calcext:value-type="time">
            <text:p>12:44:44</text:p>
          </table:table-cell>
          <table:table-cell office:value-type="float" office:value="295" calcext:value-type="float">
            <text:p>295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46S" calcext:value-type="time">
            <text:p>12:44:46</text:p>
          </table:table-cell>
          <table:table-cell office:value-type="float" office:value="80" calcext:value-type="float">
            <text:p>8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49S" calcext:value-type="time">
            <text:p>12:44:49</text:p>
          </table:table-cell>
          <table:table-cell office:value-type="float" office:value="43" calcext:value-type="float">
            <text:p>4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51S" calcext:value-type="time">
            <text:p>12:44:51</text:p>
          </table:table-cell>
          <table:table-cell office:value-type="float" office:value="205" calcext:value-type="float">
            <text:p>20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54S" calcext:value-type="time">
            <text:p>12:44:54</text:p>
          </table:table-cell>
          <table:table-cell office:value-type="float" office:value="112" calcext:value-type="float">
            <text:p>11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56S" calcext:value-type="time">
            <text:p>12:44:56</text:p>
          </table:table-cell>
          <table:table-cell office:value-type="float" office:value="26" calcext:value-type="float">
            <text:p>2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4M59S" calcext:value-type="time">
            <text:p>12:44:59</text:p>
          </table:table-cell>
          <table:table-cell office:value-type="float" office:value="223" calcext:value-type="float">
            <text:p>22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01S" calcext:value-type="time">
            <text:p>12:45:01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04S" calcext:value-type="time">
            <text:p>12:45:04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06S" calcext:value-type="time">
            <text:p>12:45:06</text:p>
          </table:table-cell>
          <table:table-cell office:value-type="float" office:value="84" calcext:value-type="float">
            <text:p>8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09S" calcext:value-type="time">
            <text:p>12:45:09</text:p>
          </table:table-cell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11S" calcext:value-type="time">
            <text:p>12:45:11</text:p>
          </table:table-cell>
          <table:table-cell office:value-type="float" office:value="597" calcext:value-type="float">
            <text:p>59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14S" calcext:value-type="time">
            <text:p>12:45:14</text:p>
          </table:table-cell>
          <table:table-cell office:value-type="float" office:value="18" calcext:value-type="float">
            <text:p>1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16S" calcext:value-type="time">
            <text:p>12:45:16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19S" calcext:value-type="time">
            <text:p>12:45:19</text:p>
          </table:table-cell>
          <table:table-cell office:value-type="float" office:value="222" calcext:value-type="float">
            <text:p>22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21S" calcext:value-type="time">
            <text:p>12:45:21</text:p>
          </table:table-cell>
          <table:table-cell office:value-type="float" office:value="6" calcext:value-type="float">
            <text:p>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24S" calcext:value-type="time">
            <text:p>12:45:24</text:p>
          </table:table-cell>
          <table:table-cell office:value-type="float" office:value="147" calcext:value-type="float">
            <text:p>147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26S" calcext:value-type="time">
            <text:p>12:45:26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29S" calcext:value-type="time">
            <text:p>12:45:29</text:p>
          </table:table-cell>
          <table:table-cell office:value-type="float" office:value="213" calcext:value-type="float">
            <text:p>21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31S" calcext:value-type="time">
            <text:p>12:45:31</text:p>
          </table:table-cell>
          <table:table-cell office:value-type="float" office:value="28" calcext:value-type="float">
            <text:p>2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34S" calcext:value-type="time">
            <text:p>12:45:34</text:p>
          </table:table-cell>
          <table:table-cell office:value-type="float" office:value="65" calcext:value-type="float">
            <text:p>6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36S" calcext:value-type="time">
            <text:p>12:45:36</text:p>
          </table:table-cell>
          <table:table-cell office:value-type="float" office:value="12" calcext:value-type="float">
            <text:p>12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39S" calcext:value-type="time">
            <text:p>12:45:39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41S" calcext:value-type="time">
            <text:p>12:45:41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44S" calcext:value-type="time">
            <text:p>12:45:44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46S" calcext:value-type="time">
            <text:p>12:45:46</text:p>
          </table:table-cell>
          <table:table-cell office:value-type="float" office:value="517" calcext:value-type="float">
            <text:p>517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49S" calcext:value-type="time">
            <text:p>12:45:49</text:p>
          </table:table-cell>
          <table:table-cell office:value-type="float" office:value="254" calcext:value-type="float">
            <text:p>25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51S" calcext:value-type="time">
            <text:p>12:45:51</text:p>
          </table:table-cell>
          <table:table-cell office:value-type="float" office:value="305" calcext:value-type="float">
            <text:p>30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54S" calcext:value-type="time">
            <text:p>12:45:54</text:p>
          </table:table-cell>
          <table:table-cell office:value-type="float" office:value="321" calcext:value-type="float">
            <text:p>32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56S" calcext:value-type="time">
            <text:p>12:45:56</text:p>
          </table:table-cell>
          <table:table-cell office:value-type="float" office:value="291" calcext:value-type="float">
            <text:p>291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5M59S" calcext:value-type="time">
            <text:p>12:45:59</text:p>
          </table:table-cell>
          <table:table-cell office:value-type="float" office:value="1032" calcext:value-type="float">
            <text:p>103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6M01S" calcext:value-type="time">
            <text:p>12:46:01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6M04S" calcext:value-type="time">
            <text:p>12:46:04</text:p>
          </table:table-cell>
          <table:table-cell office:value-type="float" office:value="294" calcext:value-type="float">
            <text:p>29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6M06S" calcext:value-type="time">
            <text:p>12:46:06</text:p>
          </table:table-cell>
          <table:table-cell office:value-type="float" office:value="274" calcext:value-type="float">
            <text:p>27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6M09S" calcext:value-type="time">
            <text:p>12:46:09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office:value-type="time" office:time-value="PT12H46M11S" calcext:value-type="time">
            <text:p>12:46:11</text:p>
          </table:table-cell>
          <table:table-cell office:value-type="float" office:value="50" calcext:value-type="float">
            <text:p>50</text:p>
          </table:table-cell>
          <table:table-cell office:value-type="float" office:value="379" calcext:value-type="float">
            <text:p>3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9T12:47:52.008654178</meta:creation-date>
    <dc:date>2022-11-19T12:49:25.113415485</dc:date>
    <meta:editing-duration>PT1M33S</meta:editing-duration>
    <meta:editing-cycles>1</meta:editing-cycles>
    <meta:document-statistic meta:table-count="1" meta:cell-count="6944" meta:object-count="0"/>
    <meta:generator>LibreOffice/7.3.6.2$Linux_X86_64 LibreOffice_project/30$Build-2</meta:generator>
  </office:meta>
</office:document-meta>
</file>