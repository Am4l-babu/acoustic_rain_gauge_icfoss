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75cm"/>
    </style:style>
    <style:style style:name="co3" style:family="table-column">
      <style:table-column-properties fo:break-before="auto" style:column-width="6.135cm"/>
    </style:style>
    <style:style style:name="co4" style:family="table-column">
      <style:table-column-properties fo:break-before="auto" style:column-width="4.817cm"/>
    </style:style>
    <style:style style:name="co5" style:family="table-column">
      <style:table-column-properties fo:break-before="auto" style:column-width="6.41cm"/>
    </style:style>
    <style:style style:name="co6" style:family="table-column">
      <style:table-column-properties fo:break-before="auto" style:column-width="4.646cm"/>
    </style:style>
    <style:style style:name="co7" style:family="table-column">
      <style:table-column-properties fo:break-before="auto" style:column-width="5.699cm"/>
    </style:style>
    <style:style style:name="co8" style:family="table-column">
      <style:table-column-properties fo:break-before="auto" style:column-width="3.979cm"/>
    </style:style>
    <style:style style:name="co9" style:family="table-column">
      <style:table-column-properties fo:break-before="auto" style:column-width="6.66cm"/>
    </style:style>
    <style:style style:name="co10" style:family="table-column">
      <style:table-column-properties fo:break-before="auto" style:column-width="2.974cm"/>
    </style:style>
    <style:style style:name="ro1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37"/>
    <style:style style:name="ce2" style:family="table-cell" style:parent-style-name="Default" style:data-style-name="N61"/>
    <style:style style:name="ce3" style:family="table-cell" style:parent-style-name="Default" style:data-style-name="N64"/>
    <style:style style:name="ce4" style:family="table-cell" style:parent-style-name="Default">
      <style:table-cell-properties fo:wrap-option="wrap"/>
    </style:style>
    <style:style style:name="ce5" style:family="table-cell" style:parent-style-name="Default" style:data-style-name="N100">
      <style:table-cell-properties fo:wrap-option="wrap"/>
    </style:style>
    <style:style style:name="ce6" style:family="table-cell" style:parent-style-name="Default" style:data-style-name="N100"/>
    <style:style style:name="ce7" style:family="table-cell" style:parent-style-name="Default">
      <style:table-cell-properties fo:wrap-option="no-wrap"/>
    </style:style>
    <style:style style:name="ce8" style:family="table-cell" style:parent-style-name="Default" style:data-style-name="N100">
      <style:table-cell-properties fo:wrap-option="no-wrap"/>
    </style:style>
    <style:style style:name="ce9" style:family="table-cell" style:parent-style-name="Default" style:data-style-name="N61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 8th nov" table:style-name="ta1">
        <table:shapes>
          <draw:frame draw:z-index="0" draw:style-name="gr1" draw:text-style-name="P1" svg:width="15.999cm" svg:height="8.999cm" svg:x="30.572cm" svg:y="27.328cm">
            <draw:object draw:notify-on-update-of-ranges="'test 8th nov'.I19:'test 8th nov'.I26 'test 8th nov'.J19:'test 8th nov'.J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32.186cm" svg:y="36.487cm">
            <draw:object draw:notify-on-update-of-ranges="'test 8th nov'.M19:'test 8th nov'.M26 'test 8th nov'.N19:'test 8th nov'.N26 'test 8th nov'.O19:'test 8th nov'.O2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9.364cm" svg:height="13.138cm" svg:x="71.45cm" svg:y="12.456cm">
            <draw:object draw:notify-on-update-of-ranges="'test 8th nov'.U10:'test 8th nov'.U85 'test 8th nov'.V10:'test 8th nov'.V85 'test 8th nov'.W10:'test 8th nov'.W8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ce5"/>
        <table:table-column table:style-name="co3" table:default-cell-style-name="ce4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6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2" office:value-type="string" calcext:value-type="string">
            <text:p>Time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loudness</text:p>
          </table:table-cell>
          <table:table-cell/>
          <table:table-cell table:style-name="ce4" office:value-type="string" calcext:value-type="string">
            <text:p>Time</text:p>
          </table:table-cell>
          <table:table-cell office:value-type="string" calcext:value-type="string">
            <text:p>device_frmpayload_data_rainfall</text:p>
          </table:table-cell>
          <table:table-cell/>
          <table:table-cell office:value-type="string" calcext:value-type="string">
            <text:p>Time</text:p>
          </table:table-cell>
          <table:table-cell table:style-name="ce7" office:value-type="string" calcext:value-type="string">
            <text:p>device_frmpayload_data_rainfall</text:p>
          </table:table-cell>
          <table:table-cell table:number-columns-repeated="7"/>
          <table:table-cell table:style-name="ce5"/>
          <table:table-cell table:style-name="ce4"/>
          <table:table-cell table:number-columns-repeated="6"/>
        </table:table-row>
        <table:table-row table:style-name="ro1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6H19M31S" calcext:value-type="time">
            <text:p>16:19:31</text:p>
          </table:table-cell>
          <table:table-cell office:value-type="float" office:value="144" calcext:value-type="float">
            <text:p>144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2022-11-08 00:00:36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2022-11-08 11:26:36</text:p>
          </table:table-cell>
          <table:table-cell office:value-type="float" office:value="0.4" calcext:value-type="float">
            <text:p>0.4</text:p>
          </table:table-cell>
          <table:table-cell table:number-columns-repeated="7"/>
          <table:table-cell table:style-name="ce5"/>
          <table:table-cell table:style-name="ce4"/>
          <table:table-cell table:number-columns-repeated="6"/>
        </table:table-row>
        <table:table-row table:style-name="ro1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6H20M31S" calcext:value-type="time">
            <text:p>16:20:31</text:p>
          </table:table-cell>
          <table:table-cell office:value-type="float" office:value="34" calcext:value-type="float">
            <text:p>34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2022-11-08 00:01:36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2022-11-08 11:28:36</text:p>
          </table:table-cell>
          <table:table-cell office:value-type="float" office:value="0.2" calcext:value-type="float">
            <text:p>0.2</text:p>
          </table:table-cell>
          <table:table-cell table:number-columns-repeated="7"/>
          <table:table-cell table:style-name="ce5"/>
          <table:table-cell table:style-name="ce4"/>
          <table:table-cell table:number-columns-repeated="6"/>
        </table:table-row>
        <table:table-row table:style-name="ro1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6H21M31S" calcext:value-type="time">
            <text:p>16:21:31</text:p>
          </table:table-cell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2022-11-08 00:02:36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2022-11-08 11:34:36</text:p>
          </table:table-cell>
          <table:table-cell office:value-type="float" office:value="0.4" calcext:value-type="float">
            <text:p>0.4</text:p>
          </table:table-cell>
          <table:table-cell table:number-columns-repeated="7"/>
          <table:table-cell table:style-name="ce5"/>
          <table:table-cell table:style-name="ce4"/>
          <table:table-cell table:number-columns-repeated="6"/>
        </table:table-row>
        <table:table-row table:style-name="ro1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6H22M31S" calcext:value-type="time">
            <text:p>16:22:31</text:p>
          </table:table-cell>
          <table:table-cell office:value-type="float" office:value="123" calcext:value-type="float">
            <text:p>123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2022-11-08 00:03:36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2022-11-08 11:35:35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5"/>
          <table:table-cell table:style-name="ce4"/>
          <table:table-cell table:number-columns-repeated="6"/>
        </table:table-row>
        <table:table-row table:style-name="ro1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6H23M31S" calcext:value-type="time">
            <text:p>16:23:31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2022-11-08 00:04:36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2022-11-08 11:36:35</text:p>
          </table:table-cell>
          <table:table-cell office:value-type="float" office:value="30.8" calcext:value-type="float">
            <text:p>30.8</text:p>
          </table:table-cell>
          <table:table-cell table:number-columns-repeated="7"/>
          <table:table-cell table:style-name="ce5"/>
          <table:table-cell table:style-name="ce4"/>
          <table:table-cell table:number-columns-repeated="6"/>
        </table:table-row>
        <table:table-row table:style-name="ro1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6H24M31S" calcext:value-type="time">
            <text:p>16:24:3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2022-11-08 00:05:36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2022-11-08 11:46:36</text:p>
          </table:table-cell>
          <table:table-cell office:value-type="float" office:value="2.2" calcext:value-type="float">
            <text:p>2.2</text:p>
          </table:table-cell>
          <table:table-cell table:number-columns-repeated="7"/>
          <table:table-cell table:style-name="ce5"/>
          <table:table-cell table:style-name="ce4"/>
          <table:table-cell table:number-columns-repeated="6"/>
        </table:table-row>
        <table:table-row table:style-name="ro1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6H25M31S" calcext:value-type="time">
            <text:p>16:25:31</text:p>
          </table:table-cell>
          <table:table-cell office:value-type="float" office:value="48" calcext:value-type="float">
            <text:p>48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2022-11-08 00:06:36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2022-11-08 11:47:35</text:p>
          </table:table-cell>
          <table:table-cell office:value-type="float" office:value="0.8" calcext:value-type="float">
            <text:p>0.8</text:p>
          </table:table-cell>
          <table:table-cell table:number-columns-repeated="7"/>
          <table:table-cell table:style-name="ce5"/>
          <table:table-cell table:style-name="ce4"/>
          <table:table-cell table:number-columns-repeated="6"/>
        </table:table-row>
        <table:table-row table:style-name="ro1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6H26M31S" calcext:value-type="time">
            <text:p>16:26:31</text:p>
          </table:table-cell>
          <table:table-cell office:value-type="float" office:value="23" calcext:value-type="float">
            <text:p>23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2022-11-08 00:07:36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2022-11-08 11:55:35</text:p>
          </table:table-cell>
          <table:table-cell office:value-type="float" office:value="0.2" calcext:value-type="float">
            <text:p>0.2</text:p>
          </table:table-cell>
          <table:table-cell table:number-columns-repeated="6"/>
          <table:table-cell office:value-type="string" calcext:value-type="string">
            <text:p>Time</text:p>
          </table:table-cell>
          <table:table-cell table:style-name="ce7" office:value-type="string" calcext:value-type="string">
            <text:p>device_frmpayload_data_rainfall</text:p>
          </table:table-cell>
          <table:table-cell table:style-name="ce4"/>
          <table:table-cell table:style-name="ce9" office:value-type="string" calcext:value-type="string">
            <text:p>Date</text:p>
          </table:table-cell>
          <table:table-cell table:style-name="ce2" office:value-type="string" calcext:value-type="string">
            <text:p>Time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loudness</text:p>
          </table:table-cell>
          <table:table-cell/>
          <table:table-cell table:style-name="ce4"/>
        </table:table-row>
        <table:table-row table:style-name="ro1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6H27M32S" calcext:value-type="time">
            <text:p>16:27:32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2022-11-08 00:08:36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2022-11-08 11:59:35</text:p>
          </table:table-cell>
          <table:table-cell office:value-type="float" office:value="4.4" calcext:value-type="float">
            <text:p>4.4</text:p>
          </table:table-cell>
          <table:table-cell table:number-columns-repeated="6"/>
          <table:table-cell table:style-name="ce8" office:value-type="string" calcext:value-type="string">
            <text:p>2022-11-08 16:52:35</text:p>
          </table:table-cell>
          <table:table-cell table:style-name="ce7" office:value-type="float" office:value="0" calcext:value-type="float">
            <text:p>0</text:p>
          </table:table-cell>
          <table:table-cell table:style-name="ce4"/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6H52M35S" calcext:value-type="time">
            <text:p>16:52:35</text:p>
          </table:table-cell>
          <table:table-cell office:value-type="float" office:value="143" calcext:value-type="float">
            <text:p>143</text:p>
          </table:table-cell>
          <table:table-cell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6H28M32S" calcext:value-type="time">
            <text:p>16:28:32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2022-11-08 00:09:36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2022-11-08 12:00:35</text:p>
          </table:table-cell>
          <table:table-cell office:value-type="float" office:value="26.8" calcext:value-type="float">
            <text:p>26.8</text:p>
          </table:table-cell>
          <table:table-cell table:number-columns-repeated="6"/>
          <table:table-cell table:style-name="ce8" office:value-type="string" calcext:value-type="string">
            <text:p>2022-11-08 16:53:35</text:p>
          </table:table-cell>
          <table:table-cell table:style-name="ce7" office:value-type="float" office:value="0" calcext:value-type="float">
            <text:p>0</text:p>
          </table:table-cell>
          <table:table-cell table:style-name="ce4"/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6H53M35S" calcext:value-type="time">
            <text:p>16:53:35</text:p>
          </table:table-cell>
          <table:table-cell office:value-type="float" office:value="48" calcext:value-type="float">
            <text:p>48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6H29M32S" calcext:value-type="time">
            <text:p>16:29:32</text:p>
          </table:table-cell>
          <table:table-cell office:value-type="float" office:value="143" calcext:value-type="float">
            <text:p>143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2022-11-08 00:10:36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2022-11-08 14:24:35</text:p>
          </table:table-cell>
          <table:table-cell office:value-type="float" office:value="0.2" calcext:value-type="float">
            <text:p>0.2</text:p>
          </table:table-cell>
          <table:table-cell table:number-columns-repeated="6"/>
          <table:table-cell table:style-name="ce8" office:value-type="string" calcext:value-type="string">
            <text:p>2022-11-08 16:54:35</text:p>
          </table:table-cell>
          <table:table-cell table:style-name="ce7" office:value-type="float" office:value="0" calcext:value-type="float">
            <text:p>0</text:p>
          </table:table-cell>
          <table:table-cell table:style-name="ce4"/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6H54M35S" calcext:value-type="time">
            <text:p>16:54:35</text:p>
          </table:table-cell>
          <table:table-cell office:value-type="float" office:value="97" calcext:value-type="float">
            <text:p>97</text:p>
          </table:table-cell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6H30M32S" calcext:value-type="time">
            <text:p>16:30:32</text:p>
          </table:table-cell>
          <table:table-cell office:value-type="float" office:value="343" calcext:value-type="float">
            <text:p>343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2022-11-08 00:11:36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2022-11-08 15:02:35</text:p>
          </table:table-cell>
          <table:table-cell office:value-type="float" office:value="0.2" calcext:value-type="float">
            <text:p>0.2</text:p>
          </table:table-cell>
          <table:table-cell table:number-columns-repeated="6"/>
          <table:table-cell table:style-name="ce8" office:value-type="string" calcext:value-type="string">
            <text:p>2022-11-08 16:55:35</text:p>
          </table:table-cell>
          <table:table-cell table:style-name="ce7" office:value-type="float" office:value="0" calcext:value-type="float">
            <text:p>0</text:p>
          </table:table-cell>
          <table:table-cell table:style-name="ce4"/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6H55M35S" calcext:value-type="time">
            <text:p>16:55:35</text:p>
          </table:table-cell>
          <table:table-cell office:value-type="float" office:value="10" calcext:value-type="float">
            <text:p>10</text:p>
          </table:table-cell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6H31M32S" calcext:value-type="time">
            <text:p>16:31:32</text:p>
          </table:table-cell>
          <table:table-cell office:value-type="float" office:value="464" calcext:value-type="float">
            <text:p>464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2022-11-08 00:12:36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2022-11-08 15:03:35</text:p>
          </table:table-cell>
          <table:table-cell office:value-type="float" office:value="0.8" calcext:value-type="float">
            <text:p>0.8</text:p>
          </table:table-cell>
          <table:table-cell table:number-columns-repeated="6"/>
          <table:table-cell table:style-name="ce8" office:value-type="string" calcext:value-type="string">
            <text:p>2022-11-08 16:56:35</text:p>
          </table:table-cell>
          <table:table-cell table:style-name="ce7" office:value-type="float" office:value="0" calcext:value-type="float">
            <text:p>0</text:p>
          </table:table-cell>
          <table:table-cell table:style-name="ce4"/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6H56M35S" calcext:value-type="time">
            <text:p>16:56:35</text:p>
          </table:table-cell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6H32M32S" calcext:value-type="time">
            <text:p>16:32:32</text:p>
          </table:table-cell>
          <table:table-cell office:value-type="float" office:value="545" calcext:value-type="float">
            <text:p>5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2022-11-08 00:13:36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2022-11-08 15:04:35</text:p>
          </table:table-cell>
          <table:table-cell office:value-type="float" office:value="0.4" calcext:value-type="float">
            <text:p>0.4</text:p>
          </table:table-cell>
          <table:table-cell table:number-columns-repeated="6"/>
          <table:table-cell table:style-name="ce8" office:value-type="string" calcext:value-type="string">
            <text:p>2022-11-08 16:57:35</text:p>
          </table:table-cell>
          <table:table-cell table:style-name="ce7" office:value-type="float" office:value="0.2" calcext:value-type="float">
            <text:p>0.2</text:p>
          </table:table-cell>
          <table:table-cell table:style-name="ce4"/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6H57M35S" calcext:value-type="time">
            <text:p>16:57:35</text:p>
          </table:table-cell>
          <table:table-cell office:value-type="float" office:value="24" calcext:value-type="float">
            <text:p>24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6H33M32S" calcext:value-type="time">
            <text:p>16:33:32</text:p>
          </table:table-cell>
          <table:table-cell office:value-type="float" office:value="629" calcext:value-type="float">
            <text:p>629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2022-11-08 00:14:36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2022-11-08 15:07:35</text:p>
          </table:table-cell>
          <table:table-cell office:value-type="float" office:value="0.2" calcext:value-type="float">
            <text:p>0.2</text:p>
          </table:table-cell>
          <table:table-cell table:number-columns-repeated="6"/>
          <table:table-cell table:style-name="ce8" office:value-type="string" calcext:value-type="string">
            <text:p>2022-11-08 16:58:35</text:p>
          </table:table-cell>
          <table:table-cell table:style-name="ce7" office:value-type="float" office:value="0" calcext:value-type="float">
            <text:p>0</text:p>
          </table:table-cell>
          <table:table-cell table:style-name="ce4"/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6H58M35S" calcext:value-type="time">
            <text:p>16:58:35</text:p>
          </table:table-cell>
          <table:table-cell office:value-type="float" office:value="58" calcext:value-type="float">
            <text:p>58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6H34M32S" calcext:value-type="time">
            <text:p>16:34:32</text:p>
          </table:table-cell>
          <table:table-cell office:value-type="float" office:value="621" calcext:value-type="float">
            <text:p>621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2022-11-08 00:15:36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2022-11-08 16:03:35</text:p>
          </table:table-cell>
          <table:table-cell office:value-type="float" office:value="0.2" calcext:value-type="float">
            <text:p>0.2</text:p>
          </table:table-cell>
          <table:table-cell table:number-columns-repeated="6"/>
          <table:table-cell table:style-name="ce8" office:value-type="string" calcext:value-type="string">
            <text:p>2022-11-08 16:59:35</text:p>
          </table:table-cell>
          <table:table-cell table:style-name="ce7" office:value-type="float" office:value="0" calcext:value-type="float">
            <text:p>0</text:p>
          </table:table-cell>
          <table:table-cell table:style-name="ce4"/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6H59M35S" calcext:value-type="time">
            <text:p>16:59:35</text:p>
          </table:table-cell>
          <table:table-cell office:value-type="float" office:value="52" calcext:value-type="float">
            <text:p>52</text:p>
          </table:table-cell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6H35M32S" calcext:value-type="time">
            <text:p>16:35:32</text:p>
          </table:table-cell>
          <table:table-cell office:value-type="float" office:value="620" calcext:value-type="float">
            <text:p>620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2022-11-08 00:16:36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2022-11-08 16:06:35</text:p>
          </table:table-cell>
          <table:table-cell office:value-type="float" office:value="0.2" calcext:value-type="float">
            <text:p>0.2</text:p>
          </table:table-cell>
          <table:table-cell table:number-columns-repeated="6"/>
          <table:table-cell table:style-name="ce8" office:value-type="string" calcext:value-type="string">
            <text:p>2022-11-08 17:00:35</text:p>
          </table:table-cell>
          <table:table-cell table:style-name="ce7" office:value-type="float" office:value="0" calcext:value-type="float">
            <text:p>0</text:p>
          </table:table-cell>
          <table:table-cell table:style-name="ce4"/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7H00M36S" calcext:value-type="time">
            <text:p>17:00:36</text:p>
          </table:table-cell>
          <table:table-cell office:value-type="float" office:value="24" calcext:value-type="float">
            <text:p>24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6H36M33S" calcext:value-type="time">
            <text:p>16:36:33</text:p>
          </table:table-cell>
          <table:table-cell office:value-type="float" office:value="661" calcext:value-type="float">
            <text:p>661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2022-11-08 00:17:36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2022-11-08 16:57:35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6H57M35S" calcext:value-type="time">
            <text:p>16:57:35</text:p>
          </table:table-cell>
          <table:table-cell office:value-type="float" office:value="24" calcext:value-type="float">
            <text:p>24</text:p>
          </table:table-cell>
          <table:table-cell office:value-type="float" office:value="77" calcext:value-type="float">
            <text:p>77</text:p>
          </table:table-cell>
          <table:table-cell/>
          <table:table-cell table:style-name="ce8" office:value-type="string" calcext:value-type="string">
            <text:p>2022-11-08 17:01:35</text:p>
          </table:table-cell>
          <table:table-cell table:style-name="ce7" office:value-type="float" office:value="0" calcext:value-type="float">
            <text:p>0</text:p>
          </table:table-cell>
          <table:table-cell table:style-name="ce4"/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7H01M36S" calcext:value-type="time">
            <text:p>17:01:36</text:p>
          </table:table-cell>
          <table:table-cell office:value-type="float" office:value="17" calcext:value-type="float">
            <text:p>17</text:p>
          </table:table-cell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6H37M33S" calcext:value-type="time">
            <text:p>16:37:33</text:p>
          </table:table-cell>
          <table:table-cell office:value-type="float" office:value="663" calcext:value-type="float">
            <text:p>663</text:p>
          </table:table-cell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2022-11-08 00:18:36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2022-11-08 17:04:35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7H04M36S" calcext:value-type="time">
            <text:p>17:04:36</text:p>
          </table:table-cell>
          <table:table-cell office:value-type="float" office:value="174" calcext:value-type="float">
            <text:p>174</text:p>
          </table:table-cell>
          <table:table-cell office:value-type="float" office:value="77" calcext:value-type="float">
            <text:p>77</text:p>
          </table:table-cell>
          <table:table-cell/>
          <table:table-cell table:style-name="ce8" office:value-type="string" calcext:value-type="string">
            <text:p>2022-11-08 17:02:35</text:p>
          </table:table-cell>
          <table:table-cell table:style-name="ce7" office:value-type="float" office:value="0" calcext:value-type="float">
            <text:p>0</text:p>
          </table:table-cell>
          <table:table-cell table:style-name="ce4"/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7H02M36S" calcext:value-type="time">
            <text:p>17:02:36</text:p>
          </table:table-cell>
          <table:table-cell office:value-type="float" office:value="71" calcext:value-type="float">
            <text:p>71</text:p>
          </table:table-cell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6H38M33S" calcext:value-type="time">
            <text:p>16:38:33</text:p>
          </table:table-cell>
          <table:table-cell office:value-type="float" office:value="602" calcext:value-type="float">
            <text:p>602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2022-11-08 00:19:36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2022-11-08 19:43:35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9H43M08S" calcext:value-type="time">
            <text:p>19:43:08</text:p>
          </table:table-cell>
          <table:table-cell office:value-type="float" office:value="42" calcext:value-type="float">
            <text:p>42</text:p>
          </table:table-cell>
          <table:table-cell office:value-type="float" office:value="143" calcext:value-type="float">
            <text:p>143</text:p>
          </table:table-cell>
          <table:table-cell/>
          <table:table-cell table:style-name="ce8" office:value-type="string" calcext:value-type="string">
            <text:p>2022-11-08 17:03:35</text:p>
          </table:table-cell>
          <table:table-cell table:style-name="ce7" office:value-type="float" office:value="0" calcext:value-type="float">
            <text:p>0</text:p>
          </table:table-cell>
          <table:table-cell table:style-name="ce4"/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7H03M36S" calcext:value-type="time">
            <text:p>17:03:36</text:p>
          </table:table-cell>
          <table:table-cell office:value-type="float" office:value="141" calcext:value-type="float">
            <text:p>141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6H39M33S" calcext:value-type="time">
            <text:p>16:39:33</text:p>
          </table:table-cell>
          <table:table-cell office:value-type="float" office:value="559" calcext:value-type="float">
            <text:p>55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2022-11-08 00:20:36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2022-11-08 20:13:35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0H13M16S" calcext:value-type="time">
            <text:p>20:13:16</text:p>
          </table:table-cell>
          <table:table-cell office:value-type="float" office:value="90" calcext:value-type="float">
            <text:p>90</text:p>
          </table:table-cell>
          <table:table-cell office:value-type="float" office:value="119" calcext:value-type="float">
            <text:p>119</text:p>
          </table:table-cell>
          <table:table-cell/>
          <table:table-cell table:style-name="ce8" office:value-type="string" calcext:value-type="string">
            <text:p>2022-11-08 17:04:35</text:p>
          </table:table-cell>
          <table:table-cell table:style-name="ce7" office:value-type="float" office:value="0.2" calcext:value-type="float">
            <text:p>0.2</text:p>
          </table:table-cell>
          <table:table-cell table:style-name="ce4"/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7H04M36S" calcext:value-type="time">
            <text:p>17:04:36</text:p>
          </table:table-cell>
          <table:table-cell office:value-type="float" office:value="174" calcext:value-type="float">
            <text:p>174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6H40M33S" calcext:value-type="time">
            <text:p>16:40:33</text:p>
          </table:table-cell>
          <table:table-cell office:value-type="float" office:value="562" calcext:value-type="float">
            <text:p>562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2022-11-08 00:21:36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2022-11-08 20:27:35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0H27M20S" calcext:value-type="time">
            <text:p>20:27:20</text:p>
          </table:table-cell>
          <table:table-cell office:value-type="float" office:value="60" calcext:value-type="float">
            <text:p>60</text:p>
          </table:table-cell>
          <table:table-cell office:value-type="float" office:value="146" calcext:value-type="float">
            <text:p>146</text:p>
          </table:table-cell>
          <table:table-cell/>
          <table:table-cell table:style-name="ce8" office:value-type="string" calcext:value-type="string">
            <text:p>2022-11-08 17:05:35</text:p>
          </table:table-cell>
          <table:table-cell table:style-name="ce7" office:value-type="float" office:value="0" calcext:value-type="float">
            <text:p>0</text:p>
          </table:table-cell>
          <table:table-cell table:style-name="ce4"/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7H05M36S" calcext:value-type="time">
            <text:p>17:05:36</text:p>
          </table:table-cell>
          <table:table-cell office:value-type="float" office:value="148" calcext:value-type="float">
            <text:p>148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6H41M33S" calcext:value-type="time">
            <text:p>16:41:33</text:p>
          </table:table-cell>
          <table:table-cell office:value-type="float" office:value="535" calcext:value-type="float">
            <text:p>53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2022-11-08 00:22:36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2022-11-08 20:35:35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0H35M23S" calcext:value-type="time">
            <text:p>20:35:23</text:p>
          </table:table-cell>
          <table:table-cell office:value-type="float" office:value="94" calcext:value-type="float">
            <text:p>94</text:p>
          </table:table-cell>
          <table:table-cell office:value-type="float" office:value="155" calcext:value-type="float">
            <text:p>155</text:p>
          </table:table-cell>
          <table:table-cell/>
          <table:table-cell table:style-name="ce8" office:value-type="string" calcext:value-type="string">
            <text:p>2022-11-08 17:06:35</text:p>
          </table:table-cell>
          <table:table-cell table:style-name="ce7" office:value-type="float" office:value="0" calcext:value-type="float">
            <text:p>0</text:p>
          </table:table-cell>
          <table:table-cell table:style-name="ce4"/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7H06M36S" calcext:value-type="time">
            <text:p>17:06:36</text:p>
          </table:table-cell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6H42M33S" calcext:value-type="time">
            <text:p>16:42:33</text:p>
          </table:table-cell>
          <table:table-cell office:value-type="float" office:value="524" calcext:value-type="float">
            <text:p>524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2022-11-08 00:23:36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2022-11-08 20:41:35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0H41M25S" calcext:value-type="time">
            <text:p>20:41:25</text:p>
          </table:table-cell>
          <table:table-cell office:value-type="float" office:value="67" calcext:value-type="float">
            <text:p>67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8" office:value-type="string" calcext:value-type="string">
            <text:p>2022-11-08 17:07:35</text:p>
          </table:table-cell>
          <table:table-cell table:style-name="ce7" office:value-type="float" office:value="0" calcext:value-type="float">
            <text:p>0</text:p>
          </table:table-cell>
          <table:table-cell table:style-name="ce4"/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7H07M37S" calcext:value-type="time">
            <text:p>17:07:37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6H43M33S" calcext:value-type="time">
            <text:p>16:43:33</text:p>
          </table:table-cell>
          <table:table-cell office:value-type="float" office:value="515" calcext:value-type="float">
            <text:p>515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2022-11-08 00:24:36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2022-11-08 20:52:35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0H52M28S" calcext:value-type="time">
            <text:p>20:52:28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/>
          <table:table-cell table:style-name="ce8" office:value-type="string" calcext:value-type="string">
            <text:p>2022-11-08 17:08:35</text:p>
          </table:table-cell>
          <table:table-cell table:style-name="ce7" office:value-type="float" office:value="0" calcext:value-type="float">
            <text:p>0</text:p>
          </table:table-cell>
          <table:table-cell table:style-name="ce4"/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7H08M37S" calcext:value-type="time">
            <text:p>17:08:37</text:p>
          </table:table-cell>
          <table:table-cell office:value-type="float" office:value="64" calcext:value-type="float">
            <text:p>64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6H44M34S" calcext:value-type="time">
            <text:p>16:44:34</text:p>
          </table:table-cell>
          <table:table-cell office:value-type="float" office:value="546" calcext:value-type="float">
            <text:p>546</text:p>
          </table:table-cell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2022-11-08 00:25:36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style-name="ce8" office:value-type="string" calcext:value-type="string">
            <text:p>2022-11-08 17:09:35</text:p>
          </table:table-cell>
          <table:table-cell table:style-name="ce7" office:value-type="float" office:value="0" calcext:value-type="float">
            <text:p>0</text:p>
          </table:table-cell>
          <table:table-cell table:style-name="ce4"/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7H09M37S" calcext:value-type="time">
            <text:p>17:09:37</text:p>
          </table:table-cell>
          <table:table-cell office:value-type="float" office:value="118" calcext:value-type="float">
            <text:p>118</text:p>
          </table:table-cell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6H45M34S" calcext:value-type="time">
            <text:p>16:45:34</text:p>
          </table:table-cell>
          <table:table-cell office:value-type="float" office:value="568" calcext:value-type="float">
            <text:p>568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2022-11-08 00:26:36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style-name="ce8" office:value-type="string" calcext:value-type="string">
            <text:p>2022-11-08 19:38:35</text:p>
          </table:table-cell>
          <table:table-cell table:style-name="ce7" office:value-type="float" office:value="0" calcext:value-type="float">
            <text:p>0</text:p>
          </table:table-cell>
          <table:table-cell table:style-name="ce4"/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9H38M07S" calcext:value-type="time">
            <text:p>19:38:07</text:p>
          </table:table-cell>
          <table:table-cell office:value-type="float" office:value="16" calcext:value-type="float">
            <text:p>16</text:p>
          </table:table-cell>
          <table:table-cell office:value-type="float" office:value="252" calcext:value-type="float">
            <text:p>252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6H46M34S" calcext:value-type="time">
            <text:p>16:46:34</text:p>
          </table:table-cell>
          <table:table-cell office:value-type="float" office:value="485" calcext:value-type="float">
            <text:p>485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2022-11-08 00:27:36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style-name="ce8" office:value-type="string" calcext:value-type="string">
            <text:p>2022-11-08 19:39:35</text:p>
          </table:table-cell>
          <table:table-cell table:style-name="ce7" office:value-type="float" office:value="0" calcext:value-type="float">
            <text:p>0</text:p>
          </table:table-cell>
          <table:table-cell table:style-name="ce4"/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9H39M07S" calcext:value-type="time">
            <text:p>19:39:07</text:p>
          </table:table-cell>
          <table:table-cell office:value-type="float" office:value="67" calcext:value-type="float">
            <text:p>67</text:p>
          </table:table-cell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6H47M34S" calcext:value-type="time">
            <text:p>16:47:34</text:p>
          </table:table-cell>
          <table:table-cell office:value-type="float" office:value="518" calcext:value-type="float">
            <text:p>518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2022-11-08 00:28:36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style-name="ce8" office:value-type="string" calcext:value-type="string">
            <text:p>2022-11-08 19:40:35</text:p>
          </table:table-cell>
          <table:table-cell table:style-name="ce7" office:value-type="float" office:value="0" calcext:value-type="float">
            <text:p>0</text:p>
          </table:table-cell>
          <table:table-cell table:style-name="ce4"/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9H40M07S" calcext:value-type="time">
            <text:p>19:40:07</text:p>
          </table:table-cell>
          <table:table-cell office:value-type="float" office:value="92" calcext:value-type="float">
            <text:p>92</text:p>
          </table:table-cell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6H48M34S" calcext:value-type="time">
            <text:p>16:48:34</text:p>
          </table:table-cell>
          <table:table-cell office:value-type="float" office:value="488" calcext:value-type="float">
            <text:p>48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2022-11-08 00:29:36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style-name="ce8" office:value-type="string" calcext:value-type="string">
            <text:p>2022-11-08 19:41:35</text:p>
          </table:table-cell>
          <table:table-cell table:style-name="ce7" office:value-type="float" office:value="0" calcext:value-type="float">
            <text:p>0</text:p>
          </table:table-cell>
          <table:table-cell table:style-name="ce4"/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9H41M08S" calcext:value-type="time">
            <text:p>19:41:08</text:p>
          </table:table-cell>
          <table:table-cell office:value-type="float" office:value="95" calcext:value-type="float">
            <text:p>95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6H49M34S" calcext:value-type="time">
            <text:p>16:49:34</text:p>
          </table:table-cell>
          <table:table-cell office:value-type="float" office:value="523" calcext:value-type="float">
            <text:p>523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2022-11-08 00:30:36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style-name="ce8" office:value-type="string" calcext:value-type="string">
            <text:p>2022-11-08 19:42:35</text:p>
          </table:table-cell>
          <table:table-cell table:style-name="ce7" office:value-type="float" office:value="0" calcext:value-type="float">
            <text:p>0</text:p>
          </table:table-cell>
          <table:table-cell table:style-name="ce4"/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9H42M08S" calcext:value-type="time">
            <text:p>19:42:08</text:p>
          </table:table-cell>
          <table:table-cell office:value-type="float" office:value="57" calcext:value-type="float">
            <text:p>57</text:p>
          </table:table-cell>
          <table:table-cell office:value-type="float" office:value="131" calcext:value-type="float">
            <text:p>131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6H50M34S" calcext:value-type="time">
            <text:p>16:50:34</text:p>
          </table:table-cell>
          <table:table-cell office:value-type="float" office:value="26" calcext:value-type="float">
            <text:p>26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2022-11-08 00:31:36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style-name="ce8" office:value-type="string" calcext:value-type="string">
            <text:p>2022-11-08 19:43:35</text:p>
          </table:table-cell>
          <table:table-cell table:style-name="ce7" office:value-type="float" office:value="0.2" calcext:value-type="float">
            <text:p>0.2</text:p>
          </table:table-cell>
          <table:table-cell table:style-name="ce4"/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9H43M08S" calcext:value-type="time">
            <text:p>19:43:08</text:p>
          </table:table-cell>
          <table:table-cell office:value-type="float" office:value="42" calcext:value-type="float">
            <text:p>42</text:p>
          </table:table-cell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6H51M34S" calcext:value-type="time">
            <text:p>16:51:34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2022-11-08 00:32:36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style-name="ce8" office:value-type="string" calcext:value-type="string">
            <text:p>2022-11-08 19:44:35</text:p>
          </table:table-cell>
          <table:table-cell table:style-name="ce7" office:value-type="float" office:value="0" calcext:value-type="float">
            <text:p>0</text:p>
          </table:table-cell>
          <table:table-cell table:style-name="ce4"/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9H44M08S" calcext:value-type="time">
            <text:p>19:44:08</text:p>
          </table:table-cell>
          <table:table-cell office:value-type="float" office:value="71" calcext:value-type="float">
            <text:p>71</text:p>
          </table:table-cell>
          <table:table-cell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6H52M35S" calcext:value-type="time">
            <text:p>16:52:35</text:p>
          </table:table-cell>
          <table:table-cell office:value-type="float" office:value="143" calcext:value-type="float">
            <text:p>143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2022-11-08 00:33:36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style-name="ce8" office:value-type="string" calcext:value-type="string">
            <text:p>2022-11-08 19:45:35</text:p>
          </table:table-cell>
          <table:table-cell table:style-name="ce7" office:value-type="float" office:value="0" calcext:value-type="float">
            <text:p>0</text:p>
          </table:table-cell>
          <table:table-cell table:style-name="ce4"/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9H45M09S" calcext:value-type="time">
            <text:p>19:45:09</text:p>
          </table:table-cell>
          <table:table-cell office:value-type="float" office:value="61" calcext:value-type="float">
            <text:p>61</text:p>
          </table:table-cell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6H53M35S" calcext:value-type="time">
            <text:p>16:53:35</text:p>
          </table:table-cell>
          <table:table-cell office:value-type="float" office:value="48" calcext:value-type="float">
            <text:p>48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2022-11-08 00:34:36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style-name="ce8" office:value-type="string" calcext:value-type="string">
            <text:p>2022-11-08 19:46:35</text:p>
          </table:table-cell>
          <table:table-cell table:style-name="ce7" office:value-type="float" office:value="0" calcext:value-type="float">
            <text:p>0</text:p>
          </table:table-cell>
          <table:table-cell table:style-name="ce4"/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9H46M09S" calcext:value-type="time">
            <text:p>19:46:09</text:p>
          </table:table-cell>
          <table:table-cell office:value-type="float" office:value="88" calcext:value-type="float">
            <text:p>88</text:p>
          </table:table-cell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6H54M35S" calcext:value-type="time">
            <text:p>16:54:35</text:p>
          </table:table-cell>
          <table:table-cell office:value-type="float" office:value="97" calcext:value-type="float">
            <text:p>97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2022-11-08 00:35:36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style-name="ce8" office:value-type="string" calcext:value-type="string">
            <text:p>2022-11-08 19:47:35</text:p>
          </table:table-cell>
          <table:table-cell table:style-name="ce7" office:value-type="float" office:value="0" calcext:value-type="float">
            <text:p>0</text:p>
          </table:table-cell>
          <table:table-cell table:style-name="ce4"/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9H47M09S" calcext:value-type="time">
            <text:p>19:47:09</text:p>
          </table:table-cell>
          <table:table-cell office:value-type="float" office:value="205" calcext:value-type="float">
            <text:p>205</text:p>
          </table:table-cell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6H55M35S" calcext:value-type="time">
            <text:p>16:55:35</text:p>
          </table:table-cell>
          <table:table-cell office:value-type="float" office:value="10" calcext:value-type="float">
            <text:p>10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2022-11-08 00:36:36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style-name="ce8" office:value-type="string" calcext:value-type="string">
            <text:p>2022-11-08 19:48:35</text:p>
          </table:table-cell>
          <table:table-cell table:style-name="ce7" office:value-type="float" office:value="0" calcext:value-type="float">
            <text:p>0</text:p>
          </table:table-cell>
          <table:table-cell table:style-name="ce4"/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9H48M09S" calcext:value-type="time">
            <text:p>19:48:09</text:p>
          </table:table-cell>
          <table:table-cell office:value-type="float" office:value="174" calcext:value-type="float">
            <text:p>174</text:p>
          </table:table-cell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6H56M35S" calcext:value-type="time">
            <text:p>16:56:35</text:p>
          </table:table-cell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2022-11-08 00:37:36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style-name="ce8" office:value-type="string" calcext:value-type="string">
            <text:p>2022-11-08 20:08:35</text:p>
          </table:table-cell>
          <table:table-cell table:style-name="ce7" office:value-type="float" office:value="0" calcext:value-type="float">
            <text:p>0</text:p>
          </table:table-cell>
          <table:table-cell table:style-name="ce4"/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0H08M15S" calcext:value-type="time">
            <text:p>20:08:15</text:p>
          </table:table-cell>
          <table:table-cell office:value-type="float" office:value="119" calcext:value-type="float">
            <text:p>119</text:p>
          </table:table-cell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6H57M35S" calcext:value-type="time">
            <text:p>16:57:35</text:p>
          </table:table-cell>
          <table:table-cell office:value-type="float" office:value="24" calcext:value-type="float">
            <text:p>24</text:p>
          </table:table-cell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2022-11-08 00:38:36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style-name="ce8" office:value-type="string" calcext:value-type="string">
            <text:p>2022-11-08 20:09:35</text:p>
          </table:table-cell>
          <table:table-cell table:style-name="ce7" office:value-type="float" office:value="0" calcext:value-type="float">
            <text:p>0</text:p>
          </table:table-cell>
          <table:table-cell table:style-name="ce4"/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0H09M15S" calcext:value-type="time">
            <text:p>20:09:15</text:p>
          </table:table-cell>
          <table:table-cell office:value-type="float" office:value="75" calcext:value-type="float">
            <text:p>75</text:p>
          </table:table-cell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6H58M35S" calcext:value-type="time">
            <text:p>16:58:35</text:p>
          </table:table-cell>
          <table:table-cell office:value-type="float" office:value="58" calcext:value-type="float">
            <text:p>58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2022-11-08 00:39:36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style-name="ce8" office:value-type="string" calcext:value-type="string">
            <text:p>2022-11-08 20:10:35</text:p>
          </table:table-cell>
          <table:table-cell table:style-name="ce7" office:value-type="float" office:value="0" calcext:value-type="float">
            <text:p>0</text:p>
          </table:table-cell>
          <table:table-cell table:style-name="ce4"/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0H10M15S" calcext:value-type="time">
            <text:p>20:10:15</text:p>
          </table:table-cell>
          <table:table-cell office:value-type="float" office:value="78" calcext:value-type="float">
            <text:p>78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6H59M35S" calcext:value-type="time">
            <text:p>16:59:35</text:p>
          </table:table-cell>
          <table:table-cell office:value-type="float" office:value="52" calcext:value-type="float">
            <text:p>52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2022-11-08 00:40:36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style-name="ce8" office:value-type="string" calcext:value-type="string">
            <text:p>2022-11-08 20:11:35</text:p>
          </table:table-cell>
          <table:table-cell table:style-name="ce7" office:value-type="float" office:value="0" calcext:value-type="float">
            <text:p>0</text:p>
          </table:table-cell>
          <table:table-cell table:style-name="ce4"/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0H11M16S" calcext:value-type="time">
            <text:p>20:11:16</text:p>
          </table:table-cell>
          <table:table-cell office:value-type="float" office:value="175" calcext:value-type="float">
            <text:p>175</text:p>
          </table:table-cell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7H00M36S" calcext:value-type="time">
            <text:p>17:00:36</text:p>
          </table:table-cell>
          <table:table-cell office:value-type="float" office:value="24" calcext:value-type="float">
            <text:p>24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2022-11-08 00:41:36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style-name="ce8" office:value-type="string" calcext:value-type="string">
            <text:p>2022-11-08 20:12:35</text:p>
          </table:table-cell>
          <table:table-cell table:style-name="ce7" office:value-type="float" office:value="0" calcext:value-type="float">
            <text:p>0</text:p>
          </table:table-cell>
          <table:table-cell table:style-name="ce4"/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0H12M16S" calcext:value-type="time">
            <text:p>20:12:16</text:p>
          </table:table-cell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7H01M36S" calcext:value-type="time">
            <text:p>17:01:36</text:p>
          </table:table-cell>
          <table:table-cell office:value-type="float" office:value="17" calcext:value-type="float">
            <text:p>17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2022-11-08 00:42:36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style-name="ce8" office:value-type="string" calcext:value-type="string">
            <text:p>2022-11-08 20:13:35</text:p>
          </table:table-cell>
          <table:table-cell table:style-name="ce7" office:value-type="float" office:value="0.2" calcext:value-type="float">
            <text:p>0.2</text:p>
          </table:table-cell>
          <table:table-cell table:style-name="ce4"/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0H13M16S" calcext:value-type="time">
            <text:p>20:13:16</text:p>
          </table:table-cell>
          <table:table-cell office:value-type="float" office:value="90" calcext:value-type="float">
            <text:p>90</text:p>
          </table:table-cell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7H02M36S" calcext:value-type="time">
            <text:p>17:02:36</text:p>
          </table:table-cell>
          <table:table-cell office:value-type="float" office:value="71" calcext:value-type="float">
            <text:p>71</text:p>
          </table:table-cell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2022-11-08 00:43:36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style-name="ce8" office:value-type="string" calcext:value-type="string">
            <text:p>2022-11-08 20:14:35</text:p>
          </table:table-cell>
          <table:table-cell table:style-name="ce7" office:value-type="float" office:value="0" calcext:value-type="float">
            <text:p>0</text:p>
          </table:table-cell>
          <table:table-cell table:style-name="ce4"/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0H14M17S" calcext:value-type="time">
            <text:p>20:14:17</text:p>
          </table:table-cell>
          <table:table-cell office:value-type="float" office:value="97" calcext:value-type="float">
            <text:p>97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7H03M36S" calcext:value-type="time">
            <text:p>17:03:36</text:p>
          </table:table-cell>
          <table:table-cell office:value-type="float" office:value="141" calcext:value-type="float">
            <text:p>141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2022-11-08 00:44:36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style-name="ce8" office:value-type="string" calcext:value-type="string">
            <text:p>2022-11-08 20:15:35</text:p>
          </table:table-cell>
          <table:table-cell table:style-name="ce7" office:value-type="float" office:value="0" calcext:value-type="float">
            <text:p>0</text:p>
          </table:table-cell>
          <table:table-cell table:style-name="ce4"/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0H15M17S" calcext:value-type="time">
            <text:p>20:15:17</text:p>
          </table:table-cell>
          <table:table-cell office:value-type="float" office:value="111" calcext:value-type="float">
            <text:p>111</text:p>
          </table:table-cell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7H04M36S" calcext:value-type="time">
            <text:p>17:04:36</text:p>
          </table:table-cell>
          <table:table-cell office:value-type="float" office:value="174" calcext:value-type="float">
            <text:p>174</text:p>
          </table:table-cell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2022-11-08 00:45:36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style-name="ce8" office:value-type="string" calcext:value-type="string">
            <text:p>2022-11-08 20:16:35</text:p>
          </table:table-cell>
          <table:table-cell table:style-name="ce7" office:value-type="float" office:value="0" calcext:value-type="float">
            <text:p>0</text:p>
          </table:table-cell>
          <table:table-cell table:style-name="ce4"/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0H16M17S" calcext:value-type="time">
            <text:p>20:16:17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7H05M36S" calcext:value-type="time">
            <text:p>17:05:36</text:p>
          </table:table-cell>
          <table:table-cell office:value-type="float" office:value="148" calcext:value-type="float">
            <text:p>148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2022-11-08 00:46:36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style-name="ce8" office:value-type="string" calcext:value-type="string">
            <text:p>2022-11-08 20:17:35</text:p>
          </table:table-cell>
          <table:table-cell table:style-name="ce7" office:value-type="float" office:value="0" calcext:value-type="float">
            <text:p>0</text:p>
          </table:table-cell>
          <table:table-cell table:style-name="ce4"/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0H17M17S" calcext:value-type="time">
            <text:p>20:17:17</text:p>
          </table:table-cell>
          <table:table-cell office:value-type="float" office:value="81" calcext:value-type="float">
            <text:p>81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7H06M36S" calcext:value-type="time">
            <text:p>17:06:36</text:p>
          </table:table-cell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2022-11-08 00:47:36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style-name="ce8" office:value-type="string" calcext:value-type="string">
            <text:p>2022-11-08 20:18:35</text:p>
          </table:table-cell>
          <table:table-cell table:style-name="ce7" office:value-type="float" office:value="0" calcext:value-type="float">
            <text:p>0</text:p>
          </table:table-cell>
          <table:table-cell table:style-name="ce4"/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0H18M18S" calcext:value-type="time">
            <text:p>20:18:18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7H07M37S" calcext:value-type="time">
            <text:p>17:07:37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2022-11-08 00:48:36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style-name="ce8" office:value-type="string" calcext:value-type="string">
            <text:p>2022-11-08 20:22:35</text:p>
          </table:table-cell>
          <table:table-cell table:style-name="ce7" office:value-type="float" office:value="0" calcext:value-type="float">
            <text:p>0</text:p>
          </table:table-cell>
          <table:table-cell table:style-name="ce4"/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0H22M19S" calcext:value-type="time">
            <text:p>20:22:19</text:p>
          </table:table-cell>
          <table:table-cell office:value-type="float" office:value="77" calcext:value-type="float">
            <text:p>77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7H08M37S" calcext:value-type="time">
            <text:p>17:08:37</text:p>
          </table:table-cell>
          <table:table-cell office:value-type="float" office:value="64" calcext:value-type="float">
            <text:p>64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2022-11-08 00:49:36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style-name="ce8" office:value-type="string" calcext:value-type="string">
            <text:p>2022-11-08 20:23:35</text:p>
          </table:table-cell>
          <table:table-cell table:style-name="ce7" office:value-type="float" office:value="0" calcext:value-type="float">
            <text:p>0</text:p>
          </table:table-cell>
          <table:table-cell table:style-name="ce4"/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0H23M19S" calcext:value-type="time">
            <text:p>20:23:19</text:p>
          </table:table-cell>
          <table:table-cell office:value-type="float" office:value="99" calcext:value-type="float">
            <text:p>99</text:p>
          </table:table-cell>
          <table:table-cell office:value-type="float" office:value="127" calcext:value-type="float">
            <text:p>127</text:p>
          </table:table-cell>
          <table:table-cell table:number-columns-repeated="2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7H09M37S" calcext:value-type="time">
            <text:p>17:09:37</text:p>
          </table:table-cell>
          <table:table-cell office:value-type="float" office:value="118" calcext:value-type="float">
            <text:p>118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2022-11-08 00:50:36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style-name="ce8" office:value-type="string" calcext:value-type="string">
            <text:p>2022-11-08 20:24:35</text:p>
          </table:table-cell>
          <table:table-cell table:style-name="ce7" office:value-type="float" office:value="0" calcext:value-type="float">
            <text:p>0</text:p>
          </table:table-cell>
          <table:table-cell table:style-name="ce4"/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0H24M19S" calcext:value-type="time">
            <text:p>20:24:19</text:p>
          </table:table-cell>
          <table:table-cell office:value-type="float" office:value="71" calcext:value-type="float">
            <text:p>71</text:p>
          </table:table-cell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7H10M37S" calcext:value-type="time">
            <text:p>17:10:37</text:p>
          </table:table-cell>
          <table:table-cell office:value-type="float" office:value="259" calcext:value-type="float">
            <text:p>259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2022-11-08 00:51:36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style-name="ce8" office:value-type="string" calcext:value-type="string">
            <text:p>2022-11-08 20:25:35</text:p>
          </table:table-cell>
          <table:table-cell table:style-name="ce7" office:value-type="float" office:value="0" calcext:value-type="float">
            <text:p>0</text:p>
          </table:table-cell>
          <table:table-cell table:style-name="ce4"/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0H25M20S" calcext:value-type="time">
            <text:p>20:25:20</text:p>
          </table:table-cell>
          <table:table-cell office:value-type="float" office:value="78" calcext:value-type="float">
            <text:p>78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7H11M37S" calcext:value-type="time">
            <text:p>17:11:37</text:p>
          </table:table-cell>
          <table:table-cell office:value-type="float" office:value="236" calcext:value-type="float">
            <text:p>236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2022-11-08 00:52:36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style-name="ce8" office:value-type="string" calcext:value-type="string">
            <text:p>2022-11-08 20:26:35</text:p>
          </table:table-cell>
          <table:table-cell table:style-name="ce7" office:value-type="float" office:value="0" calcext:value-type="float">
            <text:p>0</text:p>
          </table:table-cell>
          <table:table-cell table:style-name="ce4"/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0H26M20S" calcext:value-type="time">
            <text:p>20:26:20</text:p>
          </table:table-cell>
          <table:table-cell office:value-type="float" office:value="159" calcext:value-type="float">
            <text:p>159</text:p>
          </table:table-cell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7H12M37S" calcext:value-type="time">
            <text:p>17:12:37</text:p>
          </table:table-cell>
          <table:table-cell office:value-type="float" office:value="279" calcext:value-type="float">
            <text:p>279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2022-11-08 00:53:36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style-name="ce8" office:value-type="string" calcext:value-type="string">
            <text:p>2022-11-08 20:27:35</text:p>
          </table:table-cell>
          <table:table-cell table:style-name="ce7" office:value-type="float" office:value="0.2" calcext:value-type="float">
            <text:p>0.2</text:p>
          </table:table-cell>
          <table:table-cell table:style-name="ce4"/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0H27M20S" calcext:value-type="time">
            <text:p>20:27:20</text:p>
          </table:table-cell>
          <table:table-cell office:value-type="float" office:value="60" calcext:value-type="float">
            <text:p>60</text:p>
          </table:table-cell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7H13M37S" calcext:value-type="time">
            <text:p>17:13:37</text:p>
          </table:table-cell>
          <table:table-cell office:value-type="float" office:value="361" calcext:value-type="float">
            <text:p>361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2022-11-08 00:54:36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style-name="ce8" office:value-type="string" calcext:value-type="string">
            <text:p>2022-11-08 20:28:35</text:p>
          </table:table-cell>
          <table:table-cell table:style-name="ce7" office:value-type="float" office:value="0" calcext:value-type="float">
            <text:p>0</text:p>
          </table:table-cell>
          <table:table-cell table:style-name="ce4"/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0H28M21S" calcext:value-type="time">
            <text:p>20:28:21</text:p>
          </table:table-cell>
          <table:table-cell office:value-type="float" office:value="140" calcext:value-type="float">
            <text:p>140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7H14M38S" calcext:value-type="time">
            <text:p>17:14:38</text:p>
          </table:table-cell>
          <table:table-cell office:value-type="float" office:value="347" calcext:value-type="float">
            <text:p>347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2022-11-08 00:55:36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style-name="ce8" office:value-type="string" calcext:value-type="string">
            <text:p>2022-11-08 20:29:35</text:p>
          </table:table-cell>
          <table:table-cell table:style-name="ce7" office:value-type="float" office:value="0" calcext:value-type="float">
            <text:p>0</text:p>
          </table:table-cell>
          <table:table-cell table:style-name="ce4"/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0H29M21S" calcext:value-type="time">
            <text:p>20:29:21</text:p>
          </table:table-cell>
          <table:table-cell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7H15M38S" calcext:value-type="time">
            <text:p>17:15:38</text:p>
          </table:table-cell>
          <table:table-cell office:value-type="float" office:value="376" calcext:value-type="float">
            <text:p>37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2022-11-08 00:56:36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style-name="ce8" office:value-type="string" calcext:value-type="string">
            <text:p>2022-11-08 20:30:35</text:p>
          </table:table-cell>
          <table:table-cell table:style-name="ce7" office:value-type="float" office:value="0" calcext:value-type="float">
            <text:p>0</text:p>
          </table:table-cell>
          <table:table-cell table:style-name="ce4"/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0H30M21S" calcext:value-type="time">
            <text:p>20:30:21</text:p>
          </table:table-cell>
          <table:table-cell office:value-type="float" office:value="119" calcext:value-type="float">
            <text:p>119</text:p>
          </table:table-cell>
          <table:table-cell office:value-type="float" office:value="131" calcext:value-type="float">
            <text:p>131</text:p>
          </table:table-cell>
          <table:table-cell table:number-columns-repeated="2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7H16M38S" calcext:value-type="time">
            <text:p>17:16:38</text:p>
          </table:table-cell>
          <table:table-cell office:value-type="float" office:value="440" calcext:value-type="float">
            <text:p>44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2022-11-08 00:57:36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style-name="ce8" office:value-type="string" calcext:value-type="string">
            <text:p>2022-11-08 20:31:35</text:p>
          </table:table-cell>
          <table:table-cell table:style-name="ce7" office:value-type="float" office:value="0" calcext:value-type="float">
            <text:p>0</text:p>
          </table:table-cell>
          <table:table-cell table:style-name="ce4"/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0H31M22S" calcext:value-type="time">
            <text:p>20:31:22</text:p>
          </table:table-cell>
          <table:table-cell office:value-type="float" office:value="118" calcext:value-type="float">
            <text:p>118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7H17M38S" calcext:value-type="time">
            <text:p>17:17:38</text:p>
          </table:table-cell>
          <table:table-cell office:value-type="float" office:value="417" calcext:value-type="float">
            <text:p>417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2022-11-08 00:58:36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style-name="ce8" office:value-type="string" calcext:value-type="string">
            <text:p>2022-11-08 20:32:35</text:p>
          </table:table-cell>
          <table:table-cell table:style-name="ce7" office:value-type="float" office:value="0" calcext:value-type="float">
            <text:p>0</text:p>
          </table:table-cell>
          <table:table-cell table:style-name="ce4"/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0H32M22S" calcext:value-type="time">
            <text:p>20:32:22</text:p>
          </table:table-cell>
          <table:table-cell office:value-type="float" office:value="125" calcext:value-type="float">
            <text:p>125</text:p>
          </table:table-cell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7H18M38S" calcext:value-type="time">
            <text:p>17:18:38</text:p>
          </table:table-cell>
          <table:table-cell office:value-type="float" office:value="476" calcext:value-type="float">
            <text:p>476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2022-11-08 00:59:36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style-name="ce8" office:value-type="string" calcext:value-type="string">
            <text:p>2022-11-08 20:33:35</text:p>
          </table:table-cell>
          <table:table-cell table:style-name="ce7" office:value-type="float" office:value="0" calcext:value-type="float">
            <text:p>0</text:p>
          </table:table-cell>
          <table:table-cell table:style-name="ce4"/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0H33M22S" calcext:value-type="time">
            <text:p>20:33:22</text:p>
          </table:table-cell>
          <table:table-cell office:value-type="float" office:value="126" calcext:value-type="float">
            <text:p>126</text:p>
          </table:table-cell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7H19M38S" calcext:value-type="time">
            <text:p>17:19:38</text:p>
          </table:table-cell>
          <table:table-cell office:value-type="float" office:value="508" calcext:value-type="float">
            <text:p>508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2022-11-08 01:00:36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style-name="ce8" office:value-type="string" calcext:value-type="string">
            <text:p>2022-11-08 20:34:35</text:p>
          </table:table-cell>
          <table:table-cell table:style-name="ce7" office:value-type="float" office:value="0" calcext:value-type="float">
            <text:p>0</text:p>
          </table:table-cell>
          <table:table-cell table:style-name="ce4"/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0H34M23S" calcext:value-type="time">
            <text:p>20:34:23</text:p>
          </table:table-cell>
          <table:table-cell office:value-type="float" office:value="114" calcext:value-type="float">
            <text:p>114</text:p>
          </table:table-cell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7H20M39S" calcext:value-type="time">
            <text:p>17:20:39</text:p>
          </table:table-cell>
          <table:table-cell office:value-type="float" office:value="493" calcext:value-type="float">
            <text:p>493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2022-11-08 01:01:36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style-name="ce8" office:value-type="string" calcext:value-type="string">
            <text:p>2022-11-08 20:35:35</text:p>
          </table:table-cell>
          <table:table-cell table:style-name="ce7" office:value-type="float" office:value="0.2" calcext:value-type="float">
            <text:p>0.2</text:p>
          </table:table-cell>
          <table:table-cell table:style-name="ce4"/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0H35M23S" calcext:value-type="time">
            <text:p>20:35:23</text:p>
          </table:table-cell>
          <table:table-cell office:value-type="float" office:value="94" calcext:value-type="float">
            <text:p>94</text:p>
          </table:table-cell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7H21M39S" calcext:value-type="time">
            <text:p>17:21:39</text:p>
          </table:table-cell>
          <table:table-cell office:value-type="float" office:value="486" calcext:value-type="float">
            <text:p>486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2022-11-08 01:02:36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style-name="ce8" office:value-type="string" calcext:value-type="string">
            <text:p>2022-11-08 20:36:35</text:p>
          </table:table-cell>
          <table:table-cell table:style-name="ce7" office:value-type="float" office:value="0" calcext:value-type="float">
            <text:p>0</text:p>
          </table:table-cell>
          <table:table-cell table:style-name="ce4"/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0H36M23S" calcext:value-type="time">
            <text:p>20:36:23</text:p>
          </table:table-cell>
          <table:table-cell office:value-type="float" office:value="87" calcext:value-type="float">
            <text:p>87</text:p>
          </table:table-cell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7H22M39S" calcext:value-type="time">
            <text:p>17:22:39</text:p>
          </table:table-cell>
          <table:table-cell office:value-type="float" office:value="509" calcext:value-type="float">
            <text:p>509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2022-11-08 01:03:36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style-name="ce8" office:value-type="string" calcext:value-type="string">
            <text:p>2022-11-08 20:37:35</text:p>
          </table:table-cell>
          <table:table-cell table:style-name="ce7" office:value-type="float" office:value="0" calcext:value-type="float">
            <text:p>0</text:p>
          </table:table-cell>
          <table:table-cell table:style-name="ce4"/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0H37M23S" calcext:value-type="time">
            <text:p>20:37:23</text:p>
          </table:table-cell>
          <table:table-cell office:value-type="float" office:value="81" calcext:value-type="float">
            <text:p>81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7H23M39S" calcext:value-type="time">
            <text:p>17:23:39</text:p>
          </table:table-cell>
          <table:table-cell office:value-type="float" office:value="522" calcext:value-type="float">
            <text:p>522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2022-11-08 01:04:36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style-name="ce8" office:value-type="string" calcext:value-type="string">
            <text:p>2022-11-08 20:38:35</text:p>
          </table:table-cell>
          <table:table-cell table:style-name="ce7" office:value-type="float" office:value="0" calcext:value-type="float">
            <text:p>0</text:p>
          </table:table-cell>
          <table:table-cell table:style-name="ce4"/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0H38M24S" calcext:value-type="time">
            <text:p>20:38:24</text:p>
          </table:table-cell>
          <table:table-cell office:value-type="float" office:value="94" calcext:value-type="float">
            <text:p>94</text:p>
          </table:table-cell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7H24M39S" calcext:value-type="time">
            <text:p>17:24:39</text:p>
          </table:table-cell>
          <table:table-cell office:value-type="float" office:value="543" calcext:value-type="float">
            <text:p>543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2022-11-08 01:05:36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style-name="ce8" office:value-type="string" calcext:value-type="string">
            <text:p>2022-11-08 20:39:35</text:p>
          </table:table-cell>
          <table:table-cell table:style-name="ce7" office:value-type="float" office:value="0" calcext:value-type="float">
            <text:p>0</text:p>
          </table:table-cell>
          <table:table-cell table:style-name="ce4"/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0H39M24S" calcext:value-type="time">
            <text:p>20:39:24</text:p>
          </table:table-cell>
          <table:table-cell office:value-type="float" office:value="247" calcext:value-type="float">
            <text:p>247</text:p>
          </table:table-cell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7H25M39S" calcext:value-type="time">
            <text:p>17:25:39</text:p>
          </table:table-cell>
          <table:table-cell office:value-type="float" office:value="578" calcext:value-type="float">
            <text:p>578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2022-11-08 01:06:36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style-name="ce8" office:value-type="string" calcext:value-type="string">
            <text:p>2022-11-08 20:40:35</text:p>
          </table:table-cell>
          <table:table-cell table:style-name="ce7" office:value-type="float" office:value="0" calcext:value-type="float">
            <text:p>0</text:p>
          </table:table-cell>
          <table:table-cell table:style-name="ce4"/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0H40M24S" calcext:value-type="time">
            <text:p>20:40:24</text:p>
          </table:table-cell>
          <table:table-cell office:value-type="float" office:value="191" calcext:value-type="float">
            <text:p>191</text:p>
          </table:table-cell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7H26M39S" calcext:value-type="time">
            <text:p>17:26:39</text:p>
          </table:table-cell>
          <table:table-cell office:value-type="float" office:value="519" calcext:value-type="float">
            <text:p>519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2022-11-08 01:07:36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style-name="ce8" office:value-type="string" calcext:value-type="string">
            <text:p>2022-11-08 20:41:35</text:p>
          </table:table-cell>
          <table:table-cell table:style-name="ce7" office:value-type="float" office:value="0.2" calcext:value-type="float">
            <text:p>0.2</text:p>
          </table:table-cell>
          <table:table-cell table:style-name="ce4"/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0H41M25S" calcext:value-type="time">
            <text:p>20:41:25</text:p>
          </table:table-cell>
          <table:table-cell office:value-type="float" office:value="67" calcext:value-type="float">
            <text:p>67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7H27M40S" calcext:value-type="time">
            <text:p>17:27:40</text:p>
          </table:table-cell>
          <table:table-cell office:value-type="float" office:value="405" calcext:value-type="float">
            <text:p>405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2022-11-08 01:08:36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style-name="ce8" office:value-type="string" calcext:value-type="string">
            <text:p>2022-11-08 20:42:35</text:p>
          </table:table-cell>
          <table:table-cell table:style-name="ce7" office:value-type="float" office:value="0" calcext:value-type="float">
            <text:p>0</text:p>
          </table:table-cell>
          <table:table-cell table:style-name="ce4"/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0H42M25S" calcext:value-type="time">
            <text:p>20:42:25</text:p>
          </table:table-cell>
          <table:table-cell office:value-type="float" office:value="104" calcext:value-type="float">
            <text:p>104</text:p>
          </table:table-cell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7H28M40S" calcext:value-type="time">
            <text:p>17:28:40</text:p>
          </table:table-cell>
          <table:table-cell office:value-type="float" office:value="483" calcext:value-type="float">
            <text:p>483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2022-11-08 01:09:36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style-name="ce8" office:value-type="string" calcext:value-type="string">
            <text:p>2022-11-08 20:43:35</text:p>
          </table:table-cell>
          <table:table-cell table:style-name="ce7" office:value-type="float" office:value="0" calcext:value-type="float">
            <text:p>0</text:p>
          </table:table-cell>
          <table:table-cell table:style-name="ce4"/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0H43M25S" calcext:value-type="time">
            <text:p>20:43:25</text:p>
          </table:table-cell>
          <table:table-cell office:value-type="float" office:value="119" calcext:value-type="float">
            <text:p>119</text:p>
          </table:table-cell>
          <table:table-cell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7H29M40S" calcext:value-type="time">
            <text:p>17:29:40</text:p>
          </table:table-cell>
          <table:table-cell office:value-type="float" office:value="467" calcext:value-type="float">
            <text:p>467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2022-11-08 01:10:36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style-name="ce8" office:value-type="string" calcext:value-type="string">
            <text:p>2022-11-08 20:44:35</text:p>
          </table:table-cell>
          <table:table-cell table:style-name="ce7" office:value-type="float" office:value="0" calcext:value-type="float">
            <text:p>0</text:p>
          </table:table-cell>
          <table:table-cell table:style-name="ce4"/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0H44M26S" calcext:value-type="time">
            <text:p>20:44:26</text:p>
          </table:table-cell>
          <table:table-cell office:value-type="float" office:value="97" calcext:value-type="float">
            <text:p>97</text:p>
          </table:table-cell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7H30M40S" calcext:value-type="time">
            <text:p>17:30:40</text:p>
          </table:table-cell>
          <table:table-cell office:value-type="float" office:value="479" calcext:value-type="float">
            <text:p>479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2022-11-08 01:11:36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style-name="ce8" office:value-type="string" calcext:value-type="string">
            <text:p>2022-11-08 20:45:35</text:p>
          </table:table-cell>
          <table:table-cell table:style-name="ce7" office:value-type="float" office:value="0" calcext:value-type="float">
            <text:p>0</text:p>
          </table:table-cell>
          <table:table-cell table:style-name="ce4"/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0H45M26S" calcext:value-type="time">
            <text:p>20:45:26</text:p>
          </table:table-cell>
          <table:table-cell office:value-type="float" office:value="113" calcext:value-type="float">
            <text:p>113</text:p>
          </table:table-cell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7H31M40S" calcext:value-type="time">
            <text:p>17:31:40</text:p>
          </table:table-cell>
          <table:table-cell office:value-type="float" office:value="463" calcext:value-type="float">
            <text:p>46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2022-11-08 01:12:36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style-name="ce8" office:value-type="string" calcext:value-type="string">
            <text:p>2022-11-08 20:46:35</text:p>
          </table:table-cell>
          <table:table-cell table:style-name="ce7" office:value-type="float" office:value="0" calcext:value-type="float">
            <text:p>0</text:p>
          </table:table-cell>
          <table:table-cell table:style-name="ce4"/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0H46M26S" calcext:value-type="time">
            <text:p>20:46:26</text:p>
          </table:table-cell>
          <table:table-cell office:value-type="float" office:value="63" calcext:value-type="float">
            <text:p>63</text:p>
          </table:table-cell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7H32M40S" calcext:value-type="time">
            <text:p>17:32:40</text:p>
          </table:table-cell>
          <table:table-cell office:value-type="float" office:value="491" calcext:value-type="float">
            <text:p>491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2022-11-08 01:13:36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style-name="ce8" office:value-type="string" calcext:value-type="string">
            <text:p>2022-11-08 20:47:35</text:p>
          </table:table-cell>
          <table:table-cell table:style-name="ce7" office:value-type="float" office:value="0" calcext:value-type="float">
            <text:p>0</text:p>
          </table:table-cell>
          <table:table-cell table:style-name="ce4"/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0H47M27S" calcext:value-type="time">
            <text:p>20:47:27</text:p>
          </table:table-cell>
          <table:table-cell office:value-type="float" office:value="86" calcext:value-type="float">
            <text:p>86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7H33M41S" calcext:value-type="time">
            <text:p>17:33:41</text:p>
          </table:table-cell>
          <table:table-cell office:value-type="float" office:value="520" calcext:value-type="float">
            <text:p>52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2022-11-08 01:14:36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style-name="ce8" office:value-type="string" calcext:value-type="string">
            <text:p>2022-11-08 20:48:35</text:p>
          </table:table-cell>
          <table:table-cell table:style-name="ce7" office:value-type="float" office:value="0" calcext:value-type="float">
            <text:p>0</text:p>
          </table:table-cell>
          <table:table-cell table:style-name="ce4"/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0H48M27S" calcext:value-type="time">
            <text:p>20:48:27</text:p>
          </table:table-cell>
          <table:table-cell office:value-type="float" office:value="97" calcext:value-type="float">
            <text:p>97</text:p>
          </table:table-cell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7H34M41S" calcext:value-type="time">
            <text:p>17:34:41</text:p>
          </table:table-cell>
          <table:table-cell office:value-type="float" office:value="580" calcext:value-type="float">
            <text:p>58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2022-11-08 01:15:36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style-name="ce8" office:value-type="string" calcext:value-type="string">
            <text:p>2022-11-08 20:49:35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0H49M27S" calcext:value-type="time">
            <text:p>20:49:27</text:p>
          </table:table-cell>
          <table:table-cell office:value-type="float" office:value="114" calcext:value-type="float">
            <text:p>114</text:p>
          </table:table-cell>
          <table:table-cell office:value-type="float" office:value="131" calcext:value-type="float">
            <text:p>131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7H35M41S" calcext:value-type="time">
            <text:p>17:35:41</text:p>
          </table:table-cell>
          <table:table-cell office:value-type="float" office:value="534" calcext:value-type="float">
            <text:p>534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2022-11-08 01:16:36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style-name="ce8" office:value-type="string" calcext:value-type="string">
            <text:p>2022-11-08 20:50:35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0H50M28S" calcext:value-type="time">
            <text:p>20:50:28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7H36M41S" calcext:value-type="time">
            <text:p>17:36:41</text:p>
          </table:table-cell>
          <table:table-cell office:value-type="float" office:value="542" calcext:value-type="float">
            <text:p>542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2022-11-08 01:17:36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style-name="ce8" office:value-type="string" calcext:value-type="string">
            <text:p>2022-11-08 20:51:35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0H51M28S" calcext:value-type="time">
            <text:p>20:51:28</text:p>
          </table:table-cell>
          <table:table-cell office:value-type="float" office:value="74" calcext:value-type="float">
            <text:p>74</text:p>
          </table:table-cell>
          <table:table-cell office:value-type="float" office:value="127" calcext:value-type="float">
            <text:p>127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7H37M41S" calcext:value-type="time">
            <text:p>17:37:41</text:p>
          </table:table-cell>
          <table:table-cell office:value-type="float" office:value="530" calcext:value-type="float">
            <text:p>530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2022-11-08 01:18:36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style-name="ce8" office:value-type="string" calcext:value-type="string">
            <text:p>2022-11-08 20:52:35</text:p>
          </table:table-cell>
          <table:table-cell table:style-name="ce7" office:value-type="float" office:value="0.2" calcext:value-type="float">
            <text:p>0.2</text:p>
          </table:table-cell>
          <table:table-cell/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0H52M28S" calcext:value-type="time">
            <text:p>20:52:28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7H38M41S" calcext:value-type="time">
            <text:p>17:38:41</text:p>
          </table:table-cell>
          <table:table-cell office:value-type="float" office:value="514" calcext:value-type="float">
            <text:p>514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2022-11-08 01:19:36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style-name="ce8" office:value-type="string" calcext:value-type="string">
            <text:p>2022-11-08 20:53:35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0H53M29S" calcext:value-type="time">
            <text:p>20:53:29</text:p>
          </table:table-cell>
          <table:table-cell office:value-type="float" office:value="117" calcext:value-type="float">
            <text:p>117</text:p>
          </table:table-cell>
          <table:table-cell office:value-type="float" office:value="124" calcext:value-type="float">
            <text:p>124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7H39M42S" calcext:value-type="time">
            <text:p>17:39:42</text:p>
          </table:table-cell>
          <table:table-cell office:value-type="float" office:value="549" calcext:value-type="float">
            <text:p>549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2022-11-08 01:20:36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style-name="ce8" office:value-type="string" calcext:value-type="string">
            <text:p>2022-11-08 20:54:35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0H54M29S" calcext:value-type="time">
            <text:p>20:54:29</text:p>
          </table:table-cell>
          <table:table-cell office:value-type="float" office:value="209" calcext:value-type="float">
            <text:p>209</text:p>
          </table:table-cell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7H40M42S" calcext:value-type="time">
            <text:p>17:40:42</text:p>
          </table:table-cell>
          <table:table-cell office:value-type="float" office:value="570" calcext:value-type="float">
            <text:p>57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2022-11-08 01:21:36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style-name="ce8" office:value-type="string" calcext:value-type="string">
            <text:p>2022-11-08 20:55:35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0H55M29S" calcext:value-type="time">
            <text:p>20:55:29</text:p>
          </table:table-cell>
          <table:table-cell office:value-type="float" office:value="166" calcext:value-type="float">
            <text:p>166</text:p>
          </table:table-cell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7H41M42S" calcext:value-type="time">
            <text:p>17:41:42</text:p>
          </table:table-cell>
          <table:table-cell office:value-type="float" office:value="539" calcext:value-type="float">
            <text:p>539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2022-11-08 01:22:36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style-name="ce8" office:value-type="string" calcext:value-type="string">
            <text:p>2022-11-08 20:56:35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0H56M29S" calcext:value-type="time">
            <text:p>20:56:29</text:p>
          </table:table-cell>
          <table:table-cell office:value-type="float" office:value="129" calcext:value-type="float">
            <text:p>129</text:p>
          </table:table-cell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7H42M42S" calcext:value-type="time">
            <text:p>17:42:42</text:p>
          </table:table-cell>
          <table:table-cell office:value-type="float" office:value="553" calcext:value-type="float">
            <text:p>553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2022-11-08 01:23:36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style-name="ce8" office:value-type="string" calcext:value-type="string">
            <text:p>2022-11-08 20:57:35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0H57M30S" calcext:value-type="time">
            <text:p>20:57:30</text:p>
          </table:table-cell>
          <table:table-cell office:value-type="float" office:value="147" calcext:value-type="float">
            <text:p>147</text:p>
          </table:table-cell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7H43M42S" calcext:value-type="time">
            <text:p>17:43:42</text:p>
          </table:table-cell>
          <table:table-cell office:value-type="float" office:value="566" calcext:value-type="float">
            <text:p>56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2022-11-08 01:24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7H44M42S" calcext:value-type="time">
            <text:p>17:44:42</text:p>
          </table:table-cell>
          <table:table-cell office:value-type="float" office:value="571" calcext:value-type="float">
            <text:p>571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string" calcext:value-type="string">
            <text:p>2022-11-08 01:25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7H45M43S" calcext:value-type="time">
            <text:p>17:45:43</text:p>
          </table:table-cell>
          <table:table-cell office:value-type="float" office:value="621" calcext:value-type="float">
            <text:p>62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2022-11-08 01:26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7H46M43S" calcext:value-type="time">
            <text:p>17:46:43</text:p>
          </table:table-cell>
          <table:table-cell office:value-type="float" office:value="554" calcext:value-type="float">
            <text:p>554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2022-11-08 01:27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7H47M43S" calcext:value-type="time">
            <text:p>17:47:43</text:p>
          </table:table-cell>
          <table:table-cell office:value-type="float" office:value="588" calcext:value-type="float">
            <text:p>588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2022-11-08 01:28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7H48M43S" calcext:value-type="time">
            <text:p>17:48:43</text:p>
          </table:table-cell>
          <table:table-cell office:value-type="float" office:value="616" calcext:value-type="float">
            <text:p>616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2022-11-08 01:29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7H49M43S" calcext:value-type="time">
            <text:p>17:49:43</text:p>
          </table:table-cell>
          <table:table-cell office:value-type="float" office:value="623" calcext:value-type="float">
            <text:p>623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2022-11-08 01:30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7H50M43S" calcext:value-type="time">
            <text:p>17:50:43</text:p>
          </table:table-cell>
          <table:table-cell office:value-type="float" office:value="643" calcext:value-type="float">
            <text:p>643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2022-11-08 01:31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7H51M44S" calcext:value-type="time">
            <text:p>17:51:44</text:p>
          </table:table-cell>
          <table:table-cell office:value-type="float" office:value="588" calcext:value-type="float">
            <text:p>588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2022-11-08 01:32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7H52M44S" calcext:value-type="time">
            <text:p>17:52:44</text:p>
          </table:table-cell>
          <table:table-cell office:value-type="float" office:value="612" calcext:value-type="float">
            <text:p>612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2022-11-08 01:33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7H53M44S" calcext:value-type="time">
            <text:p>17:53:44</text:p>
          </table:table-cell>
          <table:table-cell office:value-type="float" office:value="563" calcext:value-type="float">
            <text:p>563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2022-11-08 01:34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7H54M44S" calcext:value-type="time">
            <text:p>17:54:44</text:p>
          </table:table-cell>
          <table:table-cell office:value-type="float" office:value="624" calcext:value-type="float">
            <text:p>624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2022-11-08 01:35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7H55M44S" calcext:value-type="time">
            <text:p>17:55:44</text:p>
          </table:table-cell>
          <table:table-cell office:value-type="float" office:value="570" calcext:value-type="float">
            <text:p>5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2022-11-08 01:36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7H56M44S" calcext:value-type="time">
            <text:p>17:56:44</text:p>
          </table:table-cell>
          <table:table-cell office:value-type="float" office:value="558" calcext:value-type="float">
            <text:p>558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022-11-08 01:37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7H57M45S" calcext:value-type="time">
            <text:p>17:57:45</text:p>
          </table:table-cell>
          <table:table-cell office:value-type="float" office:value="604" calcext:value-type="float">
            <text:p>604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2022-11-08 01:38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7H58M45S" calcext:value-type="time">
            <text:p>17:58:45</text:p>
          </table:table-cell>
          <table:table-cell office:value-type="float" office:value="591" calcext:value-type="float">
            <text:p>591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2022-11-08 01:39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7H59M45S" calcext:value-type="time">
            <text:p>17:59:45</text:p>
          </table:table-cell>
          <table:table-cell office:value-type="float" office:value="620" calcext:value-type="float">
            <text:p>62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2022-11-08 01:40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8H00M45S" calcext:value-type="time">
            <text:p>18:00:45</text:p>
          </table:table-cell>
          <table:table-cell office:value-type="float" office:value="589" calcext:value-type="float">
            <text:p>58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string" calcext:value-type="string">
            <text:p>2022-11-08 01:41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8H01M45S" calcext:value-type="time">
            <text:p>18:01:45</text:p>
          </table:table-cell>
          <table:table-cell office:value-type="float" office:value="595" calcext:value-type="float">
            <text:p>59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2022-11-08 01:42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8H02M46S" calcext:value-type="time">
            <text:p>18:02:46</text:p>
          </table:table-cell>
          <table:table-cell office:value-type="float" office:value="146" calcext:value-type="float">
            <text:p>146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2022-11-08 01:43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8H03M46S" calcext:value-type="time">
            <text:p>18:03:46</text:p>
          </table:table-cell>
          <table:table-cell office:value-type="float" office:value="203" calcext:value-type="float">
            <text:p>203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2022-11-08 01:44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8H04M46S" calcext:value-type="time">
            <text:p>18:04:46</text:p>
          </table:table-cell>
          <table:table-cell office:value-type="float" office:value="292" calcext:value-type="float">
            <text:p>292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2022-11-08 01:45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8H05M46S" calcext:value-type="time">
            <text:p>18:05:46</text:p>
          </table:table-cell>
          <table:table-cell office:value-type="float" office:value="302" calcext:value-type="float">
            <text:p>302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2022-11-08 01:46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8H06M46S" calcext:value-type="time">
            <text:p>18:06:46</text:p>
          </table:table-cell>
          <table:table-cell office:value-type="float" office:value="44" calcext:value-type="float">
            <text:p>44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2022-11-08 01:47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8H07M47S" calcext:value-type="time">
            <text:p>18:07:47</text:p>
          </table:table-cell>
          <table:table-cell office:value-type="float" office:value="139" calcext:value-type="float">
            <text:p>139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string" calcext:value-type="string">
            <text:p>2022-11-08 01:48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8H08M47S" calcext:value-type="time">
            <text:p>18:08:47</text:p>
          </table:table-cell>
          <table:table-cell office:value-type="float" office:value="241" calcext:value-type="float">
            <text:p>24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2022-11-08 01:49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8H09M47S" calcext:value-type="time">
            <text:p>18:09:47</text:p>
          </table:table-cell>
          <table:table-cell office:value-type="float" office:value="270" calcext:value-type="float">
            <text:p>270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2022-11-08 01:50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8H10M47S" calcext:value-type="time">
            <text:p>18:10:47</text:p>
          </table:table-cell>
          <table:table-cell office:value-type="float" office:value="315" calcext:value-type="float">
            <text:p>315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string" calcext:value-type="string">
            <text:p>2022-11-08 01:51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8H11M47S" calcext:value-type="time">
            <text:p>18:11:47</text:p>
          </table:table-cell>
          <table:table-cell office:value-type="float" office:value="39" calcext:value-type="float">
            <text:p>39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2022-11-08 01:52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8H12M47S" calcext:value-type="time">
            <text:p>18:12:47</text:p>
          </table:table-cell>
          <table:table-cell office:value-type="float" office:value="29" calcext:value-type="float">
            <text:p>29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2022-11-08 01:53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8H13M48S" calcext:value-type="time">
            <text:p>18:13:48</text:p>
          </table:table-cell>
          <table:table-cell office:value-type="float" office:value="131" calcext:value-type="float">
            <text:p>131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2022-11-08 01:54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8H14M48S" calcext:value-type="time">
            <text:p>18:14:48</text:p>
          </table:table-cell>
          <table:table-cell office:value-type="float" office:value="136" calcext:value-type="float">
            <text:p>136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2022-11-08 01:55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8H15M48S" calcext:value-type="time">
            <text:p>18:15:48</text:p>
          </table:table-cell>
          <table:table-cell office:value-type="float" office:value="83" calcext:value-type="float">
            <text:p>83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2022-11-08 01:56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8H16M48S" calcext:value-type="time">
            <text:p>18:16:48</text:p>
          </table:table-cell>
          <table:table-cell office:value-type="float" office:value="69" calcext:value-type="float">
            <text:p>69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2022-11-08 01:57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8H17M48S" calcext:value-type="time">
            <text:p>18:17:48</text:p>
          </table:table-cell>
          <table:table-cell office:value-type="float" office:value="86" calcext:value-type="float">
            <text:p>86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string" calcext:value-type="string">
            <text:p>2022-11-08 01:58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8H18M49S" calcext:value-type="time">
            <text:p>18:18:49</text:p>
          </table:table-cell>
          <table:table-cell office:value-type="float" office:value="174" calcext:value-type="float">
            <text:p>174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2022-11-08 01:59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8H19M49S" calcext:value-type="time">
            <text:p>18:19:49</text:p>
          </table:table-cell>
          <table:table-cell office:value-type="float" office:value="321" calcext:value-type="float">
            <text:p>321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2022-11-08 02:00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8H20M49S" calcext:value-type="time">
            <text:p>18:20:49</text:p>
          </table:table-cell>
          <table:table-cell office:value-type="float" office:value="323" calcext:value-type="float">
            <text:p>323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2022-11-08 02:01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8H21M49S" calcext:value-type="time">
            <text:p>18:21:49</text:p>
          </table:table-cell>
          <table:table-cell office:value-type="float" office:value="383" calcext:value-type="float">
            <text:p>383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2022-11-08 02:02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8H22M49S" calcext:value-type="time">
            <text:p>18:22:49</text:p>
          </table:table-cell>
          <table:table-cell office:value-type="float" office:value="411" calcext:value-type="float">
            <text:p>411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2022-11-08 02:03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8H23M50S" calcext:value-type="time">
            <text:p>18:23:50</text:p>
          </table:table-cell>
          <table:table-cell office:value-type="float" office:value="419" calcext:value-type="float">
            <text:p>419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string" calcext:value-type="string">
            <text:p>2022-11-08 02:04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8H24M50S" calcext:value-type="time">
            <text:p>18:24:50</text:p>
          </table:table-cell>
          <table:table-cell office:value-type="float" office:value="487" calcext:value-type="float">
            <text:p>487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2022-11-08 02:05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8H25M50S" calcext:value-type="time">
            <text:p>18:25:50</text:p>
          </table:table-cell>
          <table:table-cell office:value-type="float" office:value="315" calcext:value-type="float">
            <text:p>315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2022-11-08 02:06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8H26M50S" calcext:value-type="time">
            <text:p>18:26:50</text:p>
          </table:table-cell>
          <table:table-cell office:value-type="float" office:value="367" calcext:value-type="float">
            <text:p>367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2022-11-08 02:07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8H27M50S" calcext:value-type="time">
            <text:p>18:27:50</text:p>
          </table:table-cell>
          <table:table-cell office:value-type="float" office:value="405" calcext:value-type="float">
            <text:p>40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2022-11-08 02:08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8H28M51S" calcext:value-type="time">
            <text:p>18:28:51</text:p>
          </table:table-cell>
          <table:table-cell office:value-type="float" office:value="72" calcext:value-type="float">
            <text:p>72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string" calcext:value-type="string">
            <text:p>2022-11-08 02:09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8H29M51S" calcext:value-type="time">
            <text:p>18:29:51</text:p>
          </table:table-cell>
          <table:table-cell office:value-type="float" office:value="136" calcext:value-type="float">
            <text:p>136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string" calcext:value-type="string">
            <text:p>2022-11-08 02:10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8H30M51S" calcext:value-type="time">
            <text:p>18:30:51</text:p>
          </table:table-cell>
          <table:table-cell office:value-type="float" office:value="287" calcext:value-type="float">
            <text:p>28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2022-11-08 02:11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8H31M51S" calcext:value-type="time">
            <text:p>18:31:51</text:p>
          </table:table-cell>
          <table:table-cell office:value-type="float" office:value="399" calcext:value-type="float">
            <text:p>399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2022-11-08 02:12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8H32M51S" calcext:value-type="time">
            <text:p>18:32:51</text:p>
          </table:table-cell>
          <table:table-cell office:value-type="float" office:value="60" calcext:value-type="float">
            <text:p>60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string" calcext:value-type="string">
            <text:p>2022-11-08 02:13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8H33M52S" calcext:value-type="time">
            <text:p>18:33:52</text:p>
          </table:table-cell>
          <table:table-cell office:value-type="float" office:value="231" calcext:value-type="float">
            <text:p>23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2022-11-08 02:14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8H34M52S" calcext:value-type="time">
            <text:p>18:34:52</text:p>
          </table:table-cell>
          <table:table-cell office:value-type="float" office:value="347" calcext:value-type="float">
            <text:p>347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string" calcext:value-type="string">
            <text:p>2022-11-08 02:15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8H35M52S" calcext:value-type="time">
            <text:p>18:35:52</text:p>
          </table:table-cell>
          <table:table-cell office:value-type="float" office:value="417" calcext:value-type="float">
            <text:p>417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2022-11-08 02:16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8H36M52S" calcext:value-type="time">
            <text:p>18:36:52</text:p>
          </table:table-cell>
          <table:table-cell office:value-type="float" office:value="468" calcext:value-type="float">
            <text:p>468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string" calcext:value-type="string">
            <text:p>2022-11-08 02:17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8H37M53S" calcext:value-type="time">
            <text:p>18:37:53</text:p>
          </table:table-cell>
          <table:table-cell office:value-type="float" office:value="596" calcext:value-type="float">
            <text:p>596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2022-11-08 02:18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8H38M53S" calcext:value-type="time">
            <text:p>18:38:53</text:p>
          </table:table-cell>
          <table:table-cell office:value-type="float" office:value="551" calcext:value-type="float">
            <text:p>551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022-11-08 02:19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8H39M53S" calcext:value-type="time">
            <text:p>18:39:53</text:p>
          </table:table-cell>
          <table:table-cell office:value-type="float" office:value="668" calcext:value-type="float">
            <text:p>668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string" calcext:value-type="string">
            <text:p>2022-11-08 02:20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8H40M53S" calcext:value-type="time">
            <text:p>18:40:53</text:p>
          </table:table-cell>
          <table:table-cell office:value-type="float" office:value="637" calcext:value-type="float">
            <text:p>637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string" calcext:value-type="string">
            <text:p>2022-11-08 02:21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8H41M53S" calcext:value-type="time">
            <text:p>18:41:53</text:p>
          </table:table-cell>
          <table:table-cell office:value-type="float" office:value="641" calcext:value-type="float">
            <text:p>641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2022-11-08 02:22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8H42M54S" calcext:value-type="time">
            <text:p>18:42:54</text:p>
          </table:table-cell>
          <table:table-cell office:value-type="float" office:value="619" calcext:value-type="float">
            <text:p>619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2022-11-08 02:23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8H43M54S" calcext:value-type="time">
            <text:p>18:43:54</text:p>
          </table:table-cell>
          <table:table-cell office:value-type="float" office:value="631" calcext:value-type="float">
            <text:p>631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string" calcext:value-type="string">
            <text:p>2022-11-08 02:24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8H44M54S" calcext:value-type="time">
            <text:p>18:44:54</text:p>
          </table:table-cell>
          <table:table-cell office:value-type="float" office:value="710" calcext:value-type="float">
            <text:p>710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2022-11-08 02:25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8H45M54S" calcext:value-type="time">
            <text:p>18:45:54</text:p>
          </table:table-cell>
          <table:table-cell office:value-type="float" office:value="647" calcext:value-type="float">
            <text:p>647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string" calcext:value-type="string">
            <text:p>2022-11-08 02:26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8H46M54S" calcext:value-type="time">
            <text:p>18:46:54</text:p>
          </table:table-cell>
          <table:table-cell office:value-type="float" office:value="659" calcext:value-type="float">
            <text:p>659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string" calcext:value-type="string">
            <text:p>2022-11-08 02:27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8H47M55S" calcext:value-type="time">
            <text:p>18:47:55</text:p>
          </table:table-cell>
          <table:table-cell office:value-type="float" office:value="666" calcext:value-type="float">
            <text:p>66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2022-11-08 02:28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8H48M55S" calcext:value-type="time">
            <text:p>18:48:55</text:p>
          </table:table-cell>
          <table:table-cell office:value-type="float" office:value="708" calcext:value-type="float">
            <text:p>708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string" calcext:value-type="string">
            <text:p>2022-11-08 02:29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8H49M55S" calcext:value-type="time">
            <text:p>18:49:55</text:p>
          </table:table-cell>
          <table:table-cell office:value-type="float" office:value="692" calcext:value-type="float">
            <text:p>69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2022-11-08 02:30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8H50M55S" calcext:value-type="time">
            <text:p>18:50:55</text:p>
          </table:table-cell>
          <table:table-cell office:value-type="float" office:value="683" calcext:value-type="float">
            <text:p>683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string" calcext:value-type="string">
            <text:p>2022-11-08 02:31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8H51M56S" calcext:value-type="time">
            <text:p>18:51:56</text:p>
          </table:table-cell>
          <table:table-cell office:value-type="float" office:value="691" calcext:value-type="float">
            <text:p>69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2022-11-08 02:32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8H52M56S" calcext:value-type="time">
            <text:p>18:52:56</text:p>
          </table:table-cell>
          <table:table-cell office:value-type="float" office:value="715" calcext:value-type="float">
            <text:p>715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2022-11-08 02:33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8H53M56S" calcext:value-type="time">
            <text:p>18:53:56</text:p>
          </table:table-cell>
          <table:table-cell office:value-type="float" office:value="410" calcext:value-type="float">
            <text:p>410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string" calcext:value-type="string">
            <text:p>2022-11-08 02:34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8H54M56S" calcext:value-type="time">
            <text:p>18:54:56</text:p>
          </table:table-cell>
          <table:table-cell office:value-type="float" office:value="562" calcext:value-type="float">
            <text:p>562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string" calcext:value-type="string">
            <text:p>2022-11-08 02:35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8H55M57S" calcext:value-type="time">
            <text:p>18:55:57</text:p>
          </table:table-cell>
          <table:table-cell office:value-type="float" office:value="284" calcext:value-type="float">
            <text:p>284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string" calcext:value-type="string">
            <text:p>2022-11-08 02:36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8H56M57S" calcext:value-type="time">
            <text:p>18:56:57</text:p>
          </table:table-cell>
          <table:table-cell office:value-type="float" office:value="393" calcext:value-type="float">
            <text:p>393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string" calcext:value-type="string">
            <text:p>2022-11-08 02:37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8H57M57S" calcext:value-type="time">
            <text:p>18:57:57</text:p>
          </table:table-cell>
          <table:table-cell office:value-type="float" office:value="453" calcext:value-type="float">
            <text:p>453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2022-11-08 02:38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8H58M57S" calcext:value-type="time">
            <text:p>18:58:57</text:p>
          </table:table-cell>
          <table:table-cell office:value-type="float" office:value="560" calcext:value-type="float">
            <text:p>56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string" calcext:value-type="string">
            <text:p>2022-11-08 02:39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8H59M57S" calcext:value-type="time">
            <text:p>18:59:57</text:p>
          </table:table-cell>
          <table:table-cell office:value-type="float" office:value="632" calcext:value-type="float">
            <text:p>632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2022-11-08 02:40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9H00M58S" calcext:value-type="time">
            <text:p>19:00:58</text:p>
          </table:table-cell>
          <table:table-cell office:value-type="float" office:value="685" calcext:value-type="float">
            <text:p>685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2022-11-08 02:41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9H01M58S" calcext:value-type="time">
            <text:p>19:01:58</text:p>
          </table:table-cell>
          <table:table-cell office:value-type="float" office:value="620" calcext:value-type="float">
            <text:p>620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string" calcext:value-type="string">
            <text:p>2022-11-08 02:42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9H02M58S" calcext:value-type="time">
            <text:p>19:02:58</text:p>
          </table:table-cell>
          <table:table-cell office:value-type="float" office:value="704" calcext:value-type="float">
            <text:p>704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string" calcext:value-type="string">
            <text:p>2022-11-08 02:43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9H03M58S" calcext:value-type="time">
            <text:p>19:03:58</text:p>
          </table:table-cell>
          <table:table-cell office:value-type="float" office:value="689" calcext:value-type="float">
            <text:p>689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2022-11-08 02:44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9H04M59S" calcext:value-type="time">
            <text:p>19:04:59</text:p>
          </table:table-cell>
          <table:table-cell office:value-type="float" office:value="711" calcext:value-type="float">
            <text:p>711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2022-11-08 02:45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9H05M59S" calcext:value-type="time">
            <text:p>19:05:59</text:p>
          </table:table-cell>
          <table:table-cell office:value-type="float" office:value="696" calcext:value-type="float">
            <text:p>696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2022-11-08 02:46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9H06M59S" calcext:value-type="time">
            <text:p>19:06:59</text:p>
          </table:table-cell>
          <table:table-cell office:value-type="float" office:value="658" calcext:value-type="float">
            <text:p>658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2022-11-08 02:47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9H07M59S" calcext:value-type="time">
            <text:p>19:07:59</text:p>
          </table:table-cell>
          <table:table-cell office:value-type="float" office:value="648" calcext:value-type="float">
            <text:p>648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string" calcext:value-type="string">
            <text:p>2022-11-08 02:48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9H09M00S" calcext:value-type="time">
            <text:p>19:09:00</text:p>
          </table:table-cell>
          <table:table-cell office:value-type="float" office:value="695" calcext:value-type="float">
            <text:p>695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2022-11-08 02:49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9H10M00S" calcext:value-type="time">
            <text:p>19:10:00</text:p>
          </table:table-cell>
          <table:table-cell office:value-type="float" office:value="713" calcext:value-type="float">
            <text:p>713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2022-11-08 02:50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9H11M00S" calcext:value-type="time">
            <text:p>19:11:00</text:p>
          </table:table-cell>
          <table:table-cell office:value-type="float" office:value="676" calcext:value-type="float">
            <text:p>676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2022-11-08 02:51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9H12M00S" calcext:value-type="time">
            <text:p>19:12:00</text:p>
          </table:table-cell>
          <table:table-cell office:value-type="float" office:value="680" calcext:value-type="float">
            <text:p>680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2022-11-08 02:52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9H13M01S" calcext:value-type="time">
            <text:p>19:13:01</text:p>
          </table:table-cell>
          <table:table-cell office:value-type="float" office:value="160" calcext:value-type="float">
            <text:p>160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2022-11-08 02:53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9H14M01S" calcext:value-type="time">
            <text:p>19:14:01</text:p>
          </table:table-cell>
          <table:table-cell office:value-type="float" office:value="123" calcext:value-type="float">
            <text:p>123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string" calcext:value-type="string">
            <text:p>2022-11-08 02:54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9H15M01S" calcext:value-type="time">
            <text:p>19:15:01</text:p>
          </table:table-cell>
          <table:table-cell office:value-type="float" office:value="82" calcext:value-type="float">
            <text:p>82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string" calcext:value-type="string">
            <text:p>2022-11-08 02:55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9H16M01S" calcext:value-type="time">
            <text:p>19:16:01</text:p>
          </table:table-cell>
          <table:table-cell office:value-type="float" office:value="89" calcext:value-type="float">
            <text:p>89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2022-11-08 02:56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9H17M01S" calcext:value-type="time">
            <text:p>19:17:01</text:p>
          </table:table-cell>
          <table:table-cell office:value-type="float" office:value="184" calcext:value-type="float">
            <text:p>184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2022-11-08 02:57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9H18M02S" calcext:value-type="time">
            <text:p>19:18:02</text:p>
          </table:table-cell>
          <table:table-cell office:value-type="float" office:value="201" calcext:value-type="float">
            <text:p>201</text:p>
          </table:table-cell>
          <table:table-cell office:value-type="float" office:value="238" calcext:value-type="float">
            <text:p>238</text:p>
          </table:table-cell>
          <table:table-cell/>
          <table:table-cell office:value-type="string" calcext:value-type="string">
            <text:p>2022-11-08 02:58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9H19M02S" calcext:value-type="time">
            <text:p>19:19:02</text:p>
          </table:table-cell>
          <table:table-cell office:value-type="float" office:value="232" calcext:value-type="float">
            <text:p>232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022-11-08 02:59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9H20M02S" calcext:value-type="time">
            <text:p>19:20:02</text:p>
          </table:table-cell>
          <table:table-cell office:value-type="float" office:value="116" calcext:value-type="float">
            <text:p>116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string" calcext:value-type="string">
            <text:p>2022-11-08 03:00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9H21M02S" calcext:value-type="time">
            <text:p>19:21:02</text:p>
          </table:table-cell>
          <table:table-cell office:value-type="float" office:value="193" calcext:value-type="float">
            <text:p>193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2022-11-08 03:01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9H22M03S" calcext:value-type="time">
            <text:p>19:22:03</text:p>
          </table:table-cell>
          <table:table-cell office:value-type="float" office:value="146" calcext:value-type="float">
            <text:p>146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2022-11-08 03:02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9H23M03S" calcext:value-type="time">
            <text:p>19:23:03</text:p>
          </table:table-cell>
          <table:table-cell office:value-type="float" office:value="244" calcext:value-type="float">
            <text:p>244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2022-11-08 03:03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9H24M03S" calcext:value-type="time">
            <text:p>19:24:03</text:p>
          </table:table-cell>
          <table:table-cell office:value-type="float" office:value="204" calcext:value-type="float">
            <text:p>204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2022-11-08 03:04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9H25M03S" calcext:value-type="time">
            <text:p>19:25:03</text:p>
          </table:table-cell>
          <table:table-cell office:value-type="float" office:value="300" calcext:value-type="float">
            <text:p>300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string" calcext:value-type="string">
            <text:p>2022-11-08 03:05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9H26M04S" calcext:value-type="time">
            <text:p>19:26:04</text:p>
          </table:table-cell>
          <table:table-cell office:value-type="float" office:value="155" calcext:value-type="float">
            <text:p>155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022-11-08 03:06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9H27M04S" calcext:value-type="time">
            <text:p>19:27:04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2022-11-08 03:07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9H28M04S" calcext:value-type="time">
            <text:p>19:28:04</text:p>
          </table:table-cell>
          <table:table-cell office:value-type="float" office:value="166" calcext:value-type="float">
            <text:p>166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string" calcext:value-type="string">
            <text:p>2022-11-08 03:08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9H29M04S" calcext:value-type="time">
            <text:p>19:29:04</text:p>
          </table:table-cell>
          <table:table-cell office:value-type="float" office:value="87" calcext:value-type="float">
            <text:p>87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string" calcext:value-type="string">
            <text:p>2022-11-08 03:09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9H30M05S" calcext:value-type="time">
            <text:p>19:30:05</text:p>
          </table:table-cell>
          <table:table-cell office:value-type="float" office:value="92" calcext:value-type="float">
            <text:p>92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string" calcext:value-type="string">
            <text:p>2022-11-08 03:10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9H31M05S" calcext:value-type="time">
            <text:p>19:31:05</text:p>
          </table:table-cell>
          <table:table-cell office:value-type="float" office:value="111" calcext:value-type="float">
            <text:p>111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string" calcext:value-type="string">
            <text:p>2022-11-08 03:11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9H32M05S" calcext:value-type="time">
            <text:p>19:32:05</text:p>
          </table:table-cell>
          <table:table-cell office:value-type="float" office:value="162" calcext:value-type="float">
            <text:p>162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2022-11-08 03:12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9H33M05S" calcext:value-type="time">
            <text:p>19:33:05</text:p>
          </table:table-cell>
          <table:table-cell office:value-type="float" office:value="135" calcext:value-type="float">
            <text:p>135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2022-11-08 03:13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9H34M06S" calcext:value-type="time">
            <text:p>19:34:06</text:p>
          </table:table-cell>
          <table:table-cell office:value-type="float" office:value="173" calcext:value-type="float">
            <text:p>17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string" calcext:value-type="string">
            <text:p>2022-11-08 03:14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9H35M06S" calcext:value-type="time">
            <text:p>19:35:06</text:p>
          </table:table-cell>
          <table:table-cell office:value-type="float" office:value="79" calcext:value-type="float">
            <text:p>79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2022-11-08 03:15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9H36M06S" calcext:value-type="time">
            <text:p>19:36:06</text:p>
          </table:table-cell>
          <table:table-cell office:value-type="float" office:value="50" calcext:value-type="float">
            <text:p>5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2022-11-08 03:16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9H37M06S" calcext:value-type="time">
            <text:p>19:37:06</text:p>
          </table:table-cell>
          <table:table-cell office:value-type="float" office:value="78" calcext:value-type="float">
            <text:p>78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string" calcext:value-type="string">
            <text:p>2022-11-08 03:17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9H38M07S" calcext:value-type="time">
            <text:p>19:38:07</text:p>
          </table:table-cell>
          <table:table-cell office:value-type="float" office:value="16" calcext:value-type="float">
            <text:p>16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string" calcext:value-type="string">
            <text:p>2022-11-08 03:18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9H39M07S" calcext:value-type="time">
            <text:p>19:39:07</text:p>
          </table:table-cell>
          <table:table-cell office:value-type="float" office:value="67" calcext:value-type="float">
            <text:p>67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2022-11-08 03:19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9H40M07S" calcext:value-type="time">
            <text:p>19:40:07</text:p>
          </table:table-cell>
          <table:table-cell office:value-type="float" office:value="92" calcext:value-type="float">
            <text:p>9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string" calcext:value-type="string">
            <text:p>2022-11-08 03:20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9H41M08S" calcext:value-type="time">
            <text:p>19:41:08</text:p>
          </table:table-cell>
          <table:table-cell office:value-type="float" office:value="95" calcext:value-type="float">
            <text:p>95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string" calcext:value-type="string">
            <text:p>2022-11-08 03:21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9H42M08S" calcext:value-type="time">
            <text:p>19:42:08</text:p>
          </table:table-cell>
          <table:table-cell office:value-type="float" office:value="57" calcext:value-type="float">
            <text:p>57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string" calcext:value-type="string">
            <text:p>2022-11-08 03:22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9H43M08S" calcext:value-type="time">
            <text:p>19:43:08</text:p>
          </table:table-cell>
          <table:table-cell office:value-type="float" office:value="42" calcext:value-type="float">
            <text:p>42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2022-11-08 03:23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9H44M08S" calcext:value-type="time">
            <text:p>19:44:08</text:p>
          </table:table-cell>
          <table:table-cell office:value-type="float" office:value="71" calcext:value-type="float">
            <text:p>71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2022-11-08 03:24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9H45M09S" calcext:value-type="time">
            <text:p>19:45:09</text:p>
          </table:table-cell>
          <table:table-cell office:value-type="float" office:value="61" calcext:value-type="float">
            <text:p>61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2022-11-08 03:25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9H46M09S" calcext:value-type="time">
            <text:p>19:46:09</text:p>
          </table:table-cell>
          <table:table-cell office:value-type="float" office:value="88" calcext:value-type="float">
            <text:p>88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2022-11-08 03:26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9H47M09S" calcext:value-type="time">
            <text:p>19:47:09</text:p>
          </table:table-cell>
          <table:table-cell office:value-type="float" office:value="205" calcext:value-type="float">
            <text:p>205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string" calcext:value-type="string">
            <text:p>2022-11-08 03:27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9H48M09S" calcext:value-type="time">
            <text:p>19:48:09</text:p>
          </table:table-cell>
          <table:table-cell office:value-type="float" office:value="174" calcext:value-type="float">
            <text:p>17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string" calcext:value-type="string">
            <text:p>2022-11-08 03:28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9H49M10S" calcext:value-type="time">
            <text:p>19:49:10</text:p>
          </table:table-cell>
          <table:table-cell office:value-type="float" office:value="284" calcext:value-type="float">
            <text:p>284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string" calcext:value-type="string">
            <text:p>2022-11-08 03:29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9H50M10S" calcext:value-type="time">
            <text:p>19:50:10</text:p>
          </table:table-cell>
          <table:table-cell office:value-type="float" office:value="268" calcext:value-type="float">
            <text:p>268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2022-11-08 03:30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9H51M10S" calcext:value-type="time">
            <text:p>19:51:10</text:p>
          </table:table-cell>
          <table:table-cell office:value-type="float" office:value="489" calcext:value-type="float">
            <text:p>489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2022-11-08 03:31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9H52M10S" calcext:value-type="time">
            <text:p>19:52:10</text:p>
          </table:table-cell>
          <table:table-cell office:value-type="float" office:value="176" calcext:value-type="float">
            <text:p>176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2022-11-08 03:32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9H53M11S" calcext:value-type="time">
            <text:p>19:53:11</text:p>
          </table:table-cell>
          <table:table-cell office:value-type="float" office:value="192" calcext:value-type="float">
            <text:p>192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2022-11-08 03:33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9H54M11S" calcext:value-type="time">
            <text:p>19:54:11</text:p>
          </table:table-cell>
          <table:table-cell office:value-type="float" office:value="125" calcext:value-type="float">
            <text:p>125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string" calcext:value-type="string">
            <text:p>2022-11-08 03:34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9H55M11S" calcext:value-type="time">
            <text:p>19:55:11</text:p>
          </table:table-cell>
          <table:table-cell office:value-type="float" office:value="186" calcext:value-type="float">
            <text:p>186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2022-11-08 03:35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9H56M12S" calcext:value-type="time">
            <text:p>19:56:12</text:p>
          </table:table-cell>
          <table:table-cell office:value-type="float" office:value="143" calcext:value-type="float">
            <text:p>143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string" calcext:value-type="string">
            <text:p>2022-11-08 03:36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9H57M12S" calcext:value-type="time">
            <text:p>19:57:12</text:p>
          </table:table-cell>
          <table:table-cell office:value-type="float" office:value="129" calcext:value-type="float">
            <text:p>12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string" calcext:value-type="string">
            <text:p>2022-11-08 03:37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9H58M12S" calcext:value-type="time">
            <text:p>19:58:12</text:p>
          </table:table-cell>
          <table:table-cell office:value-type="float" office:value="81" calcext:value-type="float">
            <text:p>81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022-11-08 03:38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19H59M12S" calcext:value-type="time">
            <text:p>19:59:12</text:p>
          </table:table-cell>
          <table:table-cell office:value-type="float" office:value="231" calcext:value-type="float">
            <text:p>231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2022-11-08 03:39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0H00M13S" calcext:value-type="time">
            <text:p>20:00:13</text:p>
          </table:table-cell>
          <table:table-cell office:value-type="float" office:value="140" calcext:value-type="float">
            <text:p>140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string" calcext:value-type="string">
            <text:p>2022-11-08 03:40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0H01M13S" calcext:value-type="time">
            <text:p>20:01:13</text:p>
          </table:table-cell>
          <table:table-cell office:value-type="float" office:value="169" calcext:value-type="float">
            <text:p>169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2022-11-08 03:41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0H02M13S" calcext:value-type="time">
            <text:p>20:02:13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string" calcext:value-type="string">
            <text:p>2022-11-08 03:42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0H03M13S" calcext:value-type="time">
            <text:p>20:03:13</text:p>
          </table:table-cell>
          <table:table-cell office:value-type="float" office:value="139" calcext:value-type="float">
            <text:p>139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string" calcext:value-type="string">
            <text:p>2022-11-08 03:43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0H04M14S" calcext:value-type="time">
            <text:p>20:04:14</text:p>
          </table:table-cell>
          <table:table-cell office:value-type="float" office:value="34" calcext:value-type="float">
            <text:p>34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2022-11-08 03:44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0H05M14S" calcext:value-type="time">
            <text:p>20:05:14</text:p>
          </table:table-cell>
          <table:table-cell office:value-type="float" office:value="102" calcext:value-type="float">
            <text:p>102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2022-11-08 03:45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0H06M14S" calcext:value-type="time">
            <text:p>20:06:14</text:p>
          </table:table-cell>
          <table:table-cell office:value-type="float" office:value="75" calcext:value-type="float">
            <text:p>75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string" calcext:value-type="string">
            <text:p>2022-11-08 03:46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0H07M15S" calcext:value-type="time">
            <text:p>20:07:15</text:p>
          </table:table-cell>
          <table:table-cell office:value-type="float" office:value="68" calcext:value-type="float">
            <text:p>68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2022-11-08 03:47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0H08M15S" calcext:value-type="time">
            <text:p>20:08:15</text:p>
          </table:table-cell>
          <table:table-cell office:value-type="float" office:value="119" calcext:value-type="float">
            <text:p>119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string" calcext:value-type="string">
            <text:p>2022-11-08 03:48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0H09M15S" calcext:value-type="time">
            <text:p>20:09:15</text:p>
          </table:table-cell>
          <table:table-cell office:value-type="float" office:value="75" calcext:value-type="float">
            <text:p>75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2022-11-08 03:49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0H10M15S" calcext:value-type="time">
            <text:p>20:10:15</text:p>
          </table:table-cell>
          <table:table-cell office:value-type="float" office:value="78" calcext:value-type="float">
            <text:p>78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string" calcext:value-type="string">
            <text:p>2022-11-08 03:50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0H11M16S" calcext:value-type="time">
            <text:p>20:11:16</text:p>
          </table:table-cell>
          <table:table-cell office:value-type="float" office:value="175" calcext:value-type="float">
            <text:p>175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2022-11-08 03:51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0H12M16S" calcext:value-type="time">
            <text:p>20:12:16</text:p>
          </table:table-cell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string" calcext:value-type="string">
            <text:p>2022-11-08 03:52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0H13M16S" calcext:value-type="time">
            <text:p>20:13:16</text:p>
          </table:table-cell>
          <table:table-cell office:value-type="float" office:value="90" calcext:value-type="float">
            <text:p>90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2022-11-08 03:53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0H14M17S" calcext:value-type="time">
            <text:p>20:14:17</text:p>
          </table:table-cell>
          <table:table-cell office:value-type="float" office:value="97" calcext:value-type="float">
            <text:p>97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2022-11-08 03:54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0H15M17S" calcext:value-type="time">
            <text:p>20:15:17</text:p>
          </table:table-cell>
          <table:table-cell office:value-type="float" office:value="111" calcext:value-type="float">
            <text:p>111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2022-11-08 03:55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0H16M17S" calcext:value-type="time">
            <text:p>20:16:17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2022-11-08 03:56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0H17M17S" calcext:value-type="time">
            <text:p>20:17:17</text:p>
          </table:table-cell>
          <table:table-cell office:value-type="float" office:value="81" calcext:value-type="float">
            <text:p>81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string" calcext:value-type="string">
            <text:p>2022-11-08 03:57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0H18M18S" calcext:value-type="time">
            <text:p>20:18:18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2022-11-08 03:58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0H19M18S" calcext:value-type="time">
            <text:p>20:19:18</text:p>
          </table:table-cell>
          <table:table-cell office:value-type="float" office:value="127" calcext:value-type="float">
            <text:p>127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2022-11-08 03:59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0H20M18S" calcext:value-type="time">
            <text:p>20:20:18</text:p>
          </table:table-cell>
          <table:table-cell office:value-type="float" office:value="58" calcext:value-type="float">
            <text:p>58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2022-11-08 04:00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0H21M19S" calcext:value-type="time">
            <text:p>20:21:19</text:p>
          </table:table-cell>
          <table:table-cell office:value-type="float" office:value="111" calcext:value-type="float">
            <text:p>111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string" calcext:value-type="string">
            <text:p>2022-11-08 04:01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0H22M19S" calcext:value-type="time">
            <text:p>20:22:19</text:p>
          </table:table-cell>
          <table:table-cell office:value-type="float" office:value="77" calcext:value-type="float">
            <text:p>77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2022-11-08 04:02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0H23M19S" calcext:value-type="time">
            <text:p>20:23:19</text:p>
          </table:table-cell>
          <table:table-cell office:value-type="float" office:value="99" calcext:value-type="float">
            <text:p>99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string" calcext:value-type="string">
            <text:p>2022-11-08 04:03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0H24M19S" calcext:value-type="time">
            <text:p>20:24:19</text:p>
          </table:table-cell>
          <table:table-cell office:value-type="float" office:value="71" calcext:value-type="float">
            <text:p>71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2022-11-08 04:04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0H25M20S" calcext:value-type="time">
            <text:p>20:25:20</text:p>
          </table:table-cell>
          <table:table-cell office:value-type="float" office:value="78" calcext:value-type="float">
            <text:p>78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2022-11-08 04:05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0H26M20S" calcext:value-type="time">
            <text:p>20:26:20</text:p>
          </table:table-cell>
          <table:table-cell office:value-type="float" office:value="159" calcext:value-type="float">
            <text:p>159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2022-11-08 04:06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0H27M20S" calcext:value-type="time">
            <text:p>20:27:20</text:p>
          </table:table-cell>
          <table:table-cell office:value-type="float" office:value="60" calcext:value-type="float">
            <text:p>60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string" calcext:value-type="string">
            <text:p>2022-11-08 04:07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0H28M21S" calcext:value-type="time">
            <text:p>20:28:21</text:p>
          </table:table-cell>
          <table:table-cell office:value-type="float" office:value="140" calcext:value-type="float">
            <text:p>140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string" calcext:value-type="string">
            <text:p>2022-11-08 04:08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0H29M21S" calcext:value-type="time">
            <text:p>20:29:21</text:p>
          </table:table-cell>
          <table:table-cell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2022-11-08 04:09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0H30M21S" calcext:value-type="time">
            <text:p>20:30:21</text:p>
          </table:table-cell>
          <table:table-cell office:value-type="float" office:value="119" calcext:value-type="float">
            <text:p>119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string" calcext:value-type="string">
            <text:p>2022-11-08 04:10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0H31M22S" calcext:value-type="time">
            <text:p>20:31:22</text:p>
          </table:table-cell>
          <table:table-cell office:value-type="float" office:value="118" calcext:value-type="float">
            <text:p>118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string" calcext:value-type="string">
            <text:p>2022-11-08 04:11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0H32M22S" calcext:value-type="time">
            <text:p>20:32:22</text:p>
          </table:table-cell>
          <table:table-cell office:value-type="float" office:value="125" calcext:value-type="float">
            <text:p>125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2022-11-08 04:12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0H33M22S" calcext:value-type="time">
            <text:p>20:33:22</text:p>
          </table:table-cell>
          <table:table-cell office:value-type="float" office:value="126" calcext:value-type="float">
            <text:p>126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string" calcext:value-type="string">
            <text:p>2022-11-08 04:13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0H34M23S" calcext:value-type="time">
            <text:p>20:34:23</text:p>
          </table:table-cell>
          <table:table-cell office:value-type="float" office:value="114" calcext:value-type="float">
            <text:p>114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2022-11-08 04:14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0H35M23S" calcext:value-type="time">
            <text:p>20:35:23</text:p>
          </table:table-cell>
          <table:table-cell office:value-type="float" office:value="94" calcext:value-type="float">
            <text:p>94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string" calcext:value-type="string">
            <text:p>2022-11-08 04:15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0H36M23S" calcext:value-type="time">
            <text:p>20:36:23</text:p>
          </table:table-cell>
          <table:table-cell office:value-type="float" office:value="87" calcext:value-type="float">
            <text:p>87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string" calcext:value-type="string">
            <text:p>2022-11-08 04:16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0H37M23S" calcext:value-type="time">
            <text:p>20:37:23</text:p>
          </table:table-cell>
          <table:table-cell office:value-type="float" office:value="81" calcext:value-type="float">
            <text:p>81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string" calcext:value-type="string">
            <text:p>2022-11-08 04:17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0H38M24S" calcext:value-type="time">
            <text:p>20:38:24</text:p>
          </table:table-cell>
          <table:table-cell office:value-type="float" office:value="94" calcext:value-type="float">
            <text:p>94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2022-11-08 04:18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0H39M24S" calcext:value-type="time">
            <text:p>20:39:24</text:p>
          </table:table-cell>
          <table:table-cell office:value-type="float" office:value="247" calcext:value-type="float">
            <text:p>247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string" calcext:value-type="string">
            <text:p>2022-11-08 04:19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0H40M24S" calcext:value-type="time">
            <text:p>20:40:24</text:p>
          </table:table-cell>
          <table:table-cell office:value-type="float" office:value="191" calcext:value-type="float">
            <text:p>191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string" calcext:value-type="string">
            <text:p>2022-11-08 04:20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0H41M25S" calcext:value-type="time">
            <text:p>20:41:25</text:p>
          </table:table-cell>
          <table:table-cell office:value-type="float" office:value="67" calcext:value-type="float">
            <text:p>67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2022-11-08 04:21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0H42M25S" calcext:value-type="time">
            <text:p>20:42:25</text:p>
          </table:table-cell>
          <table:table-cell office:value-type="float" office:value="104" calcext:value-type="float">
            <text:p>104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2022-11-08 04:22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0H43M25S" calcext:value-type="time">
            <text:p>20:43:25</text:p>
          </table:table-cell>
          <table:table-cell office:value-type="float" office:value="119" calcext:value-type="float">
            <text:p>119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2022-11-08 04:23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0H44M26S" calcext:value-type="time">
            <text:p>20:44:26</text:p>
          </table:table-cell>
          <table:table-cell office:value-type="float" office:value="97" calcext:value-type="float">
            <text:p>97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string" calcext:value-type="string">
            <text:p>2022-11-08 04:24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0H45M26S" calcext:value-type="time">
            <text:p>20:45:26</text:p>
          </table:table-cell>
          <table:table-cell office:value-type="float" office:value="113" calcext:value-type="float">
            <text:p>113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2022-11-08 04:25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0H46M26S" calcext:value-type="time">
            <text:p>20:46:26</text:p>
          </table:table-cell>
          <table:table-cell office:value-type="float" office:value="63" calcext:value-type="float">
            <text:p>63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2022-11-08 04:26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0H47M27S" calcext:value-type="time">
            <text:p>20:47:27</text:p>
          </table:table-cell>
          <table:table-cell office:value-type="float" office:value="86" calcext:value-type="float">
            <text:p>86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string" calcext:value-type="string">
            <text:p>2022-11-08 04:27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0H48M27S" calcext:value-type="time">
            <text:p>20:48:27</text:p>
          </table:table-cell>
          <table:table-cell office:value-type="float" office:value="97" calcext:value-type="float">
            <text:p>97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2022-11-08 04:28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0H49M27S" calcext:value-type="time">
            <text:p>20:49:27</text:p>
          </table:table-cell>
          <table:table-cell office:value-type="float" office:value="114" calcext:value-type="float">
            <text:p>114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string" calcext:value-type="string">
            <text:p>2022-11-08 04:29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0H50M28S" calcext:value-type="time">
            <text:p>20:50:28</text:p>
          </table:table-cell>
          <table:table-cell table:number-columns-repeated="2" office:value-type="float" office:value="120" calcext:value-type="float">
            <text:p>120</text:p>
          </table:table-cell>
          <table:table-cell/>
          <table:table-cell office:value-type="string" calcext:value-type="string">
            <text:p>2022-11-08 04:30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0H51M28S" calcext:value-type="time">
            <text:p>20:51:28</text:p>
          </table:table-cell>
          <table:table-cell office:value-type="float" office:value="74" calcext:value-type="float">
            <text:p>74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string" calcext:value-type="string">
            <text:p>2022-11-08 04:31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0H52M28S" calcext:value-type="time">
            <text:p>20:52:28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2022-11-08 04:32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0H53M29S" calcext:value-type="time">
            <text:p>20:53:29</text:p>
          </table:table-cell>
          <table:table-cell office:value-type="float" office:value="117" calcext:value-type="float">
            <text:p>1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2022-11-08 04:33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0H54M29S" calcext:value-type="time">
            <text:p>20:54:29</text:p>
          </table:table-cell>
          <table:table-cell office:value-type="float" office:value="209" calcext:value-type="float">
            <text:p>209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string" calcext:value-type="string">
            <text:p>2022-11-08 04:34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0H55M29S" calcext:value-type="time">
            <text:p>20:55:29</text:p>
          </table:table-cell>
          <table:table-cell office:value-type="float" office:value="166" calcext:value-type="float">
            <text:p>166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string" calcext:value-type="string">
            <text:p>2022-11-08 04:35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0H56M29S" calcext:value-type="time">
            <text:p>20:56:29</text:p>
          </table:table-cell>
          <table:table-cell office:value-type="float" office:value="129" calcext:value-type="float">
            <text:p>129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022-11-08 04:36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0H57M30S" calcext:value-type="time">
            <text:p>20:57:30</text:p>
          </table:table-cell>
          <table:table-cell office:value-type="float" office:value="147" calcext:value-type="float">
            <text:p>147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2022-11-08 04:37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0H58M30S" calcext:value-type="time">
            <text:p>20:58:30</text:p>
          </table:table-cell>
          <table:table-cell office:value-type="float" office:value="216" calcext:value-type="float">
            <text:p>216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string" calcext:value-type="string">
            <text:p>2022-11-08 04:38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0H59M30S" calcext:value-type="time">
            <text:p>20:59:30</text:p>
          </table:table-cell>
          <table:table-cell office:value-type="float" office:value="275" calcext:value-type="float">
            <text:p>275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2022-11-08 04:39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1H00M31S" calcext:value-type="time">
            <text:p>21:00:31</text:p>
          </table:table-cell>
          <table:table-cell office:value-type="float" office:value="112" calcext:value-type="float">
            <text:p>112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string" calcext:value-type="string">
            <text:p>2022-11-08 04:40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1H01M31S" calcext:value-type="time">
            <text:p>21:01:31</text:p>
          </table:table-cell>
          <table:table-cell office:value-type="float" office:value="197" calcext:value-type="float">
            <text:p>197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2022-11-08 04:41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1H02M31S" calcext:value-type="time">
            <text:p>21:02:31</text:p>
          </table:table-cell>
          <table:table-cell office:value-type="float" office:value="113" calcext:value-type="float">
            <text:p>113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2022-11-08 04:42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1H03M32S" calcext:value-type="time">
            <text:p>21:03:32</text:p>
          </table:table-cell>
          <table:table-cell office:value-type="float" office:value="138" calcext:value-type="float">
            <text:p>13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string" calcext:value-type="string">
            <text:p>2022-11-08 04:43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1H04M32S" calcext:value-type="time">
            <text:p>21:04:32</text:p>
          </table:table-cell>
          <table:table-cell office:value-type="float" office:value="172" calcext:value-type="float">
            <text:p>172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string" calcext:value-type="string">
            <text:p>2022-11-08 04:44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1H05M32S" calcext:value-type="time">
            <text:p>21:05:32</text:p>
          </table:table-cell>
          <table:table-cell office:value-type="float" office:value="423" calcext:value-type="float">
            <text:p>423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2022-11-08 04:45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1H06M33S" calcext:value-type="time">
            <text:p>21:06:33</text:p>
          </table:table-cell>
          <table:table-cell office:value-type="float" office:value="382" calcext:value-type="float">
            <text:p>382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string" calcext:value-type="string">
            <text:p>2022-11-08 04:46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1H07M33S" calcext:value-type="time">
            <text:p>21:07:33</text:p>
          </table:table-cell>
          <table:table-cell office:value-type="float" office:value="415" calcext:value-type="float">
            <text:p>415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2022-11-08 04:47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1H08M33S" calcext:value-type="time">
            <text:p>21:08:33</text:p>
          </table:table-cell>
          <table:table-cell office:value-type="float" office:value="577" calcext:value-type="float">
            <text:p>577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2022-11-08 04:48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1H09M34S" calcext:value-type="time">
            <text:p>21:09:34</text:p>
          </table:table-cell>
          <table:table-cell office:value-type="float" office:value="657" calcext:value-type="float">
            <text:p>657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2022-11-08 04:49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1H10M34S" calcext:value-type="time">
            <text:p>21:10:34</text:p>
          </table:table-cell>
          <table:table-cell office:value-type="float" office:value="669" calcext:value-type="float">
            <text:p>669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string" calcext:value-type="string">
            <text:p>2022-11-08 04:50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1H11M34S" calcext:value-type="time">
            <text:p>21:11:34</text:p>
          </table:table-cell>
          <table:table-cell office:value-type="float" office:value="702" calcext:value-type="float">
            <text:p>702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2022-11-08 04:51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1H12M35S" calcext:value-type="time">
            <text:p>21:12:35</text:p>
          </table:table-cell>
          <table:table-cell office:value-type="float" office:value="707" calcext:value-type="float">
            <text:p>707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022-11-08 04:52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1H13M35S" calcext:value-type="time">
            <text:p>21:13:35</text:p>
          </table:table-cell>
          <table:table-cell office:value-type="float" office:value="639" calcext:value-type="float">
            <text:p>639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string" calcext:value-type="string">
            <text:p>2022-11-08 04:53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1H14M35S" calcext:value-type="time">
            <text:p>21:14:35</text:p>
          </table:table-cell>
          <table:table-cell office:value-type="float" office:value="691" calcext:value-type="float">
            <text:p>691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2022-11-08 04:54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1H15M36S" calcext:value-type="time">
            <text:p>21:15:36</text:p>
          </table:table-cell>
          <table:table-cell office:value-type="float" office:value="658" calcext:value-type="float">
            <text:p>658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2022-11-08 04:55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1H16M36S" calcext:value-type="time">
            <text:p>21:16:36</text:p>
          </table:table-cell>
          <table:table-cell office:value-type="float" office:value="678" calcext:value-type="float">
            <text:p>678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2022-11-08 04:56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1H17M36S" calcext:value-type="time">
            <text:p>21:17:36</text:p>
          </table:table-cell>
          <table:table-cell office:value-type="float" office:value="635" calcext:value-type="float">
            <text:p>6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2022-11-08 04:57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1H18M37S" calcext:value-type="time">
            <text:p>21:18:37</text:p>
          </table:table-cell>
          <table:table-cell office:value-type="float" office:value="699" calcext:value-type="float">
            <text:p>699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2022-11-08 04:58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1H19M37S" calcext:value-type="time">
            <text:p>21:19:37</text:p>
          </table:table-cell>
          <table:table-cell office:value-type="float" office:value="698" calcext:value-type="float">
            <text:p>698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2022-11-08 04:59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1H20M37S" calcext:value-type="time">
            <text:p>21:20:37</text:p>
          </table:table-cell>
          <table:table-cell office:value-type="float" office:value="670" calcext:value-type="float">
            <text:p>670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string" calcext:value-type="string">
            <text:p>2022-11-08 05:00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1H21M38S" calcext:value-type="time">
            <text:p>21:21:38</text:p>
          </table:table-cell>
          <table:table-cell office:value-type="float" office:value="697" calcext:value-type="float">
            <text:p>697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2022-11-08 05:01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1H22M38S" calcext:value-type="time">
            <text:p>21:22:38</text:p>
          </table:table-cell>
          <table:table-cell office:value-type="float" office:value="668" calcext:value-type="float">
            <text:p>668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string" calcext:value-type="string">
            <text:p>2022-11-08 05:02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1H23M38S" calcext:value-type="time">
            <text:p>21:23:38</text:p>
          </table:table-cell>
          <table:table-cell office:value-type="float" office:value="694" calcext:value-type="float">
            <text:p>694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2022-11-08 05:03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1H24M39S" calcext:value-type="time">
            <text:p>21:24:39</text:p>
          </table:table-cell>
          <table:table-cell office:value-type="float" office:value="715" calcext:value-type="float">
            <text:p>715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2022-11-08 05:04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1H25M39S" calcext:value-type="time">
            <text:p>21:25:39</text:p>
          </table:table-cell>
          <table:table-cell office:value-type="float" office:value="670" calcext:value-type="float">
            <text:p>670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2022-11-08 05:05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1H26M39S" calcext:value-type="time">
            <text:p>21:26:39</text:p>
          </table:table-cell>
          <table:table-cell office:value-type="float" office:value="683" calcext:value-type="float">
            <text:p>68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string" calcext:value-type="string">
            <text:p>2022-11-08 05:06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1H27M40S" calcext:value-type="time">
            <text:p>21:27:40</text:p>
          </table:table-cell>
          <table:table-cell office:value-type="float" office:value="673" calcext:value-type="float">
            <text:p>673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string" calcext:value-type="string">
            <text:p>2022-11-08 05:07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1H28M40S" calcext:value-type="time">
            <text:p>21:28:40</text:p>
          </table:table-cell>
          <table:table-cell office:value-type="float" office:value="681" calcext:value-type="float">
            <text:p>681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2022-11-08 05:08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1H29M40S" calcext:value-type="time">
            <text:p>21:29:40</text:p>
          </table:table-cell>
          <table:table-cell office:value-type="float" office:value="699" calcext:value-type="float">
            <text:p>699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2022-11-08 05:09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1H30M41S" calcext:value-type="time">
            <text:p>21:30:41</text:p>
          </table:table-cell>
          <table:table-cell office:value-type="float" office:value="679" calcext:value-type="float">
            <text:p>679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string" calcext:value-type="string">
            <text:p>2022-11-08 05:10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1H31M41S" calcext:value-type="time">
            <text:p>21:31:41</text:p>
          </table:table-cell>
          <table:table-cell office:value-type="float" office:value="669" calcext:value-type="float">
            <text:p>669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2022-11-08 05:11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1H32M42S" calcext:value-type="time">
            <text:p>21:32:42</text:p>
          </table:table-cell>
          <table:table-cell office:value-type="float" office:value="700" calcext:value-type="float">
            <text:p>700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string" calcext:value-type="string">
            <text:p>2022-11-08 05:12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1H33M42S" calcext:value-type="time">
            <text:p>21:33:42</text:p>
          </table:table-cell>
          <table:table-cell office:value-type="float" office:value="680" calcext:value-type="float">
            <text:p>680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2022-11-08 05:13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1H34M42S" calcext:value-type="time">
            <text:p>21:34:42</text:p>
          </table:table-cell>
          <table:table-cell office:value-type="float" office:value="653" calcext:value-type="float">
            <text:p>653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2022-11-08 05:14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1H35M43S" calcext:value-type="time">
            <text:p>21:35:43</text:p>
          </table:table-cell>
          <table:table-cell office:value-type="float" office:value="736" calcext:value-type="float">
            <text:p>736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2022-11-08 05:15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1H36M43S" calcext:value-type="time">
            <text:p>21:36:43</text:p>
          </table:table-cell>
          <table:table-cell office:value-type="float" office:value="658" calcext:value-type="float">
            <text:p>658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string" calcext:value-type="string">
            <text:p>2022-11-08 05:16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1H37M43S" calcext:value-type="time">
            <text:p>21:37:43</text:p>
          </table:table-cell>
          <table:table-cell office:value-type="float" office:value="758" calcext:value-type="float">
            <text:p>758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2022-11-08 05:17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1H38M44S" calcext:value-type="time">
            <text:p>21:38:44</text:p>
          </table:table-cell>
          <table:table-cell office:value-type="float" office:value="666" calcext:value-type="float">
            <text:p>666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2022-11-08 05:18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1H39M44S" calcext:value-type="time">
            <text:p>21:39:44</text:p>
          </table:table-cell>
          <table:table-cell office:value-type="float" office:value="664" calcext:value-type="float">
            <text:p>664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string" calcext:value-type="string">
            <text:p>2022-11-08 05:19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1H40M44S" calcext:value-type="time">
            <text:p>21:40:44</text:p>
          </table:table-cell>
          <table:table-cell office:value-type="float" office:value="669" calcext:value-type="float">
            <text:p>669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2022-11-08 05:20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1H41M45S" calcext:value-type="time">
            <text:p>21:41:45</text:p>
          </table:table-cell>
          <table:table-cell office:value-type="float" office:value="643" calcext:value-type="float">
            <text:p>643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2022-11-08 05:21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1H42M45S" calcext:value-type="time">
            <text:p>21:42:45</text:p>
          </table:table-cell>
          <table:table-cell office:value-type="float" office:value="725" calcext:value-type="float">
            <text:p>725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2022-11-08 05:22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1H43M45S" calcext:value-type="time">
            <text:p>21:43:45</text:p>
          </table:table-cell>
          <table:table-cell office:value-type="float" office:value="700" calcext:value-type="float">
            <text:p>700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string" calcext:value-type="string">
            <text:p>2022-11-08 05:23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1H44M46S" calcext:value-type="time">
            <text:p>21:44:46</text:p>
          </table:table-cell>
          <table:table-cell office:value-type="float" office:value="712" calcext:value-type="float">
            <text:p>712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string" calcext:value-type="string">
            <text:p>2022-11-08 05:24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1H45M46S" calcext:value-type="time">
            <text:p>21:45:46</text:p>
          </table:table-cell>
          <table:table-cell office:value-type="float" office:value="690" calcext:value-type="float">
            <text:p>690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2022-11-08 05:25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1H46M47S" calcext:value-type="time">
            <text:p>21:46:47</text:p>
          </table:table-cell>
          <table:table-cell office:value-type="float" office:value="714" calcext:value-type="float">
            <text:p>714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2022-11-08 05:26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1H47M47S" calcext:value-type="time">
            <text:p>21:47:47</text:p>
          </table:table-cell>
          <table:table-cell office:value-type="float" office:value="662" calcext:value-type="float">
            <text:p>66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2022-11-08 05:27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1H48M47S" calcext:value-type="time">
            <text:p>21:48:47</text:p>
          </table:table-cell>
          <table:table-cell office:value-type="float" office:value="659" calcext:value-type="float">
            <text:p>659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string" calcext:value-type="string">
            <text:p>2022-11-08 05:28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1H49M48S" calcext:value-type="time">
            <text:p>21:49:48</text:p>
          </table:table-cell>
          <table:table-cell office:value-type="float" office:value="662" calcext:value-type="float">
            <text:p>662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2022-11-08 05:29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1H50M48S" calcext:value-type="time">
            <text:p>21:50:48</text:p>
          </table:table-cell>
          <table:table-cell office:value-type="float" office:value="680" calcext:value-type="float">
            <text:p>68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2022-11-08 05:30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1H51M48S" calcext:value-type="time">
            <text:p>21:51:48</text:p>
          </table:table-cell>
          <table:table-cell office:value-type="float" office:value="663" calcext:value-type="float">
            <text:p>663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2022-11-08 05:31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1H52M49S" calcext:value-type="time">
            <text:p>21:52:49</text:p>
          </table:table-cell>
          <table:table-cell office:value-type="float" office:value="691" calcext:value-type="float">
            <text:p>691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2022-11-08 05:32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1H53M49S" calcext:value-type="time">
            <text:p>21:53:49</text:p>
          </table:table-cell>
          <table:table-cell office:value-type="float" office:value="702" calcext:value-type="float">
            <text:p>702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string" calcext:value-type="string">
            <text:p>2022-11-08 05:33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1H54M49S" calcext:value-type="time">
            <text:p>21:54:49</text:p>
          </table:table-cell>
          <table:table-cell office:value-type="float" office:value="665" calcext:value-type="float">
            <text:p>665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2022-11-08 05:34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1H55M50S" calcext:value-type="time">
            <text:p>21:55:50</text:p>
          </table:table-cell>
          <table:table-cell office:value-type="float" office:value="707" calcext:value-type="float">
            <text:p>707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string" calcext:value-type="string">
            <text:p>2022-11-08 05:35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1H56M50S" calcext:value-type="time">
            <text:p>21:56:50</text:p>
          </table:table-cell>
          <table:table-cell office:value-type="float" office:value="639" calcext:value-type="float">
            <text:p>63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2022-11-08 05:36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1H57M50S" calcext:value-type="time">
            <text:p>21:57:50</text:p>
          </table:table-cell>
          <table:table-cell office:value-type="float" office:value="691" calcext:value-type="float">
            <text:p>691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2022-11-08 05:37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1H58M51S" calcext:value-type="time">
            <text:p>21:58:51</text:p>
          </table:table-cell>
          <table:table-cell office:value-type="float" office:value="629" calcext:value-type="float">
            <text:p>629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string" calcext:value-type="string">
            <text:p>2022-11-08 05:38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1H59M51S" calcext:value-type="time">
            <text:p>21:59:51</text:p>
          </table:table-cell>
          <table:table-cell office:value-type="float" office:value="669" calcext:value-type="float">
            <text:p>66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string" calcext:value-type="string">
            <text:p>2022-11-08 05:39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2H00M52S" calcext:value-type="time">
            <text:p>22:00:52</text:p>
          </table:table-cell>
          <table:table-cell office:value-type="float" office:value="674" calcext:value-type="float">
            <text:p>67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string" calcext:value-type="string">
            <text:p>2022-11-08 05:40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2H01M52S" calcext:value-type="time">
            <text:p>22:01:52</text:p>
          </table:table-cell>
          <table:table-cell office:value-type="float" office:value="655" calcext:value-type="float">
            <text:p>655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2022-11-08 05:41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2H02M52S" calcext:value-type="time">
            <text:p>22:02:52</text:p>
          </table:table-cell>
          <table:table-cell office:value-type="float" office:value="661" calcext:value-type="float">
            <text:p>661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string" calcext:value-type="string">
            <text:p>2022-11-08 05:42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2H03M53S" calcext:value-type="time">
            <text:p>22:03:53</text:p>
          </table:table-cell>
          <table:table-cell office:value-type="float" office:value="659" calcext:value-type="float">
            <text:p>659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string" calcext:value-type="string">
            <text:p>2022-11-08 05:43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2H04M53S" calcext:value-type="time">
            <text:p>22:04:53</text:p>
          </table:table-cell>
          <table:table-cell office:value-type="float" office:value="639" calcext:value-type="float">
            <text:p>639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2022-11-08 05:44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2H05M53S" calcext:value-type="time">
            <text:p>22:05:53</text:p>
          </table:table-cell>
          <table:table-cell office:value-type="float" office:value="662" calcext:value-type="float">
            <text:p>662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string" calcext:value-type="string">
            <text:p>2022-11-08 05:45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2H06M54S" calcext:value-type="time">
            <text:p>22:06:54</text:p>
          </table:table-cell>
          <table:table-cell office:value-type="float" office:value="666" calcext:value-type="float">
            <text:p>666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2022-11-08 05:46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2H07M54S" calcext:value-type="time">
            <text:p>22:07:54</text:p>
          </table:table-cell>
          <table:table-cell office:value-type="float" office:value="687" calcext:value-type="float">
            <text:p>687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2022-11-08 05:47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2H08M55S" calcext:value-type="time">
            <text:p>22:08:55</text:p>
          </table:table-cell>
          <table:table-cell office:value-type="float" office:value="710" calcext:value-type="float">
            <text:p>710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2022-11-08 05:48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2H09M55S" calcext:value-type="time">
            <text:p>22:09:55</text:p>
          </table:table-cell>
          <table:table-cell office:value-type="float" office:value="660" calcext:value-type="float">
            <text:p>660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string" calcext:value-type="string">
            <text:p>2022-11-08 05:49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2H10M55S" calcext:value-type="time">
            <text:p>22:10:55</text:p>
          </table:table-cell>
          <table:table-cell office:value-type="float" office:value="656" calcext:value-type="float">
            <text:p>656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2022-11-08 05:50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2H11M56S" calcext:value-type="time">
            <text:p>22:11:56</text:p>
          </table:table-cell>
          <table:table-cell office:value-type="float" office:value="697" calcext:value-type="float">
            <text:p>697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string" calcext:value-type="string">
            <text:p>2022-11-08 05:51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2H12M56S" calcext:value-type="time">
            <text:p>22:12:56</text:p>
          </table:table-cell>
          <table:table-cell office:value-type="float" office:value="643" calcext:value-type="float">
            <text:p>643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2022-11-08 05:52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2H13M57S" calcext:value-type="time">
            <text:p>22:13:57</text:p>
          </table:table-cell>
          <table:table-cell office:value-type="float" office:value="663" calcext:value-type="float">
            <text:p>663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string" calcext:value-type="string">
            <text:p>2022-11-08 05:53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2H14M57S" calcext:value-type="time">
            <text:p>22:14:57</text:p>
          </table:table-cell>
          <table:table-cell office:value-type="float" office:value="654" calcext:value-type="float">
            <text:p>65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2022-11-08 05:54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2H15M57S" calcext:value-type="time">
            <text:p>22:15:57</text:p>
          </table:table-cell>
          <table:table-cell office:value-type="float" office:value="643" calcext:value-type="float">
            <text:p>643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string" calcext:value-type="string">
            <text:p>2022-11-08 05:55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2H16M58S" calcext:value-type="time">
            <text:p>22:16:58</text:p>
          </table:table-cell>
          <table:table-cell office:value-type="float" office:value="626" calcext:value-type="float">
            <text:p>626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2022-11-08 05:56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2H17M58S" calcext:value-type="time">
            <text:p>22:17:58</text:p>
          </table:table-cell>
          <table:table-cell office:value-type="float" office:value="578" calcext:value-type="float">
            <text:p>578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2022-11-08 05:57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2H18M58S" calcext:value-type="time">
            <text:p>22:18:58</text:p>
          </table:table-cell>
          <table:table-cell office:value-type="float" office:value="603" calcext:value-type="float">
            <text:p>603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string" calcext:value-type="string">
            <text:p>2022-11-08 05:58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2H19M59S" calcext:value-type="time">
            <text:p>22:19:59</text:p>
          </table:table-cell>
          <table:table-cell office:value-type="float" office:value="572" calcext:value-type="float">
            <text:p>572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string" calcext:value-type="string">
            <text:p>2022-11-08 05:59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2H20M59S" calcext:value-type="time">
            <text:p>22:20:59</text:p>
          </table:table-cell>
          <table:table-cell office:value-type="float" office:value="578" calcext:value-type="float">
            <text:p>578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2022-11-08 06:00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2H22M00S" calcext:value-type="time">
            <text:p>22:22:00</text:p>
          </table:table-cell>
          <table:table-cell office:value-type="float" office:value="582" calcext:value-type="float">
            <text:p>58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2022-11-08 06:01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2H23M00S" calcext:value-type="time">
            <text:p>22:23:00</text:p>
          </table:table-cell>
          <table:table-cell office:value-type="float" office:value="587" calcext:value-type="float">
            <text:p>587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2022-11-08 06:02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2H24M00S" calcext:value-type="time">
            <text:p>22:24:00</text:p>
          </table:table-cell>
          <table:table-cell office:value-type="float" office:value="579" calcext:value-type="float">
            <text:p>579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2022-11-08 06:03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2H25M01S" calcext:value-type="time">
            <text:p>22:25:01</text:p>
          </table:table-cell>
          <table:table-cell office:value-type="float" office:value="568" calcext:value-type="float">
            <text:p>568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2022-11-08 06:04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2H26M01S" calcext:value-type="time">
            <text:p>22:26:01</text:p>
          </table:table-cell>
          <table:table-cell office:value-type="float" office:value="525" calcext:value-type="float">
            <text:p>525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2022-11-08 06:05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2H27M02S" calcext:value-type="time">
            <text:p>22:27:02</text:p>
          </table:table-cell>
          <table:table-cell office:value-type="float" office:value="572" calcext:value-type="float">
            <text:p>572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2022-11-08 06:06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2H28M02S" calcext:value-type="time">
            <text:p>22:28:02</text:p>
          </table:table-cell>
          <table:table-cell office:value-type="float" office:value="543" calcext:value-type="float">
            <text:p>543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2022-11-08 06:07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2H29M02S" calcext:value-type="time">
            <text:p>22:29:02</text:p>
          </table:table-cell>
          <table:table-cell office:value-type="float" office:value="556" calcext:value-type="float">
            <text:p>556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2022-11-08 06:08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2H30M03S" calcext:value-type="time">
            <text:p>22:30:03</text:p>
          </table:table-cell>
          <table:table-cell office:value-type="float" office:value="586" calcext:value-type="float">
            <text:p>58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2022-11-08 06:09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2H31M03S" calcext:value-type="time">
            <text:p>22:31:03</text:p>
          </table:table-cell>
          <table:table-cell office:value-type="float" office:value="526" calcext:value-type="float">
            <text:p>526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2022-11-08 06:10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2H32M03S" calcext:value-type="time">
            <text:p>22:32:03</text:p>
          </table:table-cell>
          <table:table-cell office:value-type="float" office:value="567" calcext:value-type="float">
            <text:p>567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022-11-08 06:11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2H33M04S" calcext:value-type="time">
            <text:p>22:33:04</text:p>
          </table:table-cell>
          <table:table-cell office:value-type="float" office:value="545" calcext:value-type="float">
            <text:p>545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2022-11-08 06:12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2H34M04S" calcext:value-type="time">
            <text:p>22:34:04</text:p>
          </table:table-cell>
          <table:table-cell office:value-type="float" office:value="524" calcext:value-type="float">
            <text:p>524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string" calcext:value-type="string">
            <text:p>2022-11-08 06:13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2H35M05S" calcext:value-type="time">
            <text:p>22:35:05</text:p>
          </table:table-cell>
          <table:table-cell office:value-type="float" office:value="575" calcext:value-type="float">
            <text:p>575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2022-11-08 06:14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2H36M05S" calcext:value-type="time">
            <text:p>22:36:05</text:p>
          </table:table-cell>
          <table:table-cell office:value-type="float" office:value="563" calcext:value-type="float">
            <text:p>563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2022-11-08 06:15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2H37M05S" calcext:value-type="time">
            <text:p>22:37:05</text:p>
          </table:table-cell>
          <table:table-cell office:value-type="float" office:value="552" calcext:value-type="float">
            <text:p>552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2022-11-08 06:16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2H38M06S" calcext:value-type="time">
            <text:p>22:38:06</text:p>
          </table:table-cell>
          <table:table-cell office:value-type="float" office:value="583" calcext:value-type="float">
            <text:p>583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2022-11-08 06:17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2H39M06S" calcext:value-type="time">
            <text:p>22:39:06</text:p>
          </table:table-cell>
          <table:table-cell office:value-type="float" office:value="547" calcext:value-type="float">
            <text:p>547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string" calcext:value-type="string">
            <text:p>2022-11-08 06:18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2H40M07S" calcext:value-type="time">
            <text:p>22:40:07</text:p>
          </table:table-cell>
          <table:table-cell office:value-type="float" office:value="579" calcext:value-type="float">
            <text:p>579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2022-11-08 06:19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2H41M07S" calcext:value-type="time">
            <text:p>22:41:07</text:p>
          </table:table-cell>
          <table:table-cell office:value-type="float" office:value="560" calcext:value-type="float">
            <text:p>560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2022-11-08 06:20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2H42M07S" calcext:value-type="time">
            <text:p>22:42:07</text:p>
          </table:table-cell>
          <table:table-cell office:value-type="float" office:value="537" calcext:value-type="float">
            <text:p>537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string" calcext:value-type="string">
            <text:p>2022-11-08 06:21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2H43M08S" calcext:value-type="time">
            <text:p>22:43:08</text:p>
          </table:table-cell>
          <table:table-cell office:value-type="float" office:value="535" calcext:value-type="float">
            <text:p>535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2022-11-08 06:22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2H44M08S" calcext:value-type="time">
            <text:p>22:44:08</text:p>
          </table:table-cell>
          <table:table-cell office:value-type="float" office:value="522" calcext:value-type="float">
            <text:p>522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string" calcext:value-type="string">
            <text:p>2022-11-08 06:23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2H45M09S" calcext:value-type="time">
            <text:p>22:45:09</text:p>
          </table:table-cell>
          <table:table-cell office:value-type="float" office:value="550" calcext:value-type="float">
            <text:p>550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2022-11-08 06:24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2H46M09S" calcext:value-type="time">
            <text:p>22:46:09</text:p>
          </table:table-cell>
          <table:table-cell office:value-type="float" office:value="570" calcext:value-type="float">
            <text:p>570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2022-11-08 06:25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2H47M10S" calcext:value-type="time">
            <text:p>22:47:10</text:p>
          </table:table-cell>
          <table:table-cell office:value-type="float" office:value="539" calcext:value-type="float">
            <text:p>539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2022-11-08 06:26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2H48M10S" calcext:value-type="time">
            <text:p>22:48:10</text:p>
          </table:table-cell>
          <table:table-cell office:value-type="float" office:value="573" calcext:value-type="float">
            <text:p>573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2022-11-08 06:27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2H49M10S" calcext:value-type="time">
            <text:p>22:49:10</text:p>
          </table:table-cell>
          <table:table-cell office:value-type="float" office:value="594" calcext:value-type="float">
            <text:p>594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string" calcext:value-type="string">
            <text:p>2022-11-08 06:28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2H50M11S" calcext:value-type="time">
            <text:p>22:50:11</text:p>
          </table:table-cell>
          <table:table-cell office:value-type="float" office:value="579" calcext:value-type="float">
            <text:p>579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2022-11-08 06:29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2H51M11S" calcext:value-type="time">
            <text:p>22:51:11</text:p>
          </table:table-cell>
          <table:table-cell office:value-type="float" office:value="601" calcext:value-type="float">
            <text:p>601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2022-11-08 06:30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2H52M12S" calcext:value-type="time">
            <text:p>22:52:12</text:p>
          </table:table-cell>
          <table:table-cell office:value-type="float" office:value="623" calcext:value-type="float">
            <text:p>623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2022-11-08 06:31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2H53M12S" calcext:value-type="time">
            <text:p>22:53:12</text:p>
          </table:table-cell>
          <table:table-cell office:value-type="float" office:value="595" calcext:value-type="float">
            <text:p>595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2022-11-08 06:32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2H54M12S" calcext:value-type="time">
            <text:p>22:54:12</text:p>
          </table:table-cell>
          <table:table-cell office:value-type="float" office:value="601" calcext:value-type="float">
            <text:p>601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2022-11-08 06:33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2H55M13S" calcext:value-type="time">
            <text:p>22:55:13</text:p>
          </table:table-cell>
          <table:table-cell office:value-type="float" office:value="553" calcext:value-type="float">
            <text:p>553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2022-11-08 06:34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2H56M13S" calcext:value-type="time">
            <text:p>22:56:13</text:p>
          </table:table-cell>
          <table:table-cell office:value-type="float" office:value="610" calcext:value-type="float">
            <text:p>610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2022-11-08 06:35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2H57M14S" calcext:value-type="time">
            <text:p>22:57:14</text:p>
          </table:table-cell>
          <table:table-cell office:value-type="float" office:value="564" calcext:value-type="float">
            <text:p>56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string" calcext:value-type="string">
            <text:p>2022-11-08 06:36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2H58M14S" calcext:value-type="time">
            <text:p>22:58:14</text:p>
          </table:table-cell>
          <table:table-cell office:value-type="float" office:value="589" calcext:value-type="float">
            <text:p>589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string" calcext:value-type="string">
            <text:p>2022-11-08 06:37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2H59M14S" calcext:value-type="time">
            <text:p>22:59:14</text:p>
          </table:table-cell>
          <table:table-cell office:value-type="float" office:value="559" calcext:value-type="float">
            <text:p>559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string" calcext:value-type="string">
            <text:p>2022-11-08 06:38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3H00M15S" calcext:value-type="time">
            <text:p>23:00:15</text:p>
          </table:table-cell>
          <table:table-cell office:value-type="float" office:value="625" calcext:value-type="float">
            <text:p>625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2022-11-08 06:39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3H01M15S" calcext:value-type="time">
            <text:p>23:01:15</text:p>
          </table:table-cell>
          <table:table-cell office:value-type="float" office:value="575" calcext:value-type="float">
            <text:p>575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2022-11-08 06:40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3H02M16S" calcext:value-type="time">
            <text:p>23:02:16</text:p>
          </table:table-cell>
          <table:table-cell office:value-type="float" office:value="575" calcext:value-type="float">
            <text:p>575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2022-11-08 06:41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3H03M16S" calcext:value-type="time">
            <text:p>23:03:16</text:p>
          </table:table-cell>
          <table:table-cell office:value-type="float" office:value="582" calcext:value-type="float">
            <text:p>582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2022-11-08 06:42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3H04M17S" calcext:value-type="time">
            <text:p>23:04:17</text:p>
          </table:table-cell>
          <table:table-cell office:value-type="float" office:value="605" calcext:value-type="float">
            <text:p>605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string" calcext:value-type="string">
            <text:p>2022-11-08 06:43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3H05M17S" calcext:value-type="time">
            <text:p>23:05:17</text:p>
          </table:table-cell>
          <table:table-cell office:value-type="float" office:value="607" calcext:value-type="float">
            <text:p>607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2022-11-08 06:44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3H06M17S" calcext:value-type="time">
            <text:p>23:06:17</text:p>
          </table:table-cell>
          <table:table-cell office:value-type="float" office:value="594" calcext:value-type="float">
            <text:p>594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string" calcext:value-type="string">
            <text:p>2022-11-08 06:45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3H07M18S" calcext:value-type="time">
            <text:p>23:07:18</text:p>
          </table:table-cell>
          <table:table-cell office:value-type="float" office:value="605" calcext:value-type="float">
            <text:p>60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string" calcext:value-type="string">
            <text:p>2022-11-08 06:46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3H08M18S" calcext:value-type="time">
            <text:p>23:08:18</text:p>
          </table:table-cell>
          <table:table-cell office:value-type="float" office:value="623" calcext:value-type="float">
            <text:p>623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2022-11-08 06:47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3H09M19S" calcext:value-type="time">
            <text:p>23:09:19</text:p>
          </table:table-cell>
          <table:table-cell office:value-type="float" office:value="572" calcext:value-type="float">
            <text:p>572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string" calcext:value-type="string">
            <text:p>2022-11-08 06:48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3H10M19S" calcext:value-type="time">
            <text:p>23:10:19</text:p>
          </table:table-cell>
          <table:table-cell office:value-type="float" office:value="554" calcext:value-type="float">
            <text:p>554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022-11-08 06:49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3H11M19S" calcext:value-type="time">
            <text:p>23:11:19</text:p>
          </table:table-cell>
          <table:table-cell office:value-type="float" office:value="527" calcext:value-type="float">
            <text:p>52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2022-11-08 06:50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3H12M20S" calcext:value-type="time">
            <text:p>23:12:20</text:p>
          </table:table-cell>
          <table:table-cell office:value-type="float" office:value="559" calcext:value-type="float">
            <text:p>559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string" calcext:value-type="string">
            <text:p>2022-11-08 06:51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3H13M20S" calcext:value-type="time">
            <text:p>23:13:20</text:p>
          </table:table-cell>
          <table:table-cell office:value-type="float" office:value="535" calcext:value-type="float">
            <text:p>535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2022-11-08 06:52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3H14M21S" calcext:value-type="time">
            <text:p>23:14:21</text:p>
          </table:table-cell>
          <table:table-cell office:value-type="float" office:value="604" calcext:value-type="float">
            <text:p>604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2022-11-08 06:53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3H15M21S" calcext:value-type="time">
            <text:p>23:15:21</text:p>
          </table:table-cell>
          <table:table-cell office:value-type="float" office:value="602" calcext:value-type="float">
            <text:p>602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2022-11-08 06:54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3H16M22S" calcext:value-type="time">
            <text:p>23:16:22</text:p>
          </table:table-cell>
          <table:table-cell office:value-type="float" office:value="570" calcext:value-type="float">
            <text:p>570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2022-11-08 06:55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3H17M22S" calcext:value-type="time">
            <text:p>23:17:22</text:p>
          </table:table-cell>
          <table:table-cell office:value-type="float" office:value="628" calcext:value-type="float">
            <text:p>628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2022-11-08 06:56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3H18M23S" calcext:value-type="time">
            <text:p>23:18:23</text:p>
          </table:table-cell>
          <table:table-cell office:value-type="float" office:value="577" calcext:value-type="float">
            <text:p>577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2022-11-08 06:57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3H19M23S" calcext:value-type="time">
            <text:p>23:19:23</text:p>
          </table:table-cell>
          <table:table-cell office:value-type="float" office:value="606" calcext:value-type="float">
            <text:p>606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2022-11-08 06:58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3H20M23S" calcext:value-type="time">
            <text:p>23:20:23</text:p>
          </table:table-cell>
          <table:table-cell office:value-type="float" office:value="623" calcext:value-type="float">
            <text:p>623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2022-11-08 06:59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3H21M24S" calcext:value-type="time">
            <text:p>23:21:24</text:p>
          </table:table-cell>
          <table:table-cell office:value-type="float" office:value="623" calcext:value-type="float">
            <text:p>623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2022-11-08 07:00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3H22M24S" calcext:value-type="time">
            <text:p>23:22:24</text:p>
          </table:table-cell>
          <table:table-cell office:value-type="float" office:value="587" calcext:value-type="float">
            <text:p>587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2022-11-08 07:01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3H23M25S" calcext:value-type="time">
            <text:p>23:23:25</text:p>
          </table:table-cell>
          <table:table-cell office:value-type="float" office:value="578" calcext:value-type="float">
            <text:p>578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2022-11-08 07:02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3H24M25S" calcext:value-type="time">
            <text:p>23:24:25</text:p>
          </table:table-cell>
          <table:table-cell office:value-type="float" office:value="581" calcext:value-type="float">
            <text:p>581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string" calcext:value-type="string">
            <text:p>2022-11-08 07:03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3H25M26S" calcext:value-type="time">
            <text:p>23:25:26</text:p>
          </table:table-cell>
          <table:table-cell office:value-type="float" office:value="638" calcext:value-type="float">
            <text:p>638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022-11-08 07:04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3H26M26S" calcext:value-type="time">
            <text:p>23:26:26</text:p>
          </table:table-cell>
          <table:table-cell office:value-type="float" office:value="610" calcext:value-type="float">
            <text:p>61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2022-11-08 07:05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3H27M26S" calcext:value-type="time">
            <text:p>23:27:26</text:p>
          </table:table-cell>
          <table:table-cell office:value-type="float" office:value="573" calcext:value-type="float">
            <text:p>573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string" calcext:value-type="string">
            <text:p>2022-11-08 07:06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3H28M27S" calcext:value-type="time">
            <text:p>23:28:27</text:p>
          </table:table-cell>
          <table:table-cell office:value-type="float" office:value="567" calcext:value-type="float">
            <text:p>567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2022-11-08 07:07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3H29M27S" calcext:value-type="time">
            <text:p>23:29:27</text:p>
          </table:table-cell>
          <table:table-cell office:value-type="float" office:value="576" calcext:value-type="float">
            <text:p>576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string" calcext:value-type="string">
            <text:p>2022-11-08 07:08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3H30M28S" calcext:value-type="time">
            <text:p>23:30:28</text:p>
          </table:table-cell>
          <table:table-cell office:value-type="float" office:value="577" calcext:value-type="float">
            <text:p>57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2022-11-08 07:09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3H31M28S" calcext:value-type="time">
            <text:p>23:31:28</text:p>
          </table:table-cell>
          <table:table-cell office:value-type="float" office:value="587" calcext:value-type="float">
            <text:p>587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022-11-08 07:10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3H32M29S" calcext:value-type="time">
            <text:p>23:32:29</text:p>
          </table:table-cell>
          <table:table-cell office:value-type="float" office:value="588" calcext:value-type="float">
            <text:p>588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2022-11-08 07:11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3H33M29S" calcext:value-type="time">
            <text:p>23:33:29</text:p>
          </table:table-cell>
          <table:table-cell office:value-type="float" office:value="576" calcext:value-type="float">
            <text:p>576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2022-11-08 07:12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3H34M29S" calcext:value-type="time">
            <text:p>23:34:29</text:p>
          </table:table-cell>
          <table:table-cell office:value-type="float" office:value="602" calcext:value-type="float">
            <text:p>602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2022-11-08 07:13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3H35M30S" calcext:value-type="time">
            <text:p>23:35:30</text:p>
          </table:table-cell>
          <table:table-cell office:value-type="float" office:value="578" calcext:value-type="float">
            <text:p>578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string" calcext:value-type="string">
            <text:p>2022-11-08 07:14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3H36M30S" calcext:value-type="time">
            <text:p>23:36:30</text:p>
          </table:table-cell>
          <table:table-cell office:value-type="float" office:value="569" calcext:value-type="float">
            <text:p>569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022-11-08 07:15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3H37M31S" calcext:value-type="time">
            <text:p>23:37:31</text:p>
          </table:table-cell>
          <table:table-cell office:value-type="float" office:value="628" calcext:value-type="float">
            <text:p>628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2022-11-08 07:16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3H38M31S" calcext:value-type="time">
            <text:p>23:38:31</text:p>
          </table:table-cell>
          <table:table-cell office:value-type="float" office:value="613" calcext:value-type="float">
            <text:p>613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2022-11-08 07:17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3H39M32S" calcext:value-type="time">
            <text:p>23:39:32</text:p>
          </table:table-cell>
          <table:table-cell office:value-type="float" office:value="594" calcext:value-type="float">
            <text:p>594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string" calcext:value-type="string">
            <text:p>2022-11-08 07:18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3H40M32S" calcext:value-type="time">
            <text:p>23:40:32</text:p>
          </table:table-cell>
          <table:table-cell office:value-type="float" office:value="599" calcext:value-type="float">
            <text:p>599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string" calcext:value-type="string">
            <text:p>2022-11-08 07:19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3H41M33S" calcext:value-type="time">
            <text:p>23:41:33</text:p>
          </table:table-cell>
          <table:table-cell office:value-type="float" office:value="556" calcext:value-type="float">
            <text:p>556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2022-11-08 07:20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3H42M33S" calcext:value-type="time">
            <text:p>23:42:33</text:p>
          </table:table-cell>
          <table:table-cell office:value-type="float" office:value="556" calcext:value-type="float">
            <text:p>556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2022-11-08 07:21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3H43M34S" calcext:value-type="time">
            <text:p>23:43:34</text:p>
          </table:table-cell>
          <table:table-cell office:value-type="float" office:value="589" calcext:value-type="float">
            <text:p>589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022-11-08 07:22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3H44M34S" calcext:value-type="time">
            <text:p>23:44:34</text:p>
          </table:table-cell>
          <table:table-cell office:value-type="float" office:value="597" calcext:value-type="float">
            <text:p>597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string" calcext:value-type="string">
            <text:p>2022-11-08 07:23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3H45M34S" calcext:value-type="time">
            <text:p>23:45:34</text:p>
          </table:table-cell>
          <table:table-cell office:value-type="float" office:value="653" calcext:value-type="float">
            <text:p>653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2022-11-08 07:24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3H46M35S" calcext:value-type="time">
            <text:p>23:46:35</text:p>
          </table:table-cell>
          <table:table-cell office:value-type="float" office:value="617" calcext:value-type="float">
            <text:p>617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022-11-08 07:25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3H47M35S" calcext:value-type="time">
            <text:p>23:47:35</text:p>
          </table:table-cell>
          <table:table-cell office:value-type="float" office:value="612" calcext:value-type="float">
            <text:p>61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2022-11-08 07:26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3H48M36S" calcext:value-type="time">
            <text:p>23:48:36</text:p>
          </table:table-cell>
          <table:table-cell office:value-type="float" office:value="609" calcext:value-type="float">
            <text:p>609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2022-11-08 07:27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3H49M36S" calcext:value-type="time">
            <text:p>23:49:36</text:p>
          </table:table-cell>
          <table:table-cell office:value-type="float" office:value="596" calcext:value-type="float">
            <text:p>596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2022-11-08 07:28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3H50M37S" calcext:value-type="time">
            <text:p>23:50:37</text:p>
          </table:table-cell>
          <table:table-cell office:value-type="float" office:value="591" calcext:value-type="float">
            <text:p>591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2022-11-08 07:29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3H51M37S" calcext:value-type="time">
            <text:p>23:51:37</text:p>
          </table:table-cell>
          <table:table-cell office:value-type="float" office:value="586" calcext:value-type="float">
            <text:p>586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2022-11-08 07:30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3H52M38S" calcext:value-type="time">
            <text:p>23:52:38</text:p>
          </table:table-cell>
          <table:table-cell office:value-type="float" office:value="625" calcext:value-type="float">
            <text:p>625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2022-11-08 07:31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3H53M38S" calcext:value-type="time">
            <text:p>23:53:38</text:p>
          </table:table-cell>
          <table:table-cell office:value-type="float" office:value="561" calcext:value-type="float">
            <text:p>561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2022-11-08 07:32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3H54M39S" calcext:value-type="time">
            <text:p>23:54:39</text:p>
          </table:table-cell>
          <table:table-cell office:value-type="float" office:value="599" calcext:value-type="float">
            <text:p>599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string" calcext:value-type="string">
            <text:p>2022-11-08 07:33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3H55M39S" calcext:value-type="time">
            <text:p>23:55:39</text:p>
          </table:table-cell>
          <table:table-cell office:value-type="float" office:value="581" calcext:value-type="float">
            <text:p>581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2022-11-08 07:34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3H56M39S" calcext:value-type="time">
            <text:p>23:56:39</text:p>
          </table:table-cell>
          <table:table-cell office:value-type="float" office:value="590" calcext:value-type="float">
            <text:p>590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string" calcext:value-type="string">
            <text:p>2022-11-08 07:35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3H57M40S" calcext:value-type="time">
            <text:p>23:57:40</text:p>
          </table:table-cell>
          <table:table-cell office:value-type="float" office:value="611" calcext:value-type="float">
            <text:p>611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2022-11-08 07:36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3H58M40S" calcext:value-type="time">
            <text:p>23:58:40</text:p>
          </table:table-cell>
          <table:table-cell office:value-type="float" office:value="588" calcext:value-type="float">
            <text:p>588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2022-11-08 07:37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8" calcext:value-type="date">
            <text:p>08/11/22</text:p>
          </table:table-cell>
          <table:table-cell table:style-name="ce2" office:value-type="time" office:time-value="PT23H59M41S" calcext:value-type="time">
            <text:p>23:59:41</text:p>
          </table:table-cell>
          <table:table-cell office:value-type="float" office:value="565" calcext:value-type="float">
            <text:p>565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2022-11-08 07:38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0H00M41S" calcext:value-type="time">
            <text:p>00:00:41</text:p>
          </table:table-cell>
          <table:table-cell office:value-type="float" office:value="602" calcext:value-type="float">
            <text:p>602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2022-11-08 07:39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0H01M42S" calcext:value-type="time">
            <text:p>00:01:42</text:p>
          </table:table-cell>
          <table:table-cell office:value-type="float" office:value="618" calcext:value-type="float">
            <text:p>618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2022-11-08 07:40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0H02M42S" calcext:value-type="time">
            <text:p>00:02:42</text:p>
          </table:table-cell>
          <table:table-cell office:value-type="float" office:value="634" calcext:value-type="float">
            <text:p>634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2022-11-08 07:41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0H03M43S" calcext:value-type="time">
            <text:p>00:03:43</text:p>
          </table:table-cell>
          <table:table-cell office:value-type="float" office:value="585" calcext:value-type="float">
            <text:p>585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022-11-08 07:42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0H04M43S" calcext:value-type="time">
            <text:p>00:04:43</text:p>
          </table:table-cell>
          <table:table-cell office:value-type="float" office:value="606" calcext:value-type="float">
            <text:p>606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2022-11-08 07:43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0H05M44S" calcext:value-type="time">
            <text:p>00:05:44</text:p>
          </table:table-cell>
          <table:table-cell office:value-type="float" office:value="585" calcext:value-type="float">
            <text:p>585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string" calcext:value-type="string">
            <text:p>2022-11-08 07:44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0H06M44S" calcext:value-type="time">
            <text:p>00:06:44</text:p>
          </table:table-cell>
          <table:table-cell office:value-type="float" office:value="599" calcext:value-type="float">
            <text:p>599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2022-11-08 07:45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0H07M45S" calcext:value-type="time">
            <text:p>00:07:45</text:p>
          </table:table-cell>
          <table:table-cell office:value-type="float" office:value="580" calcext:value-type="float">
            <text:p>580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2022-11-08 07:46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0H08M45S" calcext:value-type="time">
            <text:p>00:08:45</text:p>
          </table:table-cell>
          <table:table-cell office:value-type="float" office:value="671" calcext:value-type="float">
            <text:p>671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2022-11-08 07:47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0H09M45S" calcext:value-type="time">
            <text:p>00:09:45</text:p>
          </table:table-cell>
          <table:table-cell office:value-type="float" office:value="588" calcext:value-type="float">
            <text:p>588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2022-11-08 07:48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0H10M46S" calcext:value-type="time">
            <text:p>00:10:46</text:p>
          </table:table-cell>
          <table:table-cell office:value-type="float" office:value="594" calcext:value-type="float">
            <text:p>594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string" calcext:value-type="string">
            <text:p>2022-11-08 07:49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0H11M46S" calcext:value-type="time">
            <text:p>00:11:46</text:p>
          </table:table-cell>
          <table:table-cell office:value-type="float" office:value="586" calcext:value-type="float">
            <text:p>586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2022-11-08 07:50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0H12M47S" calcext:value-type="time">
            <text:p>00:12:47</text:p>
          </table:table-cell>
          <table:table-cell office:value-type="float" office:value="604" calcext:value-type="float">
            <text:p>604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2022-11-08 07:51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0H13M47S" calcext:value-type="time">
            <text:p>00:13:47</text:p>
          </table:table-cell>
          <table:table-cell office:value-type="float" office:value="599" calcext:value-type="float">
            <text:p>599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2022-11-08 07:52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0H14M48S" calcext:value-type="time">
            <text:p>00:14:48</text:p>
          </table:table-cell>
          <table:table-cell office:value-type="float" office:value="584" calcext:value-type="float">
            <text:p>584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string" calcext:value-type="string">
            <text:p>2022-11-08 07:53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0H15M48S" calcext:value-type="time">
            <text:p>00:15:48</text:p>
          </table:table-cell>
          <table:table-cell office:value-type="float" office:value="613" calcext:value-type="float">
            <text:p>613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string" calcext:value-type="string">
            <text:p>2022-11-08 07:54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0H16M49S" calcext:value-type="time">
            <text:p>00:16:49</text:p>
          </table:table-cell>
          <table:table-cell office:value-type="float" office:value="601" calcext:value-type="float">
            <text:p>601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string" calcext:value-type="string">
            <text:p>2022-11-08 07:55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0H17M49S" calcext:value-type="time">
            <text:p>00:17:49</text:p>
          </table:table-cell>
          <table:table-cell office:value-type="float" office:value="598" calcext:value-type="float">
            <text:p>598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2022-11-08 07:56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0H18M50S" calcext:value-type="time">
            <text:p>00:18:50</text:p>
          </table:table-cell>
          <table:table-cell office:value-type="float" office:value="561" calcext:value-type="float">
            <text:p>561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2022-11-08 07:57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0H19M50S" calcext:value-type="time">
            <text:p>00:19:50</text:p>
          </table:table-cell>
          <table:table-cell office:value-type="float" office:value="606" calcext:value-type="float">
            <text:p>60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2022-11-08 07:58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0H20M51S" calcext:value-type="time">
            <text:p>00:20:51</text:p>
          </table:table-cell>
          <table:table-cell office:value-type="float" office:value="645" calcext:value-type="float">
            <text:p>645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2022-11-08 07:59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0H21M51S" calcext:value-type="time">
            <text:p>00:21:51</text:p>
          </table:table-cell>
          <table:table-cell office:value-type="float" office:value="603" calcext:value-type="float">
            <text:p>603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2022-11-08 08:00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0H22M52S" calcext:value-type="time">
            <text:p>00:22:52</text:p>
          </table:table-cell>
          <table:table-cell office:value-type="float" office:value="606" calcext:value-type="float">
            <text:p>606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2022-11-08 08:01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0H23M52S" calcext:value-type="time">
            <text:p>00:23:52</text:p>
          </table:table-cell>
          <table:table-cell office:value-type="float" office:value="596" calcext:value-type="float">
            <text:p>59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2022-11-08 08:02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0H24M53S" calcext:value-type="time">
            <text:p>00:24:53</text:p>
          </table:table-cell>
          <table:table-cell office:value-type="float" office:value="593" calcext:value-type="float">
            <text:p>593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2022-11-08 08:03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0H25M53S" calcext:value-type="time">
            <text:p>00:25:53</text:p>
          </table:table-cell>
          <table:table-cell office:value-type="float" office:value="611" calcext:value-type="float">
            <text:p>611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022-11-08 08:04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0H26M54S" calcext:value-type="time">
            <text:p>00:26:54</text:p>
          </table:table-cell>
          <table:table-cell office:value-type="float" office:value="614" calcext:value-type="float">
            <text:p>614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2022-11-08 08:05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0H27M54S" calcext:value-type="time">
            <text:p>00:27:54</text:p>
          </table:table-cell>
          <table:table-cell office:value-type="float" office:value="637" calcext:value-type="float">
            <text:p>637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2022-11-08 08:06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0H28M55S" calcext:value-type="time">
            <text:p>00:28:55</text:p>
          </table:table-cell>
          <table:table-cell office:value-type="float" office:value="602" calcext:value-type="float">
            <text:p>602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string" calcext:value-type="string">
            <text:p>2022-11-08 08:07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0H29M55S" calcext:value-type="time">
            <text:p>00:29:55</text:p>
          </table:table-cell>
          <table:table-cell office:value-type="float" office:value="595" calcext:value-type="float">
            <text:p>595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string" calcext:value-type="string">
            <text:p>2022-11-08 08:08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0H30M56S" calcext:value-type="time">
            <text:p>00:30:56</text:p>
          </table:table-cell>
          <table:table-cell office:value-type="float" office:value="617" calcext:value-type="float">
            <text:p>617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string" calcext:value-type="string">
            <text:p>2022-11-08 08:09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0H31M56S" calcext:value-type="time">
            <text:p>00:31:56</text:p>
          </table:table-cell>
          <table:table-cell office:value-type="float" office:value="635" calcext:value-type="float">
            <text:p>635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2022-11-08 08:10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0H32M57S" calcext:value-type="time">
            <text:p>00:32:57</text:p>
          </table:table-cell>
          <table:table-cell office:value-type="float" office:value="665" calcext:value-type="float">
            <text:p>665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2022-11-08 08:11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0H33M57S" calcext:value-type="time">
            <text:p>00:33:57</text:p>
          </table:table-cell>
          <table:table-cell office:value-type="float" office:value="625" calcext:value-type="float">
            <text:p>625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2022-11-08 08:12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0H34M58S" calcext:value-type="time">
            <text:p>00:34:58</text:p>
          </table:table-cell>
          <table:table-cell office:value-type="float" office:value="622" calcext:value-type="float">
            <text:p>622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2022-11-08 08:13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0H35M58S" calcext:value-type="time">
            <text:p>00:35:58</text:p>
          </table:table-cell>
          <table:table-cell office:value-type="float" office:value="626" calcext:value-type="float">
            <text:p>626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2022-11-08 08:14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0H36M59S" calcext:value-type="time">
            <text:p>00:36:59</text:p>
          </table:table-cell>
          <table:table-cell office:value-type="float" office:value="623" calcext:value-type="float">
            <text:p>623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2022-11-08 08:15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0H37M59S" calcext:value-type="time">
            <text:p>00:37:59</text:p>
          </table:table-cell>
          <table:table-cell office:value-type="float" office:value="654" calcext:value-type="float">
            <text:p>654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2022-11-08 08:16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0H39M00S" calcext:value-type="time">
            <text:p>00:39:00</text:p>
          </table:table-cell>
          <table:table-cell office:value-type="float" office:value="633" calcext:value-type="float">
            <text:p>633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2022-11-08 08:17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0H40M00S" calcext:value-type="time">
            <text:p>00:40:00</text:p>
          </table:table-cell>
          <table:table-cell office:value-type="float" office:value="617" calcext:value-type="float">
            <text:p>617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2022-11-08 08:18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0H41M01S" calcext:value-type="time">
            <text:p>00:41:01</text:p>
          </table:table-cell>
          <table:table-cell office:value-type="float" office:value="650" calcext:value-type="float">
            <text:p>650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string" calcext:value-type="string">
            <text:p>2022-11-08 08:19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0H42M01S" calcext:value-type="time">
            <text:p>00:42:01</text:p>
          </table:table-cell>
          <table:table-cell office:value-type="float" office:value="623" calcext:value-type="float">
            <text:p>623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2022-11-08 08:20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0H43M01S" calcext:value-type="time">
            <text:p>00:43:01</text:p>
          </table:table-cell>
          <table:table-cell office:value-type="float" office:value="621" calcext:value-type="float">
            <text:p>621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2022-11-08 08:21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0H44M02S" calcext:value-type="time">
            <text:p>00:44:02</text:p>
          </table:table-cell>
          <table:table-cell office:value-type="float" office:value="630" calcext:value-type="float">
            <text:p>630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2022-11-08 08:22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0H45M02S" calcext:value-type="time">
            <text:p>00:45:02</text:p>
          </table:table-cell>
          <table:table-cell office:value-type="float" office:value="642" calcext:value-type="float">
            <text:p>642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2022-11-08 08:23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0H46M03S" calcext:value-type="time">
            <text:p>00:46:03</text:p>
          </table:table-cell>
          <table:table-cell office:value-type="float" office:value="618" calcext:value-type="float">
            <text:p>618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2022-11-08 08:24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0H47M03S" calcext:value-type="time">
            <text:p>00:47:03</text:p>
          </table:table-cell>
          <table:table-cell office:value-type="float" office:value="606" calcext:value-type="float">
            <text:p>606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2022-11-08 08:25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0H48M04S" calcext:value-type="time">
            <text:p>00:48:04</text:p>
          </table:table-cell>
          <table:table-cell office:value-type="float" office:value="624" calcext:value-type="float">
            <text:p>624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2022-11-08 08:26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0H49M04S" calcext:value-type="time">
            <text:p>00:49:04</text:p>
          </table:table-cell>
          <table:table-cell office:value-type="float" office:value="616" calcext:value-type="float">
            <text:p>616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2022-11-08 08:27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0H50M05S" calcext:value-type="time">
            <text:p>00:50:05</text:p>
          </table:table-cell>
          <table:table-cell office:value-type="float" office:value="609" calcext:value-type="float">
            <text:p>609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2022-11-08 08:28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0H51M05S" calcext:value-type="time">
            <text:p>00:51:05</text:p>
          </table:table-cell>
          <table:table-cell office:value-type="float" office:value="624" calcext:value-type="float">
            <text:p>624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2022-11-08 08:29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0H52M06S" calcext:value-type="time">
            <text:p>00:52:06</text:p>
          </table:table-cell>
          <table:table-cell office:value-type="float" office:value="612" calcext:value-type="float">
            <text:p>612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string" calcext:value-type="string">
            <text:p>2022-11-08 08:30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0H53M06S" calcext:value-type="time">
            <text:p>00:53:06</text:p>
          </table:table-cell>
          <table:table-cell office:value-type="float" office:value="622" calcext:value-type="float">
            <text:p>622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2022-11-08 08:31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0H54M07S" calcext:value-type="time">
            <text:p>00:54:07</text:p>
          </table:table-cell>
          <table:table-cell office:value-type="float" office:value="619" calcext:value-type="float">
            <text:p>619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2022-11-08 08:32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0H55M08S" calcext:value-type="time">
            <text:p>00:55:08</text:p>
          </table:table-cell>
          <table:table-cell office:value-type="float" office:value="623" calcext:value-type="float">
            <text:p>623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2022-11-08 08:33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0H56M08S" calcext:value-type="time">
            <text:p>00:56:08</text:p>
          </table:table-cell>
          <table:table-cell office:value-type="float" office:value="625" calcext:value-type="float">
            <text:p>625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2022-11-08 08:34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0H57M09S" calcext:value-type="time">
            <text:p>00:57:09</text:p>
          </table:table-cell>
          <table:table-cell office:value-type="float" office:value="635" calcext:value-type="float">
            <text:p>635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2022-11-08 08:35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0H58M09S" calcext:value-type="time">
            <text:p>00:58:09</text:p>
          </table:table-cell>
          <table:table-cell office:value-type="float" office:value="620" calcext:value-type="float">
            <text:p>62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2022-11-08 08:36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0H59M10S" calcext:value-type="time">
            <text:p>00:59:10</text:p>
          </table:table-cell>
          <table:table-cell office:value-type="float" office:value="601" calcext:value-type="float">
            <text:p>601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2022-11-08 08:37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1H00M10S" calcext:value-type="time">
            <text:p>01:00:10</text:p>
          </table:table-cell>
          <table:table-cell office:value-type="float" office:value="626" calcext:value-type="float">
            <text:p>62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2022-11-08 08:38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1H01M11S" calcext:value-type="time">
            <text:p>01:01:11</text:p>
          </table:table-cell>
          <table:table-cell office:value-type="float" office:value="621" calcext:value-type="float">
            <text:p>621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2022-11-08 08:39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1H02M11S" calcext:value-type="time">
            <text:p>01:02:11</text:p>
          </table:table-cell>
          <table:table-cell office:value-type="float" office:value="623" calcext:value-type="float">
            <text:p>623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2022-11-08 08:40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1H03M12S" calcext:value-type="time">
            <text:p>01:03:12</text:p>
          </table:table-cell>
          <table:table-cell office:value-type="float" office:value="628" calcext:value-type="float">
            <text:p>628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2022-11-08 08:41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1H04M12S" calcext:value-type="time">
            <text:p>01:04:12</text:p>
          </table:table-cell>
          <table:table-cell office:value-type="float" office:value="629" calcext:value-type="float">
            <text:p>629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2022-11-08 08:42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1H05M13S" calcext:value-type="time">
            <text:p>01:05:13</text:p>
          </table:table-cell>
          <table:table-cell office:value-type="float" office:value="619" calcext:value-type="float">
            <text:p>619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2022-11-08 08:43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1H06M13S" calcext:value-type="time">
            <text:p>01:06:13</text:p>
          </table:table-cell>
          <table:table-cell office:value-type="float" office:value="626" calcext:value-type="float">
            <text:p>626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2022-11-08 08:44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1H07M14S" calcext:value-type="time">
            <text:p>01:07:14</text:p>
          </table:table-cell>
          <table:table-cell office:value-type="float" office:value="626" calcext:value-type="float">
            <text:p>62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2022-11-08 08:45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1H08M14S" calcext:value-type="time">
            <text:p>01:08:14</text:p>
          </table:table-cell>
          <table:table-cell office:value-type="float" office:value="612" calcext:value-type="float">
            <text:p>612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2022-11-08 08:46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1H09M15S" calcext:value-type="time">
            <text:p>01:09:15</text:p>
          </table:table-cell>
          <table:table-cell office:value-type="float" office:value="615" calcext:value-type="float">
            <text:p>615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2022-11-08 08:47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1H10M15S" calcext:value-type="time">
            <text:p>01:10:15</text:p>
          </table:table-cell>
          <table:table-cell office:value-type="float" office:value="649" calcext:value-type="float">
            <text:p>649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2022-11-08 08:48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1H11M16S" calcext:value-type="time">
            <text:p>01:11:16</text:p>
          </table:table-cell>
          <table:table-cell office:value-type="float" office:value="573" calcext:value-type="float">
            <text:p>573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2022-11-08 08:49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1H12M16S" calcext:value-type="time">
            <text:p>01:12:16</text:p>
          </table:table-cell>
          <table:table-cell office:value-type="float" office:value="631" calcext:value-type="float">
            <text:p>631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2022-11-08 08:50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1H13M17S" calcext:value-type="time">
            <text:p>01:13:17</text:p>
          </table:table-cell>
          <table:table-cell office:value-type="float" office:value="623" calcext:value-type="float">
            <text:p>623</text:p>
          </table:table-cell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2022-11-08 08:51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1H14M17S" calcext:value-type="time">
            <text:p>01:14:17</text:p>
          </table:table-cell>
          <table:table-cell office:value-type="float" office:value="636" calcext:value-type="float">
            <text:p>636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2022-11-08 08:52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1H15M18S" calcext:value-type="time">
            <text:p>01:15:18</text:p>
          </table:table-cell>
          <table:table-cell office:value-type="float" office:value="635" calcext:value-type="float">
            <text:p>63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2022-11-08 08:53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1H16M18S" calcext:value-type="time">
            <text:p>01:16:18</text:p>
          </table:table-cell>
          <table:table-cell office:value-type="float" office:value="621" calcext:value-type="float">
            <text:p>621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2022-11-08 08:54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1H17M19S" calcext:value-type="time">
            <text:p>01:17:19</text:p>
          </table:table-cell>
          <table:table-cell office:value-type="float" office:value="627" calcext:value-type="float">
            <text:p>627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2022-11-08 08:55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1H18M19S" calcext:value-type="time">
            <text:p>01:18:19</text:p>
          </table:table-cell>
          <table:table-cell office:value-type="float" office:value="647" calcext:value-type="float">
            <text:p>647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string" calcext:value-type="string">
            <text:p>2022-11-08 08:56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1H19M20S" calcext:value-type="time">
            <text:p>01:19:20</text:p>
          </table:table-cell>
          <table:table-cell office:value-type="float" office:value="625" calcext:value-type="float">
            <text:p>625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2022-11-08 08:57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1H20M20S" calcext:value-type="time">
            <text:p>01:20:20</text:p>
          </table:table-cell>
          <table:table-cell office:value-type="float" office:value="660" calcext:value-type="float">
            <text:p>66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string" calcext:value-type="string">
            <text:p>2022-11-08 08:58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1H21M21S" calcext:value-type="time">
            <text:p>01:21:21</text:p>
          </table:table-cell>
          <table:table-cell office:value-type="float" office:value="633" calcext:value-type="float">
            <text:p>633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string" calcext:value-type="string">
            <text:p>2022-11-08 08:59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1H22M21S" calcext:value-type="time">
            <text:p>01:22:21</text:p>
          </table:table-cell>
          <table:table-cell office:value-type="float" office:value="615" calcext:value-type="float">
            <text:p>615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2022-11-08 09:00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1H23M22S" calcext:value-type="time">
            <text:p>01:23:22</text:p>
          </table:table-cell>
          <table:table-cell office:value-type="float" office:value="643" calcext:value-type="float">
            <text:p>643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string" calcext:value-type="string">
            <text:p>2022-11-08 09:01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1H24M22S" calcext:value-type="time">
            <text:p>01:24:22</text:p>
          </table:table-cell>
          <table:table-cell office:value-type="float" office:value="645" calcext:value-type="float">
            <text:p>645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022-11-08 09:02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1H25M23S" calcext:value-type="time">
            <text:p>01:25:23</text:p>
          </table:table-cell>
          <table:table-cell office:value-type="float" office:value="649" calcext:value-type="float">
            <text:p>649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2022-11-08 09:03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1H26M24S" calcext:value-type="time">
            <text:p>01:26:24</text:p>
          </table:table-cell>
          <table:table-cell office:value-type="float" office:value="644" calcext:value-type="float">
            <text:p>644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2022-11-08 09:04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1H27M24S" calcext:value-type="time">
            <text:p>01:27:24</text:p>
          </table:table-cell>
          <table:table-cell office:value-type="float" office:value="627" calcext:value-type="float">
            <text:p>627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2022-11-08 09:05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1H28M25S" calcext:value-type="time">
            <text:p>01:28:25</text:p>
          </table:table-cell>
          <table:table-cell office:value-type="float" office:value="627" calcext:value-type="float">
            <text:p>62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2022-11-08 09:06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1H29M25S" calcext:value-type="time">
            <text:p>01:29:25</text:p>
          </table:table-cell>
          <table:table-cell office:value-type="float" office:value="619" calcext:value-type="float">
            <text:p>619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2022-11-08 09:07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1H30M26S" calcext:value-type="time">
            <text:p>01:30:26</text:p>
          </table:table-cell>
          <table:table-cell office:value-type="float" office:value="628" calcext:value-type="float">
            <text:p>628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2022-11-08 09:08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1H31M26S" calcext:value-type="time">
            <text:p>01:31:26</text:p>
          </table:table-cell>
          <table:table-cell office:value-type="float" office:value="638" calcext:value-type="float">
            <text:p>638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2022-11-08 09:09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1H32M27S" calcext:value-type="time">
            <text:p>01:32:27</text:p>
          </table:table-cell>
          <table:table-cell office:value-type="float" office:value="655" calcext:value-type="float">
            <text:p>655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2022-11-08 09:10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1H33M27S" calcext:value-type="time">
            <text:p>01:33:27</text:p>
          </table:table-cell>
          <table:table-cell office:value-type="float" office:value="656" calcext:value-type="float">
            <text:p>65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2022-11-08 09:11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1H34M28S" calcext:value-type="time">
            <text:p>01:34:28</text:p>
          </table:table-cell>
          <table:table-cell office:value-type="float" office:value="636" calcext:value-type="float">
            <text:p>636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2022-11-08 09:12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1H35M28S" calcext:value-type="time">
            <text:p>01:35:28</text:p>
          </table:table-cell>
          <table:table-cell office:value-type="float" office:value="639" calcext:value-type="float">
            <text:p>639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2022-11-08 09:13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1H36M29S" calcext:value-type="time">
            <text:p>01:36:29</text:p>
          </table:table-cell>
          <table:table-cell office:value-type="float" office:value="667" calcext:value-type="float">
            <text:p>667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2022-11-08 09:14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1H37M29S" calcext:value-type="time">
            <text:p>01:37:29</text:p>
          </table:table-cell>
          <table:table-cell office:value-type="float" office:value="649" calcext:value-type="float">
            <text:p>649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2022-11-08 09:15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1H38M30S" calcext:value-type="time">
            <text:p>01:38:30</text:p>
          </table:table-cell>
          <table:table-cell office:value-type="float" office:value="637" calcext:value-type="float">
            <text:p>637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2022-11-08 09:16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1H39M31S" calcext:value-type="time">
            <text:p>01:39:31</text:p>
          </table:table-cell>
          <table:table-cell office:value-type="float" office:value="638" calcext:value-type="float">
            <text:p>638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2022-11-08 09:17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1H40M31S" calcext:value-type="time">
            <text:p>01:40:31</text:p>
          </table:table-cell>
          <table:table-cell office:value-type="float" office:value="637" calcext:value-type="float">
            <text:p>637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2022-11-08 09:18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1H41M32S" calcext:value-type="time">
            <text:p>01:41:32</text:p>
          </table:table-cell>
          <table:table-cell office:value-type="float" office:value="630" calcext:value-type="float">
            <text:p>63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2022-11-08 09:19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1H42M32S" calcext:value-type="time">
            <text:p>01:42:32</text:p>
          </table:table-cell>
          <table:table-cell office:value-type="float" office:value="634" calcext:value-type="float">
            <text:p>634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string" calcext:value-type="string">
            <text:p>2022-11-08 09:20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1H43M33S" calcext:value-type="time">
            <text:p>01:43:33</text:p>
          </table:table-cell>
          <table:table-cell office:value-type="float" office:value="630" calcext:value-type="float">
            <text:p>630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2022-11-08 09:21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1H44M33S" calcext:value-type="time">
            <text:p>01:44:33</text:p>
          </table:table-cell>
          <table:table-cell office:value-type="float" office:value="645" calcext:value-type="float">
            <text:p>645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2022-11-08 09:22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1H45M34S" calcext:value-type="time">
            <text:p>01:45:34</text:p>
          </table:table-cell>
          <table:table-cell office:value-type="float" office:value="614" calcext:value-type="float">
            <text:p>61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2022-11-08 09:23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1H46M34S" calcext:value-type="time">
            <text:p>01:46:34</text:p>
          </table:table-cell>
          <table:table-cell office:value-type="float" office:value="612" calcext:value-type="float">
            <text:p>612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2022-11-08 09:24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1H47M35S" calcext:value-type="time">
            <text:p>01:47:35</text:p>
          </table:table-cell>
          <table:table-cell office:value-type="float" office:value="650" calcext:value-type="float">
            <text:p>65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2022-11-08 09:25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1H48M35S" calcext:value-type="time">
            <text:p>01:48:35</text:p>
          </table:table-cell>
          <table:table-cell office:value-type="float" office:value="622" calcext:value-type="float">
            <text:p>622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2022-11-08 09:26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1H49M36S" calcext:value-type="time">
            <text:p>01:49:36</text:p>
          </table:table-cell>
          <table:table-cell office:value-type="float" office:value="622" calcext:value-type="float">
            <text:p>622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string" calcext:value-type="string">
            <text:p>2022-11-08 09:27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1H50M36S" calcext:value-type="time">
            <text:p>01:50:36</text:p>
          </table:table-cell>
          <table:table-cell office:value-type="float" office:value="619" calcext:value-type="float">
            <text:p>619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2022-11-08 09:28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1H51M37S" calcext:value-type="time">
            <text:p>01:51:37</text:p>
          </table:table-cell>
          <table:table-cell office:value-type="float" office:value="623" calcext:value-type="float">
            <text:p>623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2022-11-08 09:29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1H52M38S" calcext:value-type="time">
            <text:p>01:52:38</text:p>
          </table:table-cell>
          <table:table-cell office:value-type="float" office:value="596" calcext:value-type="float">
            <text:p>596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2022-11-08 09:30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1H53M38S" calcext:value-type="time">
            <text:p>01:53:38</text:p>
          </table:table-cell>
          <table:table-cell office:value-type="float" office:value="538" calcext:value-type="float">
            <text:p>538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2022-11-08 09:31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1H54M39S" calcext:value-type="time">
            <text:p>01:54:39</text:p>
          </table:table-cell>
          <table:table-cell office:value-type="float" office:value="635" calcext:value-type="float">
            <text:p>635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2022-11-08 09:32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1H55M39S" calcext:value-type="time">
            <text:p>01:55:39</text:p>
          </table:table-cell>
          <table:table-cell office:value-type="float" office:value="637" calcext:value-type="float">
            <text:p>637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2022-11-08 09:33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1H56M40S" calcext:value-type="time">
            <text:p>01:56:40</text:p>
          </table:table-cell>
          <table:table-cell office:value-type="float" office:value="623" calcext:value-type="float">
            <text:p>62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2022-11-08 09:34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1H57M40S" calcext:value-type="time">
            <text:p>01:57:40</text:p>
          </table:table-cell>
          <table:table-cell office:value-type="float" office:value="603" calcext:value-type="float">
            <text:p>603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2022-11-08 09:35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1H58M41S" calcext:value-type="time">
            <text:p>01:58:41</text:p>
          </table:table-cell>
          <table:table-cell office:value-type="float" office:value="634" calcext:value-type="float">
            <text:p>634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2022-11-08 09:36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1H59M41S" calcext:value-type="time">
            <text:p>01:59:41</text:p>
          </table:table-cell>
          <table:table-cell office:value-type="float" office:value="643" calcext:value-type="float">
            <text:p>643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2022-11-08 09:37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2H00M42S" calcext:value-type="time">
            <text:p>02:00:42</text:p>
          </table:table-cell>
          <table:table-cell office:value-type="float" office:value="627" calcext:value-type="float">
            <text:p>627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2022-11-08 09:38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2H01M43S" calcext:value-type="time">
            <text:p>02:01:43</text:p>
          </table:table-cell>
          <table:table-cell office:value-type="float" office:value="612" calcext:value-type="float">
            <text:p>612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2022-11-08 09:39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2H02M43S" calcext:value-type="time">
            <text:p>02:02:43</text:p>
          </table:table-cell>
          <table:table-cell office:value-type="float" office:value="574" calcext:value-type="float">
            <text:p>57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string" calcext:value-type="string">
            <text:p>2022-11-08 09:40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2H03M44S" calcext:value-type="time">
            <text:p>02:03:44</text:p>
          </table:table-cell>
          <table:table-cell office:value-type="float" office:value="592" calcext:value-type="float">
            <text:p>592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2022-11-08 09:41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2H04M44S" calcext:value-type="time">
            <text:p>02:04:44</text:p>
          </table:table-cell>
          <table:table-cell office:value-type="float" office:value="604" calcext:value-type="float">
            <text:p>604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2022-11-08 09:42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2H05M45S" calcext:value-type="time">
            <text:p>02:05:45</text:p>
          </table:table-cell>
          <table:table-cell office:value-type="float" office:value="588" calcext:value-type="float">
            <text:p>58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2022-11-08 09:43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2H06M45S" calcext:value-type="time">
            <text:p>02:06:45</text:p>
          </table:table-cell>
          <table:table-cell office:value-type="float" office:value="591" calcext:value-type="float">
            <text:p>591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2022-11-08 09:44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2H07M46S" calcext:value-type="time">
            <text:p>02:07:46</text:p>
          </table:table-cell>
          <table:table-cell office:value-type="float" office:value="598" calcext:value-type="float">
            <text:p>598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2022-11-08 09:45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2H08M46S" calcext:value-type="time">
            <text:p>02:08:46</text:p>
          </table:table-cell>
          <table:table-cell office:value-type="float" office:value="614" calcext:value-type="float">
            <text:p>614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2022-11-08 09:46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2H09M47S" calcext:value-type="time">
            <text:p>02:09:47</text:p>
          </table:table-cell>
          <table:table-cell office:value-type="float" office:value="623" calcext:value-type="float">
            <text:p>62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2022-11-08 09:47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2H10M48S" calcext:value-type="time">
            <text:p>02:10:48</text:p>
          </table:table-cell>
          <table:table-cell office:value-type="float" office:value="603" calcext:value-type="float">
            <text:p>60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2022-11-08 09:48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2H11M48S" calcext:value-type="time">
            <text:p>02:11:48</text:p>
          </table:table-cell>
          <table:table-cell office:value-type="float" office:value="596" calcext:value-type="float">
            <text:p>596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2022-11-08 09:49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2H12M49S" calcext:value-type="time">
            <text:p>02:12:49</text:p>
          </table:table-cell>
          <table:table-cell office:value-type="float" office:value="601" calcext:value-type="float">
            <text:p>601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2022-11-08 09:50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2H13M49S" calcext:value-type="time">
            <text:p>02:13:49</text:p>
          </table:table-cell>
          <table:table-cell office:value-type="float" office:value="616" calcext:value-type="float">
            <text:p>616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2022-11-08 09:51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2H14M50S" calcext:value-type="time">
            <text:p>02:14:50</text:p>
          </table:table-cell>
          <table:table-cell office:value-type="float" office:value="608" calcext:value-type="float">
            <text:p>608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string" calcext:value-type="string">
            <text:p>2022-11-08 09:52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2H15M50S" calcext:value-type="time">
            <text:p>02:15:50</text:p>
          </table:table-cell>
          <table:table-cell office:value-type="float" office:value="601" calcext:value-type="float">
            <text:p>60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2022-11-08 09:53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2H16M51S" calcext:value-type="time">
            <text:p>02:16:51</text:p>
          </table:table-cell>
          <table:table-cell office:value-type="float" office:value="607" calcext:value-type="float">
            <text:p>607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2022-11-08 09:54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2H17M52S" calcext:value-type="time">
            <text:p>02:17:52</text:p>
          </table:table-cell>
          <table:table-cell office:value-type="float" office:value="582" calcext:value-type="float">
            <text:p>58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2022-11-08 09:55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2H18M52S" calcext:value-type="time">
            <text:p>02:18:52</text:p>
          </table:table-cell>
          <table:table-cell office:value-type="float" office:value="579" calcext:value-type="float">
            <text:p>579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2022-11-08 09:56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2H19M53S" calcext:value-type="time">
            <text:p>02:19:53</text:p>
          </table:table-cell>
          <table:table-cell office:value-type="float" office:value="582" calcext:value-type="float">
            <text:p>582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2022-11-08 09:57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2H20M53S" calcext:value-type="time">
            <text:p>02:20:53</text:p>
          </table:table-cell>
          <table:table-cell office:value-type="float" office:value="588" calcext:value-type="float">
            <text:p>58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2022-11-08 09:58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2H21M54S" calcext:value-type="time">
            <text:p>02:21:54</text:p>
          </table:table-cell>
          <table:table-cell office:value-type="float" office:value="587" calcext:value-type="float">
            <text:p>58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2022-11-08 09:59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2H22M54S" calcext:value-type="time">
            <text:p>02:22:54</text:p>
          </table:table-cell>
          <table:table-cell office:value-type="float" office:value="608" calcext:value-type="float">
            <text:p>608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2022-11-08 10:00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2H23M55S" calcext:value-type="time">
            <text:p>02:23:55</text:p>
          </table:table-cell>
          <table:table-cell office:value-type="float" office:value="613" calcext:value-type="float">
            <text:p>613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2022-11-08 10:01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2H24M56S" calcext:value-type="time">
            <text:p>02:24:56</text:p>
          </table:table-cell>
          <table:table-cell office:value-type="float" office:value="622" calcext:value-type="float">
            <text:p>622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2022-11-08 10:02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2H25M56S" calcext:value-type="time">
            <text:p>02:25:56</text:p>
          </table:table-cell>
          <table:table-cell office:value-type="float" office:value="569" calcext:value-type="float">
            <text:p>569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2022-11-08 10:03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2H26M57S" calcext:value-type="time">
            <text:p>02:26:57</text:p>
          </table:table-cell>
          <table:table-cell office:value-type="float" office:value="610" calcext:value-type="float">
            <text:p>610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string" calcext:value-type="string">
            <text:p>2022-11-08 10:04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2H27M57S" calcext:value-type="time">
            <text:p>02:27:57</text:p>
          </table:table-cell>
          <table:table-cell office:value-type="float" office:value="629" calcext:value-type="float">
            <text:p>629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2022-11-08 10:05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2H28M58S" calcext:value-type="time">
            <text:p>02:28:58</text:p>
          </table:table-cell>
          <table:table-cell office:value-type="float" office:value="630" calcext:value-type="float">
            <text:p>63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2022-11-08 10:06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2H29M58S" calcext:value-type="time">
            <text:p>02:29:58</text:p>
          </table:table-cell>
          <table:table-cell office:value-type="float" office:value="684" calcext:value-type="float">
            <text:p>684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2022-11-08 10:07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2H30M59S" calcext:value-type="time">
            <text:p>02:30:59</text:p>
          </table:table-cell>
          <table:table-cell office:value-type="float" office:value="597" calcext:value-type="float">
            <text:p>597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2022-11-08 10:08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2H32M00S" calcext:value-type="time">
            <text:p>02:32:00</text:p>
          </table:table-cell>
          <table:table-cell office:value-type="float" office:value="629" calcext:value-type="float">
            <text:p>629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022-11-08 10:09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2H33M00S" calcext:value-type="time">
            <text:p>02:33:00</text:p>
          </table:table-cell>
          <table:table-cell office:value-type="float" office:value="633" calcext:value-type="float">
            <text:p>633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2022-11-08 10:10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2H34M01S" calcext:value-type="time">
            <text:p>02:34:01</text:p>
          </table:table-cell>
          <table:table-cell office:value-type="float" office:value="605" calcext:value-type="float">
            <text:p>605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string" calcext:value-type="string">
            <text:p>2022-11-08 10:11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2H35M01S" calcext:value-type="time">
            <text:p>02:35:01</text:p>
          </table:table-cell>
          <table:table-cell office:value-type="float" office:value="598" calcext:value-type="float">
            <text:p>598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string" calcext:value-type="string">
            <text:p>2022-11-08 10:12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2H36M02S" calcext:value-type="time">
            <text:p>02:36:02</text:p>
          </table:table-cell>
          <table:table-cell office:value-type="float" office:value="598" calcext:value-type="float">
            <text:p>598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2022-11-08 10:13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2H37M02S" calcext:value-type="time">
            <text:p>02:37:02</text:p>
          </table:table-cell>
          <table:table-cell office:value-type="float" office:value="612" calcext:value-type="float">
            <text:p>61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2022-11-08 10:14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2H38M03S" calcext:value-type="time">
            <text:p>02:38:03</text:p>
          </table:table-cell>
          <table:table-cell office:value-type="float" office:value="601" calcext:value-type="float">
            <text:p>60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2022-11-08 10:15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2H39M04S" calcext:value-type="time">
            <text:p>02:39:04</text:p>
          </table:table-cell>
          <table:table-cell office:value-type="float" office:value="602" calcext:value-type="float">
            <text:p>602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2022-11-08 10:16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2H40M04S" calcext:value-type="time">
            <text:p>02:40:04</text:p>
          </table:table-cell>
          <table:table-cell office:value-type="float" office:value="634" calcext:value-type="float">
            <text:p>634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2022-11-08 10:17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2H41M05S" calcext:value-type="time">
            <text:p>02:41:05</text:p>
          </table:table-cell>
          <table:table-cell office:value-type="float" office:value="598" calcext:value-type="float">
            <text:p>598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2022-11-08 10:18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2H42M05S" calcext:value-type="time">
            <text:p>02:42:05</text:p>
          </table:table-cell>
          <table:table-cell office:value-type="float" office:value="615" calcext:value-type="float">
            <text:p>615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2022-11-08 10:19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2H43M06S" calcext:value-type="time">
            <text:p>02:43:06</text:p>
          </table:table-cell>
          <table:table-cell office:value-type="float" office:value="614" calcext:value-type="float">
            <text:p>614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2022-11-08 10:20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2H44M07S" calcext:value-type="time">
            <text:p>02:44:07</text:p>
          </table:table-cell>
          <table:table-cell office:value-type="float" office:value="599" calcext:value-type="float">
            <text:p>599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2022-11-08 10:21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2H45M07S" calcext:value-type="time">
            <text:p>02:45:07</text:p>
          </table:table-cell>
          <table:table-cell office:value-type="float" office:value="584" calcext:value-type="float">
            <text:p>584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2022-11-08 10:22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2H46M08S" calcext:value-type="time">
            <text:p>02:46:08</text:p>
          </table:table-cell>
          <table:table-cell office:value-type="float" office:value="594" calcext:value-type="float">
            <text:p>59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2022-11-08 10:23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2H47M08S" calcext:value-type="time">
            <text:p>02:47:08</text:p>
          </table:table-cell>
          <table:table-cell office:value-type="float" office:value="602" calcext:value-type="float">
            <text:p>602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string" calcext:value-type="string">
            <text:p>2022-11-08 10:24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2H48M09S" calcext:value-type="time">
            <text:p>02:48:09</text:p>
          </table:table-cell>
          <table:table-cell office:value-type="float" office:value="604" calcext:value-type="float">
            <text:p>604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2022-11-08 10:25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2H49M10S" calcext:value-type="time">
            <text:p>02:49:10</text:p>
          </table:table-cell>
          <table:table-cell office:value-type="float" office:value="582" calcext:value-type="float">
            <text:p>58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2022-11-08 10:26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2H50M10S" calcext:value-type="time">
            <text:p>02:50:10</text:p>
          </table:table-cell>
          <table:table-cell office:value-type="float" office:value="605" calcext:value-type="float">
            <text:p>605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string" calcext:value-type="string">
            <text:p>2022-11-08 10:27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2H51M11S" calcext:value-type="time">
            <text:p>02:51:11</text:p>
          </table:table-cell>
          <table:table-cell office:value-type="float" office:value="589" calcext:value-type="float">
            <text:p>589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2022-11-08 10:28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2H52M11S" calcext:value-type="time">
            <text:p>02:52:11</text:p>
          </table:table-cell>
          <table:table-cell office:value-type="float" office:value="610" calcext:value-type="float">
            <text:p>610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2022-11-08 10:29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2H53M12S" calcext:value-type="time">
            <text:p>02:53:12</text:p>
          </table:table-cell>
          <table:table-cell office:value-type="float" office:value="603" calcext:value-type="float">
            <text:p>603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2022-11-08 10:30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2H54M13S" calcext:value-type="time">
            <text:p>02:54:13</text:p>
          </table:table-cell>
          <table:table-cell office:value-type="float" office:value="590" calcext:value-type="float">
            <text:p>59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2022-11-08 10:31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2H55M13S" calcext:value-type="time">
            <text:p>02:55:13</text:p>
          </table:table-cell>
          <table:table-cell office:value-type="float" office:value="620" calcext:value-type="float">
            <text:p>620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2022-11-08 10:32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2H56M14S" calcext:value-type="time">
            <text:p>02:56:14</text:p>
          </table:table-cell>
          <table:table-cell office:value-type="float" office:value="609" calcext:value-type="float">
            <text:p>609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2022-11-08 10:33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2H57M14S" calcext:value-type="time">
            <text:p>02:57:14</text:p>
          </table:table-cell>
          <table:table-cell office:value-type="float" office:value="646" calcext:value-type="float">
            <text:p>646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2022-11-08 10:34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2H58M15S" calcext:value-type="time">
            <text:p>02:58:15</text:p>
          </table:table-cell>
          <table:table-cell office:value-type="float" office:value="622" calcext:value-type="float">
            <text:p>622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2022-11-08 10:35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2H59M15S" calcext:value-type="time">
            <text:p>02:59:15</text:p>
          </table:table-cell>
          <table:table-cell office:value-type="float" office:value="602" calcext:value-type="float">
            <text:p>602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2022-11-08 10:36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3H00M16S" calcext:value-type="time">
            <text:p>03:00:16</text:p>
          </table:table-cell>
          <table:table-cell office:value-type="float" office:value="600" calcext:value-type="float">
            <text:p>600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2022-11-08 10:37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3H01M17S" calcext:value-type="time">
            <text:p>03:01:17</text:p>
          </table:table-cell>
          <table:table-cell office:value-type="float" office:value="612" calcext:value-type="float">
            <text:p>612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2022-11-08 10:38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3H02M17S" calcext:value-type="time">
            <text:p>03:02:17</text:p>
          </table:table-cell>
          <table:table-cell office:value-type="float" office:value="585" calcext:value-type="float">
            <text:p>58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string" calcext:value-type="string">
            <text:p>2022-11-08 10:39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3H03M18S" calcext:value-type="time">
            <text:p>03:03:18</text:p>
          </table:table-cell>
          <table:table-cell office:value-type="float" office:value="602" calcext:value-type="float">
            <text:p>602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string" calcext:value-type="string">
            <text:p>2022-11-08 10:40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3H04M18S" calcext:value-type="time">
            <text:p>03:04:18</text:p>
          </table:table-cell>
          <table:table-cell office:value-type="float" office:value="584" calcext:value-type="float">
            <text:p>584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2022-11-08 10:41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3H05M19S" calcext:value-type="time">
            <text:p>03:05:19</text:p>
          </table:table-cell>
          <table:table-cell office:value-type="float" office:value="608" calcext:value-type="float">
            <text:p>60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2022-11-08 10:42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3H06M20S" calcext:value-type="time">
            <text:p>03:06:20</text:p>
          </table:table-cell>
          <table:table-cell office:value-type="float" office:value="590" calcext:value-type="float">
            <text:p>59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2022-11-08 10:43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3H07M20S" calcext:value-type="time">
            <text:p>03:07:20</text:p>
          </table:table-cell>
          <table:table-cell office:value-type="float" office:value="594" calcext:value-type="float">
            <text:p>594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2022-11-08 10:44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3H08M21S" calcext:value-type="time">
            <text:p>03:08:21</text:p>
          </table:table-cell>
          <table:table-cell office:value-type="float" office:value="638" calcext:value-type="float">
            <text:p>638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2022-11-08 10:45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3H09M22S" calcext:value-type="time">
            <text:p>03:09:22</text:p>
          </table:table-cell>
          <table:table-cell office:value-type="float" office:value="597" calcext:value-type="float">
            <text:p>597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2022-11-08 10:46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3H10M22S" calcext:value-type="time">
            <text:p>03:10:22</text:p>
          </table:table-cell>
          <table:table-cell office:value-type="float" office:value="609" calcext:value-type="float">
            <text:p>609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2022-11-08 10:47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3H11M23S" calcext:value-type="time">
            <text:p>03:11:23</text:p>
          </table:table-cell>
          <table:table-cell office:value-type="float" office:value="608" calcext:value-type="float">
            <text:p>608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string" calcext:value-type="string">
            <text:p>2022-11-08 10:48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3H12M23S" calcext:value-type="time">
            <text:p>03:12:23</text:p>
          </table:table-cell>
          <table:table-cell office:value-type="float" office:value="563" calcext:value-type="float">
            <text:p>563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2022-11-08 10:49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3H13M24S" calcext:value-type="time">
            <text:p>03:13:24</text:p>
          </table:table-cell>
          <table:table-cell office:value-type="float" office:value="599" calcext:value-type="float">
            <text:p>59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2022-11-08 10:50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3H14M25S" calcext:value-type="time">
            <text:p>03:14:25</text:p>
          </table:table-cell>
          <table:table-cell office:value-type="float" office:value="572" calcext:value-type="float">
            <text:p>572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2022-11-08 10:51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3H15M25S" calcext:value-type="time">
            <text:p>03:15:25</text:p>
          </table:table-cell>
          <table:table-cell office:value-type="float" office:value="578" calcext:value-type="float">
            <text:p>578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2022-11-08 10:52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3H16M26S" calcext:value-type="time">
            <text:p>03:16:26</text:p>
          </table:table-cell>
          <table:table-cell office:value-type="float" office:value="590" calcext:value-type="float">
            <text:p>590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2022-11-08 10:53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3H17M26S" calcext:value-type="time">
            <text:p>03:17:26</text:p>
          </table:table-cell>
          <table:table-cell office:value-type="float" office:value="561" calcext:value-type="float">
            <text:p>561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2022-11-08 10:54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3H18M27S" calcext:value-type="time">
            <text:p>03:18:27</text:p>
          </table:table-cell>
          <table:table-cell office:value-type="float" office:value="578" calcext:value-type="float">
            <text:p>578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2022-11-08 10:55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3H19M28S" calcext:value-type="time">
            <text:p>03:19:28</text:p>
          </table:table-cell>
          <table:table-cell office:value-type="float" office:value="579" calcext:value-type="float">
            <text:p>579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2022-11-08 10:56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3H20M28S" calcext:value-type="time">
            <text:p>03:20:28</text:p>
          </table:table-cell>
          <table:table-cell office:value-type="float" office:value="591" calcext:value-type="float">
            <text:p>591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2022-11-08 10:57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3H21M29S" calcext:value-type="time">
            <text:p>03:21:29</text:p>
          </table:table-cell>
          <table:table-cell office:value-type="float" office:value="583" calcext:value-type="float">
            <text:p>583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2022-11-08 10:58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3H22M29S" calcext:value-type="time">
            <text:p>03:22:29</text:p>
          </table:table-cell>
          <table:table-cell office:value-type="float" office:value="586" calcext:value-type="float">
            <text:p>58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2022-11-08 10:59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3H23M30S" calcext:value-type="time">
            <text:p>03:23:30</text:p>
          </table:table-cell>
          <table:table-cell office:value-type="float" office:value="586" calcext:value-type="float">
            <text:p>58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2022-11-08 11:00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3H24M31S" calcext:value-type="time">
            <text:p>03:24:31</text:p>
          </table:table-cell>
          <table:table-cell office:value-type="float" office:value="579" calcext:value-type="float">
            <text:p>579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2022-11-08 11:01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3H25M31S" calcext:value-type="time">
            <text:p>03:25:31</text:p>
          </table:table-cell>
          <table:table-cell office:value-type="float" office:value="602" calcext:value-type="float">
            <text:p>602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2022-11-08 11:02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3H26M32S" calcext:value-type="time">
            <text:p>03:26:32</text:p>
          </table:table-cell>
          <table:table-cell office:value-type="float" office:value="600" calcext:value-type="float">
            <text:p>600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2022-11-08 11:03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3H27M33S" calcext:value-type="time">
            <text:p>03:27:33</text:p>
          </table:table-cell>
          <table:table-cell office:value-type="float" office:value="599" calcext:value-type="float">
            <text:p>599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2022-11-08 11:04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3H28M33S" calcext:value-type="time">
            <text:p>03:28:33</text:p>
          </table:table-cell>
          <table:table-cell office:value-type="float" office:value="580" calcext:value-type="float">
            <text:p>58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2022-11-08 11:05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3H29M34S" calcext:value-type="time">
            <text:p>03:29:34</text:p>
          </table:table-cell>
          <table:table-cell office:value-type="float" office:value="593" calcext:value-type="float">
            <text:p>593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2022-11-08 11:06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3H30M34S" calcext:value-type="time">
            <text:p>03:30:34</text:p>
          </table:table-cell>
          <table:table-cell office:value-type="float" office:value="595" calcext:value-type="float">
            <text:p>595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2022-11-08 11:07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3H31M35S" calcext:value-type="time">
            <text:p>03:31:35</text:p>
          </table:table-cell>
          <table:table-cell office:value-type="float" office:value="577" calcext:value-type="float">
            <text:p>577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2022-11-08 11:08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3H32M36S" calcext:value-type="time">
            <text:p>03:32:36</text:p>
          </table:table-cell>
          <table:table-cell office:value-type="float" office:value="608" calcext:value-type="float">
            <text:p>608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2022-11-08 11:09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3H33M36S" calcext:value-type="time">
            <text:p>03:33:36</text:p>
          </table:table-cell>
          <table:table-cell office:value-type="float" office:value="621" calcext:value-type="float">
            <text:p>62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2022-11-08 11:10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3H34M37S" calcext:value-type="time">
            <text:p>03:34:37</text:p>
          </table:table-cell>
          <table:table-cell office:value-type="float" office:value="604" calcext:value-type="float">
            <text:p>604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2022-11-08 11:11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3H35M38S" calcext:value-type="time">
            <text:p>03:35:38</text:p>
          </table:table-cell>
          <table:table-cell office:value-type="float" office:value="591" calcext:value-type="float">
            <text:p>591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2022-11-08 11:12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3H36M38S" calcext:value-type="time">
            <text:p>03:36:38</text:p>
          </table:table-cell>
          <table:table-cell office:value-type="float" office:value="603" calcext:value-type="float">
            <text:p>603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2022-11-08 11:13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3H37M39S" calcext:value-type="time">
            <text:p>03:37:39</text:p>
          </table:table-cell>
          <table:table-cell office:value-type="float" office:value="596" calcext:value-type="float">
            <text:p>596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2022-11-08 11:14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3H38M39S" calcext:value-type="time">
            <text:p>03:38:39</text:p>
          </table:table-cell>
          <table:table-cell office:value-type="float" office:value="592" calcext:value-type="float">
            <text:p>592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2022-11-08 11:15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3H39M40S" calcext:value-type="time">
            <text:p>03:39:40</text:p>
          </table:table-cell>
          <table:table-cell office:value-type="float" office:value="593" calcext:value-type="float">
            <text:p>593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2022-11-08 11:16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3H40M41S" calcext:value-type="time">
            <text:p>03:40:41</text:p>
          </table:table-cell>
          <table:table-cell office:value-type="float" office:value="602" calcext:value-type="float">
            <text:p>602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2022-11-08 11:17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3H41M41S" calcext:value-type="time">
            <text:p>03:41:41</text:p>
          </table:table-cell>
          <table:table-cell office:value-type="float" office:value="593" calcext:value-type="float">
            <text:p>593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2022-11-08 11:18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3H42M42S" calcext:value-type="time">
            <text:p>03:42:42</text:p>
          </table:table-cell>
          <table:table-cell office:value-type="float" office:value="609" calcext:value-type="float">
            <text:p>609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2022-11-08 11:19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3H43M43S" calcext:value-type="time">
            <text:p>03:43:43</text:p>
          </table:table-cell>
          <table:table-cell office:value-type="float" office:value="609" calcext:value-type="float">
            <text:p>609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2022-11-08 11:20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3H44M43S" calcext:value-type="time">
            <text:p>03:44:43</text:p>
          </table:table-cell>
          <table:table-cell office:value-type="float" office:value="586" calcext:value-type="float">
            <text:p>586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2022-11-08 11:22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3H45M44S" calcext:value-type="time">
            <text:p>03:45:44</text:p>
          </table:table-cell>
          <table:table-cell office:value-type="float" office:value="605" calcext:value-type="float">
            <text:p>60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2022-11-08 11:23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3H46M45S" calcext:value-type="time">
            <text:p>03:46:45</text:p>
          </table:table-cell>
          <table:table-cell office:value-type="float" office:value="588" calcext:value-type="float">
            <text:p>588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string" calcext:value-type="string">
            <text:p>2022-11-08 11:24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3H47M45S" calcext:value-type="time">
            <text:p>03:47:45</text:p>
          </table:table-cell>
          <table:table-cell office:value-type="float" office:value="572" calcext:value-type="float">
            <text:p>572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2022-11-08 11:25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3H48M46S" calcext:value-type="time">
            <text:p>03:48:46</text:p>
          </table:table-cell>
          <table:table-cell office:value-type="float" office:value="601" calcext:value-type="float">
            <text:p>60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2022-11-08 11:26:36</text:p>
          </table:table-cell>
          <table:table-cell office:value-type="float" office:value="0.4" calcext:value-type="float">
            <text:p>0.4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3H49M46S" calcext:value-type="time">
            <text:p>03:49:46</text:p>
          </table:table-cell>
          <table:table-cell office:value-type="float" office:value="591" calcext:value-type="float">
            <text:p>591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2022-11-08 11:27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3H50M47S" calcext:value-type="time">
            <text:p>03:50:47</text:p>
          </table:table-cell>
          <table:table-cell office:value-type="float" office:value="594" calcext:value-type="float">
            <text:p>594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2022-11-08 11:28:36</text:p>
          </table:table-cell>
          <table:table-cell office:value-type="float" office:value="0.2" calcext:value-type="float">
            <text:p>0.2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3H51M48S" calcext:value-type="time">
            <text:p>03:51:48</text:p>
          </table:table-cell>
          <table:table-cell office:value-type="float" office:value="590" calcext:value-type="float">
            <text:p>590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2022-11-08 11:29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3H52M48S" calcext:value-type="time">
            <text:p>03:52:48</text:p>
          </table:table-cell>
          <table:table-cell office:value-type="float" office:value="579" calcext:value-type="float">
            <text:p>579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2022-11-08 11:29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3H53M49S" calcext:value-type="time">
            <text:p>03:53:49</text:p>
          </table:table-cell>
          <table:table-cell office:value-type="float" office:value="605" calcext:value-type="float">
            <text:p>605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2022-11-08 11:30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3H54M50S" calcext:value-type="time">
            <text:p>03:54:50</text:p>
          </table:table-cell>
          <table:table-cell office:value-type="float" office:value="568" calcext:value-type="float">
            <text:p>56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2022-11-08 11:31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3H55M50S" calcext:value-type="time">
            <text:p>03:55:50</text:p>
          </table:table-cell>
          <table:table-cell office:value-type="float" office:value="580" calcext:value-type="float">
            <text:p>580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string" calcext:value-type="string">
            <text:p>2022-11-08 11:32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3H56M51S" calcext:value-type="time">
            <text:p>03:56:51</text:p>
          </table:table-cell>
          <table:table-cell office:value-type="float" office:value="597" calcext:value-type="float">
            <text:p>597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2022-11-08 11:33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3H57M52S" calcext:value-type="time">
            <text:p>03:57:52</text:p>
          </table:table-cell>
          <table:table-cell office:value-type="float" office:value="622" calcext:value-type="float">
            <text:p>622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2022-11-08 11:34:36</text:p>
          </table:table-cell>
          <table:table-cell office:value-type="float" office:value="0.4" calcext:value-type="float">
            <text:p>0.4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3H58M52S" calcext:value-type="time">
            <text:p>03:58:52</text:p>
          </table:table-cell>
          <table:table-cell office:value-type="float" office:value="621" calcext:value-type="float">
            <text:p>621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2022-11-08 11:35:35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3H59M53S" calcext:value-type="time">
            <text:p>03:59:53</text:p>
          </table:table-cell>
          <table:table-cell office:value-type="float" office:value="615" calcext:value-type="float">
            <text:p>615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2022-11-08 11:36:35</text:p>
          </table:table-cell>
          <table:table-cell office:value-type="float" office:value="30.8" calcext:value-type="float">
            <text:p>30.8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4H00M53S" calcext:value-type="time">
            <text:p>04:00:53</text:p>
          </table:table-cell>
          <table:table-cell office:value-type="float" office:value="617" calcext:value-type="float">
            <text:p>617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2022-11-08 11:37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4H01M54S" calcext:value-type="time">
            <text:p>04:01:54</text:p>
          </table:table-cell>
          <table:table-cell office:value-type="float" office:value="611" calcext:value-type="float">
            <text:p>611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2022-11-08 11:38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4H02M55S" calcext:value-type="time">
            <text:p>04:02:55</text:p>
          </table:table-cell>
          <table:table-cell office:value-type="float" office:value="608" calcext:value-type="float">
            <text:p>608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2022-11-08 11:39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4H03M55S" calcext:value-type="time">
            <text:p>04:03:55</text:p>
          </table:table-cell>
          <table:table-cell office:value-type="float" office:value="603" calcext:value-type="float">
            <text:p>603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2022-11-08 11:40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4H04M56S" calcext:value-type="time">
            <text:p>04:04:56</text:p>
          </table:table-cell>
          <table:table-cell office:value-type="float" office:value="609" calcext:value-type="float">
            <text:p>609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2022-11-08 11:41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4H05M57S" calcext:value-type="time">
            <text:p>04:05:57</text:p>
          </table:table-cell>
          <table:table-cell office:value-type="float" office:value="617" calcext:value-type="float">
            <text:p>617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2022-11-08 11:42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4H06M57S" calcext:value-type="time">
            <text:p>04:06:57</text:p>
          </table:table-cell>
          <table:table-cell office:value-type="float" office:value="598" calcext:value-type="float">
            <text:p>598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2022-11-08 11:43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4H07M58S" calcext:value-type="time">
            <text:p>04:07:58</text:p>
          </table:table-cell>
          <table:table-cell office:value-type="float" office:value="586" calcext:value-type="float">
            <text:p>58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2022-11-08 11:44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4H08M59S" calcext:value-type="time">
            <text:p>04:08:59</text:p>
          </table:table-cell>
          <table:table-cell office:value-type="float" office:value="590" calcext:value-type="float">
            <text:p>59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2022-11-08 11:45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4H09M59S" calcext:value-type="time">
            <text:p>04:09:59</text:p>
          </table:table-cell>
          <table:table-cell office:value-type="float" office:value="584" calcext:value-type="float">
            <text:p>584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2022-11-08 11:46:36</text:p>
          </table:table-cell>
          <table:table-cell office:value-type="float" office:value="2.2" calcext:value-type="float">
            <text:p>2.2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4H11M00S" calcext:value-type="time">
            <text:p>04:11:00</text:p>
          </table:table-cell>
          <table:table-cell office:value-type="float" office:value="584" calcext:value-type="float">
            <text:p>584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2022-11-08 11:47:35</text:p>
          </table:table-cell>
          <table:table-cell office:value-type="float" office:value="0.8" calcext:value-type="float">
            <text:p>0.8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4H12M01S" calcext:value-type="time">
            <text:p>04:12:01</text:p>
          </table:table-cell>
          <table:table-cell office:value-type="float" office:value="593" calcext:value-type="float">
            <text:p>593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string" calcext:value-type="string">
            <text:p>2022-11-08 11:48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4H13M01S" calcext:value-type="time">
            <text:p>04:13:01</text:p>
          </table:table-cell>
          <table:table-cell office:value-type="float" office:value="597" calcext:value-type="float">
            <text:p>597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2022-11-08 11:49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4H14M02S" calcext:value-type="time">
            <text:p>04:14:02</text:p>
          </table:table-cell>
          <table:table-cell office:value-type="float" office:value="596" calcext:value-type="float">
            <text:p>59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2022-11-08 11:50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4H15M03S" calcext:value-type="time">
            <text:p>04:15:03</text:p>
          </table:table-cell>
          <table:table-cell office:value-type="float" office:value="598" calcext:value-type="float">
            <text:p>598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2022-11-08 11:51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4H16M03S" calcext:value-type="time">
            <text:p>04:16:03</text:p>
          </table:table-cell>
          <table:table-cell office:value-type="float" office:value="584" calcext:value-type="float">
            <text:p>584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2022-11-08 11:52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4H17M04S" calcext:value-type="time">
            <text:p>04:17:04</text:p>
          </table:table-cell>
          <table:table-cell office:value-type="float" office:value="602" calcext:value-type="float">
            <text:p>602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2022-11-08 11:53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4H18M05S" calcext:value-type="time">
            <text:p>04:18:05</text:p>
          </table:table-cell>
          <table:table-cell office:value-type="float" office:value="582" calcext:value-type="float">
            <text:p>582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2022-11-08 11:54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4H19M05S" calcext:value-type="time">
            <text:p>04:19:05</text:p>
          </table:table-cell>
          <table:table-cell office:value-type="float" office:value="605" calcext:value-type="float">
            <text:p>605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2022-11-08 11:55:35</text:p>
          </table:table-cell>
          <table:table-cell office:value-type="float" office:value="0.2" calcext:value-type="float">
            <text:p>0.2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4H20M06S" calcext:value-type="time">
            <text:p>04:20:06</text:p>
          </table:table-cell>
          <table:table-cell office:value-type="float" office:value="608" calcext:value-type="float">
            <text:p>608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2022-11-08 11:56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4H21M07S" calcext:value-type="time">
            <text:p>04:21:07</text:p>
          </table:table-cell>
          <table:table-cell office:value-type="float" office:value="599" calcext:value-type="float">
            <text:p>599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2022-11-08 11:57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4H22M07S" calcext:value-type="time">
            <text:p>04:22:07</text:p>
          </table:table-cell>
          <table:table-cell office:value-type="float" office:value="633" calcext:value-type="float">
            <text:p>633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2022-11-08 11:58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4H23M08S" calcext:value-type="time">
            <text:p>04:23:08</text:p>
          </table:table-cell>
          <table:table-cell office:value-type="float" office:value="649" calcext:value-type="float">
            <text:p>649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2022-11-08 11:59:35</text:p>
          </table:table-cell>
          <table:table-cell office:value-type="float" office:value="4.4" calcext:value-type="float">
            <text:p>4.4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4H24M09S" calcext:value-type="time">
            <text:p>04:24:09</text:p>
          </table:table-cell>
          <table:table-cell office:value-type="float" office:value="641" calcext:value-type="float">
            <text:p>641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string" calcext:value-type="string">
            <text:p>2022-11-08 12:00:35</text:p>
          </table:table-cell>
          <table:table-cell office:value-type="float" office:value="26.8" calcext:value-type="float">
            <text:p>26.8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4H25M09S" calcext:value-type="time">
            <text:p>04:25:09</text:p>
          </table:table-cell>
          <table:table-cell office:value-type="float" office:value="626" calcext:value-type="float">
            <text:p>626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2022-11-08 12:01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4H26M10S" calcext:value-type="time">
            <text:p>04:26:10</text:p>
          </table:table-cell>
          <table:table-cell office:value-type="float" office:value="625" calcext:value-type="float">
            <text:p>625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2022-11-08 12:02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4H27M11S" calcext:value-type="time">
            <text:p>04:27:11</text:p>
          </table:table-cell>
          <table:table-cell office:value-type="float" office:value="639" calcext:value-type="float">
            <text:p>639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2022-11-08 12:03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4H28M11S" calcext:value-type="time">
            <text:p>04:28:11</text:p>
          </table:table-cell>
          <table:table-cell office:value-type="float" office:value="641" calcext:value-type="float">
            <text:p>64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2022-11-08 12:04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4H29M12S" calcext:value-type="time">
            <text:p>04:29:12</text:p>
          </table:table-cell>
          <table:table-cell office:value-type="float" office:value="668" calcext:value-type="float">
            <text:p>668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2022-11-08 12:05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4H30M13S" calcext:value-type="time">
            <text:p>04:30:13</text:p>
          </table:table-cell>
          <table:table-cell office:value-type="float" office:value="627" calcext:value-type="float">
            <text:p>627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2022-11-08 12:06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4H31M13S" calcext:value-type="time">
            <text:p>04:31:13</text:p>
          </table:table-cell>
          <table:table-cell office:value-type="float" office:value="612" calcext:value-type="float">
            <text:p>612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2022-11-08 12:07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4H32M14S" calcext:value-type="time">
            <text:p>04:32:14</text:p>
          </table:table-cell>
          <table:table-cell office:value-type="float" office:value="632" calcext:value-type="float">
            <text:p>632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2022-11-08 12:08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4H33M15S" calcext:value-type="time">
            <text:p>04:33:15</text:p>
          </table:table-cell>
          <table:table-cell office:value-type="float" office:value="623" calcext:value-type="float">
            <text:p>623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2022-11-08 12:08:3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4H34M15S" calcext:value-type="time">
            <text:p>04:34:15</text:p>
          </table:table-cell>
          <table:table-cell office:value-type="float" office:value="641" calcext:value-type="float">
            <text:p>641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2022-11-08 12:09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4H35M16S" calcext:value-type="time">
            <text:p>04:35:16</text:p>
          </table:table-cell>
          <table:table-cell office:value-type="float" office:value="621" calcext:value-type="float">
            <text:p>62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2022-11-08 12:10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4H36M17S" calcext:value-type="time">
            <text:p>04:36:17</text:p>
          </table:table-cell>
          <table:table-cell office:value-type="float" office:value="620" calcext:value-type="float">
            <text:p>62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2022-11-08 12:11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4H37M17S" calcext:value-type="time">
            <text:p>04:37:17</text:p>
          </table:table-cell>
          <table:table-cell office:value-type="float" office:value="635" calcext:value-type="float">
            <text:p>635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2022-11-08 12:12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4H38M18S" calcext:value-type="time">
            <text:p>04:38:18</text:p>
          </table:table-cell>
          <table:table-cell office:value-type="float" office:value="629" calcext:value-type="float">
            <text:p>629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2022-11-08 12:13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4H39M19S" calcext:value-type="time">
            <text:p>04:39:19</text:p>
          </table:table-cell>
          <table:table-cell office:value-type="float" office:value="623" calcext:value-type="float">
            <text:p>623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2022-11-08 12:14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4H40M19S" calcext:value-type="time">
            <text:p>04:40:19</text:p>
          </table:table-cell>
          <table:table-cell office:value-type="float" office:value="625" calcext:value-type="float">
            <text:p>625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2022-11-08 12:15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4H41M20S" calcext:value-type="time">
            <text:p>04:41:20</text:p>
          </table:table-cell>
          <table:table-cell office:value-type="float" office:value="651" calcext:value-type="float">
            <text:p>651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2022-11-08 12:16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4H42M21S" calcext:value-type="time">
            <text:p>04:42:21</text:p>
          </table:table-cell>
          <table:table-cell office:value-type="float" office:value="612" calcext:value-type="float">
            <text:p>612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2022-11-08 12:17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4H43M21S" calcext:value-type="time">
            <text:p>04:43:21</text:p>
          </table:table-cell>
          <table:table-cell office:value-type="float" office:value="630" calcext:value-type="float">
            <text:p>63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2022-11-08 12:18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4H44M22S" calcext:value-type="time">
            <text:p>04:44:22</text:p>
          </table:table-cell>
          <table:table-cell office:value-type="float" office:value="730" calcext:value-type="float">
            <text:p>730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2022-11-08 12:19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4H45M23S" calcext:value-type="time">
            <text:p>04:45:23</text:p>
          </table:table-cell>
          <table:table-cell office:value-type="float" office:value="665" calcext:value-type="float">
            <text:p>665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2022-11-08 12:20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4H46M24S" calcext:value-type="time">
            <text:p>04:46:24</text:p>
          </table:table-cell>
          <table:table-cell office:value-type="float" office:value="635" calcext:value-type="float">
            <text:p>6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string" calcext:value-type="string">
            <text:p>2022-11-08 12:21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4H47M25S" calcext:value-type="time">
            <text:p>04:47:25</text:p>
          </table:table-cell>
          <table:table-cell office:value-type="float" office:value="611" calcext:value-type="float">
            <text:p>611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2022-11-08 12:22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4H48M25S" calcext:value-type="time">
            <text:p>04:48:25</text:p>
          </table:table-cell>
          <table:table-cell office:value-type="float" office:value="647" calcext:value-type="float">
            <text:p>647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2022-11-08 12:23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4H49M26S" calcext:value-type="time">
            <text:p>04:49:26</text:p>
          </table:table-cell>
          <table:table-cell office:value-type="float" office:value="630" calcext:value-type="float">
            <text:p>63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2022-11-08 12:24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4H50M27S" calcext:value-type="time">
            <text:p>04:50:27</text:p>
          </table:table-cell>
          <table:table-cell office:value-type="float" office:value="634" calcext:value-type="float">
            <text:p>63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2022-11-08 12:25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4H51M27S" calcext:value-type="time">
            <text:p>04:51:27</text:p>
          </table:table-cell>
          <table:table-cell office:value-type="float" office:value="623" calcext:value-type="float">
            <text:p>623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2022-11-08 12:26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4H52M28S" calcext:value-type="time">
            <text:p>04:52:28</text:p>
          </table:table-cell>
          <table:table-cell office:value-type="float" office:value="620" calcext:value-type="float">
            <text:p>62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2022-11-08 12:27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4H53M29S" calcext:value-type="time">
            <text:p>04:53:29</text:p>
          </table:table-cell>
          <table:table-cell office:value-type="float" office:value="619" calcext:value-type="float">
            <text:p>619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2022-11-08 12:28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4H54M29S" calcext:value-type="time">
            <text:p>04:54:29</text:p>
          </table:table-cell>
          <table:table-cell office:value-type="float" office:value="626" calcext:value-type="float">
            <text:p>626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2022-11-08 12:29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4H55M30S" calcext:value-type="time">
            <text:p>04:55:30</text:p>
          </table:table-cell>
          <table:table-cell office:value-type="float" office:value="621" calcext:value-type="float">
            <text:p>621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2022-11-08 12:30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4H56M31S" calcext:value-type="time">
            <text:p>04:56:31</text:p>
          </table:table-cell>
          <table:table-cell office:value-type="float" office:value="650" calcext:value-type="float">
            <text:p>6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2022-11-08 12:31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4H57M32S" calcext:value-type="time">
            <text:p>04:57:32</text:p>
          </table:table-cell>
          <table:table-cell office:value-type="float" office:value="630" calcext:value-type="float">
            <text:p>630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string" calcext:value-type="string">
            <text:p>2022-11-08 12:32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4H58M32S" calcext:value-type="time">
            <text:p>04:58:32</text:p>
          </table:table-cell>
          <table:table-cell office:value-type="float" office:value="628" calcext:value-type="float">
            <text:p>628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2022-11-08 12:33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4H59M33S" calcext:value-type="time">
            <text:p>04:59:33</text:p>
          </table:table-cell>
          <table:table-cell office:value-type="float" office:value="627" calcext:value-type="float">
            <text:p>627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string" calcext:value-type="string">
            <text:p>2022-11-08 12:34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5H00M34S" calcext:value-type="time">
            <text:p>05:00:34</text:p>
          </table:table-cell>
          <table:table-cell office:value-type="float" office:value="598" calcext:value-type="float">
            <text:p>598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2022-11-08 12:35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5H01M34S" calcext:value-type="time">
            <text:p>05:01:34</text:p>
          </table:table-cell>
          <table:table-cell office:value-type="float" office:value="612" calcext:value-type="float">
            <text:p>612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2022-11-08 12:36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5H02M35S" calcext:value-type="time">
            <text:p>05:02:35</text:p>
          </table:table-cell>
          <table:table-cell office:value-type="float" office:value="617" calcext:value-type="float">
            <text:p>617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2022-11-08 12:37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5H03M36S" calcext:value-type="time">
            <text:p>05:03:36</text:p>
          </table:table-cell>
          <table:table-cell office:value-type="float" office:value="587" calcext:value-type="float">
            <text:p>587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2022-11-08 12:38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5H04M36S" calcext:value-type="time">
            <text:p>05:04:36</text:p>
          </table:table-cell>
          <table:table-cell office:value-type="float" office:value="623" calcext:value-type="float">
            <text:p>623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2022-11-08 12:39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5H05M37S" calcext:value-type="time">
            <text:p>05:05:37</text:p>
          </table:table-cell>
          <table:table-cell office:value-type="float" office:value="617" calcext:value-type="float">
            <text:p>617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2022-11-08 12:40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5H06M38S" calcext:value-type="time">
            <text:p>05:06:38</text:p>
          </table:table-cell>
          <table:table-cell office:value-type="float" office:value="618" calcext:value-type="float">
            <text:p>61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2022-11-08 12:41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5H07M38S" calcext:value-type="time">
            <text:p>05:07:38</text:p>
          </table:table-cell>
          <table:table-cell office:value-type="float" office:value="619" calcext:value-type="float">
            <text:p>619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2022-11-08 12:42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5H08M39S" calcext:value-type="time">
            <text:p>05:08:39</text:p>
          </table:table-cell>
          <table:table-cell office:value-type="float" office:value="608" calcext:value-type="float">
            <text:p>608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2022-11-08 12:43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5H09M40S" calcext:value-type="time">
            <text:p>05:09:40</text:p>
          </table:table-cell>
          <table:table-cell office:value-type="float" office:value="604" calcext:value-type="float">
            <text:p>604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2022-11-08 12:44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5H10M41S" calcext:value-type="time">
            <text:p>05:10:41</text:p>
          </table:table-cell>
          <table:table-cell office:value-type="float" office:value="611" calcext:value-type="float">
            <text:p>611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2022-11-08 12:45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5H11M41S" calcext:value-type="time">
            <text:p>05:11:41</text:p>
          </table:table-cell>
          <table:table-cell office:value-type="float" office:value="624" calcext:value-type="float">
            <text:p>624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2022-11-08 12:46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5H12M42S" calcext:value-type="time">
            <text:p>05:12:42</text:p>
          </table:table-cell>
          <table:table-cell office:value-type="float" office:value="627" calcext:value-type="float">
            <text:p>627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2022-11-08 12:47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5H13M43S" calcext:value-type="time">
            <text:p>05:13:43</text:p>
          </table:table-cell>
          <table:table-cell office:value-type="float" office:value="622" calcext:value-type="float">
            <text:p>622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string" calcext:value-type="string">
            <text:p>2022-11-08 12:48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5H14M43S" calcext:value-type="time">
            <text:p>05:14:43</text:p>
          </table:table-cell>
          <table:table-cell office:value-type="float" office:value="602" calcext:value-type="float">
            <text:p>602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2022-11-08 12:49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5H15M44S" calcext:value-type="time">
            <text:p>05:15:44</text:p>
          </table:table-cell>
          <table:table-cell office:value-type="float" office:value="595" calcext:value-type="float">
            <text:p>595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2022-11-08 12:50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5H16M45S" calcext:value-type="time">
            <text:p>05:16:45</text:p>
          </table:table-cell>
          <table:table-cell office:value-type="float" office:value="597" calcext:value-type="float">
            <text:p>597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2022-11-08 12:51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5H17M45S" calcext:value-type="time">
            <text:p>05:17:45</text:p>
          </table:table-cell>
          <table:table-cell office:value-type="float" office:value="617" calcext:value-type="float">
            <text:p>617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2022-11-08 12:52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5H18M46S" calcext:value-type="time">
            <text:p>05:18:46</text:p>
          </table:table-cell>
          <table:table-cell office:value-type="float" office:value="604" calcext:value-type="float">
            <text:p>604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2022-11-08 12:53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5H19M47S" calcext:value-type="time">
            <text:p>05:19:47</text:p>
          </table:table-cell>
          <table:table-cell office:value-type="float" office:value="621" calcext:value-type="float">
            <text:p>62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2022-11-08 12:54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5H20M48S" calcext:value-type="time">
            <text:p>05:20:48</text:p>
          </table:table-cell>
          <table:table-cell office:value-type="float" office:value="611" calcext:value-type="float">
            <text:p>611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2022-11-08 12:55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5H21M48S" calcext:value-type="time">
            <text:p>05:21:48</text:p>
          </table:table-cell>
          <table:table-cell office:value-type="float" office:value="624" calcext:value-type="float">
            <text:p>6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2022-11-08 12:56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5H22M49S" calcext:value-type="time">
            <text:p>05:22:49</text:p>
          </table:table-cell>
          <table:table-cell office:value-type="float" office:value="607" calcext:value-type="float">
            <text:p>607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2022-11-08 12:57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5H23M50S" calcext:value-type="time">
            <text:p>05:23:50</text:p>
          </table:table-cell>
          <table:table-cell office:value-type="float" office:value="618" calcext:value-type="float">
            <text:p>618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2022-11-08 12:58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5H24M50S" calcext:value-type="time">
            <text:p>05:24:50</text:p>
          </table:table-cell>
          <table:table-cell office:value-type="float" office:value="614" calcext:value-type="float">
            <text:p>614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2022-11-08 12:59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5H25M51S" calcext:value-type="time">
            <text:p>05:25:51</text:p>
          </table:table-cell>
          <table:table-cell office:value-type="float" office:value="620" calcext:value-type="float">
            <text:p>620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2022-11-08 13:00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5H26M52S" calcext:value-type="time">
            <text:p>05:26:52</text:p>
          </table:table-cell>
          <table:table-cell office:value-type="float" office:value="620" calcext:value-type="float">
            <text:p>62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2022-11-08 13:01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5H27M53S" calcext:value-type="time">
            <text:p>05:27:53</text:p>
          </table:table-cell>
          <table:table-cell office:value-type="float" office:value="614" calcext:value-type="float">
            <text:p>614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2022-11-08 13:02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5H28M53S" calcext:value-type="time">
            <text:p>05:28:53</text:p>
          </table:table-cell>
          <table:table-cell office:value-type="float" office:value="626" calcext:value-type="float">
            <text:p>62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2022-11-08 13:03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5H29M54S" calcext:value-type="time">
            <text:p>05:29:54</text:p>
          </table:table-cell>
          <table:table-cell office:value-type="float" office:value="639" calcext:value-type="float">
            <text:p>639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2022-11-08 13:04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5H30M55S" calcext:value-type="time">
            <text:p>05:30:55</text:p>
          </table:table-cell>
          <table:table-cell office:value-type="float" office:value="620" calcext:value-type="float">
            <text:p>620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2022-11-08 13:05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5H31M55S" calcext:value-type="time">
            <text:p>05:31:55</text:p>
          </table:table-cell>
          <table:table-cell office:value-type="float" office:value="612" calcext:value-type="float">
            <text:p>61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2022-11-08 13:06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5H32M56S" calcext:value-type="time">
            <text:p>05:32:56</text:p>
          </table:table-cell>
          <table:table-cell office:value-type="float" office:value="620" calcext:value-type="float">
            <text:p>62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2022-11-08 13:07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5H33M57S" calcext:value-type="time">
            <text:p>05:33:57</text:p>
          </table:table-cell>
          <table:table-cell office:value-type="float" office:value="628" calcext:value-type="float">
            <text:p>628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2022-11-08 13:08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5H34M58S" calcext:value-type="time">
            <text:p>05:34:58</text:p>
          </table:table-cell>
          <table:table-cell office:value-type="float" office:value="612" calcext:value-type="float">
            <text:p>612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string" calcext:value-type="string">
            <text:p>2022-11-08 13:09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5H35M58S" calcext:value-type="time">
            <text:p>05:35:58</text:p>
          </table:table-cell>
          <table:table-cell office:value-type="float" office:value="627" calcext:value-type="float">
            <text:p>627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2022-11-08 13:10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5H36M59S" calcext:value-type="time">
            <text:p>05:36:59</text:p>
          </table:table-cell>
          <table:table-cell office:value-type="float" office:value="606" calcext:value-type="float">
            <text:p>60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2022-11-08 13:11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5H38M00S" calcext:value-type="time">
            <text:p>05:38:00</text:p>
          </table:table-cell>
          <table:table-cell office:value-type="float" office:value="618" calcext:value-type="float">
            <text:p>618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2022-11-08 13:12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5H39M00S" calcext:value-type="time">
            <text:p>05:39:00</text:p>
          </table:table-cell>
          <table:table-cell office:value-type="float" office:value="623" calcext:value-type="float">
            <text:p>623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2022-11-08 13:13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5H40M01S" calcext:value-type="time">
            <text:p>05:40:01</text:p>
          </table:table-cell>
          <table:table-cell office:value-type="float" office:value="615" calcext:value-type="float">
            <text:p>615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2022-11-08 13:14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5H41M02S" calcext:value-type="time">
            <text:p>05:41:02</text:p>
          </table:table-cell>
          <table:table-cell office:value-type="float" office:value="599" calcext:value-type="float">
            <text:p>59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2022-11-08 13:15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5H42M03S" calcext:value-type="time">
            <text:p>05:42:03</text:p>
          </table:table-cell>
          <table:table-cell office:value-type="float" office:value="620" calcext:value-type="float">
            <text:p>620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2022-11-08 13:16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5H43M03S" calcext:value-type="time">
            <text:p>05:43:03</text:p>
          </table:table-cell>
          <table:table-cell office:value-type="float" office:value="615" calcext:value-type="float">
            <text:p>61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2022-11-08 13:17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5H44M04S" calcext:value-type="time">
            <text:p>05:44:04</text:p>
          </table:table-cell>
          <table:table-cell office:value-type="float" office:value="617" calcext:value-type="float">
            <text:p>617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2022-11-08 13:18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5H45M05S" calcext:value-type="time">
            <text:p>05:45:05</text:p>
          </table:table-cell>
          <table:table-cell office:value-type="float" office:value="615" calcext:value-type="float">
            <text:p>615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2022-11-08 13:19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5H46M05S" calcext:value-type="time">
            <text:p>05:46:05</text:p>
          </table:table-cell>
          <table:table-cell office:value-type="float" office:value="613" calcext:value-type="float">
            <text:p>613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2022-11-08 13:20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5H47M06S" calcext:value-type="time">
            <text:p>05:47:06</text:p>
          </table:table-cell>
          <table:table-cell office:value-type="float" office:value="621" calcext:value-type="float">
            <text:p>621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2022-11-08 13:21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5H48M07S" calcext:value-type="time">
            <text:p>05:48:07</text:p>
          </table:table-cell>
          <table:table-cell office:value-type="float" office:value="612" calcext:value-type="float">
            <text:p>612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2022-11-08 13:22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5H49M08S" calcext:value-type="time">
            <text:p>05:49:08</text:p>
          </table:table-cell>
          <table:table-cell office:value-type="float" office:value="602" calcext:value-type="float">
            <text:p>6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2022-11-08 13:23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5H50M08S" calcext:value-type="time">
            <text:p>05:50:08</text:p>
          </table:table-cell>
          <table:table-cell office:value-type="float" office:value="616" calcext:value-type="float">
            <text:p>616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2022-11-08 13:24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5H51M09S" calcext:value-type="time">
            <text:p>05:51:09</text:p>
          </table:table-cell>
          <table:table-cell office:value-type="float" office:value="618" calcext:value-type="float">
            <text:p>618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2022-11-08 13:25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5H52M10S" calcext:value-type="time">
            <text:p>05:52:10</text:p>
          </table:table-cell>
          <table:table-cell office:value-type="float" office:value="616" calcext:value-type="float">
            <text:p>616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2022-11-08 13:26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5H53M11S" calcext:value-type="time">
            <text:p>05:53:11</text:p>
          </table:table-cell>
          <table:table-cell office:value-type="float" office:value="606" calcext:value-type="float">
            <text:p>606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2022-11-08 13:27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5H54M11S" calcext:value-type="time">
            <text:p>05:54:11</text:p>
          </table:table-cell>
          <table:table-cell office:value-type="float" office:value="625" calcext:value-type="float">
            <text:p>625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2022-11-08 13:28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5H55M12S" calcext:value-type="time">
            <text:p>05:55:12</text:p>
          </table:table-cell>
          <table:table-cell office:value-type="float" office:value="624" calcext:value-type="float">
            <text:p>624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2022-11-08 13:29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5H56M13S" calcext:value-type="time">
            <text:p>05:56:13</text:p>
          </table:table-cell>
          <table:table-cell office:value-type="float" office:value="616" calcext:value-type="float">
            <text:p>616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string" calcext:value-type="string">
            <text:p>2022-11-08 13:30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5H57M13S" calcext:value-type="time">
            <text:p>05:57:13</text:p>
          </table:table-cell>
          <table:table-cell office:value-type="float" office:value="394" calcext:value-type="float">
            <text:p>394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2022-11-08 13:31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5H58M14S" calcext:value-type="time">
            <text:p>05:58:14</text:p>
          </table:table-cell>
          <table:table-cell office:value-type="float" office:value="574" calcext:value-type="float">
            <text:p>574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2022-11-08 13:32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5H59M15S" calcext:value-type="time">
            <text:p>05:59:15</text:p>
          </table:table-cell>
          <table:table-cell office:value-type="float" office:value="603" calcext:value-type="float">
            <text:p>603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2022-11-08 13:33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6H00M16S" calcext:value-type="time">
            <text:p>06:00:16</text:p>
          </table:table-cell>
          <table:table-cell office:value-type="float" office:value="635" calcext:value-type="float">
            <text:p>63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2022-11-08 13:34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6H01M16S" calcext:value-type="time">
            <text:p>06:01:16</text:p>
          </table:table-cell>
          <table:table-cell office:value-type="float" office:value="622" calcext:value-type="float">
            <text:p>622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2022-11-08 13:35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6H02M17S" calcext:value-type="time">
            <text:p>06:02:17</text:p>
          </table:table-cell>
          <table:table-cell office:value-type="float" office:value="419" calcext:value-type="float">
            <text:p>419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2022-11-08 13:36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6H03M18S" calcext:value-type="time">
            <text:p>06:03:18</text:p>
          </table:table-cell>
          <table:table-cell office:value-type="float" office:value="333" calcext:value-type="float">
            <text:p>333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2022-11-08 13:37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6H04M19S" calcext:value-type="time">
            <text:p>06:04:19</text:p>
          </table:table-cell>
          <table:table-cell office:value-type="float" office:value="624" calcext:value-type="float">
            <text:p>624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2022-11-08 13:38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6H05M19S" calcext:value-type="time">
            <text:p>06:05:19</text:p>
          </table:table-cell>
          <table:table-cell office:value-type="float" office:value="619" calcext:value-type="float">
            <text:p>619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2022-11-08 13:39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6H06M20S" calcext:value-type="time">
            <text:p>06:06:20</text:p>
          </table:table-cell>
          <table:table-cell office:value-type="float" office:value="630" calcext:value-type="float">
            <text:p>630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2022-11-08 13:40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6H07M21S" calcext:value-type="time">
            <text:p>06:07:21</text:p>
          </table:table-cell>
          <table:table-cell office:value-type="float" office:value="610" calcext:value-type="float">
            <text:p>610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string" calcext:value-type="string">
            <text:p>2022-11-08 13:41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6H08M22S" calcext:value-type="time">
            <text:p>06:08:22</text:p>
          </table:table-cell>
          <table:table-cell office:value-type="float" office:value="607" calcext:value-type="float">
            <text:p>607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string" calcext:value-type="string">
            <text:p>2022-11-08 13:42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6H09M22S" calcext:value-type="time">
            <text:p>06:09:22</text:p>
          </table:table-cell>
          <table:table-cell office:value-type="float" office:value="608" calcext:value-type="float">
            <text:p>608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2022-11-08 13:43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6H10M23S" calcext:value-type="time">
            <text:p>06:10:23</text:p>
          </table:table-cell>
          <table:table-cell office:value-type="float" office:value="635" calcext:value-type="float">
            <text:p>635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2022-11-08 13:44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6H11M24S" calcext:value-type="time">
            <text:p>06:11:24</text:p>
          </table:table-cell>
          <table:table-cell office:value-type="float" office:value="623" calcext:value-type="float">
            <text:p>623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2022-11-08 13:45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6H12M25S" calcext:value-type="time">
            <text:p>06:12:25</text:p>
          </table:table-cell>
          <table:table-cell office:value-type="float" office:value="618" calcext:value-type="float">
            <text:p>618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string" calcext:value-type="string">
            <text:p>2022-11-08 13:46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6H13M25S" calcext:value-type="time">
            <text:p>06:13:25</text:p>
          </table:table-cell>
          <table:table-cell office:value-type="float" office:value="624" calcext:value-type="float">
            <text:p>624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2022-11-08 13:47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6H14M26S" calcext:value-type="time">
            <text:p>06:14:26</text:p>
          </table:table-cell>
          <table:table-cell office:value-type="float" office:value="622" calcext:value-type="float">
            <text:p>622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2022-11-08 13:48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6H15M27S" calcext:value-type="time">
            <text:p>06:15:27</text:p>
          </table:table-cell>
          <table:table-cell office:value-type="float" office:value="608" calcext:value-type="float">
            <text:p>608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2022-11-08 13:49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6H16M28S" calcext:value-type="time">
            <text:p>06:16:28</text:p>
          </table:table-cell>
          <table:table-cell office:value-type="float" office:value="623" calcext:value-type="float">
            <text:p>623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2022-11-08 13:50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6H17M28S" calcext:value-type="time">
            <text:p>06:17:28</text:p>
          </table:table-cell>
          <table:table-cell office:value-type="float" office:value="632" calcext:value-type="float">
            <text:p>632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2022-11-08 13:51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6H18M29S" calcext:value-type="time">
            <text:p>06:18:29</text:p>
          </table:table-cell>
          <table:table-cell office:value-type="float" office:value="603" calcext:value-type="float">
            <text:p>603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2022-11-08 13:52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6H19M30S" calcext:value-type="time">
            <text:p>06:19:30</text:p>
          </table:table-cell>
          <table:table-cell office:value-type="float" office:value="617" calcext:value-type="float">
            <text:p>617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022-11-08 13:53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6H20M31S" calcext:value-type="time">
            <text:p>06:20:31</text:p>
          </table:table-cell>
          <table:table-cell office:value-type="float" office:value="617" calcext:value-type="float">
            <text:p>617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2022-11-08 13:54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6H21M31S" calcext:value-type="time">
            <text:p>06:21:31</text:p>
          </table:table-cell>
          <table:table-cell office:value-type="float" office:value="611" calcext:value-type="float">
            <text:p>611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string" calcext:value-type="string">
            <text:p>2022-11-08 13:55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6H22M32S" calcext:value-type="time">
            <text:p>06:22:32</text:p>
          </table:table-cell>
          <table:table-cell office:value-type="float" office:value="624" calcext:value-type="float">
            <text:p>624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2022-11-08 13:56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6H23M33S" calcext:value-type="time">
            <text:p>06:23:33</text:p>
          </table:table-cell>
          <table:table-cell office:value-type="float" office:value="607" calcext:value-type="float">
            <text:p>60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2022-11-08 13:57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6H24M34S" calcext:value-type="time">
            <text:p>06:24:34</text:p>
          </table:table-cell>
          <table:table-cell office:value-type="float" office:value="599" calcext:value-type="float">
            <text:p>599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string" calcext:value-type="string">
            <text:p>2022-11-08 13:58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6H25M34S" calcext:value-type="time">
            <text:p>06:25:34</text:p>
          </table:table-cell>
          <table:table-cell office:value-type="float" office:value="547" calcext:value-type="float">
            <text:p>54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2022-11-08 13:59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6H26M35S" calcext:value-type="time">
            <text:p>06:26:35</text:p>
          </table:table-cell>
          <table:table-cell office:value-type="float" office:value="601" calcext:value-type="float">
            <text:p>601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2022-11-08 14:00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6H27M36S" calcext:value-type="time">
            <text:p>06:27:36</text:p>
          </table:table-cell>
          <table:table-cell office:value-type="float" office:value="595" calcext:value-type="float">
            <text:p>595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2022-11-08 14:01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6H28M37S" calcext:value-type="time">
            <text:p>06:28:37</text:p>
          </table:table-cell>
          <table:table-cell office:value-type="float" office:value="588" calcext:value-type="float">
            <text:p>588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2022-11-08 14:02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6H29M37S" calcext:value-type="time">
            <text:p>06:29:37</text:p>
          </table:table-cell>
          <table:table-cell office:value-type="float" office:value="601" calcext:value-type="float">
            <text:p>601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2022-11-08 14:03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6H30M38S" calcext:value-type="time">
            <text:p>06:30:38</text:p>
          </table:table-cell>
          <table:table-cell office:value-type="float" office:value="599" calcext:value-type="float">
            <text:p>59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2022-11-08 14:04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6H31M39S" calcext:value-type="time">
            <text:p>06:31:39</text:p>
          </table:table-cell>
          <table:table-cell office:value-type="float" office:value="605" calcext:value-type="float">
            <text:p>605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string" calcext:value-type="string">
            <text:p>2022-11-08 14:05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6H32M40S" calcext:value-type="time">
            <text:p>06:32:40</text:p>
          </table:table-cell>
          <table:table-cell office:value-type="float" office:value="589" calcext:value-type="float">
            <text:p>589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string" calcext:value-type="string">
            <text:p>2022-11-08 14:06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6H33M40S" calcext:value-type="time">
            <text:p>06:33:40</text:p>
          </table:table-cell>
          <table:table-cell office:value-type="float" office:value="593" calcext:value-type="float">
            <text:p>593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2022-11-08 14:07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6H34M41S" calcext:value-type="time">
            <text:p>06:34:41</text:p>
          </table:table-cell>
          <table:table-cell office:value-type="float" office:value="532" calcext:value-type="float">
            <text:p>532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2022-11-08 14:08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6H35M42S" calcext:value-type="time">
            <text:p>06:35:42</text:p>
          </table:table-cell>
          <table:table-cell office:value-type="float" office:value="606" calcext:value-type="float">
            <text:p>60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2022-11-08 14:09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6H36M43S" calcext:value-type="time">
            <text:p>06:36:43</text:p>
          </table:table-cell>
          <table:table-cell office:value-type="float" office:value="597" calcext:value-type="float">
            <text:p>597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2022-11-08 14:10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6H37M43S" calcext:value-type="time">
            <text:p>06:37:43</text:p>
          </table:table-cell>
          <table:table-cell office:value-type="float" office:value="590" calcext:value-type="float">
            <text:p>59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2022-11-08 14:11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6H38M44S" calcext:value-type="time">
            <text:p>06:38:44</text:p>
          </table:table-cell>
          <table:table-cell office:value-type="float" office:value="613" calcext:value-type="float">
            <text:p>613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2022-11-08 14:12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6H39M45S" calcext:value-type="time">
            <text:p>06:39:45</text:p>
          </table:table-cell>
          <table:table-cell office:value-type="float" office:value="623" calcext:value-type="float">
            <text:p>623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2022-11-08 14:13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6H40M46S" calcext:value-type="time">
            <text:p>06:40:46</text:p>
          </table:table-cell>
          <table:table-cell office:value-type="float" office:value="604" calcext:value-type="float">
            <text:p>604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2022-11-08 14:14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6H41M46S" calcext:value-type="time">
            <text:p>06:41:46</text:p>
          </table:table-cell>
          <table:table-cell office:value-type="float" office:value="588" calcext:value-type="float">
            <text:p>588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022-11-08 14:15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6H42M47S" calcext:value-type="time">
            <text:p>06:42:47</text:p>
          </table:table-cell>
          <table:table-cell office:value-type="float" office:value="586" calcext:value-type="float">
            <text:p>586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2022-11-08 14:16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6H43M48S" calcext:value-type="time">
            <text:p>06:43:48</text:p>
          </table:table-cell>
          <table:table-cell office:value-type="float" office:value="591" calcext:value-type="float">
            <text:p>591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2022-11-08 14:17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6H44M49S" calcext:value-type="time">
            <text:p>06:44:49</text:p>
          </table:table-cell>
          <table:table-cell office:value-type="float" office:value="597" calcext:value-type="float">
            <text:p>597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2022-11-08 14:18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6H45M50S" calcext:value-type="time">
            <text:p>06:45:50</text:p>
          </table:table-cell>
          <table:table-cell office:value-type="float" office:value="591" calcext:value-type="float">
            <text:p>591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022-11-08 14:19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6H46M50S" calcext:value-type="time">
            <text:p>06:46:50</text:p>
          </table:table-cell>
          <table:table-cell office:value-type="float" office:value="592" calcext:value-type="float">
            <text:p>592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string" calcext:value-type="string">
            <text:p>2022-11-08 14:20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6H47M51S" calcext:value-type="time">
            <text:p>06:47:51</text:p>
          </table:table-cell>
          <table:table-cell office:value-type="float" office:value="586" calcext:value-type="float">
            <text:p>586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string" calcext:value-type="string">
            <text:p>2022-11-08 14:21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6H48M52S" calcext:value-type="time">
            <text:p>06:48:52</text:p>
          </table:table-cell>
          <table:table-cell office:value-type="float" office:value="584" calcext:value-type="float">
            <text:p>584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2022-11-08 14:22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6H49M53S" calcext:value-type="time">
            <text:p>06:49:53</text:p>
          </table:table-cell>
          <table:table-cell office:value-type="float" office:value="581" calcext:value-type="float">
            <text:p>581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2022-11-08 14:23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6H50M53S" calcext:value-type="time">
            <text:p>06:50:53</text:p>
          </table:table-cell>
          <table:table-cell office:value-type="float" office:value="598" calcext:value-type="float">
            <text:p>598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string" calcext:value-type="string">
            <text:p>2022-11-08 14:24:35</text:p>
          </table:table-cell>
          <table:table-cell office:value-type="float" office:value="0.2" calcext:value-type="float">
            <text:p>0.2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6H51M54S" calcext:value-type="time">
            <text:p>06:51:54</text:p>
          </table:table-cell>
          <table:table-cell office:value-type="float" office:value="571" calcext:value-type="float">
            <text:p>571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2022-11-08 14:25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6H52M55S" calcext:value-type="time">
            <text:p>06:52:55</text:p>
          </table:table-cell>
          <table:table-cell office:value-type="float" office:value="569" calcext:value-type="float">
            <text:p>569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2022-11-08 14:26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date" office:date-value="2022-11-09" calcext:value-type="date">
            <text:p>09/11/22</text:p>
          </table:table-cell>
          <table:table-cell table:style-name="ce2" office:value-type="time" office:time-value="PT06H53M56S" calcext:value-type="time">
            <text:p>06:53:56</text:p>
          </table:table-cell>
          <table:table-cell office:value-type="float" office:value="581" calcext:value-type="float">
            <text:p>581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string" calcext:value-type="string">
            <text:p>2022-11-08 14:27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4:28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/>
          <table:table-cell table:style-name="ce3"/>
          <table:table-cell table:number-columns-repeated="3"/>
          <table:table-cell office:value-type="string" calcext:value-type="string">
            <text:p>2022-11-08 14:29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4:30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4:31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4:32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4:33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4:34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4:35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4:36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4:37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4:38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4:39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4:40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4:41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4:42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4:43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4:44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4:45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4:46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4:47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4:48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4:49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4:50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4:51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4:52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4:53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4:54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4:55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4:56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4:57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4:58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4:59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5:00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5:01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5:02:35</text:p>
          </table:table-cell>
          <table:table-cell office:value-type="float" office:value="0.2" calcext:value-type="float">
            <text:p>0.2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5:03:35</text:p>
          </table:table-cell>
          <table:table-cell office:value-type="float" office:value="0.8" calcext:value-type="float">
            <text:p>0.8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5:04:35</text:p>
          </table:table-cell>
          <table:table-cell office:value-type="float" office:value="0.4" calcext:value-type="float">
            <text:p>0.4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5:05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5:06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5:07:35</text:p>
          </table:table-cell>
          <table:table-cell office:value-type="float" office:value="0.2" calcext:value-type="float">
            <text:p>0.2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5:08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5:09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5:10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5:11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5:12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5:13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5:14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5:15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5:16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5:17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5:18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5:19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5:20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5:21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5:22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5:23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5:24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5:25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5:26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5:27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5:28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5:29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5:30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5:31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5:32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5:33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5:34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5:35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5:36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5:37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5:38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5:39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5:40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5:41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5:42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5:43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5:44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5:45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5:46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5:47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5:48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5:49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5:50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5:51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5:52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5:53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5:54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5:55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5:56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5:57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5:58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5:59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6:00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6:01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6:02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6:03:35</text:p>
          </table:table-cell>
          <table:table-cell office:value-type="float" office:value="0.2" calcext:value-type="float">
            <text:p>0.2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6:04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6:05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6:06:35</text:p>
          </table:table-cell>
          <table:table-cell office:value-type="float" office:value="0.2" calcext:value-type="float">
            <text:p>0.2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6:07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6:08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6:09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6:10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6:11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6:12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6:13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6:14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6:15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6:16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6:17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6:18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6:19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6:20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6:21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6:22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6:23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6:24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6:25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6:26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6:27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6:28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6:29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6:30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6:31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6:32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6:33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6:34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6:35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6:36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6:37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6:38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6:39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6:40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6:41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6:42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6:43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6:43: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6:44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6:45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6:46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6:47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6:48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6:49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6:50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6:51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6:52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6:53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6:54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6:55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6:56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6:57:35</text:p>
          </table:table-cell>
          <table:table-cell office:value-type="float" office:value="0.2" calcext:value-type="float">
            <text:p>0.2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6:58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6:59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7:00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7:01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7:02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7:03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7:04:35</text:p>
          </table:table-cell>
          <table:table-cell office:value-type="float" office:value="0.2" calcext:value-type="float">
            <text:p>0.2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7:05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7:06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7:07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7:08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7:09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7:10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7:11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7:12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7:13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7:14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7:15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7:16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7:17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7:18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7:19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7:20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7:21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7:22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7:23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7:24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7:25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7:26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7:27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7:28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7:29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7:30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7:31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7:32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7:33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7:34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7:35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7:36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7:37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7:38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7:39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7:40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7:41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7:42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7:43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7:44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7:45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7:46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7:47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7:48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7:49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7:50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7:51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7:52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7:53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7:54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7:55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7:56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7:57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7:58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7:59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8:00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8:01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8:02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8:03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8:04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8:05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8:06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8:07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8:08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8:09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8:10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8:11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8:12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8:13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8:14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8:15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8:16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8:17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8:18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8:19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8:20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8:21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8:22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8:23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8:24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8:25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8:26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8:27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8:28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8:29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8:30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8:31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8:32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8:33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8:34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8:35:35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style-name="ce5"/>
          <table:table-cell table:style-name="ce4"/>
          <table:table-cell table:number-columns-repeated="9"/>
        </table:table-row>
        <table:table-row table:style-name="ro2">
          <table:table-cell table:number-columns-repeated="5"/>
          <table:table-cell office:value-type="string" calcext:value-type="string">
            <text:p>2022-11-08 18:36:35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style-name="ce5"/>
          <table:table-cell table:style-name="ce4"/>
          <table:table-cell table:number-columns-repeated="9"/>
        </table:table-row>
        <table:table-row table:style-name="ro2">
          <table:table-cell table:number-columns-repeated="5"/>
          <table:table-cell office:value-type="string" calcext:value-type="string">
            <text:p>2022-11-08 18:37:35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style-name="ce5"/>
          <table:table-cell table:style-name="ce4"/>
          <table:table-cell table:number-columns-repeated="9"/>
        </table:table-row>
        <table:table-row table:style-name="ro2">
          <table:table-cell table:number-columns-repeated="5"/>
          <table:table-cell office:value-type="string" calcext:value-type="string">
            <text:p>2022-11-08 18:38:35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style-name="ce5"/>
          <table:table-cell table:style-name="ce4"/>
          <table:table-cell table:number-columns-repeated="9"/>
        </table:table-row>
        <table:table-row table:style-name="ro2">
          <table:table-cell table:number-columns-repeated="5"/>
          <table:table-cell office:value-type="string" calcext:value-type="string">
            <text:p>2022-11-08 18:39:35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style-name="ce5"/>
          <table:table-cell table:style-name="ce4"/>
          <table:table-cell table:number-columns-repeated="9"/>
        </table:table-row>
        <table:table-row table:style-name="ro2">
          <table:table-cell table:number-columns-repeated="5"/>
          <table:table-cell office:value-type="string" calcext:value-type="string">
            <text:p>2022-11-08 18:40:35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style-name="ce5"/>
          <table:table-cell table:style-name="ce4"/>
          <table:table-cell table:number-columns-repeated="9"/>
        </table:table-row>
        <table:table-row table:style-name="ro2">
          <table:table-cell table:number-columns-repeated="5"/>
          <table:table-cell office:value-type="string" calcext:value-type="string">
            <text:p>2022-11-08 18:41:35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style-name="ce5"/>
          <table:table-cell table:style-name="ce4"/>
          <table:table-cell table:number-columns-repeated="9"/>
        </table:table-row>
        <table:table-row table:style-name="ro2">
          <table:table-cell table:number-columns-repeated="5"/>
          <table:table-cell office:value-type="string" calcext:value-type="string">
            <text:p>2022-11-08 18:42:35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style-name="ce5"/>
          <table:table-cell table:style-name="ce4"/>
          <table:table-cell table:number-columns-repeated="9"/>
        </table:table-row>
        <table:table-row table:style-name="ro2">
          <table:table-cell table:number-columns-repeated="5"/>
          <table:table-cell office:value-type="string" calcext:value-type="string">
            <text:p>2022-11-08 18:43:35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style-name="ce5"/>
          <table:table-cell table:style-name="ce4"/>
          <table:table-cell table:number-columns-repeated="9"/>
        </table:table-row>
        <table:table-row table:style-name="ro2">
          <table:table-cell table:number-columns-repeated="5"/>
          <table:table-cell office:value-type="string" calcext:value-type="string">
            <text:p>2022-11-08 18:44:35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style-name="ce5"/>
          <table:table-cell table:style-name="ce4"/>
          <table:table-cell table:number-columns-repeated="9"/>
        </table:table-row>
        <table:table-row table:style-name="ro2">
          <table:table-cell table:number-columns-repeated="5"/>
          <table:table-cell office:value-type="string" calcext:value-type="string">
            <text:p>2022-11-08 18:45:35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style-name="ce5"/>
          <table:table-cell table:style-name="ce4"/>
          <table:table-cell table:number-columns-repeated="9"/>
        </table:table-row>
        <table:table-row table:style-name="ro2">
          <table:table-cell table:number-columns-repeated="5"/>
          <table:table-cell office:value-type="string" calcext:value-type="string">
            <text:p>2022-11-08 18:46:35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style-name="ce5"/>
          <table:table-cell table:style-name="ce4"/>
          <table:table-cell table:number-columns-repeated="9"/>
        </table:table-row>
        <table:table-row table:style-name="ro2">
          <table:table-cell table:number-columns-repeated="5"/>
          <table:table-cell office:value-type="string" calcext:value-type="string">
            <text:p>2022-11-08 18:47:35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style-name="ce5"/>
          <table:table-cell table:style-name="ce4"/>
          <table:table-cell table:number-columns-repeated="9"/>
        </table:table-row>
        <table:table-row table:style-name="ro2">
          <table:table-cell table:number-columns-repeated="5"/>
          <table:table-cell office:value-type="string" calcext:value-type="string">
            <text:p>2022-11-08 18:48:35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style-name="ce5"/>
          <table:table-cell table:style-name="ce4"/>
          <table:table-cell table:number-columns-repeated="9"/>
        </table:table-row>
        <table:table-row table:style-name="ro2">
          <table:table-cell table:number-columns-repeated="5"/>
          <table:table-cell office:value-type="string" calcext:value-type="string">
            <text:p>2022-11-08 18:49:35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style-name="ce5"/>
          <table:table-cell table:style-name="ce4"/>
          <table:table-cell table:number-columns-repeated="9"/>
        </table:table-row>
        <table:table-row table:style-name="ro2">
          <table:table-cell table:number-columns-repeated="5"/>
          <table:table-cell office:value-type="string" calcext:value-type="string">
            <text:p>2022-11-08 18:50:35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style-name="ce5"/>
          <table:table-cell table:style-name="ce4"/>
          <table:table-cell table:number-columns-repeated="9"/>
        </table:table-row>
        <table:table-row table:style-name="ro2">
          <table:table-cell table:number-columns-repeated="5"/>
          <table:table-cell office:value-type="string" calcext:value-type="string">
            <text:p>2022-11-08 18:51:35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style-name="ce5"/>
          <table:table-cell table:style-name="ce4"/>
          <table:table-cell table:number-columns-repeated="9"/>
        </table:table-row>
        <table:table-row table:style-name="ro2">
          <table:table-cell table:number-columns-repeated="5"/>
          <table:table-cell office:value-type="string" calcext:value-type="string">
            <text:p>2022-11-08 18:52:35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style-name="ce5"/>
          <table:table-cell table:style-name="ce4"/>
          <table:table-cell table:number-columns-repeated="9"/>
        </table:table-row>
        <table:table-row table:style-name="ro2">
          <table:table-cell table:number-columns-repeated="5"/>
          <table:table-cell office:value-type="string" calcext:value-type="string">
            <text:p>2022-11-08 18:53:35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style-name="ce5"/>
          <table:table-cell table:style-name="ce4"/>
          <table:table-cell table:number-columns-repeated="9"/>
        </table:table-row>
        <table:table-row table:style-name="ro2">
          <table:table-cell table:number-columns-repeated="5"/>
          <table:table-cell office:value-type="string" calcext:value-type="string">
            <text:p>2022-11-08 18:54:35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style-name="ce5"/>
          <table:table-cell table:style-name="ce4"/>
          <table:table-cell table:number-columns-repeated="9"/>
        </table:table-row>
        <table:table-row table:style-name="ro2">
          <table:table-cell table:number-columns-repeated="5"/>
          <table:table-cell office:value-type="string" calcext:value-type="string">
            <text:p>2022-11-08 18:55:35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style-name="ce5"/>
          <table:table-cell table:style-name="ce4"/>
          <table:table-cell table:number-columns-repeated="9"/>
        </table:table-row>
        <table:table-row table:style-name="ro2">
          <table:table-cell table:number-columns-repeated="5"/>
          <table:table-cell office:value-type="string" calcext:value-type="string">
            <text:p>2022-11-08 18:56:35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style-name="ce5"/>
          <table:table-cell table:style-name="ce4"/>
          <table:table-cell table:number-columns-repeated="9"/>
        </table:table-row>
        <table:table-row table:style-name="ro2">
          <table:table-cell table:number-columns-repeated="5"/>
          <table:table-cell office:value-type="string" calcext:value-type="string">
            <text:p>2022-11-08 18:57:35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style-name="ce5"/>
          <table:table-cell table:style-name="ce4"/>
          <table:table-cell table:number-columns-repeated="9"/>
        </table:table-row>
        <table:table-row table:style-name="ro2">
          <table:table-cell table:number-columns-repeated="5"/>
          <table:table-cell office:value-type="string" calcext:value-type="string">
            <text:p>2022-11-08 18:58:35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style-name="ce5"/>
          <table:table-cell table:style-name="ce4"/>
          <table:table-cell table:number-columns-repeated="9"/>
        </table:table-row>
        <table:table-row table:style-name="ro2">
          <table:table-cell table:number-columns-repeated="5"/>
          <table:table-cell office:value-type="string" calcext:value-type="string">
            <text:p>2022-11-08 18:59:35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style-name="ce5"/>
          <table:table-cell table:style-name="ce4"/>
          <table:table-cell table:number-columns-repeated="9"/>
        </table:table-row>
        <table:table-row table:style-name="ro2">
          <table:table-cell table:number-columns-repeated="5"/>
          <table:table-cell office:value-type="string" calcext:value-type="string">
            <text:p>2022-11-08 19:00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9:01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9:02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9:03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9:04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9:05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9:06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9:07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9:08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9:09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9:10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9:11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9:12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9:13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9:14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9:15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9:16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9:17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9:18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9:19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9:20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9:21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9:22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9:23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9:24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9:25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9:26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9:27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9:28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9:29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9:30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9:31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9:32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9:33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9:34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9:35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9:36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9:37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9:38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9:39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9:40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9:41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9:42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9:43:35</text:p>
          </table:table-cell>
          <table:table-cell office:value-type="float" office:value="0.2" calcext:value-type="float">
            <text:p>0.2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9:44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9:45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9:46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9:47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9:48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9:49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9:50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9:51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9:52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9:53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9:54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9:55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9:56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9:57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9:58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19:59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0:00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0:01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0:02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0:03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0:04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0:05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0:06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0:07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0:08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0:09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0:10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0:11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0:12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0:13:35</text:p>
          </table:table-cell>
          <table:table-cell office:value-type="float" office:value="0.2" calcext:value-type="float">
            <text:p>0.2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0:14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0:15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0:16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0:17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0:18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0:19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0:20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0:21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0:22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0:23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0:24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0:25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0:26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0:27:35</text:p>
          </table:table-cell>
          <table:table-cell office:value-type="float" office:value="0.2" calcext:value-type="float">
            <text:p>0.2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0:28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0:29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0:30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0:31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0:32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0:33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0:34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0:35:35</text:p>
          </table:table-cell>
          <table:table-cell office:value-type="float" office:value="0.2" calcext:value-type="float">
            <text:p>0.2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0:36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0:37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0:38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0:39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0:40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0:41:35</text:p>
          </table:table-cell>
          <table:table-cell office:value-type="float" office:value="0.2" calcext:value-type="float">
            <text:p>0.2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0:42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0:43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0:44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0:45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0:46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0:47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0:48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0:49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0:50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0:51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0:52:35</text:p>
          </table:table-cell>
          <table:table-cell office:value-type="float" office:value="0.2" calcext:value-type="float">
            <text:p>0.2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0:53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0:54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0:55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0:56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0:57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0:58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0:59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1:00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1:01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1:02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1:03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1:04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1:05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1:06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1:07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1:08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1:09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1:10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1:11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1:12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1:13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1:14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1:15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1:16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1:17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1:18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1:19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1:20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1:21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1:22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1:23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1:24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1:25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1:26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1:27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1:28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1:29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1:30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1:31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1:32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1:33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1:34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1:35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1:36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1:37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1:38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1:39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1:40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1:41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1:42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1:43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1:44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1:45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1:46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1:47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1:48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1:49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1:50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1:51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1:52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1:53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1:54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1:55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1:56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1:57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1:58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1:59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2:00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2:01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2:02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2:03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2:04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2:05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2:06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2:07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2:08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2:09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2:10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2:11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2:12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2:13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2:14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2:15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2:16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2:17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2:18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2:19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2:20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2:21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2:22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2:23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2:24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2:25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2:26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2:27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2:28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2:29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2:30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2:31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2:32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2:33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2:34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2:35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2:36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2:37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2:38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2:39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2:40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2:41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2:42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2:43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2:44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2:45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2:46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2:47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2:48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2:49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2:50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2:51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2:52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2:53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2:54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2:55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2:56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2:57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2:58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2:59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3:00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3:01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3:02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3:03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3:04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3:05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3:06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3:07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3:08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3:09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3:10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3:11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3:12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3:13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3:14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3:15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3:16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3:17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3:18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3:19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3:20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3:21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3:22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3:23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3:24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3:25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3:26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3:27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3:28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3:29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3:30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3:31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3:32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3:33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3:34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3:35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3:36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3:37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3:38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3:39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3:40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3:41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3:42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3:43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3:44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3:45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3:46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3:47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3:48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3:49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3:50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3:51: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3:52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3:53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3:54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3:55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3:56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3:57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3:58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8 23:59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0:00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0:01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0:02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0:03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0:04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0:05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0:06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0:07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0:08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0:09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0:10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0:11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0:12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0:13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0:14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0:15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0:16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0:17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0:18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0:19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0:20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0:21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0:22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0:23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0:24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0:25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0:26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0:27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0:28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0:29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0:30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0:31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0:32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0:33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0:34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0:35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0:36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0:37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0:38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0:39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0:40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0:41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0:42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0:43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0:44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0:45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0:46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0:47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0:48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0:49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0:50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0:51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0:52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0:53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0:54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0:55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0:56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0:57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0:58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0:59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1:00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1:01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1:02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1:03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1:04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1:05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1:06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1:07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1:08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1:09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1:10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1:11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1:12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1:13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1:14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1:15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1:16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1:17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1:18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1:19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1:20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1:21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1:22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1:23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1:24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1:25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1:26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1:27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1:28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1:29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1:30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1:31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1:32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1:33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1:34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1:35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1:36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1:37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1:38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1:39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1:40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1:41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1:42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1:43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1:44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1:45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1:46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1:47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1:48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1:49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1:50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1:51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1:52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1:53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1:54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1:55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1:56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1:57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1:58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1:59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2:00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2:01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2:02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2:03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2:04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2:05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2:06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2:07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2:08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2:09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2:10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2:11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2:12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2:13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2:14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2:15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2:16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2:17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2:18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2:19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2:20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2:21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2:22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2:23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2:24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2:25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2:26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2:27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2:28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2:29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2:30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2:31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2:32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2:33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2:34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2:35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2:36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2:37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2:38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2:39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2:40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2:41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2:42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2:43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2:44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2:45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2:46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2:47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2:48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2:49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2:50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2:51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2:52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2:53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2:54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2:55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2:56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2:57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2:58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2:59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3:00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3:01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3:02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3:03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3:04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3:05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3:06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3:07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3:08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3:09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3:10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3:11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3:12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3:13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3:14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3:15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3:16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3:17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3:18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3:19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3:20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3:21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3:22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3:23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3:24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3:25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3:26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3:27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3:28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3:29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3:30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3:31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3:32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3:33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3:34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3:35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3:36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3:37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3:38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3:39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3:40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3:41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3:42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3:43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3:44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3:45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3:46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3:47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3:48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3:49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3:50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3:51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3:52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3:53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3:54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3:55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3:56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3:57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3:58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3:59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4:00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4:01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4:02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4:03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4:04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4:05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4:06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4:07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4:08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4:09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4:10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4:11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4:12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4:13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4:14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4:15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4:16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4:17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4:18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4:19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4:20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4:21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4:22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4:23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4:24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4:25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4:26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4:27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4:28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4:29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4:30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4:31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4:32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4:33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4:34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4:35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4:36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4:37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4:38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4:39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4:40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4:41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4:42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4:43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4:44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4:45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4:46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4:47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4:48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4:49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4:50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4:51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4:52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4:53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4:54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4:55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4:56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4:57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4:58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4:59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5:00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5:01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5:02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5:03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5:04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5:05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5:06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5:07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5:08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5:09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5:10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5:11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5:12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5:13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5:14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5:15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5:16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5:17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5:18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5:19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5:20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5:21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5:22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5:23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5:24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5:25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5:26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5:27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5:28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5:29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5:30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5:31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5:32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5:33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5:34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5:35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5:36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5:37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5:38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5:39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5:40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5:41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5:42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5:43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5:44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5:45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5:46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5:47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5:48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5:49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5:50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5:51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5:52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5:53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5:54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5:55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5:56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5:57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5:58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5:59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6:00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6:01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6:02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6:03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6:04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6:05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6:06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6:07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6:08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6:09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6:10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6:11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6:12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6:13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6:14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6:15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6:16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6:17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6:18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6:19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6:20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6:21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6:22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6:23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6:24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6:25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6:26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6:27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6:28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6:29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6:30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6:31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6:32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6:33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6:34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6:35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6:36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6:37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6:38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6:39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6:40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6:41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6:42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6:43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6:44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6:45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6:46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6:47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6:48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6:49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6:50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6:51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6:52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6:53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6:54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6:55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6:56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6:57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6:58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6:59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7:00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7:01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7:02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7:03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7:04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7:05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7:06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7:07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7:08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7:09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7:10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7:11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7:12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7:13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7:14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7:15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7:16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7:17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7:18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7:19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7:20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7:21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7:22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7:23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7:24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7:25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7:26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7:27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7:28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7:29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7:30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7:31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7:32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7:33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7:34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7:35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7:36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7:37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7:38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7:39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7:40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7:41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7:42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7:43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7:44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7:45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7:46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7:47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7:48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7:49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7:50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7:51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7:52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7:53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7:54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7:55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7:56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7:57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7:58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7:59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8:00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8:01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8:02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8:03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8:04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8:05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8:06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8:07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8:08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8:09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8:10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8:11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8:12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8:13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8:14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8:15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8:16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8:17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8:18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8:19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8:20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8:21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8:22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8:23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8:24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8:25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8:26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8:27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8:28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8:29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8:30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8:31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8:32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8:33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8:34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8:35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8:36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8:37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8:38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8:39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8:40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8:41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8:42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8:43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8:44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8:45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8:46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8:47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8:48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8:49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8:50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8:51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8:52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8:53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8:54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8:55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8:56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8:57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8:58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8:59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9:00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9:01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9:02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9:03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9:04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9:05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9:06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9:07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9:08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9:09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9:10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9:11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9:12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9:13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9:14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9:15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9:16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9:17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9:18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9:19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9:20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9:21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9:22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9:23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9:24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9:25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9:26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9:27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9:28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9:29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9:30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9:31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9:32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9:33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9:34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9:35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9:36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9:37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9:38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9:39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9:40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9:41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9:42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9:43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9:44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9:45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9:46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9:47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9:48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9:49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9:50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9:51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9:52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9:53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9:54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9:55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9:56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9:57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9:58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09:59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10:00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10:01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10:02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10:03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10:04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10:05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10:06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10:07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10:08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10:09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10:10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10:11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10:12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10:13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10:14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10:15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10:16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10:17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10:18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10:19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10:20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10:21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10:22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10:23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10:24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10:25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10:26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10:27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10:28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10:29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10:30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10:31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10:32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10:33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10:34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10:35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10:36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10:37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10:38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10:39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10:40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10:41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10:42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10:43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10:44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10:45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10:46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10:47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10:48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10:49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10:50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10:51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10:52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10:53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10:54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10:55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10:56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10:57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10:58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10:59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11:00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11:01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11:02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11:03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11:04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11:05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string" calcext:value-type="string">
            <text:p>2022-11-09 11:06: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</table:table>
      <table:table table:name="Sheet2" table:style-name="ta1">
        <table:shapes>
          <draw:frame draw:z-index="0" draw:style-name="gr1" draw:text-style-name="P1" svg:width="29.364cm" svg:height="13.138cm" svg:x="22.6cm" svg:y="4.845cm">
            <draw:object draw:notify-on-update-of-ranges="'test 8th nov'.U10:'test 8th nov'.U85 'test 8th nov'.V10:'test 8th nov'.V85 'test 8th nov'.W10:'test 8th nov'.W8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8" table:default-cell-style-name="ce8"/>
        <table:table-column table:style-name="co9" table:default-cell-style-name="ce7"/>
        <table:table-column table:style-name="co10" table:default-cell-style-name="ce4"/>
        <table:table-column table:style-name="co1" table:default-cell-style-name="ce1"/>
        <table:table-column table:style-name="co1" table:default-cell-style-name="ce2"/>
        <table:table-column table:style-name="co1" table:number-columns-repeated="2" table:default-cell-style-name="Default"/>
        <table:table-row table:style-name="ro2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device_frmpayload_data_rainfall</text:p>
          </table:table-cell>
          <table:table-cell/>
          <table:table-cell table:style-name="ce9"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loudness</text:p>
          </table:table-cell>
        </table:table-row>
        <table:table-row table:style-name="ro2">
          <table:table-cell office:value-type="string" calcext:value-type="string">
            <text:p>2022-11-08 16:52:3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2-11-08" calcext:value-type="date">
            <text:p>08/11/22</text:p>
          </table:table-cell>
          <table:table-cell office:value-type="time" office:time-value="PT16H52M35S" calcext:value-type="time">
            <text:p>16:52:35</text:p>
          </table:table-cell>
          <table:table-cell office:value-type="float" office:value="143" calcext:value-type="float">
            <text:p>143</text:p>
          </table:table-cell>
          <table:table-cell office:value-type="float" office:value="106" calcext:value-type="float">
            <text:p>106</text:p>
          </table:table-cell>
        </table:table-row>
        <table:table-row table:style-name="ro2">
          <table:table-cell office:value-type="string" calcext:value-type="string">
            <text:p>2022-11-08 16:53:3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2-11-08" calcext:value-type="date">
            <text:p>08/11/22</text:p>
          </table:table-cell>
          <table:table-cell office:value-type="time" office:time-value="PT16H53M35S" calcext:value-type="time">
            <text:p>16:53:35</text:p>
          </table:table-cell>
          <table:table-cell office:value-type="float" office:value="48" calcext:value-type="float">
            <text:p>48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string" calcext:value-type="string">
            <text:p>2022-11-08 16:54:3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2-11-08" calcext:value-type="date">
            <text:p>08/11/22</text:p>
          </table:table-cell>
          <table:table-cell office:value-type="time" office:time-value="PT16H54M35S" calcext:value-type="time">
            <text:p>16:54:35</text:p>
          </table:table-cell>
          <table:table-cell office:value-type="float" office:value="97" calcext:value-type="float">
            <text:p>97</text:p>
          </table:table-cell>
          <table:table-cell office:value-type="float" office:value="86" calcext:value-type="float">
            <text:p>86</text:p>
          </table:table-cell>
        </table:table-row>
        <table:table-row table:style-name="ro2">
          <table:table-cell office:value-type="string" calcext:value-type="string">
            <text:p>2022-11-08 16:55:3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2-11-08" calcext:value-type="date">
            <text:p>08/11/22</text:p>
          </table:table-cell>
          <table:table-cell office:value-type="time" office:time-value="PT16H55M35S" calcext:value-type="time">
            <text:p>16:55:35</text:p>
          </table:table-cell>
          <table:table-cell office:value-type="float" office:value="10" calcext:value-type="float">
            <text:p>10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 office:value-type="string" calcext:value-type="string">
            <text:p>2022-11-08 16:56:3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2-11-08" calcext:value-type="date">
            <text:p>08/11/22</text:p>
          </table:table-cell>
          <table:table-cell office:value-type="time" office:time-value="PT16H56M35S" calcext:value-type="time">
            <text:p>16:56:35</text:p>
          </table:table-cell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string" calcext:value-type="string">
            <text:p>2022-11-08 16:57:35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date" office:date-value="2022-11-08" calcext:value-type="date">
            <text:p>08/11/22</text:p>
          </table:table-cell>
          <table:table-cell office:value-type="time" office:time-value="PT16H57M35S" calcext:value-type="time">
            <text:p>16:57:35</text:p>
          </table:table-cell>
          <table:table-cell office:value-type="float" office:value="24" calcext:value-type="float">
            <text:p>24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office:value-type="string" calcext:value-type="string">
            <text:p>2022-11-08 16:58:3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2-11-08" calcext:value-type="date">
            <text:p>08/11/22</text:p>
          </table:table-cell>
          <table:table-cell office:value-type="time" office:time-value="PT16H58M35S" calcext:value-type="time">
            <text:p>16:58:35</text:p>
          </table:table-cell>
          <table:table-cell office:value-type="float" office:value="58" calcext:value-type="float">
            <text:p>58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office:value-type="string" calcext:value-type="string">
            <text:p>2022-11-08 16:59:3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2-11-08" calcext:value-type="date">
            <text:p>08/11/22</text:p>
          </table:table-cell>
          <table:table-cell office:value-type="time" office:time-value="PT16H59M35S" calcext:value-type="time">
            <text:p>16:59:35</text:p>
          </table:table-cell>
          <table:table-cell office:value-type="float" office:value="52" calcext:value-type="float">
            <text:p>52</text:p>
          </table:table-cell>
          <table:table-cell office:value-type="float" office:value="86" calcext:value-type="float">
            <text:p>86</text:p>
          </table:table-cell>
        </table:table-row>
        <table:table-row table:style-name="ro2">
          <table:table-cell office:value-type="string" calcext:value-type="string">
            <text:p>2022-11-08 17:00:3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2-11-08" calcext:value-type="date">
            <text:p>08/11/22</text:p>
          </table:table-cell>
          <table:table-cell office:value-type="time" office:time-value="PT17H00M36S" calcext:value-type="time">
            <text:p>17:00:36</text:p>
          </table:table-cell>
          <table:table-cell office:value-type="float" office:value="24" calcext:value-type="float">
            <text:p>24</text:p>
          </table:table-cell>
          <table:table-cell office:value-type="float" office:value="101" calcext:value-type="float">
            <text:p>101</text:p>
          </table:table-cell>
        </table:table-row>
        <table:table-row table:style-name="ro2">
          <table:table-cell office:value-type="string" calcext:value-type="string">
            <text:p>2022-11-08 17:01:3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2-11-08" calcext:value-type="date">
            <text:p>08/11/22</text:p>
          </table:table-cell>
          <table:table-cell office:value-type="time" office:time-value="PT17H01M36S" calcext:value-type="time">
            <text:p>17:01:36</text:p>
          </table:table-cell>
          <table:table-cell office:value-type="float" office:value="17" calcext:value-type="float">
            <text:p>17</text:p>
          </table:table-cell>
          <table:table-cell office:value-type="float" office:value="86" calcext:value-type="float">
            <text:p>86</text:p>
          </table:table-cell>
        </table:table-row>
        <table:table-row table:style-name="ro2">
          <table:table-cell office:value-type="string" calcext:value-type="string">
            <text:p>2022-11-08 17:02:3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2-11-08" calcext:value-type="date">
            <text:p>08/11/22</text:p>
          </table:table-cell>
          <table:table-cell office:value-type="time" office:time-value="PT17H02M36S" calcext:value-type="time">
            <text:p>17:02:36</text:p>
          </table:table-cell>
          <table:table-cell office:value-type="float" office:value="71" calcext:value-type="float">
            <text:p>71</text:p>
          </table:table-cell>
          <table:table-cell office:value-type="float" office:value="97" calcext:value-type="float">
            <text:p>97</text:p>
          </table:table-cell>
        </table:table-row>
        <table:table-row table:style-name="ro2">
          <table:table-cell office:value-type="string" calcext:value-type="string">
            <text:p>2022-11-08 17:03:3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2-11-08" calcext:value-type="date">
            <text:p>08/11/22</text:p>
          </table:table-cell>
          <table:table-cell office:value-type="time" office:time-value="PT17H03M36S" calcext:value-type="time">
            <text:p>17:03:36</text:p>
          </table:table-cell>
          <table:table-cell office:value-type="float" office:value="141" calcext:value-type="float">
            <text:p>141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office:value-type="string" calcext:value-type="string">
            <text:p>2022-11-08 17:04:35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date" office:date-value="2022-11-08" calcext:value-type="date">
            <text:p>08/11/22</text:p>
          </table:table-cell>
          <table:table-cell office:value-type="time" office:time-value="PT17H04M36S" calcext:value-type="time">
            <text:p>17:04:36</text:p>
          </table:table-cell>
          <table:table-cell office:value-type="float" office:value="174" calcext:value-type="float">
            <text:p>174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office:value-type="string" calcext:value-type="string">
            <text:p>2022-11-08 17:05:3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2-11-08" calcext:value-type="date">
            <text:p>08/11/22</text:p>
          </table:table-cell>
          <table:table-cell office:value-type="time" office:time-value="PT17H05M36S" calcext:value-type="time">
            <text:p>17:05:36</text:p>
          </table:table-cell>
          <table:table-cell office:value-type="float" office:value="148" calcext:value-type="float">
            <text:p>148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office:value-type="string" calcext:value-type="string">
            <text:p>2022-11-08 17:06:3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2-11-08" calcext:value-type="date">
            <text:p>08/11/22</text:p>
          </table:table-cell>
          <table:table-cell office:value-type="time" office:time-value="PT17H06M36S" calcext:value-type="time">
            <text:p>17:06:36</text:p>
          </table:table-cell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string" calcext:value-type="string">
            <text:p>2022-11-08 17:07:3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2-11-08" calcext:value-type="date">
            <text:p>08/11/22</text:p>
          </table:table-cell>
          <table:table-cell office:value-type="time" office:time-value="PT17H07M37S" calcext:value-type="time">
            <text:p>17:07:37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office:value-type="string" calcext:value-type="string">
            <text:p>2022-11-08 17:08:3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2-11-08" calcext:value-type="date">
            <text:p>08/11/22</text:p>
          </table:table-cell>
          <table:table-cell office:value-type="time" office:time-value="PT17H08M37S" calcext:value-type="time">
            <text:p>17:08:37</text:p>
          </table:table-cell>
          <table:table-cell office:value-type="float" office:value="64" calcext:value-type="float">
            <text:p>6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string" calcext:value-type="string">
            <text:p>2022-11-08 17:09:3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2-11-08" calcext:value-type="date">
            <text:p>08/11/22</text:p>
          </table:table-cell>
          <table:table-cell office:value-type="time" office:time-value="PT17H09M37S" calcext:value-type="time">
            <text:p>17:09:37</text:p>
          </table:table-cell>
          <table:table-cell office:value-type="float" office:value="118" calcext:value-type="float">
            <text:p>118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string" calcext:value-type="string">
            <text:p>2022-11-08 19:38:3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2-11-08" calcext:value-type="date">
            <text:p>08/11/22</text:p>
          </table:table-cell>
          <table:table-cell office:value-type="time" office:time-value="PT19H38M07S" calcext:value-type="time">
            <text:p>19:38:07</text:p>
          </table:table-cell>
          <table:table-cell office:value-type="float" office:value="16" calcext:value-type="float">
            <text:p>16</text:p>
          </table:table-cell>
          <table:table-cell office:value-type="float" office:value="252" calcext:value-type="float">
            <text:p>252</text:p>
          </table:table-cell>
        </table:table-row>
        <table:table-row table:style-name="ro2">
          <table:table-cell office:value-type="string" calcext:value-type="string">
            <text:p>2022-11-08 19:39:3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2-11-08" calcext:value-type="date">
            <text:p>08/11/22</text:p>
          </table:table-cell>
          <table:table-cell office:value-type="time" office:time-value="PT19H39M07S" calcext:value-type="time">
            <text:p>19:39:07</text:p>
          </table:table-cell>
          <table:table-cell office:value-type="float" office:value="67" calcext:value-type="float">
            <text:p>67</text:p>
          </table:table-cell>
          <table:table-cell office:value-type="float" office:value="160" calcext:value-type="float">
            <text:p>160</text:p>
          </table:table-cell>
        </table:table-row>
        <table:table-row table:style-name="ro2">
          <table:table-cell office:value-type="string" calcext:value-type="string">
            <text:p>2022-11-08 19:40:3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2-11-08" calcext:value-type="date">
            <text:p>08/11/22</text:p>
          </table:table-cell>
          <table:table-cell office:value-type="time" office:time-value="PT19H40M07S" calcext:value-type="time">
            <text:p>19:40:07</text:p>
          </table:table-cell>
          <table:table-cell office:value-type="float" office:value="92" calcext:value-type="float">
            <text:p>92</text:p>
          </table:table-cell>
          <table:table-cell office:value-type="float" office:value="159" calcext:value-type="float">
            <text:p>159</text:p>
          </table:table-cell>
        </table:table-row>
        <table:table-row table:style-name="ro2">
          <table:table-cell office:value-type="string" calcext:value-type="string">
            <text:p>2022-11-08 19:41:3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2-11-08" calcext:value-type="date">
            <text:p>08/11/22</text:p>
          </table:table-cell>
          <table:table-cell office:value-type="time" office:time-value="PT19H41M08S" calcext:value-type="time">
            <text:p>19:41:08</text:p>
          </table:table-cell>
          <table:table-cell office:value-type="float" office:value="95" calcext:value-type="float">
            <text:p>95</text:p>
          </table:table-cell>
          <table:table-cell office:value-type="float" office:value="122" calcext:value-type="float">
            <text:p>122</text:p>
          </table:table-cell>
        </table:table-row>
        <table:table-row table:style-name="ro2">
          <table:table-cell office:value-type="string" calcext:value-type="string">
            <text:p>2022-11-08 19:42:3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2-11-08" calcext:value-type="date">
            <text:p>08/11/22</text:p>
          </table:table-cell>
          <table:table-cell office:value-type="time" office:time-value="PT19H42M08S" calcext:value-type="time">
            <text:p>19:42:08</text:p>
          </table:table-cell>
          <table:table-cell office:value-type="float" office:value="57" calcext:value-type="float">
            <text:p>57</text:p>
          </table:table-cell>
          <table:table-cell office:value-type="float" office:value="131" calcext:value-type="float">
            <text:p>131</text:p>
          </table:table-cell>
        </table:table-row>
        <table:table-row table:style-name="ro2">
          <table:table-cell office:value-type="string" calcext:value-type="string">
            <text:p>2022-11-08 19:43:35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date" office:date-value="2022-11-08" calcext:value-type="date">
            <text:p>08/11/22</text:p>
          </table:table-cell>
          <table:table-cell office:value-type="time" office:time-value="PT19H43M08S" calcext:value-type="time">
            <text:p>19:43:08</text:p>
          </table:table-cell>
          <table:table-cell office:value-type="float" office:value="42" calcext:value-type="float">
            <text:p>42</text:p>
          </table:table-cell>
          <table:table-cell office:value-type="float" office:value="143" calcext:value-type="float">
            <text:p>143</text:p>
          </table:table-cell>
        </table:table-row>
        <table:table-row table:style-name="ro2">
          <table:table-cell office:value-type="string" calcext:value-type="string">
            <text:p>2022-11-08 19:44:3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2-11-08" calcext:value-type="date">
            <text:p>08/11/22</text:p>
          </table:table-cell>
          <table:table-cell office:value-type="time" office:time-value="PT19H44M08S" calcext:value-type="time">
            <text:p>19:44:08</text:p>
          </table:table-cell>
          <table:table-cell office:value-type="float" office:value="71" calcext:value-type="float">
            <text:p>71</text:p>
          </table:table-cell>
          <table:table-cell office:value-type="float" office:value="121" calcext:value-type="float">
            <text:p>121</text:p>
          </table:table-cell>
        </table:table-row>
        <table:table-row table:style-name="ro2">
          <table:table-cell office:value-type="string" calcext:value-type="string">
            <text:p>2022-11-08 19:45:3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2-11-08" calcext:value-type="date">
            <text:p>08/11/22</text:p>
          </table:table-cell>
          <table:table-cell office:value-type="time" office:time-value="PT19H45M09S" calcext:value-type="time">
            <text:p>19:45:09</text:p>
          </table:table-cell>
          <table:table-cell office:value-type="float" office:value="61" calcext:value-type="float">
            <text:p>61</text:p>
          </table:table-cell>
          <table:table-cell office:value-type="float" office:value="130" calcext:value-type="float">
            <text:p>130</text:p>
          </table:table-cell>
        </table:table-row>
        <table:table-row table:style-name="ro2">
          <table:table-cell office:value-type="string" calcext:value-type="string">
            <text:p>2022-11-08 19:46:3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2-11-08" calcext:value-type="date">
            <text:p>08/11/22</text:p>
          </table:table-cell>
          <table:table-cell office:value-type="time" office:time-value="PT19H46M09S" calcext:value-type="time">
            <text:p>19:46:09</text:p>
          </table:table-cell>
          <table:table-cell office:value-type="float" office:value="88" calcext:value-type="float">
            <text:p>88</text:p>
          </table:table-cell>
          <table:table-cell office:value-type="float" office:value="144" calcext:value-type="float">
            <text:p>144</text:p>
          </table:table-cell>
        </table:table-row>
        <table:table-row table:style-name="ro2">
          <table:table-cell office:value-type="string" calcext:value-type="string">
            <text:p>2022-11-08 19:47:3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2-11-08" calcext:value-type="date">
            <text:p>08/11/22</text:p>
          </table:table-cell>
          <table:table-cell office:value-type="time" office:time-value="PT19H47M09S" calcext:value-type="time">
            <text:p>19:47:09</text:p>
          </table:table-cell>
          <table:table-cell office:value-type="float" office:value="205" calcext:value-type="float">
            <text:p>205</text:p>
          </table:table-cell>
          <table:table-cell office:value-type="float" office:value="134" calcext:value-type="float">
            <text:p>134</text:p>
          </table:table-cell>
        </table:table-row>
        <table:table-row table:style-name="ro2">
          <table:table-cell office:value-type="string" calcext:value-type="string">
            <text:p>2022-11-08 19:48:3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2-11-08" calcext:value-type="date">
            <text:p>08/11/22</text:p>
          </table:table-cell>
          <table:table-cell office:value-type="time" office:time-value="PT19H48M09S" calcext:value-type="time">
            <text:p>19:48:09</text:p>
          </table:table-cell>
          <table:table-cell office:value-type="float" office:value="174" calcext:value-type="float">
            <text:p>174</text:p>
          </table:table-cell>
          <table:table-cell office:value-type="float" office:value="135" calcext:value-type="float">
            <text:p>135</text:p>
          </table:table-cell>
        </table:table-row>
        <table:table-row table:style-name="ro2">
          <table:table-cell office:value-type="string" calcext:value-type="string">
            <text:p>2022-11-08 20:08:3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2-11-08" calcext:value-type="date">
            <text:p>08/11/22</text:p>
          </table:table-cell>
          <table:table-cell office:value-type="time" office:time-value="PT20H08M15S" calcext:value-type="time">
            <text:p>20:08:15</text:p>
          </table:table-cell>
          <table:table-cell office:value-type="float" office:value="119" calcext:value-type="float">
            <text:p>119</text:p>
          </table:table-cell>
          <table:table-cell office:value-type="float" office:value="141" calcext:value-type="float">
            <text:p>141</text:p>
          </table:table-cell>
        </table:table-row>
        <table:table-row table:style-name="ro2">
          <table:table-cell office:value-type="string" calcext:value-type="string">
            <text:p>2022-11-08 20:09:3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2-11-08" calcext:value-type="date">
            <text:p>08/11/22</text:p>
          </table:table-cell>
          <table:table-cell office:value-type="time" office:time-value="PT20H09M15S" calcext:value-type="time">
            <text:p>20:09:15</text:p>
          </table:table-cell>
          <table:table-cell office:value-type="float" office:value="75" calcext:value-type="float">
            <text:p>75</text:p>
          </table:table-cell>
          <table:table-cell office:value-type="float" office:value="136" calcext:value-type="float">
            <text:p>136</text:p>
          </table:table-cell>
        </table:table-row>
        <table:table-row table:style-name="ro2">
          <table:table-cell office:value-type="string" calcext:value-type="string">
            <text:p>2022-11-08 20:10:3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2-11-08" calcext:value-type="date">
            <text:p>08/11/22</text:p>
          </table:table-cell>
          <table:table-cell office:value-type="time" office:time-value="PT20H10M15S" calcext:value-type="time">
            <text:p>20:10:15</text:p>
          </table:table-cell>
          <table:table-cell office:value-type="float" office:value="78" calcext:value-type="float">
            <text:p>78</text:p>
          </table:table-cell>
          <table:table-cell office:value-type="float" office:value="138" calcext:value-type="float">
            <text:p>138</text:p>
          </table:table-cell>
        </table:table-row>
        <table:table-row table:style-name="ro2">
          <table:table-cell office:value-type="string" calcext:value-type="string">
            <text:p>2022-11-08 20:11:3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2-11-08" calcext:value-type="date">
            <text:p>08/11/22</text:p>
          </table:table-cell>
          <table:table-cell office:value-type="time" office:time-value="PT20H11M16S" calcext:value-type="time">
            <text:p>20:11:16</text:p>
          </table:table-cell>
          <table:table-cell office:value-type="float" office:value="175" calcext:value-type="float">
            <text:p>175</text:p>
          </table:table-cell>
          <table:table-cell office:value-type="float" office:value="143" calcext:value-type="float">
            <text:p>143</text:p>
          </table:table-cell>
        </table:table-row>
        <table:table-row table:style-name="ro2">
          <table:table-cell office:value-type="string" calcext:value-type="string">
            <text:p>2022-11-08 20:12:3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2-11-08" calcext:value-type="date">
            <text:p>08/11/22</text:p>
          </table:table-cell>
          <table:table-cell office:value-type="time" office:time-value="PT20H12M16S" calcext:value-type="time">
            <text:p>20:12:16</text:p>
          </table:table-cell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</table:table-row>
        <table:table-row table:style-name="ro2">
          <table:table-cell office:value-type="string" calcext:value-type="string">
            <text:p>2022-11-08 20:13:35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date" office:date-value="2022-11-08" calcext:value-type="date">
            <text:p>08/11/22</text:p>
          </table:table-cell>
          <table:table-cell office:value-type="time" office:time-value="PT20H13M16S" calcext:value-type="time">
            <text:p>20:13:16</text:p>
          </table:table-cell>
          <table:table-cell office:value-type="float" office:value="90" calcext:value-type="float">
            <text:p>90</text:p>
          </table:table-cell>
          <table:table-cell office:value-type="float" office:value="119" calcext:value-type="float">
            <text:p>119</text:p>
          </table:table-cell>
        </table:table-row>
        <table:table-row table:style-name="ro2">
          <table:table-cell office:value-type="string" calcext:value-type="string">
            <text:p>2022-11-08 20:14:3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2-11-08" calcext:value-type="date">
            <text:p>08/11/22</text:p>
          </table:table-cell>
          <table:table-cell office:value-type="time" office:time-value="PT20H14M17S" calcext:value-type="time">
            <text:p>20:14:17</text:p>
          </table:table-cell>
          <table:table-cell office:value-type="float" office:value="97" calcext:value-type="float">
            <text:p>97</text:p>
          </table:table-cell>
          <table:table-cell office:value-type="float" office:value="128" calcext:value-type="float">
            <text:p>128</text:p>
          </table:table-cell>
        </table:table-row>
        <table:table-row table:style-name="ro2">
          <table:table-cell office:value-type="string" calcext:value-type="string">
            <text:p>2022-11-08 20:15:3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2-11-08" calcext:value-type="date">
            <text:p>08/11/22</text:p>
          </table:table-cell>
          <table:table-cell office:value-type="time" office:time-value="PT20H15M17S" calcext:value-type="time">
            <text:p>20:15:17</text:p>
          </table:table-cell>
          <table:table-cell office:value-type="float" office:value="111" calcext:value-type="float">
            <text:p>111</text:p>
          </table:table-cell>
          <table:table-cell office:value-type="float" office:value="136" calcext:value-type="float">
            <text:p>136</text:p>
          </table:table-cell>
        </table:table-row>
        <table:table-row table:style-name="ro2">
          <table:table-cell office:value-type="string" calcext:value-type="string">
            <text:p>2022-11-08 20:16:3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2-11-08" calcext:value-type="date">
            <text:p>08/11/22</text:p>
          </table:table-cell>
          <table:table-cell office:value-type="time" office:time-value="PT20H16M17S" calcext:value-type="time">
            <text:p>20:16:17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2022-11-08 20:17:3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2-11-08" calcext:value-type="date">
            <text:p>08/11/22</text:p>
          </table:table-cell>
          <table:table-cell office:value-type="time" office:time-value="PT20H17M17S" calcext:value-type="time">
            <text:p>20:17:17</text:p>
          </table:table-cell>
          <table:table-cell office:value-type="float" office:value="81" calcext:value-type="float">
            <text:p>81</text:p>
          </table:table-cell>
          <table:table-cell office:value-type="float" office:value="138" calcext:value-type="float">
            <text:p>138</text:p>
          </table:table-cell>
        </table:table-row>
        <table:table-row table:style-name="ro2">
          <table:table-cell office:value-type="string" calcext:value-type="string">
            <text:p>2022-11-08 20:18:3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2-11-08" calcext:value-type="date">
            <text:p>08/11/22</text:p>
          </table:table-cell>
          <table:table-cell office:value-type="time" office:time-value="PT20H18M18S" calcext:value-type="time">
            <text:p>20:18:18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string" calcext:value-type="string">
            <text:p>2022-11-08 20:22:3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2-11-08" calcext:value-type="date">
            <text:p>08/11/22</text:p>
          </table:table-cell>
          <table:table-cell office:value-type="time" office:time-value="PT20H22M19S" calcext:value-type="time">
            <text:p>20:22:19</text:p>
          </table:table-cell>
          <table:table-cell office:value-type="float" office:value="77" calcext:value-type="float">
            <text:p>77</text:p>
          </table:table-cell>
          <table:table-cell office:value-type="float" office:value="99" calcext:value-type="float">
            <text:p>99</text:p>
          </table:table-cell>
        </table:table-row>
        <table:table-row table:style-name="ro2">
          <table:table-cell office:value-type="string" calcext:value-type="string">
            <text:p>2022-11-08 20:23:3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2-11-08" calcext:value-type="date">
            <text:p>08/11/22</text:p>
          </table:table-cell>
          <table:table-cell office:value-type="time" office:time-value="PT20H23M19S" calcext:value-type="time">
            <text:p>20:23:19</text:p>
          </table:table-cell>
          <table:table-cell office:value-type="float" office:value="99" calcext:value-type="float">
            <text:p>99</text:p>
          </table:table-cell>
          <table:table-cell office:value-type="float" office:value="127" calcext:value-type="float">
            <text:p>127</text:p>
          </table:table-cell>
        </table:table-row>
        <table:table-row table:style-name="ro2">
          <table:table-cell office:value-type="string" calcext:value-type="string">
            <text:p>2022-11-08 20:24:3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2-11-08" calcext:value-type="date">
            <text:p>08/11/22</text:p>
          </table:table-cell>
          <table:table-cell office:value-type="time" office:time-value="PT20H24M19S" calcext:value-type="time">
            <text:p>20:24:19</text:p>
          </table:table-cell>
          <table:table-cell office:value-type="float" office:value="71" calcext:value-type="float">
            <text:p>71</text:p>
          </table:table-cell>
          <table:table-cell office:value-type="float" office:value="112" calcext:value-type="float">
            <text:p>112</text:p>
          </table:table-cell>
        </table:table-row>
        <table:table-row table:style-name="ro2">
          <table:table-cell office:value-type="string" calcext:value-type="string">
            <text:p>2022-11-08 20:25:3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2-11-08" calcext:value-type="date">
            <text:p>08/11/22</text:p>
          </table:table-cell>
          <table:table-cell office:value-type="time" office:time-value="PT20H25M20S" calcext:value-type="time">
            <text:p>20:25:20</text:p>
          </table:table-cell>
          <table:table-cell office:value-type="float" office:value="78" calcext:value-type="float">
            <text:p>78</text:p>
          </table:table-cell>
          <table:table-cell office:value-type="float" office:value="101" calcext:value-type="float">
            <text:p>101</text:p>
          </table:table-cell>
        </table:table-row>
        <table:table-row table:style-name="ro2">
          <table:table-cell office:value-type="string" calcext:value-type="string">
            <text:p>2022-11-08 20:26:3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2-11-08" calcext:value-type="date">
            <text:p>08/11/22</text:p>
          </table:table-cell>
          <table:table-cell office:value-type="time" office:time-value="PT20H26M20S" calcext:value-type="time">
            <text:p>20:26:20</text:p>
          </table:table-cell>
          <table:table-cell office:value-type="float" office:value="159" calcext:value-type="float">
            <text:p>159</text:p>
          </table:table-cell>
          <table:table-cell office:value-type="float" office:value="125" calcext:value-type="float">
            <text:p>125</text:p>
          </table:table-cell>
        </table:table-row>
        <table:table-row table:style-name="ro2">
          <table:table-cell office:value-type="string" calcext:value-type="string">
            <text:p>2022-11-08 20:27:35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date" office:date-value="2022-11-08" calcext:value-type="date">
            <text:p>08/11/22</text:p>
          </table:table-cell>
          <table:table-cell office:value-type="time" office:time-value="PT20H27M20S" calcext:value-type="time">
            <text:p>20:27:20</text:p>
          </table:table-cell>
          <table:table-cell office:value-type="float" office:value="60" calcext:value-type="float">
            <text:p>60</text:p>
          </table:table-cell>
          <table:table-cell office:value-type="float" office:value="146" calcext:value-type="float">
            <text:p>146</text:p>
          </table:table-cell>
        </table:table-row>
        <table:table-row table:style-name="ro2">
          <table:table-cell office:value-type="string" calcext:value-type="string">
            <text:p>2022-11-08 20:28:3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2-11-08" calcext:value-type="date">
            <text:p>08/11/22</text:p>
          </table:table-cell>
          <table:table-cell office:value-type="time" office:time-value="PT20H28M21S" calcext:value-type="time">
            <text:p>20:28:21</text:p>
          </table:table-cell>
          <table:table-cell office:value-type="float" office:value="140" calcext:value-type="float">
            <text:p>140</text:p>
          </table:table-cell>
          <table:table-cell office:value-type="float" office:value="122" calcext:value-type="float">
            <text:p>122</text:p>
          </table:table-cell>
        </table:table-row>
        <table:table-row table:style-name="ro2">
          <table:table-cell office:value-type="string" calcext:value-type="string">
            <text:p>2022-11-08 20:29:3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2-11-08" calcext:value-type="date">
            <text:p>08/11/22</text:p>
          </table:table-cell>
          <table:table-cell office:value-type="time" office:time-value="PT20H29M21S" calcext:value-type="time">
            <text:p>20:29:21</text:p>
          </table:table-cell>
          <table:table-cell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</table:table-row>
        <table:table-row table:style-name="ro2">
          <table:table-cell office:value-type="string" calcext:value-type="string">
            <text:p>2022-11-08 20:30:3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2-11-08" calcext:value-type="date">
            <text:p>08/11/22</text:p>
          </table:table-cell>
          <table:table-cell office:value-type="time" office:time-value="PT20H30M21S" calcext:value-type="time">
            <text:p>20:30:21</text:p>
          </table:table-cell>
          <table:table-cell office:value-type="float" office:value="119" calcext:value-type="float">
            <text:p>119</text:p>
          </table:table-cell>
          <table:table-cell office:value-type="float" office:value="131" calcext:value-type="float">
            <text:p>131</text:p>
          </table:table-cell>
        </table:table-row>
        <table:table-row table:style-name="ro2">
          <table:table-cell office:value-type="string" calcext:value-type="string">
            <text:p>2022-11-08 20:31:3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2-11-08" calcext:value-type="date">
            <text:p>08/11/22</text:p>
          </table:table-cell>
          <table:table-cell office:value-type="time" office:time-value="PT20H31M22S" calcext:value-type="time">
            <text:p>20:31:22</text:p>
          </table:table-cell>
          <table:table-cell office:value-type="float" office:value="118" calcext:value-type="float">
            <text:p>118</text:p>
          </table:table-cell>
          <table:table-cell office:value-type="float" office:value="138" calcext:value-type="float">
            <text:p>138</text:p>
          </table:table-cell>
        </table:table-row>
        <table:table-row table:style-name="ro2">
          <table:table-cell office:value-type="string" calcext:value-type="string">
            <text:p>2022-11-08 20:32:3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2-11-08" calcext:value-type="date">
            <text:p>08/11/22</text:p>
          </table:table-cell>
          <table:table-cell office:value-type="time" office:time-value="PT20H32M22S" calcext:value-type="time">
            <text:p>20:32:22</text:p>
          </table:table-cell>
          <table:table-cell office:value-type="float" office:value="125" calcext:value-type="float">
            <text:p>125</text:p>
          </table:table-cell>
          <table:table-cell office:value-type="float" office:value="136" calcext:value-type="float">
            <text:p>136</text:p>
          </table:table-cell>
        </table:table-row>
        <table:table-row table:style-name="ro2">
          <table:table-cell office:value-type="string" calcext:value-type="string">
            <text:p>2022-11-08 20:33:3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2-11-08" calcext:value-type="date">
            <text:p>08/11/22</text:p>
          </table:table-cell>
          <table:table-cell office:value-type="time" office:time-value="PT20H33M22S" calcext:value-type="time">
            <text:p>20:33:22</text:p>
          </table:table-cell>
          <table:table-cell office:value-type="float" office:value="126" calcext:value-type="float">
            <text:p>126</text:p>
          </table:table-cell>
          <table:table-cell office:value-type="float" office:value="133" calcext:value-type="float">
            <text:p>133</text:p>
          </table:table-cell>
        </table:table-row>
        <table:table-row table:style-name="ro2">
          <table:table-cell office:value-type="string" calcext:value-type="string">
            <text:p>2022-11-08 20:34:3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2-11-08" calcext:value-type="date">
            <text:p>08/11/22</text:p>
          </table:table-cell>
          <table:table-cell office:value-type="time" office:time-value="PT20H34M23S" calcext:value-type="time">
            <text:p>20:34:23</text:p>
          </table:table-cell>
          <table:table-cell office:value-type="float" office:value="114" calcext:value-type="float">
            <text:p>114</text:p>
          </table:table-cell>
          <table:table-cell office:value-type="float" office:value="125" calcext:value-type="float">
            <text:p>125</text:p>
          </table:table-cell>
        </table:table-row>
        <table:table-row table:style-name="ro2">
          <table:table-cell office:value-type="string" calcext:value-type="string">
            <text:p>2022-11-08 20:35:35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date" office:date-value="2022-11-08" calcext:value-type="date">
            <text:p>08/11/22</text:p>
          </table:table-cell>
          <table:table-cell office:value-type="time" office:time-value="PT20H35M23S" calcext:value-type="time">
            <text:p>20:35:23</text:p>
          </table:table-cell>
          <table:table-cell office:value-type="float" office:value="94" calcext:value-type="float">
            <text:p>94</text:p>
          </table:table-cell>
          <table:table-cell office:value-type="float" office:value="155" calcext:value-type="float">
            <text:p>155</text:p>
          </table:table-cell>
        </table:table-row>
        <table:table-row table:style-name="ro2">
          <table:table-cell office:value-type="string" calcext:value-type="string">
            <text:p>2022-11-08 20:36:3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2-11-08" calcext:value-type="date">
            <text:p>08/11/22</text:p>
          </table:table-cell>
          <table:table-cell office:value-type="time" office:time-value="PT20H36M23S" calcext:value-type="time">
            <text:p>20:36:23</text:p>
          </table:table-cell>
          <table:table-cell office:value-type="float" office:value="87" calcext:value-type="float">
            <text:p>87</text:p>
          </table:table-cell>
          <table:table-cell office:value-type="float" office:value="135" calcext:value-type="float">
            <text:p>135</text:p>
          </table:table-cell>
        </table:table-row>
        <table:table-row table:style-name="ro2">
          <table:table-cell office:value-type="string" calcext:value-type="string">
            <text:p>2022-11-08 20:37:3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2-11-08" calcext:value-type="date">
            <text:p>08/11/22</text:p>
          </table:table-cell>
          <table:table-cell office:value-type="time" office:time-value="PT20H37M23S" calcext:value-type="time">
            <text:p>20:37:23</text:p>
          </table:table-cell>
          <table:table-cell office:value-type="float" office:value="81" calcext:value-type="float">
            <text:p>81</text:p>
          </table:table-cell>
          <table:table-cell office:value-type="float" office:value="122" calcext:value-type="float">
            <text:p>122</text:p>
          </table:table-cell>
        </table:table-row>
        <table:table-row table:style-name="ro2">
          <table:table-cell office:value-type="string" calcext:value-type="string">
            <text:p>2022-11-08 20:38:3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2-11-08" calcext:value-type="date">
            <text:p>08/11/22</text:p>
          </table:table-cell>
          <table:table-cell office:value-type="time" office:time-value="PT20H38M24S" calcext:value-type="time">
            <text:p>20:38:24</text:p>
          </table:table-cell>
          <table:table-cell office:value-type="float" office:value="94" calcext:value-type="float">
            <text:p>94</text:p>
          </table:table-cell>
          <table:table-cell office:value-type="float" office:value="132" calcext:value-type="float">
            <text:p>132</text:p>
          </table:table-cell>
        </table:table-row>
        <table:table-row table:style-name="ro2">
          <table:table-cell office:value-type="string" calcext:value-type="string">
            <text:p>2022-11-08 20:39:3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2-11-08" calcext:value-type="date">
            <text:p>08/11/22</text:p>
          </table:table-cell>
          <table:table-cell office:value-type="time" office:time-value="PT20H39M24S" calcext:value-type="time">
            <text:p>20:39:24</text:p>
          </table:table-cell>
          <table:table-cell office:value-type="float" office:value="247" calcext:value-type="float">
            <text:p>247</text:p>
          </table:table-cell>
          <table:table-cell office:value-type="float" office:value="146" calcext:value-type="float">
            <text:p>146</text:p>
          </table:table-cell>
        </table:table-row>
        <table:table-row table:style-name="ro2">
          <table:table-cell office:value-type="string" calcext:value-type="string">
            <text:p>2022-11-08 20:40:3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2-11-08" calcext:value-type="date">
            <text:p>08/11/22</text:p>
          </table:table-cell>
          <table:table-cell office:value-type="time" office:time-value="PT20H40M24S" calcext:value-type="time">
            <text:p>20:40:24</text:p>
          </table:table-cell>
          <table:table-cell office:value-type="float" office:value="191" calcext:value-type="float">
            <text:p>191</text:p>
          </table:table-cell>
          <table:table-cell office:value-type="float" office:value="139" calcext:value-type="float">
            <text:p>139</text:p>
          </table:table-cell>
        </table:table-row>
        <table:table-row table:style-name="ro2">
          <table:table-cell office:value-type="string" calcext:value-type="string">
            <text:p>2022-11-08 20:41:35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date" office:date-value="2022-11-08" calcext:value-type="date">
            <text:p>08/11/22</text:p>
          </table:table-cell>
          <table:table-cell office:value-type="time" office:time-value="PT20H41M25S" calcext:value-type="time">
            <text:p>20:41:25</text:p>
          </table:table-cell>
          <table:table-cell office:value-type="float" office:value="67" calcext:value-type="float">
            <text:p>67</text:p>
          </table:table-cell>
          <table:table-cell office:value-type="float" office:value="128" calcext:value-type="float">
            <text:p>128</text:p>
          </table:table-cell>
        </table:table-row>
        <table:table-row table:style-name="ro2">
          <table:table-cell office:value-type="string" calcext:value-type="string">
            <text:p>2022-11-08 20:42:3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2-11-08" calcext:value-type="date">
            <text:p>08/11/22</text:p>
          </table:table-cell>
          <table:table-cell office:value-type="time" office:time-value="PT20H42M25S" calcext:value-type="time">
            <text:p>20:42:25</text:p>
          </table:table-cell>
          <table:table-cell office:value-type="float" office:value="104" calcext:value-type="float">
            <text:p>104</text:p>
          </table:table-cell>
          <table:table-cell office:value-type="float" office:value="132" calcext:value-type="float">
            <text:p>132</text:p>
          </table:table-cell>
        </table:table-row>
        <table:table-row table:style-name="ro2">
          <table:table-cell office:value-type="string" calcext:value-type="string">
            <text:p>2022-11-08 20:43:3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2-11-08" calcext:value-type="date">
            <text:p>08/11/22</text:p>
          </table:table-cell>
          <table:table-cell office:value-type="time" office:time-value="PT20H43M25S" calcext:value-type="time">
            <text:p>20:43:25</text:p>
          </table:table-cell>
          <table:table-cell office:value-type="float" office:value="119" calcext:value-type="float">
            <text:p>119</text:p>
          </table:table-cell>
          <table:table-cell office:value-type="float" office:value="129" calcext:value-type="float">
            <text:p>129</text:p>
          </table:table-cell>
        </table:table-row>
        <table:table-row table:style-name="ro2">
          <table:table-cell office:value-type="string" calcext:value-type="string">
            <text:p>2022-11-08 20:44:3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2-11-08" calcext:value-type="date">
            <text:p>08/11/22</text:p>
          </table:table-cell>
          <table:table-cell office:value-type="time" office:time-value="PT20H44M26S" calcext:value-type="time">
            <text:p>20:44:26</text:p>
          </table:table-cell>
          <table:table-cell office:value-type="float" office:value="97" calcext:value-type="float">
            <text:p>97</text:p>
          </table:table-cell>
          <table:table-cell office:value-type="float" office:value="141" calcext:value-type="float">
            <text:p>141</text:p>
          </table:table-cell>
        </table:table-row>
        <table:table-row table:style-name="ro2">
          <table:table-cell office:value-type="string" calcext:value-type="string">
            <text:p>2022-11-08 20:45:3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2-11-08" calcext:value-type="date">
            <text:p>08/11/22</text:p>
          </table:table-cell>
          <table:table-cell office:value-type="time" office:time-value="PT20H45M26S" calcext:value-type="time">
            <text:p>20:45:26</text:p>
          </table:table-cell>
          <table:table-cell office:value-type="float" office:value="113" calcext:value-type="float">
            <text:p>113</text:p>
          </table:table-cell>
          <table:table-cell office:value-type="float" office:value="132" calcext:value-type="float">
            <text:p>132</text:p>
          </table:table-cell>
        </table:table-row>
        <table:table-row table:style-name="ro2">
          <table:table-cell office:value-type="string" calcext:value-type="string">
            <text:p>2022-11-08 20:46:3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2-11-08" calcext:value-type="date">
            <text:p>08/11/22</text:p>
          </table:table-cell>
          <table:table-cell office:value-type="time" office:time-value="PT20H46M26S" calcext:value-type="time">
            <text:p>20:46:26</text:p>
          </table:table-cell>
          <table:table-cell office:value-type="float" office:value="63" calcext:value-type="float">
            <text:p>63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office:value-type="string" calcext:value-type="string">
            <text:p>2022-11-08 20:47:3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2-11-08" calcext:value-type="date">
            <text:p>08/11/22</text:p>
          </table:table-cell>
          <table:table-cell office:value-type="time" office:time-value="PT20H47M27S" calcext:value-type="time">
            <text:p>20:47:27</text:p>
          </table:table-cell>
          <table:table-cell office:value-type="float" office:value="86" calcext:value-type="float">
            <text:p>86</text:p>
          </table:table-cell>
          <table:table-cell office:value-type="float" office:value="138" calcext:value-type="float">
            <text:p>138</text:p>
          </table:table-cell>
        </table:table-row>
        <table:table-row table:style-name="ro2">
          <table:table-cell office:value-type="string" calcext:value-type="string">
            <text:p>2022-11-08 20:48:3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2-11-08" calcext:value-type="date">
            <text:p>08/11/22</text:p>
          </table:table-cell>
          <table:table-cell office:value-type="time" office:time-value="PT20H48M27S" calcext:value-type="time">
            <text:p>20:48:27</text:p>
          </table:table-cell>
          <table:table-cell office:value-type="float" office:value="97" calcext:value-type="float">
            <text:p>97</text:p>
          </table:table-cell>
          <table:table-cell office:value-type="float" office:value="130" calcext:value-type="float">
            <text:p>130</text:p>
          </table:table-cell>
        </table:table-row>
        <table:table-row table:style-name="ro2">
          <table:table-cell office:value-type="string" calcext:value-type="string">
            <text:p>2022-11-08 20:49:35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date" office:date-value="2022-11-08" calcext:value-type="date">
            <text:p>08/11/22</text:p>
          </table:table-cell>
          <table:table-cell office:value-type="time" office:time-value="PT20H49M27S" calcext:value-type="time">
            <text:p>20:49:27</text:p>
          </table:table-cell>
          <table:table-cell office:value-type="float" office:value="114" calcext:value-type="float">
            <text:p>114</text:p>
          </table:table-cell>
          <table:table-cell office:value-type="float" office:value="131" calcext:value-type="float">
            <text:p>131</text:p>
          </table:table-cell>
        </table:table-row>
        <table:table-row table:style-name="ro2">
          <table:table-cell office:value-type="string" calcext:value-type="string">
            <text:p>2022-11-08 20:50:35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date" office:date-value="2022-11-08" calcext:value-type="date">
            <text:p>08/11/22</text:p>
          </table:table-cell>
          <table:table-cell office:value-type="time" office:time-value="PT20H50M28S" calcext:value-type="time">
            <text:p>20:50:28</text:p>
          </table:table-cell>
          <table:table-cell table:number-columns-repeated="2" office:value-type="float" office:value="120" calcext:value-type="float">
            <text:p>120</text:p>
          </table:table-cell>
        </table:table-row>
        <table:table-row table:style-name="ro2">
          <table:table-cell office:value-type="string" calcext:value-type="string">
            <text:p>2022-11-08 20:51:35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date" office:date-value="2022-11-08" calcext:value-type="date">
            <text:p>08/11/22</text:p>
          </table:table-cell>
          <table:table-cell office:value-type="time" office:time-value="PT20H51M28S" calcext:value-type="time">
            <text:p>20:51:28</text:p>
          </table:table-cell>
          <table:table-cell office:value-type="float" office:value="74" calcext:value-type="float">
            <text:p>74</text:p>
          </table:table-cell>
          <table:table-cell office:value-type="float" office:value="127" calcext:value-type="float">
            <text:p>127</text:p>
          </table:table-cell>
        </table:table-row>
        <table:table-row table:style-name="ro2">
          <table:table-cell office:value-type="string" calcext:value-type="string">
            <text:p>2022-11-08 20:52:35</text:p>
          </table:table-cell>
          <table:table-cell office:value-type="float" office:value="0.2" calcext:value-type="float">
            <text:p>0.2</text:p>
          </table:table-cell>
          <table:table-cell table:style-name="Default"/>
          <table:table-cell office:value-type="date" office:date-value="2022-11-08" calcext:value-type="date">
            <text:p>08/11/22</text:p>
          </table:table-cell>
          <table:table-cell office:value-type="time" office:time-value="PT20H52M28S" calcext:value-type="time">
            <text:p>20:52:28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</table:table-row>
        <table:table-row table:style-name="ro2">
          <table:table-cell office:value-type="string" calcext:value-type="string">
            <text:p>2022-11-08 20:53:35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date" office:date-value="2022-11-08" calcext:value-type="date">
            <text:p>08/11/22</text:p>
          </table:table-cell>
          <table:table-cell office:value-type="time" office:time-value="PT20H53M29S" calcext:value-type="time">
            <text:p>20:53:29</text:p>
          </table:table-cell>
          <table:table-cell office:value-type="float" office:value="117" calcext:value-type="float">
            <text:p>117</text:p>
          </table:table-cell>
          <table:table-cell office:value-type="float" office:value="124" calcext:value-type="float">
            <text:p>124</text:p>
          </table:table-cell>
        </table:table-row>
        <table:table-row table:style-name="ro2">
          <table:table-cell office:value-type="string" calcext:value-type="string">
            <text:p>2022-11-08 20:54:35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date" office:date-value="2022-11-08" calcext:value-type="date">
            <text:p>08/11/22</text:p>
          </table:table-cell>
          <table:table-cell office:value-type="time" office:time-value="PT20H54M29S" calcext:value-type="time">
            <text:p>20:54:29</text:p>
          </table:table-cell>
          <table:table-cell office:value-type="float" office:value="209" calcext:value-type="float">
            <text:p>209</text:p>
          </table:table-cell>
          <table:table-cell office:value-type="float" office:value="146" calcext:value-type="float">
            <text:p>146</text:p>
          </table:table-cell>
        </table:table-row>
        <table:table-row table:style-name="ro2">
          <table:table-cell office:value-type="string" calcext:value-type="string">
            <text:p>2022-11-08 20:55:35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date" office:date-value="2022-11-08" calcext:value-type="date">
            <text:p>08/11/22</text:p>
          </table:table-cell>
          <table:table-cell office:value-type="time" office:time-value="PT20H55M29S" calcext:value-type="time">
            <text:p>20:55:29</text:p>
          </table:table-cell>
          <table:table-cell office:value-type="float" office:value="166" calcext:value-type="float">
            <text:p>166</text:p>
          </table:table-cell>
          <table:table-cell office:value-type="float" office:value="134" calcext:value-type="float">
            <text:p>134</text:p>
          </table:table-cell>
        </table:table-row>
        <table:table-row table:style-name="ro2">
          <table:table-cell office:value-type="string" calcext:value-type="string">
            <text:p>2022-11-08 20:56:35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date" office:date-value="2022-11-08" calcext:value-type="date">
            <text:p>08/11/22</text:p>
          </table:table-cell>
          <table:table-cell office:value-type="time" office:time-value="PT20H56M29S" calcext:value-type="time">
            <text:p>20:56:29</text:p>
          </table:table-cell>
          <table:table-cell office:value-type="float" office:value="129" calcext:value-type="float">
            <text:p>129</text:p>
          </table:table-cell>
          <table:table-cell office:value-type="float" office:value="123" calcext:value-type="float">
            <text:p>123</text:p>
          </table:table-cell>
        </table:table-row>
        <table:table-row table:style-name="ro2">
          <table:table-cell office:value-type="string" calcext:value-type="string">
            <text:p>2022-11-08 20:57:35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date" office:date-value="2022-11-08" calcext:value-type="date">
            <text:p>08/11/22</text:p>
          </table:table-cell>
          <table:table-cell office:value-type="time" office:time-value="PT20H57M30S" calcext:value-type="time">
            <text:p>20:57:30</text:p>
          </table:table-cell>
          <table:table-cell office:value-type="float" office:value="147" calcext:value-type="float">
            <text:p>147</text:p>
          </table:table-cell>
          <table:table-cell office:value-type="float" office:value="132" calcext:value-type="float">
            <text:p>132</text:p>
          </table:table-cell>
        </table:table-row>
      </table:table>
      <table:named-expressions/>
      <table:database-ranges>
        <table:database-range table:name="__Anonymous_Sheet_DB__0" table:target-range-address="'test 8th nov'.F1:'test 8th nov'.G2110"/>
        <table:database-range table:name="__Anonymous_Sheet_DB__1" table:target-range-address="Sheet2.A1:Sheet2.B77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9T10:14:52.273607272</meta:creation-date>
    <dc:date>2022-11-09T17:47:13.240300055</dc:date>
    <meta:editing-duration>PT5H43M38S</meta:editing-duration>
    <meta:editing-cycles>2</meta:editing-cycles>
    <meta:generator>LibreOffice/7.3.6.2$Linux_X86_64 LibreOffice_project/30$Build-2</meta:generator>
    <meta:document-statistic meta:table-count="2" meta:cell-count="8708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01cm" svg:y="4.201cm" style:legend-expansion="high" chart:style-name="ch2"/>
        <chart:plot-area chart:style-name="ch3" table:cell-range-address="'test 8th nov'.I19:'test 8th nov'.J26" chart:data-source-has-labels="column" svg:x="1.008cm" svg:y="0.403cm" svg:width="12.558cm" svg:height="8.636cm">
          <chart:coordinate-region svg:x="3.358cm" svg:y="0.602cm" svg:width="10.068cm" svg:height="5.699cm"/>
          <chart:axis chart:dimension="x" chart:name="primary-x" chart:style-name="ch4" chartooo:axis-type="auto">
            <chartooo:date-scale/>
            <chart:categories table:cell-range-address="'test 8th nov'.I19:'test 8th nov'.I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test 8th nov'.J19:'test 8th nov'.J26" chart:class="chart:line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2022-11-08 16:57:35</text:p>
                <draw:g>
                  <svg:desc>'test 8th nov'.I19:'test 8th nov'.I26</svg:desc>
                </draw:g>
              </table:table-cell>
              <table:table-cell office:value-type="float" office:value="0.2">
                <text:p>0.2</text:p>
                <draw:g>
                  <svg:desc>'test 8th nov'.J19:'test 8th nov'.J26</svg:desc>
                </draw:g>
              </table:table-cell>
            </table:table-row>
            <table:table-row>
              <table:table-cell office:value-type="string">
                <text:p>2022-11-08 17:04:3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22-11-08 19:43:3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22-11-08 20:13:3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22-11-08 20:27:3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22-11-08 20:35:3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22-11-08 20:41:3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22-11-08 20:52:35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471cm" svg:y="3.952cm" style:legend-expansion="high" chart:style-name="ch2"/>
        <chart:plot-area chart:style-name="ch3" table:cell-range-address="'test 8th nov'.M19:'test 8th nov'.O26" chart:data-source-has-labels="both" svg:x="0.32cm" svg:y="0.18cm" svg:width="13.831cm" svg:height="8.64cm">
          <chart:coordinate-region svg:x="1.127cm" svg:y="0.379cm" svg:width="12.361cm" svg:height="7.794cm"/>
          <chart:axis chart:dimension="x" chart:name="primary-x" chart:style-name="ch4" chartooo:axis-type="auto">
            <chartooo:date-scale/>
            <chart:categories table:cell-range-address="'test 8th nov'.M19:'test 8th nov'.M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test 8th nov'.N19:'test 8th nov'.N26" loext:label-string="s" chart:class="chart:line">
            <chart:data-point chart:repeated="8"/>
          </chart:series>
          <chart:series chart:style-name="ch8" chart:values-cell-range-address="'test 8th nov'.O19:'test 8th nov'.O26" loext:label-string="l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</text:p>
              </table:table-cell>
              <table:table-cell office:value-type="string">
                <text:p>l</text:p>
              </table:table-cell>
            </table:table-row>
          </table:table-header-rows>
          <table:table-rows>
            <table:table-row>
              <table:table-cell office:value-type="float" office:value="0.706655092592593">
                <text:p>0.706655092592593</text:p>
                <draw:g>
                  <svg:desc>'test 8th nov'.M19:'test 8th nov'.M26</svg:desc>
                </draw:g>
              </table:table-cell>
              <table:table-cell office:value-type="float" office:value="24">
                <text:p>24</text:p>
                <draw:g>
                  <svg:desc>'test 8th nov'.N19:'test 8th nov'.N26</svg:desc>
                </draw:g>
              </table:table-cell>
              <table:table-cell office:value-type="float" office:value="77">
                <text:p>77</text:p>
                <draw:g>
                  <svg:desc>'test 8th nov'.O19:'test 8th nov'.O26</svg:desc>
                </draw:g>
              </table:table-cell>
            </table:table-row>
            <table:table-row>
              <table:table-cell office:value-type="float" office:value="0.711527777777778">
                <text:p>0.711527777777778</text:p>
              </table:table-cell>
              <table:table-cell office:value-type="float" office:value="174">
                <text:p>17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0.82162037037037">
                <text:p>0.82162037037037</text:p>
              </table:table-cell>
              <table:table-cell office:value-type="float" office:value="42">
                <text:p>42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0.842546296296296">
                <text:p>0.842546296296296</text:p>
              </table:table-cell>
              <table:table-cell office:value-type="float" office:value="90">
                <text:p>9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0.852314814814815">
                <text:p>0.852314814814815</text:p>
              </table:table-cell>
              <table:table-cell office:value-type="float" office:value="60">
                <text:p>6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0.857905092592593">
                <text:p>0.857905092592593</text:p>
              </table:table-cell>
              <table:table-cell office:value-type="float" office:value="94">
                <text:p>94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0.862094907407407">
                <text:p>0.862094907407407</text:p>
              </table:table-cell>
              <table:table-cell office:value-type="float" office:value="67">
                <text:p>6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0.869768518518518">
                <text:p>0.869768518518518</text:p>
              </table:table-cell>
              <table:table-cell office:value-type="float" office:value="134">
                <text:p>134</text:p>
              </table:table-cell>
              <table:table-cell office:value-type="float" office:value="136">
                <text:p>1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365cm" svg:height="13.139cm" xlink:href=".." xlink:type="simple" chart:class="chart:line" chart:style-name="ch1">
        <chart:legend chart:legend-position="end" svg:x="27.836cm" svg:y="6.021cm" style:legend-expansion="high" chart:style-name="ch2"/>
        <chart:plot-area chart:style-name="ch3" table:cell-range-address="'test 8th nov'.U10:'test 8th nov'.W85" chart:data-source-has-labels="both" svg:x="0.587cm" svg:y="0.262cm" svg:width="26.662cm" svg:height="12.615cm">
          <chart:coordinate-region svg:x="1.665cm" svg:y="0.461cm" svg:width="25.584cm" svg:height="10.95cm"/>
          <chart:axis chart:dimension="x" chart:name="primary-x" chart:style-name="ch4" chartooo:axis-type="auto">
            <chartooo:date-scale/>
            <chart:categories table:cell-range-address="'test 8th nov'.U10:'test 8th nov'.U8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test 8th nov'.V10:'test 8th nov'.V85" loext:label-string="s" chart:class="chart:line">
            <chart:data-point chart:repeated="76"/>
          </chart:series>
          <chart:series chart:style-name="ch8" chart:values-cell-range-address="'test 8th nov'.W10:'test 8th nov'.W85" loext:label-string="l" chart:class="chart:line">
            <chart:data-point chart:repeated="7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</text:p>
              </table:table-cell>
              <table:table-cell office:value-type="string">
                <text:p>l</text:p>
              </table:table-cell>
            </table:table-row>
          </table:table-header-rows>
          <table:table-rows>
            <table:table-row>
              <table:table-cell office:value-type="float" office:value="0.70318287037037">
                <text:p>0.70318287037037</text:p>
                <draw:g>
                  <svg:desc>'test 8th nov'.U10:'test 8th nov'.U85</svg:desc>
                </draw:g>
              </table:table-cell>
              <table:table-cell office:value-type="float" office:value="143">
                <text:p>143</text:p>
                <draw:g>
                  <svg:desc>'test 8th nov'.V10:'test 8th nov'.V85</svg:desc>
                </draw:g>
              </table:table-cell>
              <table:table-cell office:value-type="float" office:value="106">
                <text:p>106</text:p>
                <draw:g>
                  <svg:desc>'test 8th nov'.W10:'test 8th nov'.W85</svg:desc>
                </draw:g>
              </table:table-cell>
            </table:table-row>
            <table:table-row>
              <table:table-cell office:value-type="float" office:value="0.703877314814815">
                <text:p>0.703877314814815</text:p>
              </table:table-cell>
              <table:table-cell office:value-type="float" office:value="48">
                <text:p>4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0.704571759259259">
                <text:p>0.704571759259259</text:p>
              </table:table-cell>
              <table:table-cell office:value-type="float" office:value="97">
                <text:p>9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0.705266203703704">
                <text:p>0.705266203703704</text:p>
              </table:table-cell>
              <table:table-cell office:value-type="float" office:value="10">
                <text:p>1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0.705960648148148">
                <text:p>0.705960648148148</text:p>
              </table:table-cell>
              <table:table-cell office:value-type="float" office:value="10">
                <text:p>1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0.706655092592593">
                <text:p>0.706655092592593</text:p>
              </table:table-cell>
              <table:table-cell office:value-type="float" office:value="24">
                <text:p>2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0.707349537037037">
                <text:p>0.707349537037037</text:p>
              </table:table-cell>
              <table:table-cell office:value-type="float" office:value="58">
                <text:p>5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0.708043981481482">
                <text:p>0.708043981481482</text:p>
              </table:table-cell>
              <table:table-cell office:value-type="float" office:value="52">
                <text:p>5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0.70875">
                <text:p>0.70875</text:p>
              </table:table-cell>
              <table:table-cell office:value-type="float" office:value="24">
                <text:p>2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0.709444444444444">
                <text:p>0.709444444444444</text:p>
              </table:table-cell>
              <table:table-cell office:value-type="float" office:value="17">
                <text:p>1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0.710138888888889">
                <text:p>0.710138888888889</text:p>
              </table:table-cell>
              <table:table-cell office:value-type="float" office:value="71">
                <text:p>7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0.710833333333333">
                <text:p>0.710833333333333</text:p>
              </table:table-cell>
              <table:table-cell office:value-type="float" office:value="141">
                <text:p>14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0.711527777777778">
                <text:p>0.711527777777778</text:p>
              </table:table-cell>
              <table:table-cell office:value-type="float" office:value="174">
                <text:p>17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0.712222222222222">
                <text:p>0.712222222222222</text:p>
              </table:table-cell>
              <table:table-cell office:value-type="float" office:value="148">
                <text:p>14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0.712916666666667">
                <text:p>0.712916666666667</text:p>
              </table:table-cell>
              <table:table-cell office:value-type="float" office:value="15">
                <text:p>1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0.713622685185185">
                <text:p>0.713622685185185</text:p>
              </table:table-cell>
              <table:table-cell office:value-type="float" office:value="0">
                <text:p>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0.71431712962963">
                <text:p>0.71431712962963</text:p>
              </table:table-cell>
              <table:table-cell office:value-type="float" office:value="64">
                <text:p>6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0.715011574074074">
                <text:p>0.715011574074074</text:p>
              </table:table-cell>
              <table:table-cell office:value-type="float" office:value="118">
                <text:p>11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0.818136574074074">
                <text:p>0.818136574074074</text:p>
              </table:table-cell>
              <table:table-cell office:value-type="float" office:value="16">
                <text:p>16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0.818831018518518">
                <text:p>0.818831018518518</text:p>
              </table:table-cell>
              <table:table-cell office:value-type="float" office:value="67">
                <text:p>6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0.819525462962963">
                <text:p>0.819525462962963</text:p>
              </table:table-cell>
              <table:table-cell office:value-type="float" office:value="92">
                <text:p>92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0.820231481481481">
                <text:p>0.820231481481481</text:p>
              </table:table-cell>
              <table:table-cell office:value-type="float" office:value="95">
                <text:p>9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0.820925925925926">
                <text:p>0.820925925925926</text:p>
              </table:table-cell>
              <table:table-cell office:value-type="float" office:value="57">
                <text:p>57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0.82162037037037">
                <text:p>0.82162037037037</text:p>
              </table:table-cell>
              <table:table-cell office:value-type="float" office:value="42">
                <text:p>42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0.822314814814815">
                <text:p>0.822314814814815</text:p>
              </table:table-cell>
              <table:table-cell office:value-type="float" office:value="71">
                <text:p>7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0.823020833333333">
                <text:p>0.823020833333333</text:p>
              </table:table-cell>
              <table:table-cell office:value-type="float" office:value="61">
                <text:p>6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0.823715277777778">
                <text:p>0.823715277777778</text:p>
              </table:table-cell>
              <table:table-cell office:value-type="float" office:value="88">
                <text:p>8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0.824409722222222">
                <text:p>0.824409722222222</text:p>
              </table:table-cell>
              <table:table-cell office:value-type="float" office:value="205">
                <text:p>205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0.825104166666667">
                <text:p>0.825104166666667</text:p>
              </table:table-cell>
              <table:table-cell office:value-type="float" office:value="174">
                <text:p>174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0.8390625">
                <text:p>0.8390625</text:p>
              </table:table-cell>
              <table:table-cell office:value-type="float" office:value="119">
                <text:p>119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0.839756944444444">
                <text:p>0.839756944444444</text:p>
              </table:table-cell>
              <table:table-cell office:value-type="float" office:value="75">
                <text:p>75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0.840451388888889">
                <text:p>0.840451388888889</text:p>
              </table:table-cell>
              <table:table-cell office:value-type="float" office:value="78">
                <text:p>7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0.841157407407407">
                <text:p>0.841157407407407</text:p>
              </table:table-cell>
              <table:table-cell office:value-type="float" office:value="175">
                <text:p>175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0.841851851851852">
                <text:p>0.841851851851852</text:p>
              </table:table-cell>
              <table:table-cell office:value-type="float" office:value="100">
                <text:p>10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0.842546296296296">
                <text:p>0.842546296296296</text:p>
              </table:table-cell>
              <table:table-cell office:value-type="float" office:value="90">
                <text:p>9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0.843252314814815">
                <text:p>0.843252314814815</text:p>
              </table:table-cell>
              <table:table-cell office:value-type="float" office:value="97">
                <text:p>9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0.843946759259259">
                <text:p>0.843946759259259</text:p>
              </table:table-cell>
              <table:table-cell office:value-type="float" office:value="111">
                <text:p>11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0.844641203703704">
                <text:p>0.844641203703704</text:p>
              </table:table-cell>
              <table:table-cell office:value-type="float" office:value="65">
                <text:p>6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0.845335648148148">
                <text:p>0.845335648148148</text:p>
              </table:table-cell>
              <table:table-cell office:value-type="float" office:value="81">
                <text:p>81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0.846041666666667">
                <text:p>0.846041666666667</text:p>
              </table:table-cell>
              <table:table-cell office:value-type="float" office:value="118">
                <text:p>11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0.848831018518519">
                <text:p>0.848831018518519</text:p>
              </table:table-cell>
              <table:table-cell office:value-type="float" office:value="77">
                <text:p>7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0.849525462962963">
                <text:p>0.849525462962963</text:p>
              </table:table-cell>
              <table:table-cell office:value-type="float" office:value="99">
                <text:p>99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0.850219907407407">
                <text:p>0.850219907407407</text:p>
              </table:table-cell>
              <table:table-cell office:value-type="float" office:value="71">
                <text:p>7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0.850925925925926">
                <text:p>0.850925925925926</text:p>
              </table:table-cell>
              <table:table-cell office:value-type="float" office:value="78">
                <text:p>7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0.85162037037037">
                <text:p>0.85162037037037</text:p>
              </table:table-cell>
              <table:table-cell office:value-type="float" office:value="159">
                <text:p>15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0.852314814814815">
                <text:p>0.852314814814815</text:p>
              </table:table-cell>
              <table:table-cell office:value-type="float" office:value="60">
                <text:p>6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0.853020833333333">
                <text:p>0.853020833333333</text:p>
              </table:table-cell>
              <table:table-cell office:value-type="float" office:value="140">
                <text:p>14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0.853715277777778">
                <text:p>0.853715277777778</text:p>
              </table:table-cell>
              <table:table-cell office:value-type="float" office:value="110">
                <text:p>11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0.854409722222222">
                <text:p>0.854409722222222</text:p>
              </table:table-cell>
              <table:table-cell office:value-type="float" office:value="119">
                <text:p>11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0.855115740740741">
                <text:p>0.855115740740741</text:p>
              </table:table-cell>
              <table:table-cell office:value-type="float" office:value="118">
                <text:p>11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0.855810185185185">
                <text:p>0.855810185185185</text:p>
              </table:table-cell>
              <table:table-cell office:value-type="float" office:value="125">
                <text:p>125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0.85650462962963">
                <text:p>0.85650462962963</text:p>
              </table:table-cell>
              <table:table-cell office:value-type="float" office:value="126">
                <text:p>126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0.857210648148148">
                <text:p>0.857210648148148</text:p>
              </table:table-cell>
              <table:table-cell office:value-type="float" office:value="114">
                <text:p>11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0.857905092592593">
                <text:p>0.857905092592593</text:p>
              </table:table-cell>
              <table:table-cell office:value-type="float" office:value="94">
                <text:p>94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0.858599537037037">
                <text:p>0.858599537037037</text:p>
              </table:table-cell>
              <table:table-cell office:value-type="float" office:value="87">
                <text:p>8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0.859293981481481">
                <text:p>0.859293981481481</text:p>
              </table:table-cell>
              <table:table-cell office:value-type="float" office:value="81">
                <text:p>81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94">
                <text:p>94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0.860694444444444">
                <text:p>0.860694444444444</text:p>
              </table:table-cell>
              <table:table-cell office:value-type="float" office:value="247">
                <text:p>247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0.861388888888889">
                <text:p>0.861388888888889</text:p>
              </table:table-cell>
              <table:table-cell office:value-type="float" office:value="191">
                <text:p>191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0.862094907407407">
                <text:p>0.862094907407407</text:p>
              </table:table-cell>
              <table:table-cell office:value-type="float" office:value="67">
                <text:p>6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0.862789351851852">
                <text:p>0.862789351851852</text:p>
              </table:table-cell>
              <table:table-cell office:value-type="float" office:value="104">
                <text:p>104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0.863483796296296">
                <text:p>0.863483796296296</text:p>
              </table:table-cell>
              <table:table-cell office:value-type="float" office:value="119">
                <text:p>119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0.864189814814815">
                <text:p>0.864189814814815</text:p>
              </table:table-cell>
              <table:table-cell office:value-type="float" office:value="97">
                <text:p>97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0.864884259259259">
                <text:p>0.864884259259259</text:p>
              </table:table-cell>
              <table:table-cell office:value-type="float" office:value="113">
                <text:p>113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0.865578703703704">
                <text:p>0.865578703703704</text:p>
              </table:table-cell>
              <table:table-cell office:value-type="float" office:value="63">
                <text:p>6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0.866284722222222">
                <text:p>0.866284722222222</text:p>
              </table:table-cell>
              <table:table-cell office:value-type="float" office:value="86">
                <text:p>8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0.866979166666667">
                <text:p>0.866979166666667</text:p>
              </table:table-cell>
              <table:table-cell office:value-type="float" office:value="97">
                <text:p>9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0.867673611111111">
                <text:p>0.867673611111111</text:p>
              </table:table-cell>
              <table:table-cell office:value-type="float" office:value="114">
                <text:p>114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0.86837962962963">
                <text:p>0.86837962962963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0.869074074074074">
                <text:p>0.869074074074074</text:p>
              </table:table-cell>
              <table:table-cell office:value-type="float" office:value="74">
                <text:p>74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0.869768518518518">
                <text:p>0.869768518518518</text:p>
              </table:table-cell>
              <table:table-cell office:value-type="float" office:value="134">
                <text:p>13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0.870474537037037">
                <text:p>0.870474537037037</text:p>
              </table:table-cell>
              <table:table-cell office:value-type="float" office:value="117">
                <text:p>117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0.871168981481481">
                <text:p>0.871168981481481</text:p>
              </table:table-cell>
              <table:table-cell office:value-type="float" office:value="209">
                <text:p>209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0.871863425925926">
                <text:p>0.871863425925926</text:p>
              </table:table-cell>
              <table:table-cell office:value-type="float" office:value="166">
                <text:p>16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0.87255787037037">
                <text:p>0.87255787037037</text:p>
              </table:table-cell>
              <table:table-cell office:value-type="float" office:value="129">
                <text:p>129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0.873263888888889">
                <text:p>0.873263888888889</text:p>
              </table:table-cell>
              <table:table-cell office:value-type="float" office:value="147">
                <text:p>147</text:p>
              </table:table-cell>
              <table:table-cell office:value-type="float" office:value="132">
                <text:p>13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365cm" svg:height="13.139cm" xlink:href=".." xlink:type="simple" chart:class="chart:line" chart:style-name="ch1">
        <chart:legend chart:legend-position="end" svg:x="27.836cm" svg:y="6.021cm" style:legend-expansion="high" chart:style-name="ch2"/>
        <chart:plot-area chart:style-name="ch3" table:cell-range-address="'test 8th nov'.U10:'test 8th nov'.W85" chart:data-source-has-labels="both" svg:x="0.587cm" svg:y="0.262cm" svg:width="26.662cm" svg:height="12.615cm">
          <chart:coordinate-region svg:x="1.665cm" svg:y="0.461cm" svg:width="25.584cm" svg:height="10.95cm"/>
          <chart:axis chart:dimension="x" chart:name="primary-x" chart:style-name="ch4" chartooo:axis-type="auto">
            <chartooo:date-scale/>
            <chart:categories table:cell-range-address="'test 8th nov'.U10:'test 8th nov'.U8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test 8th nov'.V10:'test 8th nov'.V85" loext:label-string="s" chart:class="chart:line">
            <chart:data-point chart:repeated="76"/>
          </chart:series>
          <chart:series chart:style-name="ch8" chart:values-cell-range-address="'test 8th nov'.W10:'test 8th nov'.W85" loext:label-string="l" chart:class="chart:line">
            <chart:data-point chart:repeated="7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</text:p>
              </table:table-cell>
              <table:table-cell office:value-type="string">
                <text:p>l</text:p>
              </table:table-cell>
            </table:table-row>
          </table:table-header-rows>
          <table:table-rows>
            <table:table-row>
              <table:table-cell office:value-type="float" office:value="0.70318287037037">
                <text:p>0.70318287037037</text:p>
                <draw:g>
                  <svg:desc>'test 8th nov'.U10:'test 8th nov'.U85</svg:desc>
                </draw:g>
              </table:table-cell>
              <table:table-cell office:value-type="float" office:value="143">
                <text:p>143</text:p>
                <draw:g>
                  <svg:desc>'test 8th nov'.V10:'test 8th nov'.V85</svg:desc>
                </draw:g>
              </table:table-cell>
              <table:table-cell office:value-type="float" office:value="106">
                <text:p>106</text:p>
                <draw:g>
                  <svg:desc>'test 8th nov'.W10:'test 8th nov'.W85</svg:desc>
                </draw:g>
              </table:table-cell>
            </table:table-row>
            <table:table-row>
              <table:table-cell office:value-type="float" office:value="0.703877314814815">
                <text:p>0.703877314814815</text:p>
              </table:table-cell>
              <table:table-cell office:value-type="float" office:value="48">
                <text:p>4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0.704571759259259">
                <text:p>0.704571759259259</text:p>
              </table:table-cell>
              <table:table-cell office:value-type="float" office:value="97">
                <text:p>9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0.705266203703704">
                <text:p>0.705266203703704</text:p>
              </table:table-cell>
              <table:table-cell office:value-type="float" office:value="10">
                <text:p>1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0.705960648148148">
                <text:p>0.705960648148148</text:p>
              </table:table-cell>
              <table:table-cell office:value-type="float" office:value="10">
                <text:p>1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0.706655092592593">
                <text:p>0.706655092592593</text:p>
              </table:table-cell>
              <table:table-cell office:value-type="float" office:value="24">
                <text:p>2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0.707349537037037">
                <text:p>0.707349537037037</text:p>
              </table:table-cell>
              <table:table-cell office:value-type="float" office:value="58">
                <text:p>5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0.708043981481482">
                <text:p>0.708043981481482</text:p>
              </table:table-cell>
              <table:table-cell office:value-type="float" office:value="52">
                <text:p>5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0.70875">
                <text:p>0.70875</text:p>
              </table:table-cell>
              <table:table-cell office:value-type="float" office:value="24">
                <text:p>2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0.709444444444444">
                <text:p>0.709444444444444</text:p>
              </table:table-cell>
              <table:table-cell office:value-type="float" office:value="17">
                <text:p>1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0.710138888888889">
                <text:p>0.710138888888889</text:p>
              </table:table-cell>
              <table:table-cell office:value-type="float" office:value="71">
                <text:p>7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0.710833333333333">
                <text:p>0.710833333333333</text:p>
              </table:table-cell>
              <table:table-cell office:value-type="float" office:value="141">
                <text:p>14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0.711527777777778">
                <text:p>0.711527777777778</text:p>
              </table:table-cell>
              <table:table-cell office:value-type="float" office:value="174">
                <text:p>17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0.712222222222222">
                <text:p>0.712222222222222</text:p>
              </table:table-cell>
              <table:table-cell office:value-type="float" office:value="148">
                <text:p>14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0.712916666666667">
                <text:p>0.712916666666667</text:p>
              </table:table-cell>
              <table:table-cell office:value-type="float" office:value="15">
                <text:p>1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0.713622685185185">
                <text:p>0.713622685185185</text:p>
              </table:table-cell>
              <table:table-cell office:value-type="float" office:value="0">
                <text:p>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0.71431712962963">
                <text:p>0.71431712962963</text:p>
              </table:table-cell>
              <table:table-cell office:value-type="float" office:value="64">
                <text:p>6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0.715011574074074">
                <text:p>0.715011574074074</text:p>
              </table:table-cell>
              <table:table-cell office:value-type="float" office:value="118">
                <text:p>11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0.818136574074074">
                <text:p>0.818136574074074</text:p>
              </table:table-cell>
              <table:table-cell office:value-type="float" office:value="16">
                <text:p>16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0.818831018518518">
                <text:p>0.818831018518518</text:p>
              </table:table-cell>
              <table:table-cell office:value-type="float" office:value="67">
                <text:p>6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0.819525462962963">
                <text:p>0.819525462962963</text:p>
              </table:table-cell>
              <table:table-cell office:value-type="float" office:value="92">
                <text:p>92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0.820231481481481">
                <text:p>0.820231481481481</text:p>
              </table:table-cell>
              <table:table-cell office:value-type="float" office:value="95">
                <text:p>9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0.820925925925926">
                <text:p>0.820925925925926</text:p>
              </table:table-cell>
              <table:table-cell office:value-type="float" office:value="57">
                <text:p>57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0.82162037037037">
                <text:p>0.82162037037037</text:p>
              </table:table-cell>
              <table:table-cell office:value-type="float" office:value="42">
                <text:p>42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0.822314814814815">
                <text:p>0.822314814814815</text:p>
              </table:table-cell>
              <table:table-cell office:value-type="float" office:value="71">
                <text:p>7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0.823020833333333">
                <text:p>0.823020833333333</text:p>
              </table:table-cell>
              <table:table-cell office:value-type="float" office:value="61">
                <text:p>6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0.823715277777778">
                <text:p>0.823715277777778</text:p>
              </table:table-cell>
              <table:table-cell office:value-type="float" office:value="88">
                <text:p>8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0.824409722222222">
                <text:p>0.824409722222222</text:p>
              </table:table-cell>
              <table:table-cell office:value-type="float" office:value="205">
                <text:p>205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0.825104166666667">
                <text:p>0.825104166666667</text:p>
              </table:table-cell>
              <table:table-cell office:value-type="float" office:value="174">
                <text:p>174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0.8390625">
                <text:p>0.8390625</text:p>
              </table:table-cell>
              <table:table-cell office:value-type="float" office:value="119">
                <text:p>119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0.839756944444444">
                <text:p>0.839756944444444</text:p>
              </table:table-cell>
              <table:table-cell office:value-type="float" office:value="75">
                <text:p>75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0.840451388888889">
                <text:p>0.840451388888889</text:p>
              </table:table-cell>
              <table:table-cell office:value-type="float" office:value="78">
                <text:p>7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0.841157407407407">
                <text:p>0.841157407407407</text:p>
              </table:table-cell>
              <table:table-cell office:value-type="float" office:value="175">
                <text:p>175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0.841851851851852">
                <text:p>0.841851851851852</text:p>
              </table:table-cell>
              <table:table-cell office:value-type="float" office:value="100">
                <text:p>10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0.842546296296296">
                <text:p>0.842546296296296</text:p>
              </table:table-cell>
              <table:table-cell office:value-type="float" office:value="90">
                <text:p>9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0.843252314814815">
                <text:p>0.843252314814815</text:p>
              </table:table-cell>
              <table:table-cell office:value-type="float" office:value="97">
                <text:p>9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0.843946759259259">
                <text:p>0.843946759259259</text:p>
              </table:table-cell>
              <table:table-cell office:value-type="float" office:value="111">
                <text:p>11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0.844641203703704">
                <text:p>0.844641203703704</text:p>
              </table:table-cell>
              <table:table-cell office:value-type="float" office:value="65">
                <text:p>6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0.845335648148148">
                <text:p>0.845335648148148</text:p>
              </table:table-cell>
              <table:table-cell office:value-type="float" office:value="81">
                <text:p>81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0.846041666666667">
                <text:p>0.846041666666667</text:p>
              </table:table-cell>
              <table:table-cell office:value-type="float" office:value="118">
                <text:p>11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0.848831018518519">
                <text:p>0.848831018518519</text:p>
              </table:table-cell>
              <table:table-cell office:value-type="float" office:value="77">
                <text:p>7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0.849525462962963">
                <text:p>0.849525462962963</text:p>
              </table:table-cell>
              <table:table-cell office:value-type="float" office:value="99">
                <text:p>99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0.850219907407407">
                <text:p>0.850219907407407</text:p>
              </table:table-cell>
              <table:table-cell office:value-type="float" office:value="71">
                <text:p>7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0.850925925925926">
                <text:p>0.850925925925926</text:p>
              </table:table-cell>
              <table:table-cell office:value-type="float" office:value="78">
                <text:p>7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0.85162037037037">
                <text:p>0.85162037037037</text:p>
              </table:table-cell>
              <table:table-cell office:value-type="float" office:value="159">
                <text:p>15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0.852314814814815">
                <text:p>0.852314814814815</text:p>
              </table:table-cell>
              <table:table-cell office:value-type="float" office:value="60">
                <text:p>6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0.853020833333333">
                <text:p>0.853020833333333</text:p>
              </table:table-cell>
              <table:table-cell office:value-type="float" office:value="140">
                <text:p>14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0.853715277777778">
                <text:p>0.853715277777778</text:p>
              </table:table-cell>
              <table:table-cell office:value-type="float" office:value="110">
                <text:p>11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0.854409722222222">
                <text:p>0.854409722222222</text:p>
              </table:table-cell>
              <table:table-cell office:value-type="float" office:value="119">
                <text:p>11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0.855115740740741">
                <text:p>0.855115740740741</text:p>
              </table:table-cell>
              <table:table-cell office:value-type="float" office:value="118">
                <text:p>11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0.855810185185185">
                <text:p>0.855810185185185</text:p>
              </table:table-cell>
              <table:table-cell office:value-type="float" office:value="125">
                <text:p>125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0.85650462962963">
                <text:p>0.85650462962963</text:p>
              </table:table-cell>
              <table:table-cell office:value-type="float" office:value="126">
                <text:p>126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0.857210648148148">
                <text:p>0.857210648148148</text:p>
              </table:table-cell>
              <table:table-cell office:value-type="float" office:value="114">
                <text:p>11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0.857905092592593">
                <text:p>0.857905092592593</text:p>
              </table:table-cell>
              <table:table-cell office:value-type="float" office:value="94">
                <text:p>94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0.858599537037037">
                <text:p>0.858599537037037</text:p>
              </table:table-cell>
              <table:table-cell office:value-type="float" office:value="87">
                <text:p>8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0.859293981481481">
                <text:p>0.859293981481481</text:p>
              </table:table-cell>
              <table:table-cell office:value-type="float" office:value="81">
                <text:p>81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94">
                <text:p>94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0.860694444444444">
                <text:p>0.860694444444444</text:p>
              </table:table-cell>
              <table:table-cell office:value-type="float" office:value="247">
                <text:p>247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0.861388888888889">
                <text:p>0.861388888888889</text:p>
              </table:table-cell>
              <table:table-cell office:value-type="float" office:value="191">
                <text:p>191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0.862094907407407">
                <text:p>0.862094907407407</text:p>
              </table:table-cell>
              <table:table-cell office:value-type="float" office:value="67">
                <text:p>6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0.862789351851852">
                <text:p>0.862789351851852</text:p>
              </table:table-cell>
              <table:table-cell office:value-type="float" office:value="104">
                <text:p>104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0.863483796296296">
                <text:p>0.863483796296296</text:p>
              </table:table-cell>
              <table:table-cell office:value-type="float" office:value="119">
                <text:p>119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0.864189814814815">
                <text:p>0.864189814814815</text:p>
              </table:table-cell>
              <table:table-cell office:value-type="float" office:value="97">
                <text:p>97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0.864884259259259">
                <text:p>0.864884259259259</text:p>
              </table:table-cell>
              <table:table-cell office:value-type="float" office:value="113">
                <text:p>113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0.865578703703704">
                <text:p>0.865578703703704</text:p>
              </table:table-cell>
              <table:table-cell office:value-type="float" office:value="63">
                <text:p>6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0.866284722222222">
                <text:p>0.866284722222222</text:p>
              </table:table-cell>
              <table:table-cell office:value-type="float" office:value="86">
                <text:p>8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0.866979166666667">
                <text:p>0.866979166666667</text:p>
              </table:table-cell>
              <table:table-cell office:value-type="float" office:value="97">
                <text:p>9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0.867673611111111">
                <text:p>0.867673611111111</text:p>
              </table:table-cell>
              <table:table-cell office:value-type="float" office:value="114">
                <text:p>114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0.86837962962963">
                <text:p>0.86837962962963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0.869074074074074">
                <text:p>0.869074074074074</text:p>
              </table:table-cell>
              <table:table-cell office:value-type="float" office:value="74">
                <text:p>74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0.869768518518518">
                <text:p>0.869768518518518</text:p>
              </table:table-cell>
              <table:table-cell office:value-type="float" office:value="134">
                <text:p>13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0.870474537037037">
                <text:p>0.870474537037037</text:p>
              </table:table-cell>
              <table:table-cell office:value-type="float" office:value="117">
                <text:p>117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0.871168981481481">
                <text:p>0.871168981481481</text:p>
              </table:table-cell>
              <table:table-cell office:value-type="float" office:value="209">
                <text:p>209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0.871863425925926">
                <text:p>0.871863425925926</text:p>
              </table:table-cell>
              <table:table-cell office:value-type="float" office:value="166">
                <text:p>16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0.87255787037037">
                <text:p>0.87255787037037</text:p>
              </table:table-cell>
              <table:table-cell office:value-type="float" office:value="129">
                <text:p>129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0.873263888888889">
                <text:p>0.873263888888889</text:p>
              </table:table-cell>
              <table:table-cell office:value-type="float" office:value="147">
                <text:p>147</text:p>
              </table:table-cell>
              <table:table-cell office:value-type="float" office:value="132">
                <text:p>13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