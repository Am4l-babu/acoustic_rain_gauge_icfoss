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svg:stroke-color="#000000" draw:fill="solid" draw:fill-color="#ffffff" fo:min-height="3.4cm"/>
      <style:text-properties fo:font-style="italic" style:font-style-asian="italic" style:font-style-complex="italic"/>
    </style:style>
    <style:style style:name="gr2" style:family="graphic">
      <style:graphic-properties draw:stroke="none" svg:stroke-color="#000000" draw:fill="solid" draw:fill-color="#ffffff" fo:min-height="3.002cm"/>
      <style:text-properties fo:font-style="italic" style:font-style-asian="italic" style:font-style-complex="italic"/>
    </style:style>
    <style:style style:name="gr3" style:family="graphic">
      <style:graphic-properties draw:stroke="none" svg:stroke-color="#000000" draw:fill="solid" draw:fill-color="#ffffff" fo:min-height="2.974cm"/>
      <style:text-properties fo:font-style="italic" style:font-style-asian="italic" style:font-style-complex="italic"/>
    </style:style>
    <style:style style:name="gr4" style:family="graphic">
      <style:graphic-properties draw:stroke="none" svg:stroke-color="#000000" draw:fill="solid" draw:fill-color="#ffffff" fo:min-height="2.098cm"/>
      <style:text-properties fo:font-style="italic" style:font-style-asian="italic" style:font-style-complex="italic"/>
    </style:style>
    <style:style style:name="gr5" style:family="graphic">
      <style:graphic-properties draw:stroke="none" svg:stroke-color="#000000" draw:fill="solid" draw:fill-color="#ffffff" fo:min-height="3.001cm"/>
      <style:text-properties fo:font-style="italic" style:font-style-asian="italic" style:font-style-complex="italic"/>
    </style:style>
    <style:style style:name="P1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est data" table:style-name="ta1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</table:table-row>
        <table:table-row table:style-name="ro1">
          <table:table-cell table:style-name="ce2" office:value-type="time" office:time-value="PT12H05M07S" calcext:value-type="time">
            <text:p>12:05:07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time" office:time-value="PT12H06M07S" calcext:value-type="time">
            <text:p>12:06:07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time" office:time-value="PT12H07M07S" calcext:value-type="time">
            <text:p>12:07:07</text:p>
          </table:table-cell>
          <table:table-cell office:value-type="float" office:value="659" calcext:value-type="float">
            <text:p>65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style-name="ce2" office:value-type="time" office:time-value="PT12H08M07S" calcext:value-type="time">
            <text:p>12:08:07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2" office:value-type="time" office:time-value="PT12H09M08S" calcext:value-type="time">
            <text:p>12:09:08</text:p>
          </table:table-cell>
          <table:table-cell office:value-type="float" office:value="620" calcext:value-type="float">
            <text:p>62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2" office:value-type="time" office:time-value="PT12H10M08S" calcext:value-type="time">
            <text:p>12:10:08</text:p>
          </table:table-cell>
          <table:table-cell office:value-type="float" office:value="486" calcext:value-type="float">
            <text:p>48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time" office:time-value="PT12H11M08S" calcext:value-type="time">
            <text:p>12:11:08</text:p>
          </table:table-cell>
          <table:table-cell office:value-type="float" office:value="521" calcext:value-type="float">
            <text:p>52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style-name="ce2" office:value-type="time" office:time-value="PT12H12M08S" calcext:value-type="time">
            <text:p>12:12:08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style-name="ce2" office:value-type="time" office:time-value="PT12H13M09S" calcext:value-type="time">
            <text:p>12:13:09</text:p>
          </table:table-cell>
          <table:table-cell office:value-type="float" office:value="491" calcext:value-type="float">
            <text:p>4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time" office:time-value="PT12H14M09S" calcext:value-type="time">
            <text:p>12:14:09</text:p>
          </table:table-cell>
          <table:table-cell office:value-type="float" office:value="89" calcext:value-type="float">
            <text:p>8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2" office:value-type="time" office:time-value="PT12H15M09S" calcext:value-type="time">
            <text:p>12:15:09</text:p>
          </table:table-cell>
          <table:table-cell office:value-type="float" office:value="447" calcext:value-type="float">
            <text:p>44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style-name="ce2" office:value-type="time" office:time-value="PT12H16M09S" calcext:value-type="time">
            <text:p>12:16:09</text:p>
          </table:table-cell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time" office:time-value="PT12H17M10S" calcext:value-type="time">
            <text:p>12:17:10</text:p>
          </table:table-cell>
          <table:table-cell office:value-type="float" office:value="308" calcext:value-type="float">
            <text:p>30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time" office:time-value="PT12H18M10S" calcext:value-type="time">
            <text:p>12:18:10</text:p>
          </table:table-cell>
          <table:table-cell office:value-type="float" office:value="472" calcext:value-type="float">
            <text:p>47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style-name="ce2" office:value-type="time" office:time-value="PT12H19M10S" calcext:value-type="time">
            <text:p>12:19:10</text:p>
          </table:table-cell>
          <table:table-cell office:value-type="float" office:value="383" calcext:value-type="float">
            <text:p>38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style-name="ce2" office:value-type="time" office:time-value="PT12H20M10S" calcext:value-type="time">
            <text:p>12:20:1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time" office:time-value="PT12H21M11S" calcext:value-type="time">
            <text:p>12:21:11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time" office:time-value="PT12H22M11S" calcext:value-type="time">
            <text:p>12:22:11</text:p>
          </table:table-cell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time" office:time-value="PT12H23M11S" calcext:value-type="time">
            <text:p>12:23:11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time" office:time-value="PT12H24M12S" calcext:value-type="time">
            <text:p>12:24:12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time" office:time-value="PT12H25M12S" calcext:value-type="time">
            <text:p>12:25:12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time" office:time-value="PT12H26M12S" calcext:value-type="time">
            <text:p>12:26:12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time" office:time-value="PT12H27M12S" calcext:value-type="time">
            <text:p>12:27:12</text:p>
          </table:table-cell>
          <table:table-cell office:value-type="float" office:value="129" calcext:value-type="float">
            <text:p>12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time" office:time-value="PT12H28M13S" calcext:value-type="time">
            <text:p>12:28:13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time" office:time-value="PT12H29M13S" calcext:value-type="time">
            <text:p>12:29:13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time" office:time-value="PT12H30M13S" calcext:value-type="time">
            <text:p>12:30:13</text:p>
          </table:table-cell>
          <table:table-cell office:value-type="float" office:value="63" calcext:value-type="float">
            <text:p>6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time" office:time-value="PT12H31M14S" calcext:value-type="time">
            <text:p>12:31:14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time" office:time-value="PT12H32M14S" calcext:value-type="time">
            <text:p>12:32:14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2" office:value-type="time" office:time-value="PT12H33M14S" calcext:value-type="time">
            <text:p>12:33:14</text:p>
          </table:table-cell>
          <table:table-cell office:value-type="float" office:value="447" calcext:value-type="float">
            <text:p>4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style-name="ce2" office:value-type="time" office:time-value="PT12H34M14S" calcext:value-type="time">
            <text:p>12:34:14</text:p>
          </table:table-cell>
          <table:table-cell office:value-type="float" office:value="665" calcext:value-type="float">
            <text:p>66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time" office:time-value="PT12H35M15S" calcext:value-type="time">
            <text:p>12:35:15</text:p>
          </table:table-cell>
          <table:table-cell office:value-type="float" office:value="563" calcext:value-type="float">
            <text:p>5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style-name="ce2" office:value-type="time" office:time-value="PT12H36M15S" calcext:value-type="time">
            <text:p>12:36:15</text:p>
          </table:table-cell>
          <table:table-cell office:value-type="float" office:value="802" calcext:value-type="float">
            <text:p>80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style-name="ce2" office:value-type="time" office:time-value="PT12H37M15S" calcext:value-type="time">
            <text:p>12:37:15</text:p>
          </table:table-cell>
          <table:table-cell office:value-type="float" office:value="848" calcext:value-type="float">
            <text:p>84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style-name="ce2" office:value-type="time" office:time-value="PT12H38M16S" calcext:value-type="time">
            <text:p>12:38:16</text:p>
          </table:table-cell>
          <table:table-cell office:value-type="float" office:value="676" calcext:value-type="float">
            <text:p>67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style-name="ce2" office:value-type="time" office:time-value="PT12H39M16S" calcext:value-type="time">
            <text:p>12:39:1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style-name="ce2" office:value-type="time" office:time-value="PT12H40M16S" calcext:value-type="time">
            <text:p>12:40:16</text:p>
          </table:table-cell>
          <table:table-cell office:value-type="float" office:value="362" calcext:value-type="float">
            <text:p>36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style-name="ce2" office:value-type="time" office:time-value="PT12H41M17S" calcext:value-type="time">
            <text:p>12:41:17</text:p>
          </table:table-cell>
          <table:table-cell office:value-type="float" office:value="469" calcext:value-type="float">
            <text:p>46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style-name="ce2" office:value-type="time" office:time-value="PT12H42M17S" calcext:value-type="time">
            <text:p>12:42:17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time" office:time-value="PT12H43M17S" calcext:value-type="time">
            <text:p>12:43:17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time" office:time-value="PT12H44M18S" calcext:value-type="time">
            <text:p>12:44:18</text:p>
          </table:table-cell>
          <table:table-cell office:value-type="float" office:value="615" calcext:value-type="float">
            <text:p>61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style-name="ce2" office:value-type="time" office:time-value="PT12H45M18S" calcext:value-type="time">
            <text:p>12:45:18</text:p>
          </table:table-cell>
          <table:table-cell office:value-type="float" office:value="79" calcext:value-type="float">
            <text:p>7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time" office:time-value="PT12H46M18S" calcext:value-type="time">
            <text:p>12:46:18</text:p>
          </table:table-cell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time" office:time-value="PT12H47M19S" calcext:value-type="time">
            <text:p>12:47:19</text:p>
          </table:table-cell>
          <table:table-cell office:value-type="float" office:value="236" calcext:value-type="float">
            <text:p>2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time" office:time-value="PT12H48M19S" calcext:value-type="time">
            <text:p>12:48:19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time" office:time-value="PT12H49M19S" calcext:value-type="time">
            <text:p>12:49:19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time" office:time-value="PT12H50M20S" calcext:value-type="time">
            <text:p>12:50:2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time" office:time-value="PT12H51M20S" calcext:value-type="time">
            <text:p>12:51:20</text:p>
          </table:table-cell>
          <table:table-cell office:value-type="float" office:value="374" calcext:value-type="float">
            <text:p>37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time" office:time-value="PT12H52M20S" calcext:value-type="time">
            <text:p>12:52:2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time" office:time-value="PT12H53M21S" calcext:value-type="time">
            <text:p>12:53:21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time" office:time-value="PT12H54M21S" calcext:value-type="time">
            <text:p>12:54:21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time" office:time-value="PT12H55M21S" calcext:value-type="time">
            <text:p>12:55:21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time" office:time-value="PT12H56M22S" calcext:value-type="time">
            <text:p>12:56:22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number-rows-repeated="10485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oderate rain" table:style-name="ta1">
        <office:forms form:automatic-focus="false" form:apply-design-mode="false"/>
        <table:shapes>
          <draw:frame draw:z-index="0" draw:name="Text Frame 1" draw:style-name="gr1" draw:text-style-name="P1" svg:width="6.994cm" svg:height="3.4cm" svg:x="6.69cm" svg:y="0.08cm">
            <draw:text-box>
              <text:p><text:span text:style-name="T1">Set up 1</text:span></text:p>
              <text:p><text:span text:style-name="T2">Settings used for creating this condition: </text:span></text:p>
              <text:p><text:span text:style-name="T2"/></text:p>
              <text:p><text:span text:style-name="T2">Tap was almost closed.</text:span></text:p>
            </draw:text-box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</table:table-row>
        <table:table-row table:style-name="ro1">
          <table:table-cell office:value-type="time" office:time-value="PT12H07M07S" calcext:value-type="time">
            <text:p>12:07:07</text:p>
          </table:table-cell>
          <table:table-cell office:value-type="float" office:value="659" calcext:value-type="float">
            <text:p>65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time" office:time-value="PT12H08M07S" calcext:value-type="time">
            <text:p>12:08:07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time" office:time-value="PT12H09M08S" calcext:value-type="time">
            <text:p>12:09:08</text:p>
          </table:table-cell>
          <table:table-cell office:value-type="float" office:value="620" calcext:value-type="float">
            <text:p>62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time" office:time-value="PT12H10M08S" calcext:value-type="time">
            <text:p>12:10:08</text:p>
          </table:table-cell>
          <table:table-cell office:value-type="float" office:value="486" calcext:value-type="float">
            <text:p>48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time" office:time-value="PT12H11M08S" calcext:value-type="time">
            <text:p>12:11:08</text:p>
          </table:table-cell>
          <table:table-cell office:value-type="float" office:value="521" calcext:value-type="float">
            <text:p>52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time" office:time-value="PT12H12M08S" calcext:value-type="time">
            <text:p>12:12:08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time" office:time-value="PT12H13M09S" calcext:value-type="time">
            <text:p>12:13:09</text:p>
          </table:table-cell>
          <table:table-cell office:value-type="float" office:value="491" calcext:value-type="float">
            <text:p>491</text:p>
          </table:table-cell>
          <table:table-cell office:value-type="float" office:value="91" calcext:value-type="float">
            <text:p>91</text:p>
          </table:table-cell>
        </table:table-row>
      </table:table>
      <table:table table:name="heavy rain" table:style-name="ta1">
        <office:forms form:automatic-focus="false" form:apply-design-mode="false"/>
        <table:shapes>
          <draw:frame draw:z-index="0" draw:name="Text Frame 2" draw:style-name="gr2" draw:text-style-name="P1" svg:width="7.984cm" svg:height="3.002cm" svg:x="6.719cm" svg:y="0.053cm">
            <draw:text-box>
              <text:p><text:span text:style-name="T1">Setup 2</text:span></text:p>
              <text:p><text:span text:style-name="T2">Settings used for creating this condition: </text:span></text:p>
              <text:p><text:span text:style-name="T2"/></text:p>
              <text:p><text:span text:style-name="T2">Tap was more closed than the previous setup.</text:span></text:p>
            </draw:text-box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</table:table-row>
        <table:table-row table:style-name="ro1">
          <table:table-cell office:value-type="time" office:time-value="PT12H15M09S" calcext:value-type="time">
            <text:p>12:15:09</text:p>
          </table:table-cell>
          <table:table-cell office:value-type="float" office:value="447" calcext:value-type="float">
            <text:p>44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time" office:time-value="PT12H16M09S" calcext:value-type="time">
            <text:p>12:16:09</text:p>
          </table:table-cell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time" office:time-value="PT12H17M10S" calcext:value-type="time">
            <text:p>12:17:10</text:p>
          </table:table-cell>
          <table:table-cell office:value-type="float" office:value="308" calcext:value-type="float">
            <text:p>30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time" office:time-value="PT12H18M10S" calcext:value-type="time">
            <text:p>12:18:10</text:p>
          </table:table-cell>
          <table:table-cell office:value-type="float" office:value="472" calcext:value-type="float">
            <text:p>47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time" office:time-value="PT12H19M10S" calcext:value-type="time">
            <text:p>12:19:10</text:p>
          </table:table-cell>
          <table:table-cell office:value-type="float" office:value="383" calcext:value-type="float">
            <text:p>38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time" office:time-value="PT12H20M10S" calcext:value-type="time">
            <text:p>12:20:1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</table:table-row>
      </table:table>
      <table:table table:name="light rain" table:style-name="ta1">
        <office:forms form:automatic-focus="false" form:apply-design-mode="false"/>
        <table:shapes>
          <draw:frame draw:z-index="0" draw:name="Text Frame 3" draw:style-name="gr3" draw:text-style-name="P1" svg:width="7.957cm" svg:height="2.974cm" svg:x="6.719cm" svg:y="0.081cm">
            <draw:text-box>
              <text:p><text:span text:style-name="T1">Setup 3</text:span></text:p>
              <text:p><text:span text:style-name="T2">Settings used for creating this condition: </text:span></text:p>
              <text:p><text:span text:style-name="T2"/></text:p>
              <text:p><text:span text:style-name="T2">Tap was more open than </text:span><text:span text:style-name="T1">setup 1</text:span></text:p>
            </draw:text-box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</table:table-row>
        <table:table-row table:style-name="ro1">
          <table:table-cell office:value-type="time" office:time-value="PT12H21M11S" calcext:value-type="time">
            <text:p>12:21:11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time" office:time-value="PT12H22M11S" calcext:value-type="time">
            <text:p>12:22:11</text:p>
          </table:table-cell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time" office:time-value="PT12H23M11S" calcext:value-type="time">
            <text:p>12:23:11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time" office:time-value="PT12H24M12S" calcext:value-type="time">
            <text:p>12:24:12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time" office:time-value="PT12H25M12S" calcext:value-type="time">
            <text:p>12:25:12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time" office:time-value="PT12H26M12S" calcext:value-type="time">
            <text:p>12:26:12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</table:table-row>
      </table:table>
      <table:table table:name="nozzle modified low discharge" table:style-name="ta1">
        <office:forms form:automatic-focus="false" form:apply-design-mode="false"/>
        <table:shapes>
          <draw:frame draw:z-index="0" draw:name="Text Frame 4" draw:style-name="gr4" draw:text-style-name="P1" svg:width="7.35cm" svg:height="2.341cm" svg:x="6.747cm" svg:y="0.053cm">
            <draw:text-box>
              <text:p><text:span text:style-name="T1">Setup 4</text:span></text:p>
              <text:p><text:span text:style-name="T2">Settings used for creating this condition: </text:span></text:p>
              <text:p><text:span text:style-name="T2"/></text:p>
              <text:p><text:span text:style-name="T2">The Mist Nozzle was cut. </text:span></text:p>
              <text:p><text:span text:style-name="T2">Tap was partially open. </text:span></text:p>
            </draw:text-box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</table:table-row>
        <table:table-row table:style-name="ro1">
          <table:table-cell office:value-type="time" office:time-value="PT12H32M14S" calcext:value-type="time">
            <text:p>12:32:14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time" office:time-value="PT12H33M14S" calcext:value-type="time">
            <text:p>12:33:14</text:p>
          </table:table-cell>
          <table:table-cell office:value-type="float" office:value="447" calcext:value-type="float">
            <text:p>4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time" office:time-value="PT12H34M14S" calcext:value-type="time">
            <text:p>12:34:14</text:p>
          </table:table-cell>
          <table:table-cell office:value-type="float" office:value="665" calcext:value-type="float">
            <text:p>66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time" office:time-value="PT12H35M15S" calcext:value-type="time">
            <text:p>12:35:15</text:p>
          </table:table-cell>
          <table:table-cell office:value-type="float" office:value="563" calcext:value-type="float">
            <text:p>563</text:p>
          </table:table-cell>
          <table:table-cell office:value-type="float" office:value="251" calcext:value-type="float">
            <text:p>251</text:p>
          </table:table-cell>
        </table:table-row>
      </table:table>
      <table:table table:name="nozzle modified high discharge" table:style-name="ta1">
        <office:forms form:automatic-focus="false" form:apply-design-mode="false"/>
        <table:shapes>
          <draw:frame draw:z-index="0" draw:name="Text Frame 5" draw:style-name="gr5" draw:text-style-name="P1" svg:width="7.735cm" svg:height="3.001cm" svg:x="6.748cm" svg:y="0.054cm">
            <draw:text-box>
              <text:p><text:span text:style-name="T1">Setup 5</text:span></text:p>
              <text:p><text:span text:style-name="T2">Settings used for creating this condition: </text:span></text:p>
              <text:p><text:span text:style-name="T2"/></text:p>
              <text:p><text:span text:style-name="T2">The Mist Nozzle was cut. </text:span></text:p>
              <text:p><text:span text:style-name="T2">Tap was more open than previous setup.</text:span></text:p>
            </draw:text-box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</table:table-row>
        <table:table-row table:style-name="ro1">
          <table:table-cell office:value-type="time" office:time-value="PT12H37M15S" calcext:value-type="time">
            <text:p>12:37:15</text:p>
          </table:table-cell>
          <table:table-cell office:value-type="float" office:value="848" calcext:value-type="float">
            <text:p>84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time" office:time-value="PT12H38M16S" calcext:value-type="time">
            <text:p>12:38:16</text:p>
          </table:table-cell>
          <table:table-cell office:value-type="float" office:value="676" calcext:value-type="float">
            <text:p>67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time" office:time-value="PT12H39M16S" calcext:value-type="time">
            <text:p>12:39:1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time" office:time-value="PT12H40M16S" calcext:value-type="time">
            <text:p>12:40:16</text:p>
          </table:table-cell>
          <table:table-cell office:value-type="float" office:value="362" calcext:value-type="float">
            <text:p>36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time" office:time-value="PT12H41M17S" calcext:value-type="time">
            <text:p>12:41:17</text:p>
          </table:table-cell>
          <table:table-cell office:value-type="float" office:value="469" calcext:value-type="float">
            <text:p>46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time" office:time-value="PT12H42M17S" calcext:value-type="time">
            <text:p>12:42:17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fan jet nozzle" table:style-name="ta1">
        <office:forms form:automatic-focus="false" form:apply-design-mode="false"/>
        <table:shapes>
          <draw:frame draw:z-index="0" draw:name="Text Frame 6" draw:style-name="gr5" draw:text-style-name="P1" svg:width="7.735cm" svg:height="3.001cm" svg:x="6.719cm" svg:y="0.028cm">
            <draw:text-box>
              <text:p><text:span text:style-name="T1">Setup 6</text:span></text:p>
              <text:p><text:span text:style-name="T2">Settings used for creating this condition: </text:span></text:p>
              <text:p><text:span text:style-name="T2"/></text:p>
              <text:p><text:span text:style-name="T2">The Fan Jet Nozzle was used </text:span></text:p>
              <text:p><text:span text:style-name="T2">Tap was same as previous setup.</text:span></text:p>
            </draw:text-box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</table:table-row>
        <table:table-row table:style-name="ro1">
          <table:table-cell office:value-type="time" office:time-value="PT12H43M17S" calcext:value-type="time">
            <text:p>12:43:17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time" office:time-value="PT12H44M18S" calcext:value-type="time">
            <text:p>12:44:18</text:p>
          </table:table-cell>
          <table:table-cell office:value-type="float" office:value="615" calcext:value-type="float">
            <text:p>61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time" office:time-value="PT12H45M18S" calcext:value-type="time">
            <text:p>12:45:18</text:p>
          </table:table-cell>
          <table:table-cell office:value-type="float" office:value="79" calcext:value-type="float">
            <text:p>79</text:p>
          </table:table-cell>
          <table:table-cell office:value-type="float" office:value="126" calcext:value-type="float">
            <text:p>126</text:p>
          </table:table-cell>
        </table:table-row>
      </table:table>
      <table:table table:name="labeled data" table:style-name="ta1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odera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oderat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oderat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oderat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oderat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oderat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oderat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ight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0:40:15.424559666</meta:creation-date>
    <dc:date>2022-10-29T17:32:33.563740649</dc:date>
    <meta:editing-duration>PT4H36M48S</meta:editing-duration>
    <meta:editing-cycles>16</meta:editing-cycles>
    <meta:generator>LibreOffice/7.3.6.2$Linux_X86_64 LibreOffice_project/30$Build-2</meta:generator>
    <meta:document-statistic meta:table-count="8" meta:cell-count="333" meta:object-count="6"/>
  </office:meta>
</office:document-meta>
</file>