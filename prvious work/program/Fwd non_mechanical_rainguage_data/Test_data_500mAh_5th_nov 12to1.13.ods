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_data_5th_nov_500_12.35_1.13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1M49S" calcext:value-type="time">
            <text:p>12:31:49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2M49S" calcext:value-type="time">
            <text:p>12:32:49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3M49S" calcext:value-type="time">
            <text:p>12:33:4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4M49S" calcext:value-type="time">
            <text:p>12:34:49</text:p>
          </table:table-cell>
          <table:table-cell office:value-type="float" office:value="271" calcext:value-type="float">
            <text:p>2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5M49S" calcext:value-type="time">
            <text:p>12:35:49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6M49S" calcext:value-type="time">
            <text:p>12:36:49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7M49S" calcext:value-type="time">
            <text:p>12:37:49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8M49S" calcext:value-type="time">
            <text:p>12:38:49</text:p>
          </table:table-cell>
          <table:table-cell office:value-type="float" office:value="396" calcext:value-type="float">
            <text:p>3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39M50S" calcext:value-type="time">
            <text:p>12:39:50</text:p>
          </table:table-cell>
          <table:table-cell office:value-type="float" office:value="505" calcext:value-type="float">
            <text:p>5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0M50S" calcext:value-type="time">
            <text:p>12:40:5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1M50S" calcext:value-type="time">
            <text:p>12:41:50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2M50S" calcext:value-type="time">
            <text:p>12:42:5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3M50S" calcext:value-type="time">
            <text:p>12:43:5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4M50S" calcext:value-type="time">
            <text:p>12:44:50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5M50S" calcext:value-type="time">
            <text:p>12:45:50</text:p>
          </table:table-cell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6M50S" calcext:value-type="time">
            <text:p>12:46:50</text:p>
          </table:table-cell>
          <table:table-cell office:value-type="float" office:value="615" calcext:value-type="float">
            <text:p>6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7M50S" calcext:value-type="time">
            <text:p>12:47:50</text:p>
          </table:table-cell>
          <table:table-cell office:value-type="float" office:value="683" calcext:value-type="float">
            <text:p>6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8M51S" calcext:value-type="time">
            <text:p>12:48:51</text:p>
          </table:table-cell>
          <table:table-cell office:value-type="float" office:value="721" calcext:value-type="float">
            <text:p>7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49M51S" calcext:value-type="time">
            <text:p>12:49:51</text:p>
          </table:table-cell>
          <table:table-cell office:value-type="float" office:value="756" calcext:value-type="float">
            <text:p>7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0M51S" calcext:value-type="time">
            <text:p>12:50:51</text:p>
          </table:table-cell>
          <table:table-cell office:value-type="float" office:value="764" calcext:value-type="float">
            <text:p>7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1M51S" calcext:value-type="time">
            <text:p>12:51:51</text:p>
          </table:table-cell>
          <table:table-cell office:value-type="float" office:value="765" calcext:value-type="float">
            <text:p>7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2M51S" calcext:value-type="time">
            <text:p>12:52:51</text:p>
          </table:table-cell>
          <table:table-cell office:value-type="float" office:value="758" calcext:value-type="float">
            <text:p>7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3M51S" calcext:value-type="time">
            <text:p>12:53:51</text:p>
          </table:table-cell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4M51S" calcext:value-type="time">
            <text:p>12:54:51</text:p>
          </table:table-cell>
          <table:table-cell office:value-type="float" office:value="793" calcext:value-type="float">
            <text:p>7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5M51S" calcext:value-type="time">
            <text:p>12:55:51</text:p>
          </table:table-cell>
          <table:table-cell office:value-type="float" office:value="733" calcext:value-type="float">
            <text:p>7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6M52S" calcext:value-type="time">
            <text:p>12:56:52</text:p>
          </table:table-cell>
          <table:table-cell office:value-type="float" office:value="759" calcext:value-type="float">
            <text:p>7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7M52S" calcext:value-type="time">
            <text:p>12:57:52</text:p>
          </table:table-cell>
          <table:table-cell office:value-type="float" office:value="742" calcext:value-type="float">
            <text:p>7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8M52S" calcext:value-type="time">
            <text:p>12:58:52</text:p>
          </table:table-cell>
          <table:table-cell office:value-type="float" office:value="767" calcext:value-type="float">
            <text:p>7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2H59M52S" calcext:value-type="time">
            <text:p>12:59:52</text:p>
          </table:table-cell>
          <table:table-cell office:value-type="float" office:value="762" calcext:value-type="float">
            <text:p>7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0M52S" calcext:value-type="time">
            <text:p>13:00:52</text:p>
          </table:table-cell>
          <table:table-cell office:value-type="float" office:value="777" calcext:value-type="float">
            <text:p>7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1M52S" calcext:value-type="time">
            <text:p>13:01:52</text:p>
          </table:table-cell>
          <table:table-cell office:value-type="float" office:value="740" calcext:value-type="float">
            <text:p>7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2M52S" calcext:value-type="time">
            <text:p>13:02:52</text:p>
          </table:table-cell>
          <table:table-cell office:value-type="float" office:value="772" calcext:value-type="float">
            <text:p>7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3M52S" calcext:value-type="time">
            <text:p>13:03:52</text:p>
          </table:table-cell>
          <table:table-cell office:value-type="float" office:value="741" calcext:value-type="float">
            <text:p>7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4M53S" calcext:value-type="time">
            <text:p>13:04:53</text:p>
          </table:table-cell>
          <table:table-cell office:value-type="float" office:value="744" calcext:value-type="float">
            <text:p>74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5M53S" calcext:value-type="time">
            <text:p>13:05:53</text:p>
          </table:table-cell>
          <table:table-cell office:value-type="float" office:value="755" calcext:value-type="float">
            <text:p>7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6M53S" calcext:value-type="time">
            <text:p>13:06:53</text:p>
          </table:table-cell>
          <table:table-cell office:value-type="float" office:value="763" calcext:value-type="float">
            <text:p>7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7M53S" calcext:value-type="time">
            <text:p>13:07:53</text:p>
          </table:table-cell>
          <table:table-cell office:value-type="float" office:value="759" calcext:value-type="float">
            <text:p>7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8M53S" calcext:value-type="time">
            <text:p>13:08:53</text:p>
          </table:table-cell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09M53S" calcext:value-type="time">
            <text:p>13:09:53</text:p>
          </table:table-cell>
          <table:table-cell office:value-type="float" office:value="742" calcext:value-type="float">
            <text:p>7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0M53S" calcext:value-type="time">
            <text:p>13:10:53</text:p>
          </table:table-cell>
          <table:table-cell office:value-type="float" office:value="718" calcext:value-type="float">
            <text:p>7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1M54S" calcext:value-type="time">
            <text:p>13:11:54</text:p>
          </table:table-cell>
          <table:table-cell office:value-type="float" office:value="733" calcext:value-type="float">
            <text:p>7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2M54S" calcext:value-type="time">
            <text:p>13:12:54</text:p>
          </table:table-cell>
          <table:table-cell office:value-type="float" office:value="687" calcext:value-type="float">
            <text:p>6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3M54S" calcext:value-type="time">
            <text:p>13:13:54</text:p>
          </table:table-cell>
          <table:table-cell office:value-type="float" office:value="513" calcext:value-type="float">
            <text:p>51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4M54S" calcext:value-type="time">
            <text:p>13:14:54</text:p>
          </table:table-cell>
          <table:table-cell office:value-type="float" office:value="487" calcext:value-type="float">
            <text:p>4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5M54S" calcext:value-type="time">
            <text:p>13:15:54</text:p>
          </table:table-cell>
          <table:table-cell office:value-type="float" office:value="574" calcext:value-type="float">
            <text:p>5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6M54S" calcext:value-type="time">
            <text:p>13:16:54</text:p>
          </table:table-cell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7M54S" calcext:value-type="time">
            <text:p>13:17:54</text:p>
          </table:table-cell>
          <table:table-cell office:value-type="float" office:value="644" calcext:value-type="float">
            <text:p>6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8M54S" calcext:value-type="time">
            <text:p>13:18:54</text:p>
          </table:table-cell>
          <table:table-cell office:value-type="float" office:value="597" calcext:value-type="float">
            <text:p>5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19M55S" calcext:value-type="time">
            <text:p>13:19:5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0M55S" calcext:value-type="time">
            <text:p>13:20:55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1M55S" calcext:value-type="time">
            <text:p>13:21:55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2M55S" calcext:value-type="time">
            <text:p>13:22:55</text:p>
          </table:table-cell>
          <table:table-cell office:value-type="float" office:value="183" calcext:value-type="float">
            <text:p>18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3M55S" calcext:value-type="time">
            <text:p>13:23:55</text:p>
          </table:table-cell>
          <table:table-cell office:value-type="float" office:value="27" calcext:value-type="float">
            <text:p>2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4M55S" calcext:value-type="time">
            <text:p>13:24:55</text:p>
          </table:table-cell>
          <table:table-cell office:value-type="float" office:value="44" calcext:value-type="float">
            <text:p>4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office:value-type="time" office:time-value="PT13H25M56S" calcext:value-type="time">
            <text:p>13:25:5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3:27:05.336888218</meta:creation-date>
    <dc:date>2022-11-05T17:31:26.736070973</dc:date>
    <meta:editing-duration>PT3H14M10S</meta:editing-duration>
    <meta:editing-cycles>2</meta:editing-cycles>
    <meta:generator>LibreOffice/7.3.6.2$Linux_X86_64 LibreOffice_project/30$Build-2</meta:generator>
    <meta:document-statistic meta:table-count="1" meta:cell-count="224" meta:object-count="0"/>
  </office:meta>
</office:document-meta>
</file>