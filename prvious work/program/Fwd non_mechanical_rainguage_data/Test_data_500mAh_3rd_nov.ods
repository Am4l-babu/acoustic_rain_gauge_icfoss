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6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Loudness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11M41S" calcext:value-type="time">
            <text:p>17:11:41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12M41S" calcext:value-type="time">
            <text:p>17:12:4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13M41S" calcext:value-type="time">
            <text:p>17:13:4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14M41S" calcext:value-type="time">
            <text:p>17:14:41</text:p>
          </table:table-cell>
          <table:table-cell office:value-type="float" office:value="1023" calcext:value-type="float">
            <text:p>102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15M41S" calcext:value-type="time">
            <text:p>17:15:41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16M41S" calcext:value-type="time">
            <text:p>17:16:41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17M41S" calcext:value-type="time">
            <text:p>17:17:41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18M41S" calcext:value-type="time">
            <text:p>17:18:41</text:p>
          </table:table-cell>
          <table:table-cell office:value-type="float" office:value="270" calcext:value-type="float">
            <text:p>27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19M42S" calcext:value-type="time">
            <text:p>17:19:42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20M42S" calcext:value-type="time">
            <text:p>17:20: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21M42S" calcext:value-type="time">
            <text:p>17:21: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22M42S" calcext:value-type="time">
            <text:p>17:22:4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23M42S" calcext:value-type="time">
            <text:p>17:23:4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24M42S" calcext:value-type="time">
            <text:p>17:24:42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25M42S" calcext:value-type="time">
            <text:p>17:25:4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26M42S" calcext:value-type="time">
            <text:p>17:26: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27M42S" calcext:value-type="time">
            <text:p>17:27:4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28M43S" calcext:value-type="time">
            <text:p>17:28:43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29M43S" calcext:value-type="time">
            <text:p>17:29:43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30M43S" calcext:value-type="time">
            <text:p>17:30:43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31M43S" calcext:value-type="time">
            <text:p>17:31:4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32M43S" calcext:value-type="time">
            <text:p>17:32:4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33M43S" calcext:value-type="time">
            <text:p>17:33:43</text:p>
          </table:table-cell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34M43S" calcext:value-type="time">
            <text:p>17:34:43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35M43S" calcext:value-type="time">
            <text:p>17:35:43</text:p>
          </table:table-cell>
          <table:table-cell office:value-type="float" office:value="248" calcext:value-type="float">
            <text:p>2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36M44S" calcext:value-type="time">
            <text:p>17:36:44</text:p>
          </table:table-cell>
          <table:table-cell office:value-type="float" office:value="241" calcext:value-type="float">
            <text:p>24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37M44S" calcext:value-type="time">
            <text:p>17:37:44</text:p>
          </table:table-cell>
          <table:table-cell office:value-type="float" office:value="315" calcext:value-type="float">
            <text:p>3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38M44S" calcext:value-type="time">
            <text:p>17:38:44</text:p>
          </table:table-cell>
          <table:table-cell office:value-type="float" office:value="274" calcext:value-type="float">
            <text:p>2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39M44S" calcext:value-type="time">
            <text:p>17:39:44</text:p>
          </table:table-cell>
          <table:table-cell office:value-type="float" office:value="308" calcext:value-type="float">
            <text:p>3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40M44S" calcext:value-type="time">
            <text:p>17:40:44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41M44S" calcext:value-type="time">
            <text:p>17:41:44</text:p>
          </table:table-cell>
          <table:table-cell office:value-type="float" office:value="333" calcext:value-type="float">
            <text:p>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42M44S" calcext:value-type="time">
            <text:p>17:42:44</text:p>
          </table:table-cell>
          <table:table-cell office:value-type="float" office:value="322" calcext:value-type="float">
            <text:p>3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43M44S" calcext:value-type="time">
            <text:p>17:43:44</text:p>
          </table:table-cell>
          <table:table-cell office:value-type="float" office:value="347" calcext:value-type="float">
            <text:p>3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44M45S" calcext:value-type="time">
            <text:p>17:44:45</text:p>
          </table:table-cell>
          <table:table-cell office:value-type="float" office:value="343" calcext:value-type="float">
            <text:p>34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45M45S" calcext:value-type="time">
            <text:p>17:45:45</text:p>
          </table:table-cell>
          <table:table-cell office:value-type="float" office:value="358" calcext:value-type="float">
            <text:p>3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46M45S" calcext:value-type="time">
            <text:p>17:46:45</text:p>
          </table:table-cell>
          <table:table-cell office:value-type="float" office:value="334" calcext:value-type="float">
            <text:p>3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47M45S" calcext:value-type="time">
            <text:p>17:47:45</text:p>
          </table:table-cell>
          <table:table-cell office:value-type="float" office:value="337" calcext:value-type="float">
            <text:p>33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48M45S" calcext:value-type="time">
            <text:p>17:48:45</text:p>
          </table:table-cell>
          <table:table-cell office:value-type="float" office:value="348" calcext:value-type="float">
            <text:p>3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49M45S" calcext:value-type="time">
            <text:p>17:49:45</text:p>
          </table:table-cell>
          <table:table-cell office:value-type="float" office:value="369" calcext:value-type="float">
            <text:p>36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50M45S" calcext:value-type="time">
            <text:p>17:50:45</text:p>
          </table:table-cell>
          <table:table-cell office:value-type="float" office:value="340" calcext:value-type="float">
            <text:p>3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51M45S" calcext:value-type="time">
            <text:p>17:51:45</text:p>
          </table:table-cell>
          <table:table-cell office:value-type="float" office:value="328" calcext:value-type="float">
            <text:p>3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52M46S" calcext:value-type="time">
            <text:p>17:52:46</text:p>
          </table:table-cell>
          <table:table-cell office:value-type="float" office:value="331" calcext:value-type="float">
            <text:p>3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53M46S" calcext:value-type="time">
            <text:p>17:53:46</text:p>
          </table:table-cell>
          <table:table-cell office:value-type="float" office:value="348" calcext:value-type="float">
            <text:p>3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54M46S" calcext:value-type="time">
            <text:p>17:54:46</text:p>
          </table:table-cell>
          <table:table-cell office:value-type="float" office:value="400" calcext:value-type="float">
            <text:p>4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55M46S" calcext:value-type="time">
            <text:p>17:55:46</text:p>
          </table:table-cell>
          <table:table-cell office:value-type="float" office:value="345" calcext:value-type="float">
            <text:p>34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56M46S" calcext:value-type="time">
            <text:p>17:56:46</text:p>
          </table:table-cell>
          <table:table-cell office:value-type="float" office:value="330" calcext:value-type="float">
            <text:p>3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57M46S" calcext:value-type="time">
            <text:p>17:57:46</text:p>
          </table:table-cell>
          <table:table-cell office:value-type="float" office:value="340" calcext:value-type="float">
            <text:p>3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58M46S" calcext:value-type="time">
            <text:p>17:58:46</text:p>
          </table:table-cell>
          <table:table-cell office:value-type="float" office:value="409" calcext:value-type="float">
            <text:p>4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7H59M47S" calcext:value-type="time">
            <text:p>17:59:47</text:p>
          </table:table-cell>
          <table:table-cell office:value-type="float" office:value="353" calcext:value-type="float">
            <text:p>35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00M47S" calcext:value-type="time">
            <text:p>18:00:47</text:p>
          </table:table-cell>
          <table:table-cell office:value-type="float" office:value="336" calcext:value-type="float">
            <text:p>3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01M47S" calcext:value-type="time">
            <text:p>18:01:47</text:p>
          </table:table-cell>
          <table:table-cell office:value-type="float" office:value="410" calcext:value-type="float">
            <text:p>4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02M47S" calcext:value-type="time">
            <text:p>18:02:47</text:p>
          </table:table-cell>
          <table:table-cell office:value-type="float" office:value="315" calcext:value-type="float">
            <text:p>3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03M47S" calcext:value-type="time">
            <text:p>18:03:47</text:p>
          </table:table-cell>
          <table:table-cell office:value-type="float" office:value="313" calcext:value-type="float">
            <text:p>31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04M47S" calcext:value-type="time">
            <text:p>18:04:47</text:p>
          </table:table-cell>
          <table:table-cell office:value-type="float" office:value="338" calcext:value-type="float">
            <text:p>33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05M47S" calcext:value-type="time">
            <text:p>18:05:47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06M48S" calcext:value-type="time">
            <text:p>18:06:48</text:p>
          </table:table-cell>
          <table:table-cell office:value-type="float" office:value="308" calcext:value-type="float">
            <text:p>3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07M48S" calcext:value-type="time">
            <text:p>18:07:48</text:p>
          </table:table-cell>
          <table:table-cell office:value-type="float" office:value="317" calcext:value-type="float">
            <text:p>3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08M48S" calcext:value-type="time">
            <text:p>18:08:48</text:p>
          </table:table-cell>
          <table:table-cell office:value-type="float" office:value="306" calcext:value-type="float">
            <text:p>3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09M48S" calcext:value-type="time">
            <text:p>18:09:48</text:p>
          </table:table-cell>
          <table:table-cell office:value-type="float" office:value="312" calcext:value-type="float">
            <text:p>3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10M48S" calcext:value-type="time">
            <text:p>18:10:48</text:p>
          </table:table-cell>
          <table:table-cell office:value-type="float" office:value="343" calcext:value-type="float">
            <text:p>3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11M48S" calcext:value-type="time">
            <text:p>18:11:48</text:p>
          </table:table-cell>
          <table:table-cell office:value-type="float" office:value="341" calcext:value-type="float">
            <text:p>34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12M49S" calcext:value-type="time">
            <text:p>18:12:49</text:p>
          </table:table-cell>
          <table:table-cell office:value-type="float" office:value="373" calcext:value-type="float">
            <text:p>3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13M49S" calcext:value-type="time">
            <text:p>18:13:49</text:p>
          </table:table-cell>
          <table:table-cell office:value-type="float" office:value="339" calcext:value-type="float">
            <text:p>3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14M49S" calcext:value-type="time">
            <text:p>18:14:49</text:p>
          </table:table-cell>
          <table:table-cell office:value-type="float" office:value="304" calcext:value-type="float">
            <text:p>30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15M49S" calcext:value-type="time">
            <text:p>18:15:49</text:p>
          </table:table-cell>
          <table:table-cell office:value-type="float" office:value="351" calcext:value-type="float">
            <text:p>3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16M49S" calcext:value-type="time">
            <text:p>18:16:49</text:p>
          </table:table-cell>
          <table:table-cell office:value-type="float" office:value="383" calcext:value-type="float">
            <text:p>3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17M49S" calcext:value-type="time">
            <text:p>18:17:49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18M49S" calcext:value-type="time">
            <text:p>18:18:49</text:p>
          </table:table-cell>
          <table:table-cell office:value-type="float" office:value="330" calcext:value-type="float">
            <text:p>3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19M50S" calcext:value-type="time">
            <text:p>18:19:50</text:p>
          </table:table-cell>
          <table:table-cell office:value-type="float" office:value="325" calcext:value-type="float">
            <text:p>3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20M50S" calcext:value-type="time">
            <text:p>18:20:50</text:p>
          </table:table-cell>
          <table:table-cell office:value-type="float" office:value="313" calcext:value-type="float">
            <text:p>3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21M50S" calcext:value-type="time">
            <text:p>18:21:50</text:p>
          </table:table-cell>
          <table:table-cell office:value-type="float" office:value="387" calcext:value-type="float">
            <text:p>38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22M50S" calcext:value-type="time">
            <text:p>18:22:50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23M50S" calcext:value-type="time">
            <text:p>18:23:50</text:p>
          </table:table-cell>
          <table:table-cell office:value-type="float" office:value="328" calcext:value-type="float">
            <text:p>3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24M50S" calcext:value-type="time">
            <text:p>18:24:50</text:p>
          </table:table-cell>
          <table:table-cell office:value-type="float" office:value="362" calcext:value-type="float">
            <text:p>3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25M51S" calcext:value-type="time">
            <text:p>18:25:51</text:p>
          </table:table-cell>
          <table:table-cell office:value-type="float" office:value="401" calcext:value-type="float">
            <text:p>4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26M51S" calcext:value-type="time">
            <text:p>18:26:51</text:p>
          </table:table-cell>
          <table:table-cell office:value-type="float" office:value="307" calcext:value-type="float">
            <text:p>30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27M51S" calcext:value-type="time">
            <text:p>18:27:51</text:p>
          </table:table-cell>
          <table:table-cell office:value-type="float" office:value="343" calcext:value-type="float">
            <text:p>34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28M51S" calcext:value-type="time">
            <text:p>18:28:51</text:p>
          </table:table-cell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29M51S" calcext:value-type="time">
            <text:p>18:29:51</text:p>
          </table:table-cell>
          <table:table-cell office:value-type="float" office:value="338" calcext:value-type="float">
            <text:p>3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30M51S" calcext:value-type="time">
            <text:p>18:30:51</text:p>
          </table:table-cell>
          <table:table-cell office:value-type="float" office:value="303" calcext:value-type="float">
            <text:p>3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31M52S" calcext:value-type="time">
            <text:p>18:31:52</text:p>
          </table:table-cell>
          <table:table-cell office:value-type="float" office:value="335" calcext:value-type="float">
            <text:p>3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32M52S" calcext:value-type="time">
            <text:p>18:32:52</text:p>
          </table:table-cell>
          <table:table-cell office:value-type="float" office:value="367" calcext:value-type="float">
            <text:p>36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33M52S" calcext:value-type="time">
            <text:p>18:33:52</text:p>
          </table:table-cell>
          <table:table-cell office:value-type="float" office:value="354" calcext:value-type="float">
            <text:p>35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34M52S" calcext:value-type="time">
            <text:p>18:34:52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35M52S" calcext:value-type="time">
            <text:p>18:35:52</text:p>
          </table:table-cell>
          <table:table-cell office:value-type="float" office:value="343" calcext:value-type="float">
            <text:p>3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36M52S" calcext:value-type="time">
            <text:p>18:36:52</text:p>
          </table:table-cell>
          <table:table-cell office:value-type="float" office:value="350" calcext:value-type="float">
            <text:p>3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37M53S" calcext:value-type="time">
            <text:p>18:37:53</text:p>
          </table:table-cell>
          <table:table-cell office:value-type="float" office:value="303" calcext:value-type="float">
            <text:p>30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38M53S" calcext:value-type="time">
            <text:p>18:38:53</text:p>
          </table:table-cell>
          <table:table-cell office:value-type="float" office:value="337" calcext:value-type="float">
            <text:p>3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39M53S" calcext:value-type="time">
            <text:p>18:39:53</text:p>
          </table:table-cell>
          <table:table-cell office:value-type="float" office:value="300" calcext:value-type="float">
            <text:p>3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40M53S" calcext:value-type="time">
            <text:p>18:40:53</text:p>
          </table:table-cell>
          <table:table-cell office:value-type="float" office:value="371" calcext:value-type="float">
            <text:p>37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41M53S" calcext:value-type="time">
            <text:p>18:41:53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42M53S" calcext:value-type="time">
            <text:p>18:42:53</text:p>
          </table:table-cell>
          <table:table-cell office:value-type="float" office:value="342" calcext:value-type="float">
            <text:p>34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43M54S" calcext:value-type="time">
            <text:p>18:43:54</text:p>
          </table:table-cell>
          <table:table-cell office:value-type="float" office:value="334" calcext:value-type="float">
            <text:p>3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44M54S" calcext:value-type="time">
            <text:p>18:44:54</text:p>
          </table:table-cell>
          <table:table-cell office:value-type="float" office:value="346" calcext:value-type="float">
            <text:p>34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45M54S" calcext:value-type="time">
            <text:p>18:45:54</text:p>
          </table:table-cell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46M54S" calcext:value-type="time">
            <text:p>18:46:54</text:p>
          </table:table-cell>
          <table:table-cell office:value-type="float" office:value="307" calcext:value-type="float">
            <text:p>3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47M54S" calcext:value-type="time">
            <text:p>18:47:54</text:p>
          </table:table-cell>
          <table:table-cell office:value-type="float" office:value="327" calcext:value-type="float">
            <text:p>3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48M54S" calcext:value-type="time">
            <text:p>18:48:54</text:p>
          </table:table-cell>
          <table:table-cell office:value-type="float" office:value="367" calcext:value-type="float">
            <text:p>3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49M55S" calcext:value-type="time">
            <text:p>18:49:55</text:p>
          </table:table-cell>
          <table:table-cell office:value-type="float" office:value="342" calcext:value-type="float">
            <text:p>34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50M55S" calcext:value-type="time">
            <text:p>18:50:55</text:p>
          </table:table-cell>
          <table:table-cell office:value-type="float" office:value="322" calcext:value-type="float">
            <text:p>3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51M55S" calcext:value-type="time">
            <text:p>18:51:55</text:p>
          </table:table-cell>
          <table:table-cell office:value-type="float" office:value="344" calcext:value-type="float">
            <text:p>3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52M55S" calcext:value-type="time">
            <text:p>18:52:55</text:p>
          </table:table-cell>
          <table:table-cell office:value-type="float" office:value="326" calcext:value-type="float">
            <text:p>3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53M55S" calcext:value-type="time">
            <text:p>18:53:55</text:p>
          </table:table-cell>
          <table:table-cell office:value-type="float" office:value="407" calcext:value-type="float">
            <text:p>40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54M56S" calcext:value-type="time">
            <text:p>18:54:56</text:p>
          </table:table-cell>
          <table:table-cell office:value-type="float" office:value="328" calcext:value-type="float">
            <text:p>32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55M56S" calcext:value-type="time">
            <text:p>18:55:56</text:p>
          </table:table-cell>
          <table:table-cell office:value-type="float" office:value="329" calcext:value-type="float">
            <text:p>32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56M56S" calcext:value-type="time">
            <text:p>18:56:56</text:p>
          </table:table-cell>
          <table:table-cell office:value-type="float" office:value="393" calcext:value-type="float">
            <text:p>3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57M56S" calcext:value-type="time">
            <text:p>18:57:56</text:p>
          </table:table-cell>
          <table:table-cell office:value-type="float" office:value="379" calcext:value-type="float">
            <text:p>37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58M56S" calcext:value-type="time">
            <text:p>18:58:56</text:p>
          </table:table-cell>
          <table:table-cell office:value-type="float" office:value="379" calcext:value-type="float">
            <text:p>3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8H59M57S" calcext:value-type="time">
            <text:p>18:59:57</text:p>
          </table:table-cell>
          <table:table-cell office:value-type="float" office:value="363" calcext:value-type="float">
            <text:p>36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00M57S" calcext:value-type="time">
            <text:p>19:00:57</text:p>
          </table:table-cell>
          <table:table-cell office:value-type="float" office:value="400" calcext:value-type="float">
            <text:p>4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01M57S" calcext:value-type="time">
            <text:p>19:01:57</text:p>
          </table:table-cell>
          <table:table-cell office:value-type="float" office:value="413" calcext:value-type="float">
            <text:p>4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02M57S" calcext:value-type="time">
            <text:p>19:02:57</text:p>
          </table:table-cell>
          <table:table-cell office:value-type="float" office:value="363" calcext:value-type="float">
            <text:p>36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03M57S" calcext:value-type="time">
            <text:p>19:03:57</text:p>
          </table:table-cell>
          <table:table-cell office:value-type="float" office:value="461" calcext:value-type="float">
            <text:p>4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04M57S" calcext:value-type="time">
            <text:p>19:04:57</text:p>
          </table:table-cell>
          <table:table-cell office:value-type="float" office:value="438" calcext:value-type="float">
            <text:p>43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05M58S" calcext:value-type="time">
            <text:p>19:05:58</text:p>
          </table:table-cell>
          <table:table-cell office:value-type="float" office:value="356" calcext:value-type="float">
            <text:p>3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06M58S" calcext:value-type="time">
            <text:p>19:06:58</text:p>
          </table:table-cell>
          <table:table-cell office:value-type="float" office:value="380" calcext:value-type="float">
            <text:p>3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07M58S" calcext:value-type="time">
            <text:p>19:07:58</text:p>
          </table:table-cell>
          <table:table-cell office:value-type="float" office:value="373" calcext:value-type="float">
            <text:p>37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08M58S" calcext:value-type="time">
            <text:p>19:08:58</text:p>
          </table:table-cell>
          <table:table-cell office:value-type="float" office:value="393" calcext:value-type="float">
            <text:p>39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09M58S" calcext:value-type="time">
            <text:p>19:09:58</text:p>
          </table:table-cell>
          <table:table-cell office:value-type="float" office:value="365" calcext:value-type="float">
            <text:p>3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10M59S" calcext:value-type="time">
            <text:p>19:10:59</text:p>
          </table:table-cell>
          <table:table-cell office:value-type="float" office:value="373" calcext:value-type="float">
            <text:p>37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11M59S" calcext:value-type="time">
            <text:p>19:11:59</text:p>
          </table:table-cell>
          <table:table-cell office:value-type="float" office:value="412" calcext:value-type="float">
            <text:p>4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12M59S" calcext:value-type="time">
            <text:p>19:12:59</text:p>
          </table:table-cell>
          <table:table-cell office:value-type="float" office:value="458" calcext:value-type="float">
            <text:p>45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13M59S" calcext:value-type="time">
            <text:p>19:13:59</text:p>
          </table:table-cell>
          <table:table-cell office:value-type="float" office:value="408" calcext:value-type="float">
            <text:p>40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14M59S" calcext:value-type="time">
            <text:p>19:14:59</text:p>
          </table:table-cell>
          <table:table-cell office:value-type="float" office:value="417" calcext:value-type="float">
            <text:p>4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16M00S" calcext:value-type="time">
            <text:p>19:16:00</text:p>
          </table:table-cell>
          <table:table-cell office:value-type="float" office:value="435" calcext:value-type="float">
            <text:p>4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17M00S" calcext:value-type="time">
            <text:p>19:17:00</text:p>
          </table:table-cell>
          <table:table-cell office:value-type="float" office:value="423" calcext:value-type="float">
            <text:p>4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18M00S" calcext:value-type="time">
            <text:p>19:18:00</text:p>
          </table:table-cell>
          <table:table-cell office:value-type="float" office:value="455" calcext:value-type="float">
            <text:p>45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19M00S" calcext:value-type="time">
            <text:p>19:19:00</text:p>
          </table:table-cell>
          <table:table-cell office:value-type="float" office:value="388" calcext:value-type="float">
            <text:p>3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20M00S" calcext:value-type="time">
            <text:p>19:20:00</text:p>
          </table:table-cell>
          <table:table-cell office:value-type="float" office:value="378" calcext:value-type="float">
            <text:p>37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21M01S" calcext:value-type="time">
            <text:p>19:21:01</text:p>
          </table:table-cell>
          <table:table-cell office:value-type="float" office:value="393" calcext:value-type="float">
            <text:p>39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22M01S" calcext:value-type="time">
            <text:p>19:22:01</text:p>
          </table:table-cell>
          <table:table-cell office:value-type="float" office:value="446" calcext:value-type="float">
            <text:p>4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23M01S" calcext:value-type="time">
            <text:p>19:23:01</text:p>
          </table:table-cell>
          <table:table-cell office:value-type="float" office:value="464" calcext:value-type="float">
            <text:p>46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24M01S" calcext:value-type="time">
            <text:p>19:24:01</text:p>
          </table:table-cell>
          <table:table-cell office:value-type="float" office:value="444" calcext:value-type="float">
            <text:p>44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25M02S" calcext:value-type="time">
            <text:p>19:25:02</text:p>
          </table:table-cell>
          <table:table-cell office:value-type="float" office:value="447" calcext:value-type="float">
            <text:p>44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26M02S" calcext:value-type="time">
            <text:p>19:26:02</text:p>
          </table:table-cell>
          <table:table-cell office:value-type="float" office:value="421" calcext:value-type="float">
            <text:p>4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27M02S" calcext:value-type="time">
            <text:p>19:27:02</text:p>
          </table:table-cell>
          <table:table-cell office:value-type="float" office:value="383" calcext:value-type="float">
            <text:p>38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28M02S" calcext:value-type="time">
            <text:p>19:28:02</text:p>
          </table:table-cell>
          <table:table-cell office:value-type="float" office:value="469" calcext:value-type="float">
            <text:p>46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29M02S" calcext:value-type="time">
            <text:p>19:29:02</text:p>
          </table:table-cell>
          <table:table-cell office:value-type="float" office:value="469" calcext:value-type="float">
            <text:p>46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30M03S" calcext:value-type="time">
            <text:p>19:30:03</text:p>
          </table:table-cell>
          <table:table-cell office:value-type="float" office:value="449" calcext:value-type="float">
            <text:p>44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31M03S" calcext:value-type="time">
            <text:p>19:31:03</text:p>
          </table:table-cell>
          <table:table-cell office:value-type="float" office:value="418" calcext:value-type="float">
            <text:p>4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32M03S" calcext:value-type="time">
            <text:p>19:32:03</text:p>
          </table:table-cell>
          <table:table-cell office:value-type="float" office:value="467" calcext:value-type="float">
            <text:p>46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33M03S" calcext:value-type="time">
            <text:p>19:33:03</text:p>
          </table:table-cell>
          <table:table-cell office:value-type="float" office:value="441" calcext:value-type="float">
            <text:p>44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34M03S" calcext:value-type="time">
            <text:p>19:34:03</text:p>
          </table:table-cell>
          <table:table-cell office:value-type="float" office:value="419" calcext:value-type="float">
            <text:p>4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35M04S" calcext:value-type="time">
            <text:p>19:35:04</text:p>
          </table:table-cell>
          <table:table-cell office:value-type="float" office:value="415" calcext:value-type="float">
            <text:p>4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36M04S" calcext:value-type="time">
            <text:p>19:36:04</text:p>
          </table:table-cell>
          <table:table-cell office:value-type="float" office:value="449" calcext:value-type="float">
            <text:p>44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37M04S" calcext:value-type="time">
            <text:p>19:37:04</text:p>
          </table:table-cell>
          <table:table-cell office:value-type="float" office:value="387" calcext:value-type="float">
            <text:p>38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38M04S" calcext:value-type="time">
            <text:p>19:38:04</text:p>
          </table:table-cell>
          <table:table-cell office:value-type="float" office:value="375" calcext:value-type="float">
            <text:p>37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39M05S" calcext:value-type="time">
            <text:p>19:39:05</text:p>
          </table:table-cell>
          <table:table-cell office:value-type="float" office:value="383" calcext:value-type="float">
            <text:p>38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40M05S" calcext:value-type="time">
            <text:p>19:40:05</text:p>
          </table:table-cell>
          <table:table-cell office:value-type="float" office:value="466" calcext:value-type="float">
            <text:p>46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41M05S" calcext:value-type="time">
            <text:p>19:41:05</text:p>
          </table:table-cell>
          <table:table-cell office:value-type="float" office:value="426" calcext:value-type="float">
            <text:p>42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42M05S" calcext:value-type="time">
            <text:p>19:42:05</text:p>
          </table:table-cell>
          <table:table-cell office:value-type="float" office:value="462" calcext:value-type="float">
            <text:p>46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43M05S" calcext:value-type="time">
            <text:p>19:43:05</text:p>
          </table:table-cell>
          <table:table-cell office:value-type="float" office:value="409" calcext:value-type="float">
            <text:p>4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44M06S" calcext:value-type="time">
            <text:p>19:44:06</text:p>
          </table:table-cell>
          <table:table-cell office:value-type="float" office:value="372" calcext:value-type="float">
            <text:p>37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45M06S" calcext:value-type="time">
            <text:p>19:45:06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46M06S" calcext:value-type="time">
            <text:p>19:46:06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47M06S" calcext:value-type="time">
            <text:p>19:47:06</text:p>
          </table:table-cell>
          <table:table-cell office:value-type="float" office:value="421" calcext:value-type="float">
            <text:p>4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48M06S" calcext:value-type="time">
            <text:p>19:48:06</text:p>
          </table:table-cell>
          <table:table-cell office:value-type="float" office:value="396" calcext:value-type="float">
            <text:p>39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49M07S" calcext:value-type="time">
            <text:p>19:49:07</text:p>
          </table:table-cell>
          <table:table-cell office:value-type="float" office:value="390" calcext:value-type="float">
            <text:p>39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50M07S" calcext:value-type="time">
            <text:p>19:50:07</text:p>
          </table:table-cell>
          <table:table-cell office:value-type="float" office:value="415" calcext:value-type="float">
            <text:p>4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51M07S" calcext:value-type="time">
            <text:p>19:51:07</text:p>
          </table:table-cell>
          <table:table-cell office:value-type="float" office:value="416" calcext:value-type="float">
            <text:p>4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52M07S" calcext:value-type="time">
            <text:p>19:52:07</text:p>
          </table:table-cell>
          <table:table-cell office:value-type="float" office:value="427" calcext:value-type="float">
            <text:p>4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53M08S" calcext:value-type="time">
            <text:p>19:53:08</text:p>
          </table:table-cell>
          <table:table-cell office:value-type="float" office:value="451" calcext:value-type="float">
            <text:p>45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54M08S" calcext:value-type="time">
            <text:p>19:54:08</text:p>
          </table:table-cell>
          <table:table-cell office:value-type="float" office:value="444" calcext:value-type="float">
            <text:p>44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55M08S" calcext:value-type="time">
            <text:p>19:55:08</text:p>
          </table:table-cell>
          <table:table-cell office:value-type="float" office:value="439" calcext:value-type="float">
            <text:p>43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56M08S" calcext:value-type="time">
            <text:p>19:56:08</text:p>
          </table:table-cell>
          <table:table-cell office:value-type="float" office:value="483" calcext:value-type="float">
            <text:p>48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57M09S" calcext:value-type="time">
            <text:p>19:57:09</text:p>
          </table:table-cell>
          <table:table-cell office:value-type="float" office:value="443" calcext:value-type="float">
            <text:p>44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58M09S" calcext:value-type="time">
            <text:p>19:58:09</text:p>
          </table:table-cell>
          <table:table-cell office:value-type="float" office:value="481" calcext:value-type="float">
            <text:p>48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19H59M09S" calcext:value-type="time">
            <text:p>19:59:09</text:p>
          </table:table-cell>
          <table:table-cell office:value-type="float" office:value="422" calcext:value-type="float">
            <text:p>4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00M09S" calcext:value-type="time">
            <text:p>20:00:09</text:p>
          </table:table-cell>
          <table:table-cell office:value-type="float" office:value="467" calcext:value-type="float">
            <text:p>46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01M09S" calcext:value-type="time">
            <text:p>20:01:09</text:p>
          </table:table-cell>
          <table:table-cell office:value-type="float" office:value="429" calcext:value-type="float">
            <text:p>4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02M10S" calcext:value-type="time">
            <text:p>20:02:10</text:p>
          </table:table-cell>
          <table:table-cell office:value-type="float" office:value="483" calcext:value-type="float">
            <text:p>4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03M10S" calcext:value-type="time">
            <text:p>20:03:10</text:p>
          </table:table-cell>
          <table:table-cell office:value-type="float" office:value="480" calcext:value-type="float">
            <text:p>48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04M10S" calcext:value-type="time">
            <text:p>20:04:10</text:p>
          </table:table-cell>
          <table:table-cell office:value-type="float" office:value="576" calcext:value-type="float">
            <text:p>57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05M10S" calcext:value-type="time">
            <text:p>20:05:10</text:p>
          </table:table-cell>
          <table:table-cell office:value-type="float" office:value="538" calcext:value-type="float">
            <text:p>5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06M11S" calcext:value-type="time">
            <text:p>20:06:11</text:p>
          </table:table-cell>
          <table:table-cell office:value-type="float" office:value="458" calcext:value-type="float">
            <text:p>4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07M11S" calcext:value-type="time">
            <text:p>20:07:11</text:p>
          </table:table-cell>
          <table:table-cell office:value-type="float" office:value="499" calcext:value-type="float">
            <text:p>49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08M11S" calcext:value-type="time">
            <text:p>20:08:11</text:p>
          </table:table-cell>
          <table:table-cell office:value-type="float" office:value="441" calcext:value-type="float">
            <text:p>44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09M11S" calcext:value-type="time">
            <text:p>20:09:11</text:p>
          </table:table-cell>
          <table:table-cell office:value-type="float" office:value="483" calcext:value-type="float">
            <text:p>48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10M12S" calcext:value-type="time">
            <text:p>20:10:12</text:p>
          </table:table-cell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11M12S" calcext:value-type="time">
            <text:p>20:11:12</text:p>
          </table:table-cell>
          <table:table-cell office:value-type="float" office:value="468" calcext:value-type="float">
            <text:p>46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12M12S" calcext:value-type="time">
            <text:p>20:12:12</text:p>
          </table:table-cell>
          <table:table-cell office:value-type="float" office:value="520" calcext:value-type="float">
            <text:p>5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13M12S" calcext:value-type="time">
            <text:p>20:13:12</text:p>
          </table:table-cell>
          <table:table-cell office:value-type="float" office:value="476" calcext:value-type="float">
            <text:p>47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14M13S" calcext:value-type="time">
            <text:p>20:14:13</text:p>
          </table:table-cell>
          <table:table-cell office:value-type="float" office:value="515" calcext:value-type="float">
            <text:p>51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15M13S" calcext:value-type="time">
            <text:p>20:15:13</text:p>
          </table:table-cell>
          <table:table-cell office:value-type="float" office:value="529" calcext:value-type="float">
            <text:p>5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16M13S" calcext:value-type="time">
            <text:p>20:16:13</text:p>
          </table:table-cell>
          <table:table-cell office:value-type="float" office:value="509" calcext:value-type="float">
            <text:p>50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17M13S" calcext:value-type="time">
            <text:p>20:17:13</text:p>
          </table:table-cell>
          <table:table-cell office:value-type="float" office:value="546" calcext:value-type="float">
            <text:p>54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18M14S" calcext:value-type="time">
            <text:p>20:18:14</text:p>
          </table:table-cell>
          <table:table-cell office:value-type="float" office:value="536" calcext:value-type="float">
            <text:p>5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19M14S" calcext:value-type="time">
            <text:p>20:19:14</text:p>
          </table:table-cell>
          <table:table-cell office:value-type="float" office:value="535" calcext:value-type="float">
            <text:p>53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20M14S" calcext:value-type="time">
            <text:p>20:20:14</text:p>
          </table:table-cell>
          <table:table-cell office:value-type="float" office:value="499" calcext:value-type="float">
            <text:p>49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21M14S" calcext:value-type="time">
            <text:p>20:21:14</text:p>
          </table:table-cell>
          <table:table-cell office:value-type="float" office:value="532" calcext:value-type="float">
            <text:p>5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22M15S" calcext:value-type="time">
            <text:p>20:22:15</text:p>
          </table:table-cell>
          <table:table-cell office:value-type="float" office:value="499" calcext:value-type="float">
            <text:p>49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23M15S" calcext:value-type="time">
            <text:p>20:23:15</text:p>
          </table:table-cell>
          <table:table-cell office:value-type="float" office:value="505" calcext:value-type="float">
            <text:p>5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24M15S" calcext:value-type="time">
            <text:p>20:24:15</text:p>
          </table:table-cell>
          <table:table-cell office:value-type="float" office:value="462" calcext:value-type="float">
            <text:p>46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25M15S" calcext:value-type="time">
            <text:p>20:25:15</text:p>
          </table:table-cell>
          <table:table-cell office:value-type="float" office:value="574" calcext:value-type="float">
            <text:p>57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26M16S" calcext:value-type="time">
            <text:p>20:26:16</text:p>
          </table:table-cell>
          <table:table-cell office:value-type="float" office:value="530" calcext:value-type="float">
            <text:p>53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27M16S" calcext:value-type="time">
            <text:p>20:27:16</text:p>
          </table:table-cell>
          <table:table-cell office:value-type="float" office:value="465" calcext:value-type="float">
            <text:p>4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28M16S" calcext:value-type="time">
            <text:p>20:28:16</text:p>
          </table:table-cell>
          <table:table-cell office:value-type="float" office:value="513" calcext:value-type="float">
            <text:p>5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29M16S" calcext:value-type="time">
            <text:p>20:29:16</text:p>
          </table:table-cell>
          <table:table-cell office:value-type="float" office:value="502" calcext:value-type="float">
            <text:p>50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30M17S" calcext:value-type="time">
            <text:p>20:30:17</text:p>
          </table:table-cell>
          <table:table-cell office:value-type="float" office:value="536" calcext:value-type="float">
            <text:p>5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31M17S" calcext:value-type="time">
            <text:p>20:31:17</text:p>
          </table:table-cell>
          <table:table-cell office:value-type="float" office:value="527" calcext:value-type="float">
            <text:p>52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32M17S" calcext:value-type="time">
            <text:p>20:32:17</text:p>
          </table:table-cell>
          <table:table-cell office:value-type="float" office:value="529" calcext:value-type="float">
            <text:p>52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33M17S" calcext:value-type="time">
            <text:p>20:33:17</text:p>
          </table:table-cell>
          <table:table-cell office:value-type="float" office:value="520" calcext:value-type="float">
            <text:p>5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34M18S" calcext:value-type="time">
            <text:p>20:34:18</text:p>
          </table:table-cell>
          <table:table-cell office:value-type="float" office:value="505" calcext:value-type="float">
            <text:p>50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35M18S" calcext:value-type="time">
            <text:p>20:35:18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36M18S" calcext:value-type="time">
            <text:p>20:36:18</text:p>
          </table:table-cell>
          <table:table-cell office:value-type="float" office:value="526" calcext:value-type="float">
            <text:p>5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37M18S" calcext:value-type="time">
            <text:p>20:37:18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38M19S" calcext:value-type="time">
            <text:p>20:38:19</text:p>
          </table:table-cell>
          <table:table-cell office:value-type="float" office:value="675" calcext:value-type="float">
            <text:p>67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39M19S" calcext:value-type="time">
            <text:p>20:39:19</text:p>
          </table:table-cell>
          <table:table-cell office:value-type="float" office:value="482" calcext:value-type="float">
            <text:p>48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40M19S" calcext:value-type="time">
            <text:p>20:40:19</text:p>
          </table:table-cell>
          <table:table-cell office:value-type="float" office:value="493" calcext:value-type="float">
            <text:p>49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41M20S" calcext:value-type="time">
            <text:p>20:41:20</text:p>
          </table:table-cell>
          <table:table-cell office:value-type="float" office:value="517" calcext:value-type="float">
            <text:p>5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42M20S" calcext:value-type="time">
            <text:p>20:42:20</text:p>
          </table:table-cell>
          <table:table-cell office:value-type="float" office:value="539" calcext:value-type="float">
            <text:p>53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43M20S" calcext:value-type="time">
            <text:p>20:43:20</text:p>
          </table:table-cell>
          <table:table-cell office:value-type="float" office:value="476" calcext:value-type="float">
            <text:p>47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44M20S" calcext:value-type="time">
            <text:p>20:44:20</text:p>
          </table:table-cell>
          <table:table-cell office:value-type="float" office:value="498" calcext:value-type="float">
            <text:p>4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45M21S" calcext:value-type="time">
            <text:p>20:45:21</text:p>
          </table:table-cell>
          <table:table-cell office:value-type="float" office:value="510" calcext:value-type="float">
            <text:p>5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46M21S" calcext:value-type="time">
            <text:p>20:46:21</text:p>
          </table:table-cell>
          <table:table-cell office:value-type="float" office:value="548" calcext:value-type="float">
            <text:p>54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47M21S" calcext:value-type="time">
            <text:p>20:47:21</text:p>
          </table:table-cell>
          <table:table-cell office:value-type="float" office:value="528" calcext:value-type="float">
            <text:p>52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48M21S" calcext:value-type="time">
            <text:p>20:48:21</text:p>
          </table:table-cell>
          <table:table-cell office:value-type="float" office:value="471" calcext:value-type="float">
            <text:p>4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49M22S" calcext:value-type="time">
            <text:p>20:49:22</text:p>
          </table:table-cell>
          <table:table-cell office:value-type="float" office:value="516" calcext:value-type="float">
            <text:p>5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50M22S" calcext:value-type="time">
            <text:p>20:50:22</text:p>
          </table:table-cell>
          <table:table-cell office:value-type="float" office:value="501" calcext:value-type="float">
            <text:p>5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51M22S" calcext:value-type="time">
            <text:p>20:51:22</text:p>
          </table:table-cell>
          <table:table-cell office:value-type="float" office:value="511" calcext:value-type="float">
            <text:p>5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52M23S" calcext:value-type="time">
            <text:p>20:52:23</text:p>
          </table:table-cell>
          <table:table-cell office:value-type="float" office:value="547" calcext:value-type="float">
            <text:p>54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53M23S" calcext:value-type="time">
            <text:p>20:53:23</text:p>
          </table:table-cell>
          <table:table-cell office:value-type="float" office:value="475" calcext:value-type="float">
            <text:p>47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54M23S" calcext:value-type="time">
            <text:p>20:54:23</text:p>
          </table:table-cell>
          <table:table-cell office:value-type="float" office:value="494" calcext:value-type="float">
            <text:p>49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55M23S" calcext:value-type="time">
            <text:p>20:55:23</text:p>
          </table:table-cell>
          <table:table-cell office:value-type="float" office:value="502" calcext:value-type="float">
            <text:p>50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56M24S" calcext:value-type="time">
            <text:p>20:56:24</text:p>
          </table:table-cell>
          <table:table-cell office:value-type="float" office:value="497" calcext:value-type="float">
            <text:p>49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57M24S" calcext:value-type="time">
            <text:p>20:57:24</text:p>
          </table:table-cell>
          <table:table-cell office:value-type="float" office:value="535" calcext:value-type="float">
            <text:p>5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58M24S" calcext:value-type="time">
            <text:p>20:58:24</text:p>
          </table:table-cell>
          <table:table-cell office:value-type="float" office:value="493" calcext:value-type="float">
            <text:p>49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0H59M25S" calcext:value-type="time">
            <text:p>20:59:25</text:p>
          </table:table-cell>
          <table:table-cell office:value-type="float" office:value="572" calcext:value-type="float">
            <text:p>5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00M25S" calcext:value-type="time">
            <text:p>21:00:25</text:p>
          </table:table-cell>
          <table:table-cell office:value-type="float" office:value="514" calcext:value-type="float">
            <text:p>51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01M25S" calcext:value-type="time">
            <text:p>21:01:25</text:p>
          </table:table-cell>
          <table:table-cell office:value-type="float" office:value="521" calcext:value-type="float">
            <text:p>5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02M25S" calcext:value-type="time">
            <text:p>21:02:25</text:p>
          </table:table-cell>
          <table:table-cell office:value-type="float" office:value="544" calcext:value-type="float">
            <text:p>54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03M26S" calcext:value-type="time">
            <text:p>21:03:26</text:p>
          </table:table-cell>
          <table:table-cell office:value-type="float" office:value="529" calcext:value-type="float">
            <text:p>52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04M26S" calcext:value-type="time">
            <text:p>21:04:26</text:p>
          </table:table-cell>
          <table:table-cell office:value-type="float" office:value="568" calcext:value-type="float">
            <text:p>56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05M26S" calcext:value-type="time">
            <text:p>21:05:26</text:p>
          </table:table-cell>
          <table:table-cell office:value-type="float" office:value="500" calcext:value-type="float">
            <text:p>5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06M27S" calcext:value-type="time">
            <text:p>21:06:27</text:p>
          </table:table-cell>
          <table:table-cell office:value-type="float" office:value="551" calcext:value-type="float">
            <text:p>5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07M27S" calcext:value-type="time">
            <text:p>21:07:27</text:p>
          </table:table-cell>
          <table:table-cell office:value-type="float" office:value="533" calcext:value-type="float">
            <text:p>5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08M27S" calcext:value-type="time">
            <text:p>21:08:27</text:p>
          </table:table-cell>
          <table:table-cell office:value-type="float" office:value="529" calcext:value-type="float">
            <text:p>5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09M27S" calcext:value-type="time">
            <text:p>21:09:27</text:p>
          </table:table-cell>
          <table:table-cell office:value-type="float" office:value="592" calcext:value-type="float">
            <text:p>59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10M28S" calcext:value-type="time">
            <text:p>21:10:28</text:p>
          </table:table-cell>
          <table:table-cell office:value-type="float" office:value="553" calcext:value-type="float">
            <text:p>55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11M28S" calcext:value-type="time">
            <text:p>21:11:28</text:p>
          </table:table-cell>
          <table:table-cell office:value-type="float" office:value="580" calcext:value-type="float">
            <text:p>5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12M28S" calcext:value-type="time">
            <text:p>21:12:28</text:p>
          </table:table-cell>
          <table:table-cell office:value-type="float" office:value="538" calcext:value-type="float">
            <text:p>5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13M29S" calcext:value-type="time">
            <text:p>21:13:29</text:p>
          </table:table-cell>
          <table:table-cell office:value-type="float" office:value="600" calcext:value-type="float">
            <text:p>6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14M29S" calcext:value-type="time">
            <text:p>21:14:29</text:p>
          </table:table-cell>
          <table:table-cell office:value-type="float" office:value="527" calcext:value-type="float">
            <text:p>52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15M29S" calcext:value-type="time">
            <text:p>21:15:29</text:p>
          </table:table-cell>
          <table:table-cell office:value-type="float" office:value="587" calcext:value-type="float">
            <text:p>58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16M29S" calcext:value-type="time">
            <text:p>21:16:29</text:p>
          </table:table-cell>
          <table:table-cell office:value-type="float" office:value="597" calcext:value-type="float">
            <text:p>59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17M30S" calcext:value-type="time">
            <text:p>21:17:30</text:p>
          </table:table-cell>
          <table:table-cell office:value-type="float" office:value="577" calcext:value-type="float">
            <text:p>57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18M30S" calcext:value-type="time">
            <text:p>21:18:30</text:p>
          </table:table-cell>
          <table:table-cell office:value-type="float" office:value="559" calcext:value-type="float">
            <text:p>55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19M30S" calcext:value-type="time">
            <text:p>21:19:30</text:p>
          </table:table-cell>
          <table:table-cell office:value-type="float" office:value="582" calcext:value-type="float">
            <text:p>58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20M31S" calcext:value-type="time">
            <text:p>21:20:31</text:p>
          </table:table-cell>
          <table:table-cell office:value-type="float" office:value="533" calcext:value-type="float">
            <text:p>5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21M31S" calcext:value-type="time">
            <text:p>21:21:31</text:p>
          </table:table-cell>
          <table:table-cell office:value-type="float" office:value="530" calcext:value-type="float">
            <text:p>5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22M31S" calcext:value-type="time">
            <text:p>21:22:31</text:p>
          </table:table-cell>
          <table:table-cell office:value-type="float" office:value="551" calcext:value-type="float">
            <text:p>55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23M32S" calcext:value-type="time">
            <text:p>21:23:32</text:p>
          </table:table-cell>
          <table:table-cell office:value-type="float" office:value="638" calcext:value-type="float">
            <text:p>63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24M32S" calcext:value-type="time">
            <text:p>21:24:32</text:p>
          </table:table-cell>
          <table:table-cell office:value-type="float" office:value="589" calcext:value-type="float">
            <text:p>58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25M32S" calcext:value-type="time">
            <text:p>21:25:32</text:p>
          </table:table-cell>
          <table:table-cell office:value-type="float" office:value="519" calcext:value-type="float">
            <text:p>51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26M32S" calcext:value-type="time">
            <text:p>21:26:32</text:p>
          </table:table-cell>
          <table:table-cell office:value-type="float" office:value="523" calcext:value-type="float">
            <text:p>5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27M33S" calcext:value-type="time">
            <text:p>21:27:33</text:p>
          </table:table-cell>
          <table:table-cell office:value-type="float" office:value="541" calcext:value-type="float">
            <text:p>54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28M33S" calcext:value-type="time">
            <text:p>21:28:33</text:p>
          </table:table-cell>
          <table:table-cell office:value-type="float" office:value="576" calcext:value-type="float">
            <text:p>57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29M33S" calcext:value-type="time">
            <text:p>21:29:33</text:p>
          </table:table-cell>
          <table:table-cell office:value-type="float" office:value="548" calcext:value-type="float">
            <text:p>54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30M34S" calcext:value-type="time">
            <text:p>21:30:34</text:p>
          </table:table-cell>
          <table:table-cell office:value-type="float" office:value="525" calcext:value-type="float">
            <text:p>52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31M34S" calcext:value-type="time">
            <text:p>21:31:34</text:p>
          </table:table-cell>
          <table:table-cell office:value-type="float" office:value="532" calcext:value-type="float">
            <text:p>53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32M34S" calcext:value-type="time">
            <text:p>21:32:34</text:p>
          </table:table-cell>
          <table:table-cell office:value-type="float" office:value="618" calcext:value-type="float">
            <text:p>61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33M35S" calcext:value-type="time">
            <text:p>21:33:35</text:p>
          </table:table-cell>
          <table:table-cell office:value-type="float" office:value="595" calcext:value-type="float">
            <text:p>59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34M35S" calcext:value-type="time">
            <text:p>21:34:35</text:p>
          </table:table-cell>
          <table:table-cell office:value-type="float" office:value="570" calcext:value-type="float">
            <text:p>57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35M35S" calcext:value-type="time">
            <text:p>21:35:35</text:p>
          </table:table-cell>
          <table:table-cell office:value-type="float" office:value="661" calcext:value-type="float">
            <text:p>66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36M36S" calcext:value-type="time">
            <text:p>21:36:36</text:p>
          </table:table-cell>
          <table:table-cell office:value-type="float" office:value="628" calcext:value-type="float">
            <text:p>62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37M36S" calcext:value-type="time">
            <text:p>21:37:36</text:p>
          </table:table-cell>
          <table:table-cell office:value-type="float" office:value="623" calcext:value-type="float">
            <text:p>62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38M36S" calcext:value-type="time">
            <text:p>21:38:36</text:p>
          </table:table-cell>
          <table:table-cell office:value-type="float" office:value="618" calcext:value-type="float">
            <text:p>61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39M36S" calcext:value-type="time">
            <text:p>21:39:36</text:p>
          </table:table-cell>
          <table:table-cell office:value-type="float" office:value="633" calcext:value-type="float">
            <text:p>63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40M37S" calcext:value-type="time">
            <text:p>21:40:37</text:p>
          </table:table-cell>
          <table:table-cell office:value-type="float" office:value="604" calcext:value-type="float">
            <text:p>60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41M37S" calcext:value-type="time">
            <text:p>21:41:37</text:p>
          </table:table-cell>
          <table:table-cell office:value-type="float" office:value="534" calcext:value-type="float">
            <text:p>53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42M37S" calcext:value-type="time">
            <text:p>21:42:37</text:p>
          </table:table-cell>
          <table:table-cell office:value-type="float" office:value="601" calcext:value-type="float">
            <text:p>60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43M38S" calcext:value-type="time">
            <text:p>21:43:38</text:p>
          </table:table-cell>
          <table:table-cell office:value-type="float" office:value="624" calcext:value-type="float">
            <text:p>6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44M38S" calcext:value-type="time">
            <text:p>21:44:38</text:p>
          </table:table-cell>
          <table:table-cell office:value-type="float" office:value="563" calcext:value-type="float">
            <text:p>56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45M38S" calcext:value-type="time">
            <text:p>21:45:38</text:p>
          </table:table-cell>
          <table:table-cell office:value-type="float" office:value="543" calcext:value-type="float">
            <text:p>54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46M39S" calcext:value-type="time">
            <text:p>21:46:39</text:p>
          </table:table-cell>
          <table:table-cell office:value-type="float" office:value="553" calcext:value-type="float">
            <text:p>55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47M39S" calcext:value-type="time">
            <text:p>21:47:39</text:p>
          </table:table-cell>
          <table:table-cell office:value-type="float" office:value="560" calcext:value-type="float">
            <text:p>56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48M39S" calcext:value-type="time">
            <text:p>21:48:39</text:p>
          </table:table-cell>
          <table:table-cell office:value-type="float" office:value="595" calcext:value-type="float">
            <text:p>59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49M40S" calcext:value-type="time">
            <text:p>21:49:40</text:p>
          </table:table-cell>
          <table:table-cell office:value-type="float" office:value="549" calcext:value-type="float">
            <text:p>54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50M40S" calcext:value-type="time">
            <text:p>21:50:40</text:p>
          </table:table-cell>
          <table:table-cell office:value-type="float" office:value="620" calcext:value-type="float">
            <text:p>6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51M40S" calcext:value-type="time">
            <text:p>21:51:40</text:p>
          </table:table-cell>
          <table:table-cell office:value-type="float" office:value="583" calcext:value-type="float">
            <text:p>58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52M41S" calcext:value-type="time">
            <text:p>21:52:41</text:p>
          </table:table-cell>
          <table:table-cell office:value-type="float" office:value="541" calcext:value-type="float">
            <text:p>54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53M41S" calcext:value-type="time">
            <text:p>21:53:41</text:p>
          </table:table-cell>
          <table:table-cell office:value-type="float" office:value="583" calcext:value-type="float">
            <text:p>58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54M41S" calcext:value-type="time">
            <text:p>21:54:41</text:p>
          </table:table-cell>
          <table:table-cell office:value-type="float" office:value="559" calcext:value-type="float">
            <text:p>55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55M42S" calcext:value-type="time">
            <text:p>21:55:42</text:p>
          </table:table-cell>
          <table:table-cell office:value-type="float" office:value="545" calcext:value-type="float">
            <text:p>5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56M42S" calcext:value-type="time">
            <text:p>21:56:42</text:p>
          </table:table-cell>
          <table:table-cell office:value-type="float" office:value="618" calcext:value-type="float">
            <text:p>6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57M42S" calcext:value-type="time">
            <text:p>21:57:42</text:p>
          </table:table-cell>
          <table:table-cell office:value-type="float" office:value="549" calcext:value-type="float">
            <text:p>54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58M43S" calcext:value-type="time">
            <text:p>21:58:43</text:p>
          </table:table-cell>
          <table:table-cell office:value-type="float" office:value="614" calcext:value-type="float">
            <text:p>6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1H59M43S" calcext:value-type="time">
            <text:p>21:59:43</text:p>
          </table:table-cell>
          <table:table-cell office:value-type="float" office:value="583" calcext:value-type="float">
            <text:p>58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00M43S" calcext:value-type="time">
            <text:p>22:00:43</text:p>
          </table:table-cell>
          <table:table-cell office:value-type="float" office:value="592" calcext:value-type="float">
            <text:p>59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01M44S" calcext:value-type="time">
            <text:p>22:01:44</text:p>
          </table:table-cell>
          <table:table-cell office:value-type="float" office:value="615" calcext:value-type="float">
            <text:p>61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02M44S" calcext:value-type="time">
            <text:p>22:02:44</text:p>
          </table:table-cell>
          <table:table-cell office:value-type="float" office:value="586" calcext:value-type="float">
            <text:p>5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03M44S" calcext:value-type="time">
            <text:p>22:03:44</text:p>
          </table:table-cell>
          <table:table-cell office:value-type="float" office:value="596" calcext:value-type="float">
            <text:p>5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04M45S" calcext:value-type="time">
            <text:p>22:04:45</text:p>
          </table:table-cell>
          <table:table-cell office:value-type="float" office:value="607" calcext:value-type="float">
            <text:p>6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05M45S" calcext:value-type="time">
            <text:p>22:05:45</text:p>
          </table:table-cell>
          <table:table-cell office:value-type="float" office:value="600" calcext:value-type="float">
            <text:p>6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06M45S" calcext:value-type="time">
            <text:p>22:06:45</text:p>
          </table:table-cell>
          <table:table-cell office:value-type="float" office:value="584" calcext:value-type="float">
            <text:p>58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07M46S" calcext:value-type="time">
            <text:p>22:07:46</text:p>
          </table:table-cell>
          <table:table-cell office:value-type="float" office:value="582" calcext:value-type="float">
            <text:p>58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08M46S" calcext:value-type="time">
            <text:p>22:08:46</text:p>
          </table:table-cell>
          <table:table-cell office:value-type="float" office:value="590" calcext:value-type="float">
            <text:p>59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09M46S" calcext:value-type="time">
            <text:p>22:09:46</text:p>
          </table:table-cell>
          <table:table-cell office:value-type="float" office:value="596" calcext:value-type="float">
            <text:p>5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10M47S" calcext:value-type="time">
            <text:p>22:10:47</text:p>
          </table:table-cell>
          <table:table-cell office:value-type="float" office:value="616" calcext:value-type="float">
            <text:p>61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11M47S" calcext:value-type="time">
            <text:p>22:11:47</text:p>
          </table:table-cell>
          <table:table-cell office:value-type="float" office:value="574" calcext:value-type="float">
            <text:p>57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12M47S" calcext:value-type="time">
            <text:p>22:12:47</text:p>
          </table:table-cell>
          <table:table-cell office:value-type="float" office:value="610" calcext:value-type="float">
            <text:p>6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13M48S" calcext:value-type="time">
            <text:p>22:13:48</text:p>
          </table:table-cell>
          <table:table-cell office:value-type="float" office:value="565" calcext:value-type="float">
            <text:p>56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14M48S" calcext:value-type="time">
            <text:p>22:14:48</text:p>
          </table:table-cell>
          <table:table-cell office:value-type="float" office:value="557" calcext:value-type="float">
            <text:p>55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15M48S" calcext:value-type="time">
            <text:p>22:15:48</text:p>
          </table:table-cell>
          <table:table-cell office:value-type="float" office:value="596" calcext:value-type="float">
            <text:p>5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16M49S" calcext:value-type="time">
            <text:p>22:16:49</text:p>
          </table:table-cell>
          <table:table-cell office:value-type="float" office:value="582" calcext:value-type="float">
            <text:p>58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17M49S" calcext:value-type="time">
            <text:p>22:17:49</text:p>
          </table:table-cell>
          <table:table-cell office:value-type="float" office:value="594" calcext:value-type="float">
            <text:p>5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18M49S" calcext:value-type="time">
            <text:p>22:18:49</text:p>
          </table:table-cell>
          <table:table-cell office:value-type="float" office:value="626" calcext:value-type="float">
            <text:p>62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19M50S" calcext:value-type="time">
            <text:p>22:19:50</text:p>
          </table:table-cell>
          <table:table-cell office:value-type="float" office:value="625" calcext:value-type="float">
            <text:p>62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20M50S" calcext:value-type="time">
            <text:p>22:20:50</text:p>
          </table:table-cell>
          <table:table-cell office:value-type="float" office:value="604" calcext:value-type="float">
            <text:p>6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21M50S" calcext:value-type="time">
            <text:p>22:21:50</text:p>
          </table:table-cell>
          <table:table-cell office:value-type="float" office:value="632" calcext:value-type="float">
            <text:p>6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22M51S" calcext:value-type="time">
            <text:p>22:22:51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23M51S" calcext:value-type="time">
            <text:p>22:23:51</text:p>
          </table:table-cell>
          <table:table-cell office:value-type="float" office:value="582" calcext:value-type="float">
            <text:p>5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24M51S" calcext:value-type="time">
            <text:p>22:24:51</text:p>
          </table:table-cell>
          <table:table-cell office:value-type="float" office:value="613" calcext:value-type="float">
            <text:p>6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25M52S" calcext:value-type="time">
            <text:p>22:25:52</text:p>
          </table:table-cell>
          <table:table-cell office:value-type="float" office:value="610" calcext:value-type="float">
            <text:p>6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26M52S" calcext:value-type="time">
            <text:p>22:26:52</text:p>
          </table:table-cell>
          <table:table-cell office:value-type="float" office:value="667" calcext:value-type="float">
            <text:p>66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27M52S" calcext:value-type="time">
            <text:p>22:27:52</text:p>
          </table:table-cell>
          <table:table-cell office:value-type="float" office:value="633" calcext:value-type="float">
            <text:p>63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28M53S" calcext:value-type="time">
            <text:p>22:28:53</text:p>
          </table:table-cell>
          <table:table-cell office:value-type="float" office:value="560" calcext:value-type="float">
            <text:p>56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29M53S" calcext:value-type="time">
            <text:p>22:29:53</text:p>
          </table:table-cell>
          <table:table-cell office:value-type="float" office:value="552" calcext:value-type="float">
            <text:p>55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30M53S" calcext:value-type="time">
            <text:p>22:30:53</text:p>
          </table:table-cell>
          <table:table-cell office:value-type="float" office:value="633" calcext:value-type="float">
            <text:p>63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31M54S" calcext:value-type="time">
            <text:p>22:31:54</text:p>
          </table:table-cell>
          <table:table-cell office:value-type="float" office:value="649" calcext:value-type="float">
            <text:p>6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32M54S" calcext:value-type="time">
            <text:p>22:32:54</text:p>
          </table:table-cell>
          <table:table-cell office:value-type="float" office:value="647" calcext:value-type="float">
            <text:p>64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33M55S" calcext:value-type="time">
            <text:p>22:33:55</text:p>
          </table:table-cell>
          <table:table-cell office:value-type="float" office:value="573" calcext:value-type="float">
            <text:p>57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34M55S" calcext:value-type="time">
            <text:p>22:34:55</text:p>
          </table:table-cell>
          <table:table-cell office:value-type="float" office:value="649" calcext:value-type="float">
            <text:p>64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35M55S" calcext:value-type="time">
            <text:p>22:35:55</text:p>
          </table:table-cell>
          <table:table-cell office:value-type="float" office:value="692" calcext:value-type="float">
            <text:p>69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36M56S" calcext:value-type="time">
            <text:p>22:36:56</text:p>
          </table:table-cell>
          <table:table-cell office:value-type="float" office:value="629" calcext:value-type="float">
            <text:p>62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37M56S" calcext:value-type="time">
            <text:p>22:37:56</text:p>
          </table:table-cell>
          <table:table-cell office:value-type="float" office:value="611" calcext:value-type="float">
            <text:p>61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38M56S" calcext:value-type="time">
            <text:p>22:38:56</text:p>
          </table:table-cell>
          <table:table-cell office:value-type="float" office:value="589" calcext:value-type="float">
            <text:p>58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39M57S" calcext:value-type="time">
            <text:p>22:39:57</text:p>
          </table:table-cell>
          <table:table-cell office:value-type="float" office:value="622" calcext:value-type="float">
            <text:p>62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40M57S" calcext:value-type="time">
            <text:p>22:40:57</text:p>
          </table:table-cell>
          <table:table-cell office:value-type="float" office:value="632" calcext:value-type="float">
            <text:p>63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41M57S" calcext:value-type="time">
            <text:p>22:41:57</text:p>
          </table:table-cell>
          <table:table-cell office:value-type="float" office:value="711" calcext:value-type="float">
            <text:p>7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42M58S" calcext:value-type="time">
            <text:p>22:42:58</text:p>
          </table:table-cell>
          <table:table-cell office:value-type="float" office:value="676" calcext:value-type="float">
            <text:p>6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43M58S" calcext:value-type="time">
            <text:p>22:43:58</text:p>
          </table:table-cell>
          <table:table-cell office:value-type="float" office:value="672" calcext:value-type="float">
            <text:p>67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44M59S" calcext:value-type="time">
            <text:p>22:44:59</text:p>
          </table:table-cell>
          <table:table-cell office:value-type="float" office:value="657" calcext:value-type="float">
            <text:p>65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45M59S" calcext:value-type="time">
            <text:p>22:45:59</text:p>
          </table:table-cell>
          <table:table-cell office:value-type="float" office:value="643" calcext:value-type="float">
            <text:p>64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46M59S" calcext:value-type="time">
            <text:p>22:46:59</text:p>
          </table:table-cell>
          <table:table-cell office:value-type="float" office:value="674" calcext:value-type="float">
            <text:p>67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48M00S" calcext:value-type="time">
            <text:p>22:48:00</text:p>
          </table:table-cell>
          <table:table-cell office:value-type="float" office:value="653" calcext:value-type="float">
            <text:p>6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49M00S" calcext:value-type="time">
            <text:p>22:49:00</text:p>
          </table:table-cell>
          <table:table-cell office:value-type="float" office:value="645" calcext:value-type="float">
            <text:p>64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50M00S" calcext:value-type="time">
            <text:p>22:50:00</text:p>
          </table:table-cell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51M01S" calcext:value-type="time">
            <text:p>22:51:01</text:p>
          </table:table-cell>
          <table:table-cell office:value-type="float" office:value="667" calcext:value-type="float">
            <text:p>66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52M01S" calcext:value-type="time">
            <text:p>22:52:01</text:p>
          </table:table-cell>
          <table:table-cell office:value-type="float" office:value="630" calcext:value-type="float">
            <text:p>63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53M01S" calcext:value-type="time">
            <text:p>22:53:01</text:p>
          </table:table-cell>
          <table:table-cell office:value-type="float" office:value="621" calcext:value-type="float">
            <text:p>6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54M02S" calcext:value-type="time">
            <text:p>22:54:02</text:p>
          </table:table-cell>
          <table:table-cell office:value-type="float" office:value="588" calcext:value-type="float">
            <text:p>58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55M02S" calcext:value-type="time">
            <text:p>22:55:02</text:p>
          </table:table-cell>
          <table:table-cell office:value-type="float" office:value="708" calcext:value-type="float">
            <text:p>7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56M03S" calcext:value-type="time">
            <text:p>22:56:03</text:p>
          </table:table-cell>
          <table:table-cell office:value-type="float" office:value="672" calcext:value-type="float">
            <text:p>67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57M03S" calcext:value-type="time">
            <text:p>22:57:03</text:p>
          </table:table-cell>
          <table:table-cell office:value-type="float" office:value="609" calcext:value-type="float">
            <text:p>60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58M03S" calcext:value-type="time">
            <text:p>22:58:03</text:p>
          </table:table-cell>
          <table:table-cell office:value-type="float" office:value="628" calcext:value-type="float">
            <text:p>62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2H59M04S" calcext:value-type="time">
            <text:p>22:59:04</text:p>
          </table:table-cell>
          <table:table-cell office:value-type="float" office:value="638" calcext:value-type="float">
            <text:p>63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00M04S" calcext:value-type="time">
            <text:p>23:00:04</text:p>
          </table:table-cell>
          <table:table-cell office:value-type="float" office:value="651" calcext:value-type="float">
            <text:p>6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01M04S" calcext:value-type="time">
            <text:p>23:01:04</text:p>
          </table:table-cell>
          <table:table-cell office:value-type="float" office:value="650" calcext:value-type="float">
            <text:p>65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02M05S" calcext:value-type="time">
            <text:p>23:02:05</text:p>
          </table:table-cell>
          <table:table-cell office:value-type="float" office:value="632" calcext:value-type="float">
            <text:p>6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03M05S" calcext:value-type="time">
            <text:p>23:03:05</text:p>
          </table:table-cell>
          <table:table-cell office:value-type="float" office:value="161" calcext:value-type="float">
            <text:p>16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04M06S" calcext:value-type="time">
            <text:p>23:04:06</text:p>
          </table:table-cell>
          <table:table-cell office:value-type="float" office:value="312" calcext:value-type="float">
            <text:p>3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05M06S" calcext:value-type="time">
            <text:p>23:05:06</text:p>
          </table:table-cell>
          <table:table-cell office:value-type="float" office:value="378" calcext:value-type="float">
            <text:p>37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06M06S" calcext:value-type="time">
            <text:p>23:06:06</text:p>
          </table:table-cell>
          <table:table-cell office:value-type="float" office:value="491" calcext:value-type="float">
            <text:p>49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07M07S" calcext:value-type="time">
            <text:p>23:07:07</text:p>
          </table:table-cell>
          <table:table-cell office:value-type="float" office:value="544" calcext:value-type="float">
            <text:p>54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08M07S" calcext:value-type="time">
            <text:p>23:08:07</text:p>
          </table:table-cell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09M07S" calcext:value-type="time">
            <text:p>23:09:07</text:p>
          </table:table-cell>
          <table:table-cell office:value-type="float" office:value="539" calcext:value-type="float">
            <text:p>53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10M08S" calcext:value-type="time">
            <text:p>23:10:08</text:p>
          </table:table-cell>
          <table:table-cell office:value-type="float" office:value="574" calcext:value-type="float">
            <text:p>57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11M08S" calcext:value-type="time">
            <text:p>23:11:08</text:p>
          </table:table-cell>
          <table:table-cell office:value-type="float" office:value="619" calcext:value-type="float">
            <text:p>6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12M09S" calcext:value-type="time">
            <text:p>23:12:09</text:p>
          </table:table-cell>
          <table:table-cell office:value-type="float" office:value="579" calcext:value-type="float">
            <text:p>57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13M09S" calcext:value-type="time">
            <text:p>23:13:09</text:p>
          </table:table-cell>
          <table:table-cell office:value-type="float" office:value="592" calcext:value-type="float">
            <text:p>59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14M09S" calcext:value-type="time">
            <text:p>23:14:09</text:p>
          </table:table-cell>
          <table:table-cell office:value-type="float" office:value="606" calcext:value-type="float">
            <text:p>6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15M10S" calcext:value-type="time">
            <text:p>23:15:10</text:p>
          </table:table-cell>
          <table:table-cell office:value-type="float" office:value="585" calcext:value-type="float">
            <text:p>5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16M10S" calcext:value-type="time">
            <text:p>23:16:10</text:p>
          </table:table-cell>
          <table:table-cell office:value-type="float" office:value="621" calcext:value-type="float">
            <text:p>6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17M11S" calcext:value-type="time">
            <text:p>23:17:11</text:p>
          </table:table-cell>
          <table:table-cell office:value-type="float" office:value="587" calcext:value-type="float">
            <text:p>58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18M11S" calcext:value-type="time">
            <text:p>23:18:11</text:p>
          </table:table-cell>
          <table:table-cell office:value-type="float" office:value="671" calcext:value-type="float">
            <text:p>67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19M11S" calcext:value-type="time">
            <text:p>23:19:11</text:p>
          </table:table-cell>
          <table:table-cell office:value-type="float" office:value="690" calcext:value-type="float">
            <text:p>69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20M12S" calcext:value-type="time">
            <text:p>23:20:12</text:p>
          </table:table-cell>
          <table:table-cell office:value-type="float" office:value="725" calcext:value-type="float">
            <text:p>72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21M12S" calcext:value-type="time">
            <text:p>23:21:12</text:p>
          </table:table-cell>
          <table:table-cell office:value-type="float" office:value="670" calcext:value-type="float">
            <text:p>6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22M13S" calcext:value-type="time">
            <text:p>23:22:13</text:p>
          </table:table-cell>
          <table:table-cell office:value-type="float" office:value="683" calcext:value-type="float">
            <text:p>6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23M13S" calcext:value-type="time">
            <text:p>23:23:13</text:p>
          </table:table-cell>
          <table:table-cell office:value-type="float" office:value="646" calcext:value-type="float">
            <text:p>6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24M13S" calcext:value-type="time">
            <text:p>23:24:13</text:p>
          </table:table-cell>
          <table:table-cell office:value-type="float" office:value="678" calcext:value-type="float">
            <text:p>67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25M14S" calcext:value-type="time">
            <text:p>23:25:14</text:p>
          </table:table-cell>
          <table:table-cell office:value-type="float" office:value="604" calcext:value-type="float">
            <text:p>6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26M14S" calcext:value-type="time">
            <text:p>23:26:14</text:p>
          </table:table-cell>
          <table:table-cell office:value-type="float" office:value="625" calcext:value-type="float">
            <text:p>62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27M15S" calcext:value-type="time">
            <text:p>23:27:15</text:p>
          </table:table-cell>
          <table:table-cell office:value-type="float" office:value="671" calcext:value-type="float">
            <text:p>6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28M15S" calcext:value-type="time">
            <text:p>23:28:15</text:p>
          </table:table-cell>
          <table:table-cell office:value-type="float" office:value="668" calcext:value-type="float">
            <text:p>66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29M15S" calcext:value-type="time">
            <text:p>23:29:15</text:p>
          </table:table-cell>
          <table:table-cell office:value-type="float" office:value="630" calcext:value-type="float">
            <text:p>6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30M16S" calcext:value-type="time">
            <text:p>23:30:16</text:p>
          </table:table-cell>
          <table:table-cell office:value-type="float" office:value="694" calcext:value-type="float">
            <text:p>69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31M16S" calcext:value-type="time">
            <text:p>23:31:16</text:p>
          </table:table-cell>
          <table:table-cell office:value-type="float" office:value="682" calcext:value-type="float">
            <text:p>6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32M17S" calcext:value-type="time">
            <text:p>23:32:17</text:p>
          </table:table-cell>
          <table:table-cell office:value-type="float" office:value="667" calcext:value-type="float">
            <text:p>66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33M17S" calcext:value-type="time">
            <text:p>23:33:17</text:p>
          </table:table-cell>
          <table:table-cell office:value-type="float" office:value="590" calcext:value-type="float">
            <text:p>59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34M17S" calcext:value-type="time">
            <text:p>23:34:17</text:p>
          </table:table-cell>
          <table:table-cell office:value-type="float" office:value="655" calcext:value-type="float">
            <text:p>65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35M18S" calcext:value-type="time">
            <text:p>23:35:18</text:p>
          </table:table-cell>
          <table:table-cell office:value-type="float" office:value="651" calcext:value-type="float">
            <text:p>6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36M18S" calcext:value-type="time">
            <text:p>23:36:18</text:p>
          </table:table-cell>
          <table:table-cell office:value-type="float" office:value="645" calcext:value-type="float">
            <text:p>64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37M19S" calcext:value-type="time">
            <text:p>23:37:19</text:p>
          </table:table-cell>
          <table:table-cell office:value-type="float" office:value="653" calcext:value-type="float">
            <text:p>65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38M19S" calcext:value-type="time">
            <text:p>23:38:19</text:p>
          </table:table-cell>
          <table:table-cell office:value-type="float" office:value="630" calcext:value-type="float">
            <text:p>63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39M19S" calcext:value-type="time">
            <text:p>23:39:19</text:p>
          </table:table-cell>
          <table:table-cell office:value-type="float" office:value="637" calcext:value-type="float">
            <text:p>63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40M20S" calcext:value-type="time">
            <text:p>23:40:20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41M20S" calcext:value-type="time">
            <text:p>23:41:20</text:p>
          </table:table-cell>
          <table:table-cell office:value-type="float" office:value="649" calcext:value-type="float">
            <text:p>6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42M21S" calcext:value-type="time">
            <text:p>23:42:21</text:p>
          </table:table-cell>
          <table:table-cell office:value-type="float" office:value="703" calcext:value-type="float">
            <text:p>7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43M21S" calcext:value-type="time">
            <text:p>23:43:21</text:p>
          </table:table-cell>
          <table:table-cell office:value-type="float" office:value="654" calcext:value-type="float">
            <text:p>6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44M21S" calcext:value-type="time">
            <text:p>23:44:21</text:p>
          </table:table-cell>
          <table:table-cell office:value-type="float" office:value="661" calcext:value-type="float">
            <text:p>66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45M22S" calcext:value-type="time">
            <text:p>23:45:22</text:p>
          </table:table-cell>
          <table:table-cell office:value-type="float" office:value="608" calcext:value-type="float">
            <text:p>60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46M22S" calcext:value-type="time">
            <text:p>23:46:22</text:p>
          </table:table-cell>
          <table:table-cell office:value-type="float" office:value="665" calcext:value-type="float">
            <text:p>66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47M23S" calcext:value-type="time">
            <text:p>23:47:23</text:p>
          </table:table-cell>
          <table:table-cell office:value-type="float" office:value="673" calcext:value-type="float">
            <text:p>67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48M23S" calcext:value-type="time">
            <text:p>23:48:23</text:p>
          </table:table-cell>
          <table:table-cell office:value-type="float" office:value="608" calcext:value-type="float">
            <text:p>6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49M23S" calcext:value-type="time">
            <text:p>23:49:23</text:p>
          </table:table-cell>
          <table:table-cell office:value-type="float" office:value="641" calcext:value-type="float">
            <text:p>6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50M24S" calcext:value-type="time">
            <text:p>23:50:24</text:p>
          </table:table-cell>
          <table:table-cell office:value-type="float" office:value="649" calcext:value-type="float">
            <text:p>64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51M24S" calcext:value-type="time">
            <text:p>23:51:24</text:p>
          </table:table-cell>
          <table:table-cell office:value-type="float" office:value="639" calcext:value-type="float">
            <text:p>6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52M25S" calcext:value-type="time">
            <text:p>23:52:25</text:p>
          </table:table-cell>
          <table:table-cell office:value-type="float" office:value="658" calcext:value-type="float">
            <text:p>6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53M25S" calcext:value-type="time">
            <text:p>23:53:25</text:p>
          </table:table-cell>
          <table:table-cell office:value-type="float" office:value="659" calcext:value-type="float">
            <text:p>6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54M26S" calcext:value-type="time">
            <text:p>23:54:26</text:p>
          </table:table-cell>
          <table:table-cell office:value-type="float" office:value="624" calcext:value-type="float">
            <text:p>62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55M26S" calcext:value-type="time">
            <text:p>23:55:26</text:p>
          </table:table-cell>
          <table:table-cell office:value-type="float" office:value="665" calcext:value-type="float">
            <text:p>6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56M26S" calcext:value-type="time">
            <text:p>23:56:26</text:p>
          </table:table-cell>
          <table:table-cell office:value-type="float" office:value="692" calcext:value-type="float">
            <text:p>69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57M27S" calcext:value-type="time">
            <text:p>23:57:27</text:p>
          </table:table-cell>
          <table:table-cell office:value-type="float" office:value="678" calcext:value-type="float">
            <text:p>67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58M27S" calcext:value-type="time">
            <text:p>23:58:27</text:p>
          </table:table-cell>
          <table:table-cell office:value-type="float" office:value="719" calcext:value-type="float">
            <text:p>7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time" office:time-value="PT23H59M28S" calcext:value-type="time">
            <text:p>23:59:28</text:p>
          </table:table-cell>
          <table:table-cell office:value-type="float" office:value="645" calcext:value-type="float">
            <text:p>6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00M28S" calcext:value-type="time">
            <text:p>00:00:28</text:p>
          </table:table-cell>
          <table:table-cell office:value-type="float" office:value="605" calcext:value-type="float">
            <text:p>60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01M29S" calcext:value-type="time">
            <text:p>00:01:29</text:p>
          </table:table-cell>
          <table:table-cell office:value-type="float" office:value="641" calcext:value-type="float">
            <text:p>64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02M29S" calcext:value-type="time">
            <text:p>00:02:29</text:p>
          </table:table-cell>
          <table:table-cell office:value-type="float" office:value="641" calcext:value-type="float">
            <text:p>64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03M29S" calcext:value-type="time">
            <text:p>00:03:29</text:p>
          </table:table-cell>
          <table:table-cell office:value-type="float" office:value="664" calcext:value-type="float">
            <text:p>66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04M30S" calcext:value-type="time">
            <text:p>00:04:30</text:p>
          </table:table-cell>
          <table:table-cell office:value-type="float" office:value="674" calcext:value-type="float">
            <text:p>6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05M30S" calcext:value-type="time">
            <text:p>00:05:30</text:p>
          </table:table-cell>
          <table:table-cell office:value-type="float" office:value="653" calcext:value-type="float">
            <text:p>65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06M31S" calcext:value-type="time">
            <text:p>00:06:31</text:p>
          </table:table-cell>
          <table:table-cell office:value-type="float" office:value="714" calcext:value-type="float">
            <text:p>71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07M31S" calcext:value-type="time">
            <text:p>00:07:31</text:p>
          </table:table-cell>
          <table:table-cell office:value-type="float" office:value="654" calcext:value-type="float">
            <text:p>65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08M32S" calcext:value-type="time">
            <text:p>00:08:32</text:p>
          </table:table-cell>
          <table:table-cell office:value-type="float" office:value="634" calcext:value-type="float">
            <text:p>6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09M32S" calcext:value-type="time">
            <text:p>00:09:32</text:p>
          </table:table-cell>
          <table:table-cell office:value-type="float" office:value="630" calcext:value-type="float">
            <text:p>6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10M32S" calcext:value-type="time">
            <text:p>00:10:32</text:p>
          </table:table-cell>
          <table:table-cell office:value-type="float" office:value="712" calcext:value-type="float">
            <text:p>7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11M33S" calcext:value-type="time">
            <text:p>00:11:33</text:p>
          </table:table-cell>
          <table:table-cell office:value-type="float" office:value="633" calcext:value-type="float">
            <text:p>63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12M33S" calcext:value-type="time">
            <text:p>00:12:33</text:p>
          </table:table-cell>
          <table:table-cell office:value-type="float" office:value="660" calcext:value-type="float">
            <text:p>66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13M34S" calcext:value-type="time">
            <text:p>00:13:34</text:p>
          </table:table-cell>
          <table:table-cell office:value-type="float" office:value="711" calcext:value-type="float">
            <text:p>71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14M34S" calcext:value-type="time">
            <text:p>00:14:34</text:p>
          </table:table-cell>
          <table:table-cell office:value-type="float" office:value="635" calcext:value-type="float">
            <text:p>6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15M35S" calcext:value-type="time">
            <text:p>00:15:35</text:p>
          </table:table-cell>
          <table:table-cell office:value-type="float" office:value="647" calcext:value-type="float">
            <text:p>6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16M35S" calcext:value-type="time">
            <text:p>00:16:35</text:p>
          </table:table-cell>
          <table:table-cell office:value-type="float" office:value="663" calcext:value-type="float">
            <text:p>6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17M35S" calcext:value-type="time">
            <text:p>00:17:35</text:p>
          </table:table-cell>
          <table:table-cell office:value-type="float" office:value="635" calcext:value-type="float">
            <text:p>6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18M36S" calcext:value-type="time">
            <text:p>00:18:36</text:p>
          </table:table-cell>
          <table:table-cell office:value-type="float" office:value="637" calcext:value-type="float">
            <text:p>6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19M36S" calcext:value-type="time">
            <text:p>00:19:36</text:p>
          </table:table-cell>
          <table:table-cell office:value-type="float" office:value="686" calcext:value-type="float">
            <text:p>68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20M37S" calcext:value-type="time">
            <text:p>00:20:37</text:p>
          </table:table-cell>
          <table:table-cell office:value-type="float" office:value="627" calcext:value-type="float">
            <text:p>6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21M37S" calcext:value-type="time">
            <text:p>00:21:37</text:p>
          </table:table-cell>
          <table:table-cell office:value-type="float" office:value="612" calcext:value-type="float">
            <text:p>6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22M38S" calcext:value-type="time">
            <text:p>00:22:38</text:p>
          </table:table-cell>
          <table:table-cell office:value-type="float" office:value="608" calcext:value-type="float">
            <text:p>60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23M38S" calcext:value-type="time">
            <text:p>00:23:38</text:p>
          </table:table-cell>
          <table:table-cell office:value-type="float" office:value="687" calcext:value-type="float">
            <text:p>68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24M38S" calcext:value-type="time">
            <text:p>00:24:38</text:p>
          </table:table-cell>
          <table:table-cell office:value-type="float" office:value="669" calcext:value-type="float">
            <text:p>66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25M39S" calcext:value-type="time">
            <text:p>00:25:39</text:p>
          </table:table-cell>
          <table:table-cell office:value-type="float" office:value="608" calcext:value-type="float">
            <text:p>6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26M39S" calcext:value-type="time">
            <text:p>00:26:39</text:p>
          </table:table-cell>
          <table:table-cell office:value-type="float" office:value="684" calcext:value-type="float">
            <text:p>68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27M40S" calcext:value-type="time">
            <text:p>00:27:40</text:p>
          </table:table-cell>
          <table:table-cell office:value-type="float" office:value="595" calcext:value-type="float">
            <text:p>59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28M40S" calcext:value-type="time">
            <text:p>00:28:40</text:p>
          </table:table-cell>
          <table:table-cell office:value-type="float" office:value="648" calcext:value-type="float">
            <text:p>6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29M41S" calcext:value-type="time">
            <text:p>00:29:41</text:p>
          </table:table-cell>
          <table:table-cell office:value-type="float" office:value="648" calcext:value-type="float">
            <text:p>6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30M41S" calcext:value-type="time">
            <text:p>00:30:41</text:p>
          </table:table-cell>
          <table:table-cell office:value-type="float" office:value="659" calcext:value-type="float">
            <text:p>6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31M42S" calcext:value-type="time">
            <text:p>00:31:42</text:p>
          </table:table-cell>
          <table:table-cell office:value-type="float" office:value="658" calcext:value-type="float">
            <text:p>6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32M42S" calcext:value-type="time">
            <text:p>00:32:42</text:p>
          </table:table-cell>
          <table:table-cell office:value-type="float" office:value="640" calcext:value-type="float">
            <text:p>6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33M43S" calcext:value-type="time">
            <text:p>00:33:43</text:p>
          </table:table-cell>
          <table:table-cell office:value-type="float" office:value="655" calcext:value-type="float">
            <text:p>65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34M43S" calcext:value-type="time">
            <text:p>00:34:43</text:p>
          </table:table-cell>
          <table:table-cell office:value-type="float" office:value="636" calcext:value-type="float">
            <text:p>6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35M43S" calcext:value-type="time">
            <text:p>00:35:43</text:p>
          </table:table-cell>
          <table:table-cell office:value-type="float" office:value="678" calcext:value-type="float">
            <text:p>67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36M44S" calcext:value-type="time">
            <text:p>00:36:44</text:p>
          </table:table-cell>
          <table:table-cell office:value-type="float" office:value="630" calcext:value-type="float">
            <text:p>63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37M44S" calcext:value-type="time">
            <text:p>00:37:44</text:p>
          </table:table-cell>
          <table:table-cell office:value-type="float" office:value="617" calcext:value-type="float">
            <text:p>6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38M45S" calcext:value-type="time">
            <text:p>00:38:45</text:p>
          </table:table-cell>
          <table:table-cell office:value-type="float" office:value="626" calcext:value-type="float">
            <text:p>62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39M45S" calcext:value-type="time">
            <text:p>00:39:45</text:p>
          </table:table-cell>
          <table:table-cell office:value-type="float" office:value="627" calcext:value-type="float">
            <text:p>62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40M46S" calcext:value-type="time">
            <text:p>00:40:46</text:p>
          </table:table-cell>
          <table:table-cell office:value-type="float" office:value="659" calcext:value-type="float">
            <text:p>65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41M46S" calcext:value-type="time">
            <text:p>00:41:46</text:p>
          </table:table-cell>
          <table:table-cell office:value-type="float" office:value="647" calcext:value-type="float">
            <text:p>64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42M47S" calcext:value-type="time">
            <text:p>00:42:47</text:p>
          </table:table-cell>
          <table:table-cell office:value-type="float" office:value="645" calcext:value-type="float">
            <text:p>64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43M47S" calcext:value-type="time">
            <text:p>00:43:47</text:p>
          </table:table-cell>
          <table:table-cell office:value-type="float" office:value="617" calcext:value-type="float">
            <text:p>6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44M47S" calcext:value-type="time">
            <text:p>00:44:47</text:p>
          </table:table-cell>
          <table:table-cell office:value-type="float" office:value="643" calcext:value-type="float">
            <text:p>64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45M48S" calcext:value-type="time">
            <text:p>00:45:48</text:p>
          </table:table-cell>
          <table:table-cell office:value-type="float" office:value="650" calcext:value-type="float">
            <text:p>6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46M48S" calcext:value-type="time">
            <text:p>00:46:48</text:p>
          </table:table-cell>
          <table:table-cell office:value-type="float" office:value="639" calcext:value-type="float">
            <text:p>63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47M49S" calcext:value-type="time">
            <text:p>00:47:49</text:p>
          </table:table-cell>
          <table:table-cell office:value-type="float" office:value="655" calcext:value-type="float">
            <text:p>65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48M49S" calcext:value-type="time">
            <text:p>00:48:49</text:p>
          </table:table-cell>
          <table:table-cell office:value-type="float" office:value="618" calcext:value-type="float">
            <text:p>6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49M50S" calcext:value-type="time">
            <text:p>00:49:50</text:p>
          </table:table-cell>
          <table:table-cell office:value-type="float" office:value="633" calcext:value-type="float">
            <text:p>6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50M50S" calcext:value-type="time">
            <text:p>00:50:50</text:p>
          </table:table-cell>
          <table:table-cell office:value-type="float" office:value="653" calcext:value-type="float">
            <text:p>65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51M51S" calcext:value-type="time">
            <text:p>00:51:51</text:p>
          </table:table-cell>
          <table:table-cell office:value-type="float" office:value="652" calcext:value-type="float">
            <text:p>65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52M51S" calcext:value-type="time">
            <text:p>00:52:51</text:p>
          </table:table-cell>
          <table:table-cell office:value-type="float" office:value="636" calcext:value-type="float">
            <text:p>63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53M52S" calcext:value-type="time">
            <text:p>00:53:52</text:p>
          </table:table-cell>
          <table:table-cell office:value-type="float" office:value="680" calcext:value-type="float">
            <text:p>6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54M52S" calcext:value-type="time">
            <text:p>00:54:52</text:p>
          </table:table-cell>
          <table:table-cell office:value-type="float" office:value="660" calcext:value-type="float">
            <text:p>6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55M53S" calcext:value-type="time">
            <text:p>00:55:53</text:p>
          </table:table-cell>
          <table:table-cell office:value-type="float" office:value="656" calcext:value-type="float">
            <text:p>65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56M53S" calcext:value-type="time">
            <text:p>00:56:53</text:p>
          </table:table-cell>
          <table:table-cell office:value-type="float" office:value="667" calcext:value-type="float">
            <text:p>66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57M54S" calcext:value-type="time">
            <text:p>00:57:54</text:p>
          </table:table-cell>
          <table:table-cell office:value-type="float" office:value="668" calcext:value-type="float">
            <text:p>66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58M54S" calcext:value-type="time">
            <text:p>00:58:54</text:p>
          </table:table-cell>
          <table:table-cell office:value-type="float" office:value="677" calcext:value-type="float">
            <text:p>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0H59M54S" calcext:value-type="time">
            <text:p>00:59:54</text:p>
          </table:table-cell>
          <table:table-cell office:value-type="float" office:value="645" calcext:value-type="float">
            <text:p>6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00M55S" calcext:value-type="time">
            <text:p>01:00:55</text:p>
          </table:table-cell>
          <table:table-cell office:value-type="float" office:value="637" calcext:value-type="float">
            <text:p>63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01M55S" calcext:value-type="time">
            <text:p>01:01:55</text:p>
          </table:table-cell>
          <table:table-cell office:value-type="float" office:value="664" calcext:value-type="float">
            <text:p>6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02M56S" calcext:value-type="time">
            <text:p>01:02:56</text:p>
          </table:table-cell>
          <table:table-cell office:value-type="float" office:value="643" calcext:value-type="float">
            <text:p>6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03M56S" calcext:value-type="time">
            <text:p>01:03:56</text:p>
          </table:table-cell>
          <table:table-cell office:value-type="float" office:value="652" calcext:value-type="float">
            <text:p>65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04M57S" calcext:value-type="time">
            <text:p>01:04:57</text:p>
          </table:table-cell>
          <table:table-cell office:value-type="float" office:value="665" calcext:value-type="float">
            <text:p>66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05M57S" calcext:value-type="time">
            <text:p>01:05:57</text:p>
          </table:table-cell>
          <table:table-cell office:value-type="float" office:value="672" calcext:value-type="float">
            <text:p>67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06M58S" calcext:value-type="time">
            <text:p>01:06:58</text:p>
          </table:table-cell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07M58S" calcext:value-type="time">
            <text:p>01:07:58</text:p>
          </table:table-cell>
          <table:table-cell office:value-type="float" office:value="665" calcext:value-type="float">
            <text:p>66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08M59S" calcext:value-type="time">
            <text:p>01:08:59</text:p>
          </table:table-cell>
          <table:table-cell office:value-type="float" office:value="653" calcext:value-type="float">
            <text:p>65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09M59S" calcext:value-type="time">
            <text:p>01:09:59</text:p>
          </table:table-cell>
          <table:table-cell office:value-type="float" office:value="642" calcext:value-type="float">
            <text:p>64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11M00S" calcext:value-type="time">
            <text:p>01:11:00</text:p>
          </table:table-cell>
          <table:table-cell office:value-type="float" office:value="655" calcext:value-type="float">
            <text:p>6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12M00S" calcext:value-type="time">
            <text:p>01:12:00</text:p>
          </table:table-cell>
          <table:table-cell office:value-type="float" office:value="657" calcext:value-type="float">
            <text:p>65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13M01S" calcext:value-type="time">
            <text:p>01:13:01</text:p>
          </table:table-cell>
          <table:table-cell office:value-type="float" office:value="632" calcext:value-type="float">
            <text:p>6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14M01S" calcext:value-type="time">
            <text:p>01:14:01</text:p>
          </table:table-cell>
          <table:table-cell office:value-type="float" office:value="652" calcext:value-type="float">
            <text:p>65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15M02S" calcext:value-type="time">
            <text:p>01:15:02</text:p>
          </table:table-cell>
          <table:table-cell office:value-type="float" office:value="659" calcext:value-type="float">
            <text:p>65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16M02S" calcext:value-type="time">
            <text:p>01:16:02</text:p>
          </table:table-cell>
          <table:table-cell office:value-type="float" office:value="676" calcext:value-type="float">
            <text:p>67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17M03S" calcext:value-type="time">
            <text:p>01:17:03</text:p>
          </table:table-cell>
          <table:table-cell office:value-type="float" office:value="671" calcext:value-type="float">
            <text:p>67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18M03S" calcext:value-type="time">
            <text:p>01:18:03</text:p>
          </table:table-cell>
          <table:table-cell office:value-type="float" office:value="649" calcext:value-type="float">
            <text:p>64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19M03S" calcext:value-type="time">
            <text:p>01:19:03</text:p>
          </table:table-cell>
          <table:table-cell office:value-type="float" office:value="647" calcext:value-type="float">
            <text:p>64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20M04S" calcext:value-type="time">
            <text:p>01:20:04</text:p>
          </table:table-cell>
          <table:table-cell office:value-type="float" office:value="678" calcext:value-type="float">
            <text:p>6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21M04S" calcext:value-type="time">
            <text:p>01:21:04</text:p>
          </table:table-cell>
          <table:table-cell office:value-type="float" office:value="656" calcext:value-type="float">
            <text:p>65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22M05S" calcext:value-type="time">
            <text:p>01:22:05</text:p>
          </table:table-cell>
          <table:table-cell office:value-type="float" office:value="660" calcext:value-type="float">
            <text:p>6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23M05S" calcext:value-type="time">
            <text:p>01:23:05</text:p>
          </table:table-cell>
          <table:table-cell office:value-type="float" office:value="641" calcext:value-type="float">
            <text:p>64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24M06S" calcext:value-type="time">
            <text:p>01:24:06</text:p>
          </table:table-cell>
          <table:table-cell office:value-type="float" office:value="663" calcext:value-type="float">
            <text:p>66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25M06S" calcext:value-type="time">
            <text:p>01:25:06</text:p>
          </table:table-cell>
          <table:table-cell office:value-type="float" office:value="649" calcext:value-type="float">
            <text:p>64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26M07S" calcext:value-type="time">
            <text:p>01:26:07</text:p>
          </table:table-cell>
          <table:table-cell office:value-type="float" office:value="647" calcext:value-type="float">
            <text:p>6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27M07S" calcext:value-type="time">
            <text:p>01:27:07</text:p>
          </table:table-cell>
          <table:table-cell office:value-type="float" office:value="657" calcext:value-type="float">
            <text:p>65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28M08S" calcext:value-type="time">
            <text:p>01:28:08</text:p>
          </table:table-cell>
          <table:table-cell office:value-type="float" office:value="647" calcext:value-type="float">
            <text:p>64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29M08S" calcext:value-type="time">
            <text:p>01:29:08</text:p>
          </table:table-cell>
          <table:table-cell office:value-type="float" office:value="690" calcext:value-type="float">
            <text:p>6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30M09S" calcext:value-type="time">
            <text:p>01:30:09</text:p>
          </table:table-cell>
          <table:table-cell office:value-type="float" office:value="637" calcext:value-type="float">
            <text:p>63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31M09S" calcext:value-type="time">
            <text:p>01:31:09</text:p>
          </table:table-cell>
          <table:table-cell office:value-type="float" office:value="661" calcext:value-type="float">
            <text:p>6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32M10S" calcext:value-type="time">
            <text:p>01:32:10</text:p>
          </table:table-cell>
          <table:table-cell office:value-type="float" office:value="635" calcext:value-type="float">
            <text:p>63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33M10S" calcext:value-type="time">
            <text:p>01:33:10</text:p>
          </table:table-cell>
          <table:table-cell office:value-type="float" office:value="644" calcext:value-type="float">
            <text:p>64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34M11S" calcext:value-type="time">
            <text:p>01:34:11</text:p>
          </table:table-cell>
          <table:table-cell office:value-type="float" office:value="674" calcext:value-type="float">
            <text:p>67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35M11S" calcext:value-type="time">
            <text:p>01:35:11</text:p>
          </table:table-cell>
          <table:table-cell office:value-type="float" office:value="623" calcext:value-type="float">
            <text:p>62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36M12S" calcext:value-type="time">
            <text:p>01:36:12</text:p>
          </table:table-cell>
          <table:table-cell office:value-type="float" office:value="676" calcext:value-type="float">
            <text:p>6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37M12S" calcext:value-type="time">
            <text:p>01:37:12</text:p>
          </table:table-cell>
          <table:table-cell office:value-type="float" office:value="656" calcext:value-type="float">
            <text:p>65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38M13S" calcext:value-type="time">
            <text:p>01:38:13</text:p>
          </table:table-cell>
          <table:table-cell office:value-type="float" office:value="688" calcext:value-type="float">
            <text:p>6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39M13S" calcext:value-type="time">
            <text:p>01:39:13</text:p>
          </table:table-cell>
          <table:table-cell office:value-type="float" office:value="657" calcext:value-type="float">
            <text:p>65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40M14S" calcext:value-type="time">
            <text:p>01:40:14</text:p>
          </table:table-cell>
          <table:table-cell office:value-type="float" office:value="655" calcext:value-type="float">
            <text:p>65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41M14S" calcext:value-type="time">
            <text:p>01:41:14</text:p>
          </table:table-cell>
          <table:table-cell office:value-type="float" office:value="659" calcext:value-type="float">
            <text:p>65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42M15S" calcext:value-type="time">
            <text:p>01:42:15</text:p>
          </table:table-cell>
          <table:table-cell office:value-type="float" office:value="660" calcext:value-type="float">
            <text:p>6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43M15S" calcext:value-type="time">
            <text:p>01:43:15</text:p>
          </table:table-cell>
          <table:table-cell office:value-type="float" office:value="659" calcext:value-type="float">
            <text:p>6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44M16S" calcext:value-type="time">
            <text:p>01:44:16</text:p>
          </table:table-cell>
          <table:table-cell office:value-type="float" office:value="655" calcext:value-type="float">
            <text:p>6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45M16S" calcext:value-type="time">
            <text:p>01:45:16</text:p>
          </table:table-cell>
          <table:table-cell office:value-type="float" office:value="629" calcext:value-type="float">
            <text:p>62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46M17S" calcext:value-type="time">
            <text:p>01:46:17</text:p>
          </table:table-cell>
          <table:table-cell office:value-type="float" office:value="679" calcext:value-type="float">
            <text:p>6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47M17S" calcext:value-type="time">
            <text:p>01:47:17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48M18S" calcext:value-type="time">
            <text:p>01:48:18</text:p>
          </table:table-cell>
          <table:table-cell office:value-type="float" office:value="640" calcext:value-type="float">
            <text:p>6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49M18S" calcext:value-type="time">
            <text:p>01:49:18</text:p>
          </table:table-cell>
          <table:table-cell office:value-type="float" office:value="672" calcext:value-type="float">
            <text:p>67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50M19S" calcext:value-type="time">
            <text:p>01:50:19</text:p>
          </table:table-cell>
          <table:table-cell office:value-type="float" office:value="661" calcext:value-type="float">
            <text:p>6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51M19S" calcext:value-type="time">
            <text:p>01:51:19</text:p>
          </table:table-cell>
          <table:table-cell office:value-type="float" office:value="670" calcext:value-type="float">
            <text:p>6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52M20S" calcext:value-type="time">
            <text:p>01:52:20</text:p>
          </table:table-cell>
          <table:table-cell office:value-type="float" office:value="665" calcext:value-type="float">
            <text:p>66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53M20S" calcext:value-type="time">
            <text:p>01:53:20</text:p>
          </table:table-cell>
          <table:table-cell office:value-type="float" office:value="651" calcext:value-type="float">
            <text:p>65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54M21S" calcext:value-type="time">
            <text:p>01:54:21</text:p>
          </table:table-cell>
          <table:table-cell office:value-type="float" office:value="655" calcext:value-type="float">
            <text:p>6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55M21S" calcext:value-type="time">
            <text:p>01:55:21</text:p>
          </table:table-cell>
          <table:table-cell office:value-type="float" office:value="639" calcext:value-type="float">
            <text:p>6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56M22S" calcext:value-type="time">
            <text:p>01:56:22</text:p>
          </table:table-cell>
          <table:table-cell office:value-type="float" office:value="667" calcext:value-type="float">
            <text:p>66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57M22S" calcext:value-type="time">
            <text:p>01:57:22</text:p>
          </table:table-cell>
          <table:table-cell office:value-type="float" office:value="641" calcext:value-type="float">
            <text:p>6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58M23S" calcext:value-type="time">
            <text:p>01:58:23</text:p>
          </table:table-cell>
          <table:table-cell office:value-type="float" office:value="645" calcext:value-type="float">
            <text:p>64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1H59M23S" calcext:value-type="time">
            <text:p>01:59:23</text:p>
          </table:table-cell>
          <table:table-cell office:value-type="float" office:value="652" calcext:value-type="float">
            <text:p>6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00M24S" calcext:value-type="time">
            <text:p>02:00:24</text:p>
          </table:table-cell>
          <table:table-cell office:value-type="float" office:value="645" calcext:value-type="float">
            <text:p>64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01M24S" calcext:value-type="time">
            <text:p>02:01:24</text:p>
          </table:table-cell>
          <table:table-cell office:value-type="float" office:value="656" calcext:value-type="float">
            <text:p>65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02M25S" calcext:value-type="time">
            <text:p>02:02:25</text:p>
          </table:table-cell>
          <table:table-cell office:value-type="float" office:value="642" calcext:value-type="float">
            <text:p>6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03M26S" calcext:value-type="time">
            <text:p>02:03:26</text:p>
          </table:table-cell>
          <table:table-cell office:value-type="float" office:value="657" calcext:value-type="float">
            <text:p>6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04M26S" calcext:value-type="time">
            <text:p>02:04:26</text:p>
          </table:table-cell>
          <table:table-cell office:value-type="float" office:value="650" calcext:value-type="float">
            <text:p>6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05M27S" calcext:value-type="time">
            <text:p>02:05:27</text:p>
          </table:table-cell>
          <table:table-cell office:value-type="float" office:value="655" calcext:value-type="float">
            <text:p>6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06M27S" calcext:value-type="time">
            <text:p>02:06:27</text:p>
          </table:table-cell>
          <table:table-cell office:value-type="float" office:value="660" calcext:value-type="float">
            <text:p>66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07M28S" calcext:value-type="time">
            <text:p>02:07:28</text:p>
          </table:table-cell>
          <table:table-cell office:value-type="float" office:value="654" calcext:value-type="float">
            <text:p>65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08M28S" calcext:value-type="time">
            <text:p>02:08:28</text:p>
          </table:table-cell>
          <table:table-cell office:value-type="float" office:value="647" calcext:value-type="float">
            <text:p>64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09M29S" calcext:value-type="time">
            <text:p>02:09:29</text:p>
          </table:table-cell>
          <table:table-cell office:value-type="float" office:value="650" calcext:value-type="float">
            <text:p>6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10M29S" calcext:value-type="time">
            <text:p>02:10:29</text:p>
          </table:table-cell>
          <table:table-cell office:value-type="float" office:value="679" calcext:value-type="float">
            <text:p>6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11M30S" calcext:value-type="time">
            <text:p>02:11:30</text:p>
          </table:table-cell>
          <table:table-cell office:value-type="float" office:value="656" calcext:value-type="float">
            <text:p>65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12M30S" calcext:value-type="time">
            <text:p>02:12:30</text:p>
          </table:table-cell>
          <table:table-cell office:value-type="float" office:value="652" calcext:value-type="float">
            <text:p>65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13M31S" calcext:value-type="time">
            <text:p>02:13:31</text:p>
          </table:table-cell>
          <table:table-cell office:value-type="float" office:value="639" calcext:value-type="float">
            <text:p>6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14M31S" calcext:value-type="time">
            <text:p>02:14:31</text:p>
          </table:table-cell>
          <table:table-cell office:value-type="float" office:value="673" calcext:value-type="float">
            <text:p>67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15M32S" calcext:value-type="time">
            <text:p>02:15:32</text:p>
          </table:table-cell>
          <table:table-cell office:value-type="float" office:value="650" calcext:value-type="float">
            <text:p>6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16M32S" calcext:value-type="time">
            <text:p>02:16:32</text:p>
          </table:table-cell>
          <table:table-cell office:value-type="float" office:value="658" calcext:value-type="float">
            <text:p>6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17M33S" calcext:value-type="time">
            <text:p>02:17:33</text:p>
          </table:table-cell>
          <table:table-cell office:value-type="float" office:value="668" calcext:value-type="float">
            <text:p>66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18M33S" calcext:value-type="time">
            <text:p>02:18:33</text:p>
          </table:table-cell>
          <table:table-cell office:value-type="float" office:value="659" calcext:value-type="float">
            <text:p>6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19M34S" calcext:value-type="time">
            <text:p>02:19:34</text:p>
          </table:table-cell>
          <table:table-cell office:value-type="float" office:value="657" calcext:value-type="float">
            <text:p>65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20M34S" calcext:value-type="time">
            <text:p>02:20:34</text:p>
          </table:table-cell>
          <table:table-cell office:value-type="float" office:value="651" calcext:value-type="float">
            <text:p>65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21M35S" calcext:value-type="time">
            <text:p>02:21:35</text:p>
          </table:table-cell>
          <table:table-cell office:value-type="float" office:value="644" calcext:value-type="float">
            <text:p>6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22M35S" calcext:value-type="time">
            <text:p>02:22:35</text:p>
          </table:table-cell>
          <table:table-cell office:value-type="float" office:value="651" calcext:value-type="float">
            <text:p>65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23M36S" calcext:value-type="time">
            <text:p>02:23:36</text:p>
          </table:table-cell>
          <table:table-cell office:value-type="float" office:value="646" calcext:value-type="float">
            <text:p>64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24M37S" calcext:value-type="time">
            <text:p>02:24:37</text:p>
          </table:table-cell>
          <table:table-cell office:value-type="float" office:value="646" calcext:value-type="float">
            <text:p>64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25M37S" calcext:value-type="time">
            <text:p>02:25:37</text:p>
          </table:table-cell>
          <table:table-cell office:value-type="float" office:value="662" calcext:value-type="float">
            <text:p>6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26M38S" calcext:value-type="time">
            <text:p>02:26:38</text:p>
          </table:table-cell>
          <table:table-cell office:value-type="float" office:value="657" calcext:value-type="float">
            <text:p>65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27M38S" calcext:value-type="time">
            <text:p>02:27:38</text:p>
          </table:table-cell>
          <table:table-cell office:value-type="float" office:value="659" calcext:value-type="float">
            <text:p>65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28M39S" calcext:value-type="time">
            <text:p>02:28:39</text:p>
          </table:table-cell>
          <table:table-cell office:value-type="float" office:value="663" calcext:value-type="float">
            <text:p>6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29M39S" calcext:value-type="time">
            <text:p>02:29:39</text:p>
          </table:table-cell>
          <table:table-cell office:value-type="float" office:value="644" calcext:value-type="float">
            <text:p>64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30M40S" calcext:value-type="time">
            <text:p>02:30:40</text:p>
          </table:table-cell>
          <table:table-cell office:value-type="float" office:value="671" calcext:value-type="float">
            <text:p>67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31M40S" calcext:value-type="time">
            <text:p>02:31:40</text:p>
          </table:table-cell>
          <table:table-cell office:value-type="float" office:value="658" calcext:value-type="float">
            <text:p>6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32M41S" calcext:value-type="time">
            <text:p>02:32:41</text:p>
          </table:table-cell>
          <table:table-cell office:value-type="float" office:value="626" calcext:value-type="float">
            <text:p>62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33M41S" calcext:value-type="time">
            <text:p>02:33:41</text:p>
          </table:table-cell>
          <table:table-cell office:value-type="float" office:value="633" calcext:value-type="float">
            <text:p>6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34M42S" calcext:value-type="time">
            <text:p>02:34:42</text:p>
          </table:table-cell>
          <table:table-cell office:value-type="float" office:value="630" calcext:value-type="float">
            <text:p>6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35M42S" calcext:value-type="time">
            <text:p>02:35:42</text:p>
          </table:table-cell>
          <table:table-cell office:value-type="float" office:value="665" calcext:value-type="float">
            <text:p>66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36M43S" calcext:value-type="time">
            <text:p>02:36:43</text:p>
          </table:table-cell>
          <table:table-cell office:value-type="float" office:value="659" calcext:value-type="float">
            <text:p>65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37M43S" calcext:value-type="time">
            <text:p>02:37:43</text:p>
          </table:table-cell>
          <table:table-cell office:value-type="float" office:value="654" calcext:value-type="float">
            <text:p>65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38M44S" calcext:value-type="time">
            <text:p>02:38:44</text:p>
          </table:table-cell>
          <table:table-cell office:value-type="float" office:value="646" calcext:value-type="float">
            <text:p>6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39M45S" calcext:value-type="time">
            <text:p>02:39:45</text:p>
          </table:table-cell>
          <table:table-cell office:value-type="float" office:value="647" calcext:value-type="float">
            <text:p>6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40M45S" calcext:value-type="time">
            <text:p>02:40:45</text:p>
          </table:table-cell>
          <table:table-cell office:value-type="float" office:value="657" calcext:value-type="float">
            <text:p>65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41M46S" calcext:value-type="time">
            <text:p>02:41:46</text:p>
          </table:table-cell>
          <table:table-cell office:value-type="float" office:value="667" calcext:value-type="float">
            <text:p>66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42M46S" calcext:value-type="time">
            <text:p>02:42:46</text:p>
          </table:table-cell>
          <table:table-cell office:value-type="float" office:value="653" calcext:value-type="float">
            <text:p>65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43M47S" calcext:value-type="time">
            <text:p>02:43:47</text:p>
          </table:table-cell>
          <table:table-cell office:value-type="float" office:value="664" calcext:value-type="float">
            <text:p>6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44M47S" calcext:value-type="time">
            <text:p>02:44:47</text:p>
          </table:table-cell>
          <table:table-cell office:value-type="float" office:value="664" calcext:value-type="float">
            <text:p>6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45M48S" calcext:value-type="time">
            <text:p>02:45:48</text:p>
          </table:table-cell>
          <table:table-cell office:value-type="float" office:value="665" calcext:value-type="float">
            <text:p>6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46M48S" calcext:value-type="time">
            <text:p>02:46:48</text:p>
          </table:table-cell>
          <table:table-cell office:value-type="float" office:value="631" calcext:value-type="float">
            <text:p>6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47M49S" calcext:value-type="time">
            <text:p>02:47:49</text:p>
          </table:table-cell>
          <table:table-cell office:value-type="float" office:value="637" calcext:value-type="float">
            <text:p>63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48M50S" calcext:value-type="time">
            <text:p>02:48:50</text:p>
          </table:table-cell>
          <table:table-cell office:value-type="float" office:value="664" calcext:value-type="float">
            <text:p>66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49M50S" calcext:value-type="time">
            <text:p>02:49:50</text:p>
          </table:table-cell>
          <table:table-cell office:value-type="float" office:value="686" calcext:value-type="float">
            <text:p>68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50M51S" calcext:value-type="time">
            <text:p>02:50:51</text:p>
          </table:table-cell>
          <table:table-cell office:value-type="float" office:value="623" calcext:value-type="float">
            <text:p>6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51M51S" calcext:value-type="time">
            <text:p>02:51:51</text:p>
          </table:table-cell>
          <table:table-cell office:value-type="float" office:value="654" calcext:value-type="float">
            <text:p>65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52M52S" calcext:value-type="time">
            <text:p>02:52:52</text:p>
          </table:table-cell>
          <table:table-cell office:value-type="float" office:value="647" calcext:value-type="float">
            <text:p>64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53M52S" calcext:value-type="time">
            <text:p>02:53:52</text:p>
          </table:table-cell>
          <table:table-cell office:value-type="float" office:value="655" calcext:value-type="float">
            <text:p>6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54M53S" calcext:value-type="time">
            <text:p>02:54:53</text:p>
          </table:table-cell>
          <table:table-cell office:value-type="float" office:value="661" calcext:value-type="float">
            <text:p>6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55M53S" calcext:value-type="time">
            <text:p>02:55:53</text:p>
          </table:table-cell>
          <table:table-cell office:value-type="float" office:value="639" calcext:value-type="float">
            <text:p>6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56M54S" calcext:value-type="time">
            <text:p>02:56:54</text:p>
          </table:table-cell>
          <table:table-cell office:value-type="float" office:value="682" calcext:value-type="float">
            <text:p>68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57M54S" calcext:value-type="time">
            <text:p>02:57:54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58M55S" calcext:value-type="time">
            <text:p>02:58:55</text:p>
          </table:table-cell>
          <table:table-cell office:value-type="float" office:value="665" calcext:value-type="float">
            <text:p>66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2H59M56S" calcext:value-type="time">
            <text:p>02:59:56</text:p>
          </table:table-cell>
          <table:table-cell office:value-type="float" office:value="656" calcext:value-type="float">
            <text:p>65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00M56S" calcext:value-type="time">
            <text:p>03:00:56</text:p>
          </table:table-cell>
          <table:table-cell office:value-type="float" office:value="661" calcext:value-type="float">
            <text:p>6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01M57S" calcext:value-type="time">
            <text:p>03:01:57</text:p>
          </table:table-cell>
          <table:table-cell office:value-type="float" office:value="664" calcext:value-type="float">
            <text:p>66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02M57S" calcext:value-type="time">
            <text:p>03:02:57</text:p>
          </table:table-cell>
          <table:table-cell office:value-type="float" office:value="655" calcext:value-type="float">
            <text:p>6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03M58S" calcext:value-type="time">
            <text:p>03:03:58</text:p>
          </table:table-cell>
          <table:table-cell office:value-type="float" office:value="663" calcext:value-type="float">
            <text:p>6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04M58S" calcext:value-type="time">
            <text:p>03:04:58</text:p>
          </table:table-cell>
          <table:table-cell office:value-type="float" office:value="671" calcext:value-type="float">
            <text:p>67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05M59S" calcext:value-type="time">
            <text:p>03:05:59</text:p>
          </table:table-cell>
          <table:table-cell office:value-type="float" office:value="666" calcext:value-type="float">
            <text:p>66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07M00S" calcext:value-type="time">
            <text:p>03:07:00</text:p>
          </table:table-cell>
          <table:table-cell office:value-type="float" office:value="674" calcext:value-type="float">
            <text:p>67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08M00S" calcext:value-type="time">
            <text:p>03:08:00</text:p>
          </table:table-cell>
          <table:table-cell office:value-type="float" office:value="676" calcext:value-type="float">
            <text:p>6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09M01S" calcext:value-type="time">
            <text:p>03:09:01</text:p>
          </table:table-cell>
          <table:table-cell office:value-type="float" office:value="645" calcext:value-type="float">
            <text:p>6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10M01S" calcext:value-type="time">
            <text:p>03:10:01</text:p>
          </table:table-cell>
          <table:table-cell office:value-type="float" office:value="652" calcext:value-type="float">
            <text:p>6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11M02S" calcext:value-type="time">
            <text:p>03:11:02</text:p>
          </table:table-cell>
          <table:table-cell office:value-type="float" office:value="689" calcext:value-type="float">
            <text:p>68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12M02S" calcext:value-type="time">
            <text:p>03:12:02</text:p>
          </table:table-cell>
          <table:table-cell office:value-type="float" office:value="667" calcext:value-type="float">
            <text:p>66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13M03S" calcext:value-type="time">
            <text:p>03:13:03</text:p>
          </table:table-cell>
          <table:table-cell office:value-type="float" office:value="661" calcext:value-type="float">
            <text:p>66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14M04S" calcext:value-type="time">
            <text:p>03:14:04</text:p>
          </table:table-cell>
          <table:table-cell office:value-type="float" office:value="649" calcext:value-type="float">
            <text:p>6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15M04S" calcext:value-type="time">
            <text:p>03:15:04</text:p>
          </table:table-cell>
          <table:table-cell office:value-type="float" office:value="652" calcext:value-type="float">
            <text:p>6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16M05S" calcext:value-type="time">
            <text:p>03:16:05</text:p>
          </table:table-cell>
          <table:table-cell office:value-type="float" office:value="694" calcext:value-type="float">
            <text:p>69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17M05S" calcext:value-type="time">
            <text:p>03:17:05</text:p>
          </table:table-cell>
          <table:table-cell office:value-type="float" office:value="652" calcext:value-type="float">
            <text:p>6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18M06S" calcext:value-type="time">
            <text:p>03:18:06</text:p>
          </table:table-cell>
          <table:table-cell office:value-type="float" office:value="659" calcext:value-type="float">
            <text:p>65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19M06S" calcext:value-type="time">
            <text:p>03:19:06</text:p>
          </table:table-cell>
          <table:table-cell office:value-type="float" office:value="670" calcext:value-type="float">
            <text:p>6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20M07S" calcext:value-type="time">
            <text:p>03:20:07</text:p>
          </table:table-cell>
          <table:table-cell office:value-type="float" office:value="665" calcext:value-type="float">
            <text:p>66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21M08S" calcext:value-type="time">
            <text:p>03:21:08</text:p>
          </table:table-cell>
          <table:table-cell office:value-type="float" office:value="641" calcext:value-type="float">
            <text:p>6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22M08S" calcext:value-type="time">
            <text:p>03:22:08</text:p>
          </table:table-cell>
          <table:table-cell office:value-type="float" office:value="678" calcext:value-type="float">
            <text:p>67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23M09S" calcext:value-type="time">
            <text:p>03:23:09</text:p>
          </table:table-cell>
          <table:table-cell office:value-type="float" office:value="664" calcext:value-type="float">
            <text:p>6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24M09S" calcext:value-type="time">
            <text:p>03:24:09</text:p>
          </table:table-cell>
          <table:table-cell office:value-type="float" office:value="648" calcext:value-type="float">
            <text:p>64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25M10S" calcext:value-type="time">
            <text:p>03:25:10</text:p>
          </table:table-cell>
          <table:table-cell office:value-type="float" office:value="672" calcext:value-type="float">
            <text:p>6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26M10S" calcext:value-type="time">
            <text:p>03:26:10</text:p>
          </table:table-cell>
          <table:table-cell office:value-type="float" office:value="644" calcext:value-type="float">
            <text:p>6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27M11S" calcext:value-type="time">
            <text:p>03:27:11</text:p>
          </table:table-cell>
          <table:table-cell office:value-type="float" office:value="669" calcext:value-type="float">
            <text:p>66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28M12S" calcext:value-type="time">
            <text:p>03:28:12</text:p>
          </table:table-cell>
          <table:table-cell office:value-type="float" office:value="674" calcext:value-type="float">
            <text:p>67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29M12S" calcext:value-type="time">
            <text:p>03:29:12</text:p>
          </table:table-cell>
          <table:table-cell office:value-type="float" office:value="652" calcext:value-type="float">
            <text:p>65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30M13S" calcext:value-type="time">
            <text:p>03:30:13</text:p>
          </table:table-cell>
          <table:table-cell office:value-type="float" office:value="652" calcext:value-type="float">
            <text:p>6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31M13S" calcext:value-type="time">
            <text:p>03:31:13</text:p>
          </table:table-cell>
          <table:table-cell office:value-type="float" office:value="669" calcext:value-type="float">
            <text:p>66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32M14S" calcext:value-type="time">
            <text:p>03:32:14</text:p>
          </table:table-cell>
          <table:table-cell office:value-type="float" office:value="652" calcext:value-type="float">
            <text:p>6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33M15S" calcext:value-type="time">
            <text:p>03:33:15</text:p>
          </table:table-cell>
          <table:table-cell office:value-type="float" office:value="655" calcext:value-type="float">
            <text:p>6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34M15S" calcext:value-type="time">
            <text:p>03:34:15</text:p>
          </table:table-cell>
          <table:table-cell office:value-type="float" office:value="656" calcext:value-type="float">
            <text:p>6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35M16S" calcext:value-type="time">
            <text:p>03:35:16</text:p>
          </table:table-cell>
          <table:table-cell office:value-type="float" office:value="673" calcext:value-type="float">
            <text:p>67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36M16S" calcext:value-type="time">
            <text:p>03:36:16</text:p>
          </table:table-cell>
          <table:table-cell office:value-type="float" office:value="642" calcext:value-type="float">
            <text:p>6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37M17S" calcext:value-type="time">
            <text:p>03:37:17</text:p>
          </table:table-cell>
          <table:table-cell office:value-type="float" office:value="643" calcext:value-type="float">
            <text:p>64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38M17S" calcext:value-type="time">
            <text:p>03:38:17</text:p>
          </table:table-cell>
          <table:table-cell office:value-type="float" office:value="679" calcext:value-type="float">
            <text:p>6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39M18S" calcext:value-type="time">
            <text:p>03:39:18</text:p>
          </table:table-cell>
          <table:table-cell office:value-type="float" office:value="619" calcext:value-type="float">
            <text:p>6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40M19S" calcext:value-type="time">
            <text:p>03:40:19</text:p>
          </table:table-cell>
          <table:table-cell office:value-type="float" office:value="667" calcext:value-type="float">
            <text:p>66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41M19S" calcext:value-type="time">
            <text:p>03:41:19</text:p>
          </table:table-cell>
          <table:table-cell office:value-type="float" office:value="685" calcext:value-type="float">
            <text:p>6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42M20S" calcext:value-type="time">
            <text:p>03:42:20</text:p>
          </table:table-cell>
          <table:table-cell office:value-type="float" office:value="646" calcext:value-type="float">
            <text:p>64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43M20S" calcext:value-type="time">
            <text:p>03:43:20</text:p>
          </table:table-cell>
          <table:table-cell office:value-type="float" office:value="659" calcext:value-type="float">
            <text:p>6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44M21S" calcext:value-type="time">
            <text:p>03:44:21</text:p>
          </table:table-cell>
          <table:table-cell office:value-type="float" office:value="652" calcext:value-type="float">
            <text:p>6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45M22S" calcext:value-type="time">
            <text:p>03:45:22</text:p>
          </table:table-cell>
          <table:table-cell office:value-type="float" office:value="668" calcext:value-type="float">
            <text:p>66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46M22S" calcext:value-type="time">
            <text:p>03:46:22</text:p>
          </table:table-cell>
          <table:table-cell office:value-type="float" office:value="654" calcext:value-type="float">
            <text:p>65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47M23S" calcext:value-type="time">
            <text:p>03:47:23</text:p>
          </table:table-cell>
          <table:table-cell office:value-type="float" office:value="627" calcext:value-type="float">
            <text:p>6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48M23S" calcext:value-type="time">
            <text:p>03:48:23</text:p>
          </table:table-cell>
          <table:table-cell office:value-type="float" office:value="646" calcext:value-type="float">
            <text:p>64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49M24S" calcext:value-type="time">
            <text:p>03:49:24</text:p>
          </table:table-cell>
          <table:table-cell office:value-type="float" office:value="656" calcext:value-type="float">
            <text:p>65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50M25S" calcext:value-type="time">
            <text:p>03:50:25</text:p>
          </table:table-cell>
          <table:table-cell office:value-type="float" office:value="660" calcext:value-type="float">
            <text:p>6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51M25S" calcext:value-type="time">
            <text:p>03:51:25</text:p>
          </table:table-cell>
          <table:table-cell office:value-type="float" office:value="662" calcext:value-type="float">
            <text:p>66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52M26S" calcext:value-type="time">
            <text:p>03:52:26</text:p>
          </table:table-cell>
          <table:table-cell office:value-type="float" office:value="645" calcext:value-type="float">
            <text:p>6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53M26S" calcext:value-type="time">
            <text:p>03:53:26</text:p>
          </table:table-cell>
          <table:table-cell office:value-type="float" office:value="655" calcext:value-type="float">
            <text:p>65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54M27S" calcext:value-type="time">
            <text:p>03:54:27</text:p>
          </table:table-cell>
          <table:table-cell office:value-type="float" office:value="643" calcext:value-type="float">
            <text:p>64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55M28S" calcext:value-type="time">
            <text:p>03:55:28</text:p>
          </table:table-cell>
          <table:table-cell office:value-type="float" office:value="664" calcext:value-type="float">
            <text:p>66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56M28S" calcext:value-type="time">
            <text:p>03:56:28</text:p>
          </table:table-cell>
          <table:table-cell office:value-type="float" office:value="642" calcext:value-type="float">
            <text:p>6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57M29S" calcext:value-type="time">
            <text:p>03:57:29</text:p>
          </table:table-cell>
          <table:table-cell office:value-type="float" office:value="646" calcext:value-type="float">
            <text:p>64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58M29S" calcext:value-type="time">
            <text:p>03:58:29</text:p>
          </table:table-cell>
          <table:table-cell office:value-type="float" office:value="670" calcext:value-type="float">
            <text:p>67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3H59M30S" calcext:value-type="time">
            <text:p>03:59:30</text:p>
          </table:table-cell>
          <table:table-cell office:value-type="float" office:value="674" calcext:value-type="float">
            <text:p>67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00M31S" calcext:value-type="time">
            <text:p>04:00:31</text:p>
          </table:table-cell>
          <table:table-cell office:value-type="float" office:value="668" calcext:value-type="float">
            <text:p>66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01M31S" calcext:value-type="time">
            <text:p>04:01:31</text:p>
          </table:table-cell>
          <table:table-cell office:value-type="float" office:value="670" calcext:value-type="float">
            <text:p>67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02M32S" calcext:value-type="time">
            <text:p>04:02:32</text:p>
          </table:table-cell>
          <table:table-cell office:value-type="float" office:value="632" calcext:value-type="float">
            <text:p>6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03M32S" calcext:value-type="time">
            <text:p>04:03:32</text:p>
          </table:table-cell>
          <table:table-cell office:value-type="float" office:value="654" calcext:value-type="float">
            <text:p>65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04M33S" calcext:value-type="time">
            <text:p>04:04:33</text:p>
          </table:table-cell>
          <table:table-cell office:value-type="float" office:value="667" calcext:value-type="float">
            <text:p>6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05M34S" calcext:value-type="time">
            <text:p>04:05:34</text:p>
          </table:table-cell>
          <table:table-cell office:value-type="float" office:value="661" calcext:value-type="float">
            <text:p>6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06M34S" calcext:value-type="time">
            <text:p>04:06:34</text:p>
          </table:table-cell>
          <table:table-cell office:value-type="float" office:value="660" calcext:value-type="float">
            <text:p>66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07M35S" calcext:value-type="time">
            <text:p>04:07:35</text:p>
          </table:table-cell>
          <table:table-cell office:value-type="float" office:value="671" calcext:value-type="float">
            <text:p>67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08M35S" calcext:value-type="time">
            <text:p>04:08:35</text:p>
          </table:table-cell>
          <table:table-cell office:value-type="float" office:value="661" calcext:value-type="float">
            <text:p>6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09M36S" calcext:value-type="time">
            <text:p>04:09:36</text:p>
          </table:table-cell>
          <table:table-cell office:value-type="float" office:value="662" calcext:value-type="float">
            <text:p>6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10M37S" calcext:value-type="time">
            <text:p>04:10:37</text:p>
          </table:table-cell>
          <table:table-cell office:value-type="float" office:value="671" calcext:value-type="float">
            <text:p>6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11M37S" calcext:value-type="time">
            <text:p>04:11:37</text:p>
          </table:table-cell>
          <table:table-cell office:value-type="float" office:value="669" calcext:value-type="float">
            <text:p>6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12M38S" calcext:value-type="time">
            <text:p>04:12:38</text:p>
          </table:table-cell>
          <table:table-cell office:value-type="float" office:value="688" calcext:value-type="float">
            <text:p>68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13M39S" calcext:value-type="time">
            <text:p>04:13:39</text:p>
          </table:table-cell>
          <table:table-cell office:value-type="float" office:value="667" calcext:value-type="float">
            <text:p>6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14M39S" calcext:value-type="time">
            <text:p>04:14:39</text:p>
          </table:table-cell>
          <table:table-cell office:value-type="float" office:value="673" calcext:value-type="float">
            <text:p>6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15M40S" calcext:value-type="time">
            <text:p>04:15:40</text:p>
          </table:table-cell>
          <table:table-cell office:value-type="float" office:value="660" calcext:value-type="float">
            <text:p>6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16M40S" calcext:value-type="time">
            <text:p>04:16:40</text:p>
          </table:table-cell>
          <table:table-cell office:value-type="float" office:value="657" calcext:value-type="float">
            <text:p>65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17M41S" calcext:value-type="time">
            <text:p>04:17:41</text:p>
          </table:table-cell>
          <table:table-cell office:value-type="float" office:value="655" calcext:value-type="float">
            <text:p>65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18M42S" calcext:value-type="time">
            <text:p>04:18:42</text:p>
          </table:table-cell>
          <table:table-cell office:value-type="float" office:value="679" calcext:value-type="float">
            <text:p>67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19M42S" calcext:value-type="time">
            <text:p>04:19:42</text:p>
          </table:table-cell>
          <table:table-cell office:value-type="float" office:value="657" calcext:value-type="float">
            <text:p>65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20M43S" calcext:value-type="time">
            <text:p>04:20:43</text:p>
          </table:table-cell>
          <table:table-cell office:value-type="float" office:value="659" calcext:value-type="float">
            <text:p>65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21M44S" calcext:value-type="time">
            <text:p>04:21:44</text:p>
          </table:table-cell>
          <table:table-cell office:value-type="float" office:value="647" calcext:value-type="float">
            <text:p>6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22M44S" calcext:value-type="time">
            <text:p>04:22:44</text:p>
          </table:table-cell>
          <table:table-cell office:value-type="float" office:value="661" calcext:value-type="float">
            <text:p>66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23M45S" calcext:value-type="time">
            <text:p>04:23:45</text:p>
          </table:table-cell>
          <table:table-cell office:value-type="float" office:value="637" calcext:value-type="float">
            <text:p>6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24M45S" calcext:value-type="time">
            <text:p>04:24:45</text:p>
          </table:table-cell>
          <table:table-cell office:value-type="float" office:value="630" calcext:value-type="float">
            <text:p>6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25M46S" calcext:value-type="time">
            <text:p>04:25:46</text:p>
          </table:table-cell>
          <table:table-cell office:value-type="float" office:value="668" calcext:value-type="float">
            <text:p>6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26M47S" calcext:value-type="time">
            <text:p>04:26:47</text:p>
          </table:table-cell>
          <table:table-cell office:value-type="float" office:value="667" calcext:value-type="float">
            <text:p>66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27M47S" calcext:value-type="time">
            <text:p>04:27:47</text:p>
          </table:table-cell>
          <table:table-cell office:value-type="float" office:value="664" calcext:value-type="float">
            <text:p>66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28M48S" calcext:value-type="time">
            <text:p>04:28:48</text:p>
          </table:table-cell>
          <table:table-cell office:value-type="float" office:value="662" calcext:value-type="float">
            <text:p>66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29M49S" calcext:value-type="time">
            <text:p>04:29:49</text:p>
          </table:table-cell>
          <table:table-cell office:value-type="float" office:value="657" calcext:value-type="float">
            <text:p>65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30M49S" calcext:value-type="time">
            <text:p>04:30:49</text:p>
          </table:table-cell>
          <table:table-cell office:value-type="float" office:value="637" calcext:value-type="float">
            <text:p>63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31M50S" calcext:value-type="time">
            <text:p>04:31:50</text:p>
          </table:table-cell>
          <table:table-cell office:value-type="float" office:value="681" calcext:value-type="float">
            <text:p>68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32M50S" calcext:value-type="time">
            <text:p>04:32:50</text:p>
          </table:table-cell>
          <table:table-cell office:value-type="float" office:value="654" calcext:value-type="float">
            <text:p>65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33M51S" calcext:value-type="time">
            <text:p>04:33:51</text:p>
          </table:table-cell>
          <table:table-cell office:value-type="float" office:value="678" calcext:value-type="float">
            <text:p>67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34M52S" calcext:value-type="time">
            <text:p>04:34:52</text:p>
          </table:table-cell>
          <table:table-cell office:value-type="float" office:value="659" calcext:value-type="float">
            <text:p>65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35M52S" calcext:value-type="time">
            <text:p>04:35:52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36M53S" calcext:value-type="time">
            <text:p>04:36:53</text:p>
          </table:table-cell>
          <table:table-cell office:value-type="float" office:value="653" calcext:value-type="float">
            <text:p>65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37M54S" calcext:value-type="time">
            <text:p>04:37:54</text:p>
          </table:table-cell>
          <table:table-cell office:value-type="float" office:value="681" calcext:value-type="float">
            <text:p>6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38M54S" calcext:value-type="time">
            <text:p>04:38:54</text:p>
          </table:table-cell>
          <table:table-cell office:value-type="float" office:value="652" calcext:value-type="float">
            <text:p>65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39M55S" calcext:value-type="time">
            <text:p>04:39:55</text:p>
          </table:table-cell>
          <table:table-cell office:value-type="float" office:value="644" calcext:value-type="float">
            <text:p>6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40M56S" calcext:value-type="time">
            <text:p>04:40:56</text:p>
          </table:table-cell>
          <table:table-cell office:value-type="float" office:value="640" calcext:value-type="float">
            <text:p>6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41M56S" calcext:value-type="time">
            <text:p>04:41:56</text:p>
          </table:table-cell>
          <table:table-cell office:value-type="float" office:value="643" calcext:value-type="float">
            <text:p>6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42M57S" calcext:value-type="time">
            <text:p>04:42:57</text:p>
          </table:table-cell>
          <table:table-cell office:value-type="float" office:value="659" calcext:value-type="float">
            <text:p>65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43M57S" calcext:value-type="time">
            <text:p>04:43:57</text:p>
          </table:table-cell>
          <table:table-cell office:value-type="float" office:value="635" calcext:value-type="float">
            <text:p>63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44M58S" calcext:value-type="time">
            <text:p>04:44:58</text:p>
          </table:table-cell>
          <table:table-cell office:value-type="float" office:value="673" calcext:value-type="float">
            <text:p>6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45M59S" calcext:value-type="time">
            <text:p>04:45:59</text:p>
          </table:table-cell>
          <table:table-cell office:value-type="float" office:value="653" calcext:value-type="float">
            <text:p>65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46M59S" calcext:value-type="time">
            <text:p>04:46:59</text:p>
          </table:table-cell>
          <table:table-cell office:value-type="float" office:value="662" calcext:value-type="float">
            <text:p>66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48M00S" calcext:value-type="time">
            <text:p>04:48:00</text:p>
          </table:table-cell>
          <table:table-cell office:value-type="float" office:value="641" calcext:value-type="float">
            <text:p>64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49M01S" calcext:value-type="time">
            <text:p>04:49:01</text:p>
          </table:table-cell>
          <table:table-cell office:value-type="float" office:value="664" calcext:value-type="float">
            <text:p>6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50M01S" calcext:value-type="time">
            <text:p>04:50:01</text:p>
          </table:table-cell>
          <table:table-cell office:value-type="float" office:value="658" calcext:value-type="float">
            <text:p>6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51M02S" calcext:value-type="time">
            <text:p>04:51:02</text:p>
          </table:table-cell>
          <table:table-cell office:value-type="float" office:value="650" calcext:value-type="float">
            <text:p>6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52M03S" calcext:value-type="time">
            <text:p>04:52:03</text:p>
          </table:table-cell>
          <table:table-cell office:value-type="float" office:value="676" calcext:value-type="float">
            <text:p>67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53M03S" calcext:value-type="time">
            <text:p>04:53:03</text:p>
          </table:table-cell>
          <table:table-cell office:value-type="float" office:value="649" calcext:value-type="float">
            <text:p>64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54M04S" calcext:value-type="time">
            <text:p>04:54:04</text:p>
          </table:table-cell>
          <table:table-cell office:value-type="float" office:value="662" calcext:value-type="float">
            <text:p>66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55M04S" calcext:value-type="time">
            <text:p>04:55:04</text:p>
          </table:table-cell>
          <table:table-cell office:value-type="float" office:value="655" calcext:value-type="float">
            <text:p>6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56M05S" calcext:value-type="time">
            <text:p>04:56:05</text:p>
          </table:table-cell>
          <table:table-cell office:value-type="float" office:value="657" calcext:value-type="float">
            <text:p>65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57M06S" calcext:value-type="time">
            <text:p>04:57:06</text:p>
          </table:table-cell>
          <table:table-cell office:value-type="float" office:value="682" calcext:value-type="float">
            <text:p>6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58M06S" calcext:value-type="time">
            <text:p>04:58:06</text:p>
          </table:table-cell>
          <table:table-cell office:value-type="float" office:value="666" calcext:value-type="float">
            <text:p>66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4H59M07S" calcext:value-type="time">
            <text:p>04:59:07</text:p>
          </table:table-cell>
          <table:table-cell office:value-type="float" office:value="682" calcext:value-type="float">
            <text:p>68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00M08S" calcext:value-type="time">
            <text:p>05:00:08</text:p>
          </table:table-cell>
          <table:table-cell office:value-type="float" office:value="641" calcext:value-type="float">
            <text:p>6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01M08S" calcext:value-type="time">
            <text:p>05:01:08</text:p>
          </table:table-cell>
          <table:table-cell office:value-type="float" office:value="653" calcext:value-type="float">
            <text:p>65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02M09S" calcext:value-type="time">
            <text:p>05:02:09</text:p>
          </table:table-cell>
          <table:table-cell office:value-type="float" office:value="620" calcext:value-type="float">
            <text:p>6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03M10S" calcext:value-type="time">
            <text:p>05:03:10</text:p>
          </table:table-cell>
          <table:table-cell office:value-type="float" office:value="667" calcext:value-type="float">
            <text:p>6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04M10S" calcext:value-type="time">
            <text:p>05:04:10</text:p>
          </table:table-cell>
          <table:table-cell office:value-type="float" office:value="633" calcext:value-type="float">
            <text:p>6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05M11S" calcext:value-type="time">
            <text:p>05:05:11</text:p>
          </table:table-cell>
          <table:table-cell office:value-type="float" office:value="676" calcext:value-type="float">
            <text:p>67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06M12S" calcext:value-type="time">
            <text:p>05:06:12</text:p>
          </table:table-cell>
          <table:table-cell office:value-type="float" office:value="672" calcext:value-type="float">
            <text:p>67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07M12S" calcext:value-type="time">
            <text:p>05:07:12</text:p>
          </table:table-cell>
          <table:table-cell office:value-type="float" office:value="648" calcext:value-type="float">
            <text:p>6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08M13S" calcext:value-type="time">
            <text:p>05:08:13</text:p>
          </table:table-cell>
          <table:table-cell office:value-type="float" office:value="670" calcext:value-type="float">
            <text:p>6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09M14S" calcext:value-type="time">
            <text:p>05:09:14</text:p>
          </table:table-cell>
          <table:table-cell office:value-type="float" office:value="681" calcext:value-type="float">
            <text:p>6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10M14S" calcext:value-type="time">
            <text:p>05:10:14</text:p>
          </table:table-cell>
          <table:table-cell office:value-type="float" office:value="680" calcext:value-type="float">
            <text:p>6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11M15S" calcext:value-type="time">
            <text:p>05:11:15</text:p>
          </table:table-cell>
          <table:table-cell office:value-type="float" office:value="680" calcext:value-type="float">
            <text:p>68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12M16S" calcext:value-type="time">
            <text:p>05:12:16</text:p>
          </table:table-cell>
          <table:table-cell office:value-type="float" office:value="692" calcext:value-type="float">
            <text:p>69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13M16S" calcext:value-type="time">
            <text:p>05:13:16</text:p>
          </table:table-cell>
          <table:table-cell office:value-type="float" office:value="683" calcext:value-type="float">
            <text:p>6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14M17S" calcext:value-type="time">
            <text:p>05:14:17</text:p>
          </table:table-cell>
          <table:table-cell office:value-type="float" office:value="704" calcext:value-type="float">
            <text:p>7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15M18S" calcext:value-type="time">
            <text:p>05:15:18</text:p>
          </table:table-cell>
          <table:table-cell office:value-type="float" office:value="671" calcext:value-type="float">
            <text:p>67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16M18S" calcext:value-type="time">
            <text:p>05:16:18</text:p>
          </table:table-cell>
          <table:table-cell office:value-type="float" office:value="688" calcext:value-type="float">
            <text:p>68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17M19S" calcext:value-type="time">
            <text:p>05:17:19</text:p>
          </table:table-cell>
          <table:table-cell office:value-type="float" office:value="669" calcext:value-type="float">
            <text:p>6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18M20S" calcext:value-type="time">
            <text:p>05:18:20</text:p>
          </table:table-cell>
          <table:table-cell office:value-type="float" office:value="675" calcext:value-type="float">
            <text:p>6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19M20S" calcext:value-type="time">
            <text:p>05:19:20</text:p>
          </table:table-cell>
          <table:table-cell office:value-type="float" office:value="693" calcext:value-type="float">
            <text:p>69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20M21S" calcext:value-type="time">
            <text:p>05:20:21</text:p>
          </table:table-cell>
          <table:table-cell office:value-type="float" office:value="662" calcext:value-type="float">
            <text:p>6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21M22S" calcext:value-type="time">
            <text:p>05:21:22</text:p>
          </table:table-cell>
          <table:table-cell office:value-type="float" office:value="677" calcext:value-type="float">
            <text:p>6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22M22S" calcext:value-type="time">
            <text:p>05:22:22</text:p>
          </table:table-cell>
          <table:table-cell office:value-type="float" office:value="672" calcext:value-type="float">
            <text:p>67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23M23S" calcext:value-type="time">
            <text:p>05:23:23</text:p>
          </table:table-cell>
          <table:table-cell office:value-type="float" office:value="695" calcext:value-type="float">
            <text:p>69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24M24S" calcext:value-type="time">
            <text:p>05:24:24</text:p>
          </table:table-cell>
          <table:table-cell office:value-type="float" office:value="655" calcext:value-type="float">
            <text:p>65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25M24S" calcext:value-type="time">
            <text:p>05:25:24</text:p>
          </table:table-cell>
          <table:table-cell office:value-type="float" office:value="661" calcext:value-type="float">
            <text:p>6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26M25S" calcext:value-type="time">
            <text:p>05:26:25</text:p>
          </table:table-cell>
          <table:table-cell office:value-type="float" office:value="671" calcext:value-type="float">
            <text:p>6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27M26S" calcext:value-type="time">
            <text:p>05:27:26</text:p>
          </table:table-cell>
          <table:table-cell office:value-type="float" office:value="685" calcext:value-type="float">
            <text:p>68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28M26S" calcext:value-type="time">
            <text:p>05:28:26</text:p>
          </table:table-cell>
          <table:table-cell office:value-type="float" office:value="670" calcext:value-type="float">
            <text:p>6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29M27S" calcext:value-type="time">
            <text:p>05:29:27</text:p>
          </table:table-cell>
          <table:table-cell office:value-type="float" office:value="694" calcext:value-type="float">
            <text:p>6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30M28S" calcext:value-type="time">
            <text:p>05:30:28</text:p>
          </table:table-cell>
          <table:table-cell office:value-type="float" office:value="678" calcext:value-type="float">
            <text:p>67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31M28S" calcext:value-type="time">
            <text:p>05:31:28</text:p>
          </table:table-cell>
          <table:table-cell office:value-type="float" office:value="670" calcext:value-type="float">
            <text:p>67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32M29S" calcext:value-type="time">
            <text:p>05:32:29</text:p>
          </table:table-cell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33M30S" calcext:value-type="time">
            <text:p>05:33:30</text:p>
          </table:table-cell>
          <table:table-cell office:value-type="float" office:value="654" calcext:value-type="float">
            <text:p>65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34M30S" calcext:value-type="time">
            <text:p>05:34:30</text:p>
          </table:table-cell>
          <table:table-cell office:value-type="float" office:value="666" calcext:value-type="float">
            <text:p>66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35M31S" calcext:value-type="time">
            <text:p>05:35:31</text:p>
          </table:table-cell>
          <table:table-cell office:value-type="float" office:value="698" calcext:value-type="float">
            <text:p>69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36M32S" calcext:value-type="time">
            <text:p>05:36:32</text:p>
          </table:table-cell>
          <table:table-cell office:value-type="float" office:value="654" calcext:value-type="float">
            <text:p>6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37M32S" calcext:value-type="time">
            <text:p>05:37:32</text:p>
          </table:table-cell>
          <table:table-cell office:value-type="float" office:value="680" calcext:value-type="float">
            <text:p>68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38M33S" calcext:value-type="time">
            <text:p>05:38:33</text:p>
          </table:table-cell>
          <table:table-cell office:value-type="float" office:value="669" calcext:value-type="float">
            <text:p>66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39M34S" calcext:value-type="time">
            <text:p>05:39:3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40M34S" calcext:value-type="time">
            <text:p>05:40:34</text:p>
          </table:table-cell>
          <table:table-cell office:value-type="float" office:value="704" calcext:value-type="float">
            <text:p>7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41M35S" calcext:value-type="time">
            <text:p>05:41:35</text:p>
          </table:table-cell>
          <table:table-cell office:value-type="float" office:value="692" calcext:value-type="float">
            <text:p>69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42M36S" calcext:value-type="time">
            <text:p>05:42:36</text:p>
          </table:table-cell>
          <table:table-cell office:value-type="float" office:value="673" calcext:value-type="float">
            <text:p>67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43M36S" calcext:value-type="time">
            <text:p>05:43:36</text:p>
          </table:table-cell>
          <table:table-cell office:value-type="float" office:value="687" calcext:value-type="float">
            <text:p>68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44M37S" calcext:value-type="time">
            <text:p>05:44:37</text:p>
          </table:table-cell>
          <table:table-cell office:value-type="float" office:value="678" calcext:value-type="float">
            <text:p>67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45M38S" calcext:value-type="time">
            <text:p>05:45:38</text:p>
          </table:table-cell>
          <table:table-cell office:value-type="float" office:value="681" calcext:value-type="float">
            <text:p>6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46M39S" calcext:value-type="time">
            <text:p>05:46:39</text:p>
          </table:table-cell>
          <table:table-cell office:value-type="float" office:value="519" calcext:value-type="float">
            <text:p>5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47M39S" calcext:value-type="time">
            <text:p>05:47:39</text:p>
          </table:table-cell>
          <table:table-cell office:value-type="float" office:value="638" calcext:value-type="float">
            <text:p>6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48M40S" calcext:value-type="time">
            <text:p>05:48:40</text:p>
          </table:table-cell>
          <table:table-cell office:value-type="float" office:value="682" calcext:value-type="float">
            <text:p>68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49M41S" calcext:value-type="time">
            <text:p>05:49:41</text:p>
          </table:table-cell>
          <table:table-cell office:value-type="float" office:value="710" calcext:value-type="float">
            <text:p>7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50M41S" calcext:value-type="time">
            <text:p>05:50:41</text:p>
          </table:table-cell>
          <table:table-cell office:value-type="float" office:value="715" calcext:value-type="float">
            <text:p>7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51M42S" calcext:value-type="time">
            <text:p>05:51:42</text:p>
          </table:table-cell>
          <table:table-cell office:value-type="float" office:value="710" calcext:value-type="float">
            <text:p>7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52M43S" calcext:value-type="time">
            <text:p>05:52:43</text:p>
          </table:table-cell>
          <table:table-cell office:value-type="float" office:value="677" calcext:value-type="float">
            <text:p>6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53M43S" calcext:value-type="time">
            <text:p>05:53:43</text:p>
          </table:table-cell>
          <table:table-cell office:value-type="float" office:value="699" calcext:value-type="float">
            <text:p>69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54M44S" calcext:value-type="time">
            <text:p>05:54:44</text:p>
          </table:table-cell>
          <table:table-cell office:value-type="float" office:value="711" calcext:value-type="float">
            <text:p>7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55M45S" calcext:value-type="time">
            <text:p>05:55:45</text:p>
          </table:table-cell>
          <table:table-cell office:value-type="float" office:value="709" calcext:value-type="float">
            <text:p>7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56M45S" calcext:value-type="time">
            <text:p>05:56:45</text:p>
          </table:table-cell>
          <table:table-cell office:value-type="float" office:value="696" calcext:value-type="float">
            <text:p>69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57M46S" calcext:value-type="time">
            <text:p>05:57:46</text:p>
          </table:table-cell>
          <table:table-cell office:value-type="float" office:value="699" calcext:value-type="float">
            <text:p>6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58M47S" calcext:value-type="time">
            <text:p>05:58:47</text:p>
          </table:table-cell>
          <table:table-cell office:value-type="float" office:value="711" calcext:value-type="float">
            <text:p>7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5H59M48S" calcext:value-type="time">
            <text:p>05:59:48</text:p>
          </table:table-cell>
          <table:table-cell office:value-type="float" office:value="693" calcext:value-type="float">
            <text:p>6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00M48S" calcext:value-type="time">
            <text:p>06:00:48</text:p>
          </table:table-cell>
          <table:table-cell office:value-type="float" office:value="680" calcext:value-type="float">
            <text:p>6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01M49S" calcext:value-type="time">
            <text:p>06:01:49</text:p>
          </table:table-cell>
          <table:table-cell office:value-type="float" office:value="700" calcext:value-type="float">
            <text:p>7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02M50S" calcext:value-type="time">
            <text:p>06:02:50</text:p>
          </table:table-cell>
          <table:table-cell office:value-type="float" office:value="413" calcext:value-type="float">
            <text:p>41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03M50S" calcext:value-type="time">
            <text:p>06:03:50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04M51S" calcext:value-type="time">
            <text:p>06:04:51</text:p>
          </table:table-cell>
          <table:table-cell office:value-type="float" office:value="426" calcext:value-type="float">
            <text:p>4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05M52S" calcext:value-type="time">
            <text:p>06:05:52</text:p>
          </table:table-cell>
          <table:table-cell office:value-type="float" office:value="443" calcext:value-type="float">
            <text:p>44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06M52S" calcext:value-type="time">
            <text:p>06:06:52</text:p>
          </table:table-cell>
          <table:table-cell office:value-type="float" office:value="307" calcext:value-type="float">
            <text:p>3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07M53S" calcext:value-type="time">
            <text:p>06:07:53</text:p>
          </table:table-cell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08M54S" calcext:value-type="time">
            <text:p>06:08:54</text:p>
          </table:table-cell>
          <table:table-cell office:value-type="float" office:value="342" calcext:value-type="float">
            <text:p>3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09M55S" calcext:value-type="time">
            <text:p>06:09:55</text:p>
          </table:table-cell>
          <table:table-cell office:value-type="float" office:value="257" calcext:value-type="float">
            <text:p>25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10M55S" calcext:value-type="time">
            <text:p>06:10:55</text:p>
          </table:table-cell>
          <table:table-cell office:value-type="float" office:value="580" calcext:value-type="float">
            <text:p>58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11M56S" calcext:value-type="time">
            <text:p>06:11:56</text:p>
          </table:table-cell>
          <table:table-cell office:value-type="float" office:value="655" calcext:value-type="float">
            <text:p>6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12M57S" calcext:value-type="time">
            <text:p>06:12:57</text:p>
          </table:table-cell>
          <table:table-cell office:value-type="float" office:value="677" calcext:value-type="float">
            <text:p>67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13M57S" calcext:value-type="time">
            <text:p>06:13:57</text:p>
          </table:table-cell>
          <table:table-cell office:value-type="float" office:value="264" calcext:value-type="float">
            <text:p>26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14M58S" calcext:value-type="time">
            <text:p>06:14:58</text:p>
          </table:table-cell>
          <table:table-cell office:value-type="float" office:value="557" calcext:value-type="float">
            <text:p>5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15M59S" calcext:value-type="time">
            <text:p>06:15:59</text:p>
          </table:table-cell>
          <table:table-cell office:value-type="float" office:value="596" calcext:value-type="float">
            <text:p>5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16M59S" calcext:value-type="time">
            <text:p>06:16:59</text:p>
          </table:table-cell>
          <table:table-cell office:value-type="float" office:value="643" calcext:value-type="float">
            <text:p>6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18M00S" calcext:value-type="time">
            <text:p>06:18:00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19M01S" calcext:value-type="time">
            <text:p>06:19:01</text:p>
          </table:table-cell>
          <table:table-cell office:value-type="float" office:value="673" calcext:value-type="float">
            <text:p>67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20M02S" calcext:value-type="time">
            <text:p>06:20:02</text:p>
          </table:table-cell>
          <table:table-cell office:value-type="float" office:value="677" calcext:value-type="float">
            <text:p>6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21M02S" calcext:value-type="time">
            <text:p>06:21:02</text:p>
          </table:table-cell>
          <table:table-cell office:value-type="float" office:value="710" calcext:value-type="float">
            <text:p>7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22M03S" calcext:value-type="time">
            <text:p>06:22:03</text:p>
          </table:table-cell>
          <table:table-cell office:value-type="float" office:value="677" calcext:value-type="float">
            <text:p>67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23M04S" calcext:value-type="time">
            <text:p>06:23:04</text:p>
          </table:table-cell>
          <table:table-cell office:value-type="float" office:value="669" calcext:value-type="float">
            <text:p>66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24M04S" calcext:value-type="time">
            <text:p>06:24:04</text:p>
          </table:table-cell>
          <table:table-cell office:value-type="float" office:value="715" calcext:value-type="float">
            <text:p>7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25M05S" calcext:value-type="time">
            <text:p>06:25:05</text:p>
          </table:table-cell>
          <table:table-cell office:value-type="float" office:value="680" calcext:value-type="float">
            <text:p>68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26M06S" calcext:value-type="time">
            <text:p>06:26:06</text:p>
          </table:table-cell>
          <table:table-cell office:value-type="float" office:value="670" calcext:value-type="float">
            <text:p>67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27M07S" calcext:value-type="time">
            <text:p>06:27:07</text:p>
          </table:table-cell>
          <table:table-cell office:value-type="float" office:value="684" calcext:value-type="float">
            <text:p>6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28M07S" calcext:value-type="time">
            <text:p>06:28:07</text:p>
          </table:table-cell>
          <table:table-cell office:value-type="float" office:value="687" calcext:value-type="float">
            <text:p>6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29M08S" calcext:value-type="time">
            <text:p>06:29:08</text:p>
          </table:table-cell>
          <table:table-cell office:value-type="float" office:value="669" calcext:value-type="float">
            <text:p>6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30M09S" calcext:value-type="time">
            <text:p>06:30:09</text:p>
          </table:table-cell>
          <table:table-cell office:value-type="float" office:value="699" calcext:value-type="float">
            <text:p>6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31M09S" calcext:value-type="time">
            <text:p>06:31:09</text:p>
          </table:table-cell>
          <table:table-cell office:value-type="float" office:value="699" calcext:value-type="float">
            <text:p>69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32M10S" calcext:value-type="time">
            <text:p>06:32:10</text:p>
          </table:table-cell>
          <table:table-cell office:value-type="float" office:value="696" calcext:value-type="float">
            <text:p>6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33M11S" calcext:value-type="time">
            <text:p>06:33:11</text:p>
          </table:table-cell>
          <table:table-cell office:value-type="float" office:value="697" calcext:value-type="float">
            <text:p>69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34M12S" calcext:value-type="time">
            <text:p>06:34:12</text:p>
          </table:table-cell>
          <table:table-cell office:value-type="float" office:value="697" calcext:value-type="float">
            <text:p>69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35M12S" calcext:value-type="time">
            <text:p>06:35:12</text:p>
          </table:table-cell>
          <table:table-cell office:value-type="float" office:value="677" calcext:value-type="float">
            <text:p>6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36M13S" calcext:value-type="time">
            <text:p>06:36:13</text:p>
          </table:table-cell>
          <table:table-cell office:value-type="float" office:value="692" calcext:value-type="float">
            <text:p>69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37M14S" calcext:value-type="time">
            <text:p>06:37:14</text:p>
          </table:table-cell>
          <table:table-cell office:value-type="float" office:value="709" calcext:value-type="float">
            <text:p>70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38M15S" calcext:value-type="time">
            <text:p>06:38:15</text:p>
          </table:table-cell>
          <table:table-cell office:value-type="float" office:value="728" calcext:value-type="float">
            <text:p>7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39M15S" calcext:value-type="time">
            <text:p>06:39:15</text:p>
          </table:table-cell>
          <table:table-cell office:value-type="float" office:value="623" calcext:value-type="float">
            <text:p>6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40M16S" calcext:value-type="time">
            <text:p>06:40:16</text:p>
          </table:table-cell>
          <table:table-cell office:value-type="float" office:value="661" calcext:value-type="float">
            <text:p>66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41M17S" calcext:value-type="time">
            <text:p>06:41:17</text:p>
          </table:table-cell>
          <table:table-cell office:value-type="float" office:value="689" calcext:value-type="float">
            <text:p>6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42M18S" calcext:value-type="time">
            <text:p>06:42:18</text:p>
          </table:table-cell>
          <table:table-cell office:value-type="float" office:value="717" calcext:value-type="float">
            <text:p>7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43M18S" calcext:value-type="time">
            <text:p>06:43:1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44M19S" calcext:value-type="time">
            <text:p>06:44:19</text:p>
          </table:table-cell>
          <table:table-cell office:value-type="float" office:value="698" calcext:value-type="float">
            <text:p>69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45M20S" calcext:value-type="time">
            <text:p>06:45:20</text:p>
          </table:table-cell>
          <table:table-cell office:value-type="float" office:value="712" calcext:value-type="float">
            <text:p>71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46M20S" calcext:value-type="time">
            <text:p>06:46:20</text:p>
          </table:table-cell>
          <table:table-cell office:value-type="float" office:value="724" calcext:value-type="float">
            <text:p>7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47M21S" calcext:value-type="time">
            <text:p>06:47:21</text:p>
          </table:table-cell>
          <table:table-cell office:value-type="float" office:value="718" calcext:value-type="float">
            <text:p>7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48M22S" calcext:value-type="time">
            <text:p>06:48:22</text:p>
          </table:table-cell>
          <table:table-cell office:value-type="float" office:value="685" calcext:value-type="float">
            <text:p>68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49M23S" calcext:value-type="time">
            <text:p>06:49:23</text:p>
          </table:table-cell>
          <table:table-cell office:value-type="float" office:value="686" calcext:value-type="float">
            <text:p>68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50M23S" calcext:value-type="time">
            <text:p>06:50:23</text:p>
          </table:table-cell>
          <table:table-cell office:value-type="float" office:value="673" calcext:value-type="float">
            <text:p>6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51M24S" calcext:value-type="time">
            <text:p>06:51:24</text:p>
          </table:table-cell>
          <table:table-cell office:value-type="float" office:value="646" calcext:value-type="float">
            <text:p>64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52M25S" calcext:value-type="time">
            <text:p>06:52:25</text:p>
          </table:table-cell>
          <table:table-cell office:value-type="float" office:value="646" calcext:value-type="float">
            <text:p>64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53M26S" calcext:value-type="time">
            <text:p>06:53:26</text:p>
          </table:table-cell>
          <table:table-cell office:value-type="float" office:value="651" calcext:value-type="float">
            <text:p>65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54M26S" calcext:value-type="time">
            <text:p>06:54:26</text:p>
          </table:table-cell>
          <table:table-cell office:value-type="float" office:value="652" calcext:value-type="float">
            <text:p>65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55M27S" calcext:value-type="time">
            <text:p>06:55:27</text:p>
          </table:table-cell>
          <table:table-cell office:value-type="float" office:value="626" calcext:value-type="float">
            <text:p>6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56M28S" calcext:value-type="time">
            <text:p>06:56:28</text:p>
          </table:table-cell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57M29S" calcext:value-type="time">
            <text:p>06:57:29</text:p>
          </table:table-cell>
          <table:table-cell office:value-type="float" office:value="638" calcext:value-type="float">
            <text:p>63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58M29S" calcext:value-type="time">
            <text:p>06:58:29</text:p>
          </table:table-cell>
          <table:table-cell office:value-type="float" office:value="603" calcext:value-type="float">
            <text:p>60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6H59M30S" calcext:value-type="time">
            <text:p>06:59:30</text:p>
          </table:table-cell>
          <table:table-cell office:value-type="float" office:value="589" calcext:value-type="float">
            <text:p>58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00M31S" calcext:value-type="time">
            <text:p>07:00:31</text:p>
          </table:table-cell>
          <table:table-cell office:value-type="float" office:value="601" calcext:value-type="float">
            <text:p>6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01M31S" calcext:value-type="time">
            <text:p>07:01:31</text:p>
          </table:table-cell>
          <table:table-cell office:value-type="float" office:value="582" calcext:value-type="float">
            <text:p>5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02M32S" calcext:value-type="time">
            <text:p>07:02:32</text:p>
          </table:table-cell>
          <table:table-cell office:value-type="float" office:value="613" calcext:value-type="float">
            <text:p>61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03M33S" calcext:value-type="time">
            <text:p>07:03:33</text:p>
          </table:table-cell>
          <table:table-cell office:value-type="float" office:value="603" calcext:value-type="float">
            <text:p>60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04M34S" calcext:value-type="time">
            <text:p>07:04:34</text:p>
          </table:table-cell>
          <table:table-cell office:value-type="float" office:value="611" calcext:value-type="float">
            <text:p>6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05M34S" calcext:value-type="time">
            <text:p>07:05:34</text:p>
          </table:table-cell>
          <table:table-cell office:value-type="float" office:value="602" calcext:value-type="float">
            <text:p>6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06M35S" calcext:value-type="time">
            <text:p>07:06:35</text:p>
          </table:table-cell>
          <table:table-cell office:value-type="float" office:value="596" calcext:value-type="float">
            <text:p>59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07M36S" calcext:value-type="time">
            <text:p>07:07:36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08M37S" calcext:value-type="time">
            <text:p>07:08:37</text:p>
          </table:table-cell>
          <table:table-cell office:value-type="float" office:value="398" calcext:value-type="float">
            <text:p>3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09M37S" calcext:value-type="time">
            <text:p>07:09:37</text:p>
          </table:table-cell>
          <table:table-cell office:value-type="float" office:value="589" calcext:value-type="float">
            <text:p>5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10M38S" calcext:value-type="time">
            <text:p>07:10:38</text:p>
          </table:table-cell>
          <table:table-cell office:value-type="float" office:value="564" calcext:value-type="float">
            <text:p>56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11M39S" calcext:value-type="time">
            <text:p>07:11:39</text:p>
          </table:table-cell>
          <table:table-cell office:value-type="float" office:value="565" calcext:value-type="float">
            <text:p>5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12M40S" calcext:value-type="time">
            <text:p>07:12:40</text:p>
          </table:table-cell>
          <table:table-cell office:value-type="float" office:value="526" calcext:value-type="float">
            <text:p>52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13M40S" calcext:value-type="time">
            <text:p>07:13:40</text:p>
          </table:table-cell>
          <table:table-cell office:value-type="float" office:value="548" calcext:value-type="float">
            <text:p>54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14M41S" calcext:value-type="time">
            <text:p>07:14:41</text:p>
          </table:table-cell>
          <table:table-cell office:value-type="float" office:value="536" calcext:value-type="float">
            <text:p>53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15M42S" calcext:value-type="time">
            <text:p>07:15:42</text:p>
          </table:table-cell>
          <table:table-cell office:value-type="float" office:value="532" calcext:value-type="float">
            <text:p>5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16M43S" calcext:value-type="time">
            <text:p>07:16:43</text:p>
          </table:table-cell>
          <table:table-cell office:value-type="float" office:value="553" calcext:value-type="float">
            <text:p>5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17M43S" calcext:value-type="time">
            <text:p>07:17:43</text:p>
          </table:table-cell>
          <table:table-cell office:value-type="float" office:value="518" calcext:value-type="float">
            <text:p>5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18M44S" calcext:value-type="time">
            <text:p>07:18:44</text:p>
          </table:table-cell>
          <table:table-cell office:value-type="float" office:value="515" calcext:value-type="float">
            <text:p>51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19M45S" calcext:value-type="time">
            <text:p>07:19:45</text:p>
          </table:table-cell>
          <table:table-cell office:value-type="float" office:value="522" calcext:value-type="float">
            <text:p>5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20M46S" calcext:value-type="time">
            <text:p>07:20:46</text:p>
          </table:table-cell>
          <table:table-cell office:value-type="float" office:value="520" calcext:value-type="float">
            <text:p>5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21M46S" calcext:value-type="time">
            <text:p>07:21:46</text:p>
          </table:table-cell>
          <table:table-cell office:value-type="float" office:value="485" calcext:value-type="float">
            <text:p>4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22M47S" calcext:value-type="time">
            <text:p>07:22:47</text:p>
          </table:table-cell>
          <table:table-cell office:value-type="float" office:value="478" calcext:value-type="float">
            <text:p>47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23M48S" calcext:value-type="time">
            <text:p>07:23:48</text:p>
          </table:table-cell>
          <table:table-cell office:value-type="float" office:value="514" calcext:value-type="float">
            <text:p>5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24M49S" calcext:value-type="time">
            <text:p>07:24:49</text:p>
          </table:table-cell>
          <table:table-cell office:value-type="float" office:value="498" calcext:value-type="float">
            <text:p>49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25M49S" calcext:value-type="time">
            <text:p>07:25:49</text:p>
          </table:table-cell>
          <table:table-cell office:value-type="float" office:value="451" calcext:value-type="float">
            <text:p>4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26M50S" calcext:value-type="time">
            <text:p>07:26:50</text:p>
          </table:table-cell>
          <table:table-cell office:value-type="float" office:value="419" calcext:value-type="float">
            <text:p>4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27M51S" calcext:value-type="time">
            <text:p>07:27:51</text:p>
          </table:table-cell>
          <table:table-cell office:value-type="float" office:value="461" calcext:value-type="float">
            <text:p>46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28M52S" calcext:value-type="time">
            <text:p>07:28:52</text:p>
          </table:table-cell>
          <table:table-cell office:value-type="float" office:value="464" calcext:value-type="float">
            <text:p>46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29M53S" calcext:value-type="time">
            <text:p>07:29:53</text:p>
          </table:table-cell>
          <table:table-cell office:value-type="float" office:value="489" calcext:value-type="float">
            <text:p>48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30M53S" calcext:value-type="time">
            <text:p>07:30:53</text:p>
          </table:table-cell>
          <table:table-cell office:value-type="float" office:value="493" calcext:value-type="float">
            <text:p>49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31M54S" calcext:value-type="time">
            <text:p>07:31:54</text:p>
          </table:table-cell>
          <table:table-cell office:value-type="float" office:value="433" calcext:value-type="float">
            <text:p>43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32M55S" calcext:value-type="time">
            <text:p>07:32:55</text:p>
          </table:table-cell>
          <table:table-cell office:value-type="float" office:value="444" calcext:value-type="float">
            <text:p>44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33M56S" calcext:value-type="time">
            <text:p>07:33:56</text:p>
          </table:table-cell>
          <table:table-cell office:value-type="float" office:value="430" calcext:value-type="float">
            <text:p>4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time" office:time-value="PT07H34M56S" calcext:value-type="time">
            <text:p>07:34:56</text:p>
          </table:table-cell>
          <table:table-cell office:value-type="float" office:value="462" calcext:value-type="float">
            <text:p>462</text:p>
          </table:table-cell>
          <table:table-cell office:value-type="float" office:value="118" calcext:value-type="float">
            <text:p>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0:19:55.697546793</meta:creation-date>
    <dc:date>2022-11-04T10:26:46.286004821</dc:date>
    <meta:editing-duration>PT6M52S</meta:editing-duration>
    <meta:editing-cycles>1</meta:editing-cycles>
    <meta:generator>LibreOffice/7.3.6.2$Linux_X86_64 LibreOffice_project/30$Build-2</meta:generator>
    <meta:document-statistic meta:table-count="1" meta:cell-count="3436" meta:object-count="0"/>
  </office:meta>
</office:document-meta>
</file>