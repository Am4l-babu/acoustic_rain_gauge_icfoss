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6:45:4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66" calcext:value-type="float">
            <text:p>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6:46:4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6:47:4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6:48:4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6:49:5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6:50:5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69" calcext:value-type="float">
            <text:p>1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6:51:5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362" calcext:value-type="float">
            <text:p>362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6:52:5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7"/>
          <table:table-cell table:style-name="ce3" office:value-type="string" calcext:value-type="string">
            <text:p>"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6:53:5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6:54:5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6:55:5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6:56:5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6:57:5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6:58:5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6:59:5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0:5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1:5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85" calcext:value-type="float">
            <text:p>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2:5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3:5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4:5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5:5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6:5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7:5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8:5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9:5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10:5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11:5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12:5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13:5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14:5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15:5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16:5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17:5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18:5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19:5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20:5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21:5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22:5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23:5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24:5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25:5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26:5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27:5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65" calcext:value-type="float">
            <text:p>1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28:5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31" calcext:value-type="float">
            <text:p>2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29:5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30:5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31:5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32:5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69" calcext:value-type="float">
            <text:p>1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33:5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34:5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36: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37: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38: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39: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40: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41: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42: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5" calcext:value-type="float">
            <text:p>2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43: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44: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9" calcext:value-type="float">
            <text:p>1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45: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46: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47: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48: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49: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50: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51: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3" calcext:value-type="float">
            <text:p>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52: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53: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5" calcext:value-type="float">
            <text:p>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54: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55: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56: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57: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18" calcext:value-type="float">
            <text:p>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58: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7:59: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0: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1: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2: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3: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5" calcext:value-type="float">
            <text:p>2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4: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5: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45" calcext:value-type="float">
            <text:p>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6: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7: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5" calcext:value-type="float">
            <text:p>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8: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9:1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10:1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72" calcext:value-type="float">
            <text:p>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11:1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12:1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6" calcext:value-type="float">
            <text:p>2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13:1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14:1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15:1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16:1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17:1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62" calcext:value-type="float">
            <text:p>1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18:1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66" calcext:value-type="float">
            <text:p>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19:1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20:1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69" calcext:value-type="float">
            <text:p>1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21:1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22:1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31" calcext:value-type="float">
            <text:p>2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23:1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24:1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25:1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26:1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27:1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30" calcext:value-type="float">
            <text:p>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28:1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29:1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30:1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31:1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32:1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33:1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34:1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35:1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36:1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37:1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76" calcext:value-type="float">
            <text:p>1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38:2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3" calcext:value-type="float">
            <text:p>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39:2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45" calcext:value-type="float">
            <text:p>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40:2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41:2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9" calcext:value-type="float">
            <text:p>2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42:2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43:2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44:2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45:2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46:2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47:2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48:2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49:2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79" calcext:value-type="float">
            <text:p>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50:2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76" calcext:value-type="float">
            <text:p>1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51:2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52:2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53:2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58" calcext:value-type="float">
            <text:p>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54:2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55" calcext:value-type="float">
            <text:p>2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55:2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56:2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57:2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58:2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30" calcext:value-type="float">
            <text:p>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8:59:2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0:2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5" calcext:value-type="float">
            <text:p>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1:2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2:3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3:3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38" calcext:value-type="float">
            <text:p>2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4:3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6" calcext:value-type="float">
            <text:p>2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5:3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6:3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7:3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8:3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9:3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10:3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11:3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12:3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13:3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14:3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15:3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16:3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5" calcext:value-type="float">
            <text:p>2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17:3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79" calcext:value-type="float">
            <text:p>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18:3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19:3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20:3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21:3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22:3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23:3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24:4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25:4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26:4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27:4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28:4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29:4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30:4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31:4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32:4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33:4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69" calcext:value-type="float">
            <text:p>1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34:4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35:4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45" calcext:value-type="float">
            <text:p>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36:4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37:4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5" calcext:value-type="float">
            <text:p>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38:4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66" calcext:value-type="float">
            <text:p>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39:4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40:4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41:4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42:4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43:4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44:5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45:5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45" calcext:value-type="float">
            <text:p>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46:5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47:5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13" calcext:value-type="float">
            <text:p>2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48:5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49:5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69" calcext:value-type="float">
            <text:p>2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50:5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51:5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52:5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53:5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54:5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55:5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56:5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57:5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58:5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19:59:5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0:5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1:5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2:5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4: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5: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6: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7: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8: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9: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10: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11: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30" calcext:value-type="float">
            <text:p>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12: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13: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31" calcext:value-type="float">
            <text:p>2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14: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70" calcext:value-type="float">
            <text:p>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15: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81" calcext:value-type="float">
            <text:p>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16: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17: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44" calcext:value-type="float">
            <text:p>2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18: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19: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20: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21:1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58" calcext:value-type="float">
            <text:p>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22:1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23:1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24:1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25:1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26:1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27:1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28:1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29:1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61" calcext:value-type="float">
            <text:p>2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30:1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31:1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32:1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33:1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34:1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35:1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65" calcext:value-type="float">
            <text:p>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36:1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12" calcext:value-type="float">
            <text:p>3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37:1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38:2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14" calcext:value-type="float">
            <text:p>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39:2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40:2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41:2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42:2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93" calcext:value-type="float">
            <text:p>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43:2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06" calcext:value-type="float">
            <text:p>3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44:2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01" calcext:value-type="float">
            <text:p>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45:2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46:2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47:2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39" calcext:value-type="float">
            <text:p>3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48:2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94" calcext:value-type="float">
            <text:p>2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49:2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50:2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21" calcext:value-type="float">
            <text:p>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51:2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26" calcext:value-type="float">
            <text:p>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52:2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53:2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54:3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55:3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56:3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57:3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64" calcext:value-type="float">
            <text:p>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58:3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0:59:3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29" calcext:value-type="float">
            <text:p>3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0:3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34" calcext:value-type="float">
            <text:p>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1:3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2:3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3:3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4:3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53" calcext:value-type="float">
            <text:p>3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5:3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34" calcext:value-type="float">
            <text:p>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6:3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11" calcext:value-type="float">
            <text:p>3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7:3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8:3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94" calcext:value-type="float">
            <text:p>2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9:4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10:4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01" calcext:value-type="float">
            <text:p>4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11:4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65" calcext:value-type="float">
            <text:p>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12:4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13:4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14:4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15:4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80" calcext:value-type="float">
            <text:p>2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16:4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64" calcext:value-type="float">
            <text:p>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17:4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18:4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19:4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01" calcext:value-type="float">
            <text:p>4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20:4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21:4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46" calcext:value-type="float">
            <text:p>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22:4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99" calcext:value-type="float">
            <text:p>2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23:5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24:5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91" calcext:value-type="float">
            <text:p>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25:5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99" calcext:value-type="float">
            <text:p>2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26:5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94" calcext:value-type="float">
            <text:p>2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27:5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28:5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29:5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78" calcext:value-type="float">
            <text:p>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30:5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31:5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39" calcext:value-type="float">
            <text:p>3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32:5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29" calcext:value-type="float">
            <text:p>3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33:5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88" calcext:value-type="float">
            <text:p>2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34:5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35:5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02" calcext:value-type="float">
            <text:p>4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36:5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87" calcext:value-type="float">
            <text:p>3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38: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09" calcext:value-type="float">
            <text:p>4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39: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40: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41: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32" calcext:value-type="float">
            <text:p>3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42: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87" calcext:value-type="float">
            <text:p>3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43: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44: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45: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26" calcext:value-type="float">
            <text:p>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46: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47: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48: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72" calcext:value-type="float">
            <text:p>3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49: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50: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14" calcext:value-type="float">
            <text:p>4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51:1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09" calcext:value-type="float">
            <text:p>4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52:1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35" calcext:value-type="float">
            <text:p>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53:1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54:1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55:1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56" calcext:value-type="float">
            <text:p>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3" calcext:value-type="float">
            <text:p>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56:1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57:1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32" calcext:value-type="float">
            <text:p>3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58:1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1:59:1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0:1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1:1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2:1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3:1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4:2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5:2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35" calcext:value-type="float">
            <text:p>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6:2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72" calcext:value-type="float">
            <text:p>3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7:2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8:2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9:2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10:2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11:2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12:2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54" calcext:value-type="float">
            <text:p>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13:2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72" calcext:value-type="float">
            <text:p>3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14:2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15:2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16:2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73" calcext:value-type="float">
            <text:p>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17:3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92" calcext:value-type="float">
            <text:p>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18:3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46" calcext:value-type="float">
            <text:p>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19:3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20:3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21:3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73" calcext:value-type="float">
            <text:p>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22:3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23:3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24:3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25:3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66" calcext:value-type="float">
            <text:p>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26:3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27:3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28:3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29:4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30:4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31:4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32:4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73" calcext:value-type="float">
            <text:p>4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33:4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09" calcext:value-type="float">
            <text:p>4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34:4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35:45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36:46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37:47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12" calcext:value-type="float">
            <text:p>4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38:48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39:4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51" calcext:value-type="float">
            <text:p>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40:49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41:50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42:51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43:52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18" calcext:value-type="float">
            <text:p>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44:53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= :</text:p>
          </table:table-cell>
          <table:table-cell office:value-type="string" calcext:value-type="string">
            <text:p>22:45:54, Date (D/M/Y) =</text:p>
          </table:table-cell>
          <table:table-cell table:style-name="ce1" office:value-type="date" office:date-value="2022-11-02" calcext:value-type="date">
            <text:p>02/11/22</text:p>
          </table:table-cell>
          <table:table-cell table:number-columns-repeated="8"/>
        </table:table-row>
      </table:table>
      <table:table table:name="data_2nd_nov" table:style-name="ta1">
        <table:table-column table:style-name="co1" table:number-columns-repeated="1024" table:default-cell-style-name="ce4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oudness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6H45M49S" calcext:value-type="time">
            <text:p>16:45:49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6H46M49S" calcext:value-type="time">
            <text:p>16:46:49</text:p>
          </table:table-cell>
          <table:table-cell office:value-type="float" office:value="1023" calcext:value-type="float">
            <text:p>1023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6H47M49S" calcext:value-type="time">
            <text:p>16:47:49</text:p>
          </table:table-cell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6H48M49S" calcext:value-type="time">
            <text:p>16:48:49</text:p>
          </table:table-cell>
          <table:table-cell office:value-type="float" office:value="53" calcext:value-type="float">
            <text:p>53</text:p>
          </table:table-cell>
          <table:table-cell office:value-type="float" office:value="700" calcext:value-type="float">
            <text:p>70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6H49M50S" calcext:value-type="time">
            <text:p>16:49:50</text:p>
          </table:table-cell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6H50M50S" calcext:value-type="time">
            <text:p>16:50:50</text:p>
          </table:table-cell>
          <table:table-cell office:value-type="float" office:value="216" calcext:value-type="float">
            <text:p>216</text:p>
          </table:table-cell>
          <table:table-cell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6H51M50S" calcext:value-type="time">
            <text:p>16:51:50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6H52M50S" calcext:value-type="time">
            <text:p>16:52:50</text:p>
          </table:table-cell>
          <table:table-cell office:value-type="float" office:value="1024" calcext:value-type="float">
            <text:p>1024</text:p>
          </table:table-cell>
          <table:table-cell office:value-type="float" office:value="362" calcext:value-type="float">
            <text:p>36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6H53M50S" calcext:value-type="time">
            <text:p>16:53:50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6H54M51S" calcext:value-type="time">
            <text:p>16:54:51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6H55M51S" calcext:value-type="time">
            <text:p>16:55:51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6H56M51S" calcext:value-type="time">
            <text:p>16:56:51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6H57M51S" calcext:value-type="time">
            <text:p>16:57:5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6H58M51S" calcext:value-type="time">
            <text:p>16:58:51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6H59M51S" calcext:value-type="time">
            <text:p>16:59:51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00M52S" calcext:value-type="time">
            <text:p>17:00:52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01M52S" calcext:value-type="time">
            <text:p>17:01:52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02M52S" calcext:value-type="time">
            <text:p>17:02:52</text:p>
          </table:table-cell>
          <table:table-cell office:value-type="float" office:value="351" calcext:value-type="float">
            <text:p>351</text:p>
          </table:table-cell>
          <table:table-cell office:value-type="float" office:value="185" calcext:value-type="float">
            <text:p>18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03M52S" calcext:value-type="time">
            <text:p>17:03:52</text:p>
          </table:table-cell>
          <table:table-cell office:value-type="float" office:value="49" calcext:value-type="float">
            <text:p>49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04M52S" calcext:value-type="time">
            <text:p>17:04:52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6"/>
          <table:table-cell table:number-columns-repeated="1016"/>
        </table:table-row>
        <table:table-row table:style-name="ro1">
          <table:table-cell table:style-name="ce5" office:value-type="time" office:time-value="PT17H05M53S" calcext:value-type="time">
            <text:p>17:05:5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7"/>
          <table:table-cell table:style-name="ce7" office:value-type="string" calcext:value-type="string">
            <text:p>"</text:p>
          </table:table-cell>
          <table:table-cell table:number-columns-repeated="1013"/>
        </table:table-row>
        <table:table-row table:style-name="ro1">
          <table:table-cell table:style-name="ce5" office:value-type="time" office:time-value="PT17H06M53S" calcext:value-type="time">
            <text:p>17:06:5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07M53S" calcext:value-type="time">
            <text:p>17:07:53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08M53S" calcext:value-type="time">
            <text:p>17:08:53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09M54S" calcext:value-type="time">
            <text:p>17:09:5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10M54S" calcext:value-type="time">
            <text:p>17:10:54</text:p>
          </table:table-cell>
          <table:table-cell office:value-type="float" office:value="138" calcext:value-type="float">
            <text:p>138</text:p>
          </table:table-cell>
          <table:table-cell office:value-type="float" office:value="157" calcext:value-type="float">
            <text:p>15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11M54S" calcext:value-type="time">
            <text:p>17:11:54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12M54S" calcext:value-type="time">
            <text:p>17:12:54</text:p>
          </table:table-cell>
          <table:table-cell office:value-type="float" office:value="99" calcext:value-type="float">
            <text:p>99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13M54S" calcext:value-type="time">
            <text:p>17:13:54</text:p>
          </table:table-cell>
          <table:table-cell office:value-type="float" office:value="49" calcext:value-type="float">
            <text:p>49</text:p>
          </table:table-cell>
          <table:table-cell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14M55S" calcext:value-type="time">
            <text:p>17:14:55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15M55S" calcext:value-type="time">
            <text:p>17:15:55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16M55S" calcext:value-type="time">
            <text:p>17:16:55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17M55S" calcext:value-type="time">
            <text:p>17:17:55</text:p>
          </table:table-cell>
          <table:table-cell office:value-type="float" office:value="51" calcext:value-type="float">
            <text:p>51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18M56S" calcext:value-type="time">
            <text:p>17:18:56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19M56S" calcext:value-type="time">
            <text:p>17:19:56</text:p>
          </table:table-cell>
          <table:table-cell office:value-type="float" office:value="153" calcext:value-type="float">
            <text:p>153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20M56S" calcext:value-type="time">
            <text:p>17:20:56</text:p>
          </table:table-cell>
          <table:table-cell office:value-type="float" office:value="149" calcext:value-type="float">
            <text:p>149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21M56S" calcext:value-type="time">
            <text:p>17:21:56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22M56S" calcext:value-type="time">
            <text:p>17:22:56</text:p>
          </table:table-cell>
          <table:table-cell office:value-type="float" office:value="187" calcext:value-type="float">
            <text:p>187</text:p>
          </table:table-cell>
          <table:table-cell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23M57S" calcext:value-type="time">
            <text:p>17:23:57</text:p>
          </table:table-cell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24M57S" calcext:value-type="time">
            <text:p>17:24:57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25M57S" calcext:value-type="time">
            <text:p>17:25:57</text:p>
          </table:table-cell>
          <table:table-cell office:value-type="float" office:value="221" calcext:value-type="float">
            <text:p>221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26M57S" calcext:value-type="time">
            <text:p>17:26:57</text:p>
          </table:table-cell>
          <table:table-cell office:value-type="float" office:value="190" calcext:value-type="float">
            <text:p>190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27M58S" calcext:value-type="time">
            <text:p>17:27:58</text:p>
          </table:table-cell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28M58S" calcext:value-type="time">
            <text:p>17:28:58</text:p>
          </table:table-cell>
          <table:table-cell office:value-type="float" office:value="165" calcext:value-type="float">
            <text:p>165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29M58S" calcext:value-type="time">
            <text:p>17:29:58</text:p>
          </table:table-cell>
          <table:table-cell office:value-type="float" office:value="231" calcext:value-type="float">
            <text:p>23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30M58S" calcext:value-type="time">
            <text:p>17:30:58</text:p>
          </table:table-cell>
          <table:table-cell office:value-type="float" office:value="149" calcext:value-type="float">
            <text:p>149</text:p>
          </table:table-cell>
          <table:table-cell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31M59S" calcext:value-type="time">
            <text:p>17:31:59</text:p>
          </table:table-cell>
          <table:table-cell office:value-type="float" office:value="168" calcext:value-type="float">
            <text:p>168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32M59S" calcext:value-type="time">
            <text:p>17:32:59</text:p>
          </table:table-cell>
          <table:table-cell office:value-type="float" office:value="200" calcext:value-type="float">
            <text:p>200</text:p>
          </table:table-cell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33M59S" calcext:value-type="time">
            <text:p>17:33:59</text:p>
          </table:table-cell>
          <table:table-cell office:value-type="float" office:value="169" calcext:value-type="float">
            <text:p>169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34M59S" calcext:value-type="time">
            <text:p>17:34:59</text:p>
          </table:table-cell>
          <table:table-cell office:value-type="float" office:value="197" calcext:value-type="float">
            <text:p>197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36M00S" calcext:value-type="time">
            <text:p>17:36:00</text:p>
          </table:table-cell>
          <table:table-cell office:value-type="float" office:value="210" calcext:value-type="float">
            <text:p>210</text:p>
          </table:table-cell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37M00S" calcext:value-type="time">
            <text:p>17:37:00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38M00S" calcext:value-type="time">
            <text:p>17:38:00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39M01S" calcext:value-type="time">
            <text:p>17:39:01</text:p>
          </table:table-cell>
          <table:table-cell office:value-type="float" office:value="207" calcext:value-type="float">
            <text:p>207</text:p>
          </table:table-cell>
          <table:table-cell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40M01S" calcext:value-type="time">
            <text:p>17:40:01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41M01S" calcext:value-type="time">
            <text:p>17:41:01</text:p>
          </table:table-cell>
          <table:table-cell office:value-type="float" office:value="203" calcext:value-type="float">
            <text:p>203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42M01S" calcext:value-type="time">
            <text:p>17:42:01</text:p>
          </table:table-cell>
          <table:table-cell office:value-type="float" office:value="184" calcext:value-type="float">
            <text:p>184</text:p>
          </table:table-cell>
          <table:table-cell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43M02S" calcext:value-type="time">
            <text:p>17:43:02</text:p>
          </table:table-cell>
          <table:table-cell office:value-type="float" office:value="205" calcext:value-type="float">
            <text:p>205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44M02S" calcext:value-type="time">
            <text:p>17:44:02</text:p>
          </table:table-cell>
          <table:table-cell office:value-type="float" office:value="181" calcext:value-type="float">
            <text:p>181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45M02S" calcext:value-type="time">
            <text:p>17:45:02</text:p>
          </table:table-cell>
          <table:table-cell office:value-type="float" office:value="199" calcext:value-type="float">
            <text:p>199</text:p>
          </table:table-cell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46M03S" calcext:value-type="time">
            <text:p>17:46:03</text:p>
          </table:table-cell>
          <table:table-cell office:value-type="float" office:value="190" calcext:value-type="float">
            <text:p>190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47M03S" calcext:value-type="time">
            <text:p>17:47:03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48M03S" calcext:value-type="time">
            <text:p>17:48:03</text:p>
          </table:table-cell>
          <table:table-cell office:value-type="float" office:value="183" calcext:value-type="float">
            <text:p>183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49M03S" calcext:value-type="time">
            <text:p>17:49:03</text:p>
          </table:table-cell>
          <table:table-cell office:value-type="float" office:value="233" calcext:value-type="float">
            <text:p>233</text:p>
          </table:table-cell>
          <table:table-cell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50M04S" calcext:value-type="time">
            <text:p>17:50:04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51M04S" calcext:value-type="time">
            <text:p>17:51:04</text:p>
          </table:table-cell>
          <table:table-cell office:value-type="float" office:value="196" calcext:value-type="float">
            <text:p>196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52M04S" calcext:value-type="time">
            <text:p>17:52:04</text:p>
          </table:table-cell>
          <table:table-cell office:value-type="float" office:value="177" calcext:value-type="float">
            <text:p>177</text:p>
          </table:table-cell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53M05S" calcext:value-type="time">
            <text:p>17:53:05</text:p>
          </table:table-cell>
          <table:table-cell office:value-type="float" office:value="194" calcext:value-type="float">
            <text:p>194</text:p>
          </table:table-cell>
          <table:table-cell office:value-type="float" office:value="142" calcext:value-type="float">
            <text:p>14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54M05S" calcext:value-type="time">
            <text:p>17:54:05</text:p>
          </table:table-cell>
          <table:table-cell office:value-type="float" office:value="185" calcext:value-type="float">
            <text:p>185</text:p>
          </table:table-cell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55M05S" calcext:value-type="time">
            <text:p>17:55:05</text:p>
          </table:table-cell>
          <table:table-cell office:value-type="float" office:value="177" calcext:value-type="float">
            <text:p>177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56M05S" calcext:value-type="time">
            <text:p>17:56:05</text:p>
          </table:table-cell>
          <table:table-cell office:value-type="float" office:value="196" calcext:value-type="float">
            <text:p>196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57M06S" calcext:value-type="time">
            <text:p>17:57:06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58M06S" calcext:value-type="time">
            <text:p>17:58:06</text:p>
          </table:table-cell>
          <table:table-cell office:value-type="float" office:value="218" calcext:value-type="float">
            <text:p>218</text:p>
          </table:table-cell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7H59M06S" calcext:value-type="time">
            <text:p>17:59:06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00M07S" calcext:value-type="time">
            <text:p>18:00:07</text:p>
          </table:table-cell>
          <table:table-cell office:value-type="float" office:value="161" calcext:value-type="float">
            <text:p>161</text:p>
          </table:table-cell>
          <table:table-cell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01M07S" calcext:value-type="time">
            <text:p>18:01:07</text:p>
          </table:table-cell>
          <table:table-cell office:value-type="float" office:value="207" calcext:value-type="float">
            <text:p>207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02M07S" calcext:value-type="time">
            <text:p>18:02:07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03M08S" calcext:value-type="time">
            <text:p>18:03:08</text:p>
          </table:table-cell>
          <table:table-cell office:value-type="float" office:value="189" calcext:value-type="float">
            <text:p>189</text:p>
          </table:table-cell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04M08S" calcext:value-type="time">
            <text:p>18:04:08</text:p>
          </table:table-cell>
          <table:table-cell office:value-type="float" office:value="205" calcext:value-type="float">
            <text:p>205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05M08S" calcext:value-type="time">
            <text:p>18:05:08</text:p>
          </table:table-cell>
          <table:table-cell office:value-type="float" office:value="228" calcext:value-type="float">
            <text:p>228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06M09S" calcext:value-type="time">
            <text:p>18:06:09</text:p>
          </table:table-cell>
          <table:table-cell office:value-type="float" office:value="245" calcext:value-type="float">
            <text:p>245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07M09S" calcext:value-type="time">
            <text:p>18:07:09</text:p>
          </table:table-cell>
          <table:table-cell office:value-type="float" office:value="161" calcext:value-type="float">
            <text:p>161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08M09S" calcext:value-type="time">
            <text:p>18:08:09</text:p>
          </table:table-cell>
          <table:table-cell office:value-type="float" office:value="185" calcext:value-type="float">
            <text:p>185</text:p>
          </table:table-cell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09M10S" calcext:value-type="time">
            <text:p>18:09:10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10M10S" calcext:value-type="time">
            <text:p>18:10:10</text:p>
          </table:table-cell>
          <table:table-cell office:value-type="float" office:value="191" calcext:value-type="float">
            <text:p>191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11M10S" calcext:value-type="time">
            <text:p>18:11:10</text:p>
          </table:table-cell>
          <table:table-cell office:value-type="float" office:value="272" calcext:value-type="float">
            <text:p>272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12M11S" calcext:value-type="time">
            <text:p>18:12:11</text:p>
          </table:table-cell>
          <table:table-cell office:value-type="float" office:value="221" calcext:value-type="float">
            <text:p>221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13M11S" calcext:value-type="time">
            <text:p>18:13:11</text:p>
          </table:table-cell>
          <table:table-cell office:value-type="float" office:value="206" calcext:value-type="float">
            <text:p>206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14M11S" calcext:value-type="time">
            <text:p>18:14:11</text:p>
          </table:table-cell>
          <table:table-cell office:value-type="float" office:value="201" calcext:value-type="float">
            <text:p>201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15M12S" calcext:value-type="time">
            <text:p>18:15:12</text:p>
          </table:table-cell>
          <table:table-cell office:value-type="float" office:value="170" calcext:value-type="float">
            <text:p>170</text:p>
          </table:table-cell>
          <table:table-cell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16M12S" calcext:value-type="time">
            <text:p>18:16:12</text:p>
          </table:table-cell>
          <table:table-cell office:value-type="float" office:value="224" calcext:value-type="float">
            <text:p>224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17M12S" calcext:value-type="time">
            <text:p>18:17:12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18M13S" calcext:value-type="time">
            <text:p>18:18:13</text:p>
          </table:table-cell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19M13S" calcext:value-type="time">
            <text:p>18:19:13</text:p>
          </table:table-cell>
          <table:table-cell office:value-type="float" office:value="166" calcext:value-type="float">
            <text:p>166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20M13S" calcext:value-type="time">
            <text:p>18:20:13</text:p>
          </table:table-cell>
          <table:table-cell office:value-type="float" office:value="191" calcext:value-type="float">
            <text:p>191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21M14S" calcext:value-type="time">
            <text:p>18:21:14</text:p>
          </table:table-cell>
          <table:table-cell office:value-type="float" office:value="169" calcext:value-type="float">
            <text:p>169</text:p>
          </table:table-cell>
          <table:table-cell office:value-type="float" office:value="138" calcext:value-type="float">
            <text:p>13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22M14S" calcext:value-type="time">
            <text:p>18:22:14</text:p>
          </table:table-cell>
          <table:table-cell office:value-type="float" office:value="198" calcext:value-type="float">
            <text:p>198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23M14S" calcext:value-type="time">
            <text:p>18:23:14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24M15S" calcext:value-type="time">
            <text:p>18:24:15</text:p>
          </table:table-cell>
          <table:table-cell office:value-type="float" office:value="178" calcext:value-type="float">
            <text:p>178</text:p>
          </table:table-cell>
          <table:table-cell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25M15S" calcext:value-type="time">
            <text:p>18:25:15</text:p>
          </table:table-cell>
          <table:table-cell office:value-type="float" office:value="182" calcext:value-type="float">
            <text:p>182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26M15S" calcext:value-type="time">
            <text:p>18:26:15</text:p>
          </table:table-cell>
          <table:table-cell office:value-type="float" office:value="223" calcext:value-type="float">
            <text:p>223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27M16S" calcext:value-type="time">
            <text:p>18:27:16</text:p>
          </table:table-cell>
          <table:table-cell office:value-type="float" office:value="276" calcext:value-type="float">
            <text:p>276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28M16S" calcext:value-type="time">
            <text:p>18:28:16</text:p>
          </table:table-cell>
          <table:table-cell office:value-type="float" office:value="230" calcext:value-type="float">
            <text:p>230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29M16S" calcext:value-type="time">
            <text:p>18:29:16</text:p>
          </table:table-cell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30M17S" calcext:value-type="time">
            <text:p>18:30:17</text:p>
          </table:table-cell>
          <table:table-cell office:value-type="float" office:value="178" calcext:value-type="float">
            <text:p>178</text:p>
          </table:table-cell>
          <table:table-cell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31M17S" calcext:value-type="time">
            <text:p>18:31:17</text:p>
          </table:table-cell>
          <table:table-cell office:value-type="float" office:value="212" calcext:value-type="float">
            <text:p>212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32M18S" calcext:value-type="time">
            <text:p>18:32:18</text:p>
          </table:table-cell>
          <table:table-cell office:value-type="float" office:value="192" calcext:value-type="float">
            <text:p>192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33M18S" calcext:value-type="time">
            <text:p>18:33:18</text:p>
          </table:table-cell>
          <table:table-cell office:value-type="float" office:value="228" calcext:value-type="float">
            <text:p>228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34M18S" calcext:value-type="time">
            <text:p>18:34:18</text:p>
          </table:table-cell>
          <table:table-cell office:value-type="float" office:value="190" calcext:value-type="float">
            <text:p>190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35M19S" calcext:value-type="time">
            <text:p>18:35:19</text:p>
          </table:table-cell>
          <table:table-cell office:value-type="float" office:value="180" calcext:value-type="float">
            <text:p>180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36M19S" calcext:value-type="time">
            <text:p>18:36:19</text:p>
          </table:table-cell>
          <table:table-cell office:value-type="float" office:value="217" calcext:value-type="float">
            <text:p>217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37M19S" calcext:value-type="time">
            <text:p>18:37:19</text:p>
          </table:table-cell>
          <table:table-cell office:value-type="float" office:value="215" calcext:value-type="float">
            <text:p>215</text:p>
          </table:table-cell>
          <table:table-cell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38M20S" calcext:value-type="time">
            <text:p>18:38:20</text:p>
          </table:table-cell>
          <table:table-cell office:value-type="float" office:value="176" calcext:value-type="float">
            <text:p>176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39M20S" calcext:value-type="time">
            <text:p>18:39:20</text:p>
          </table:table-cell>
          <table:table-cell office:value-type="float" office:value="267" calcext:value-type="float">
            <text:p>267</text:p>
          </table:table-cell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40M21S" calcext:value-type="time">
            <text:p>18:40:21</text:p>
          </table:table-cell>
          <table:table-cell office:value-type="float" office:value="245" calcext:value-type="float">
            <text:p>245</text:p>
          </table:table-cell>
          <table:table-cell office:value-type="float" office:value="136" calcext:value-type="float">
            <text:p>13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41M21S" calcext:value-type="time">
            <text:p>18:41:21</text:p>
          </table:table-cell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42M21S" calcext:value-type="time">
            <text:p>18:42:21</text:p>
          </table:table-cell>
          <table:table-cell office:value-type="float" office:value="209" calcext:value-type="float">
            <text:p>209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43M22S" calcext:value-type="time">
            <text:p>18:43:22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44M22S" calcext:value-type="time">
            <text:p>18:44:22</text:p>
          </table:table-cell>
          <table:table-cell office:value-type="float" office:value="187" calcext:value-type="float">
            <text:p>187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45M23S" calcext:value-type="time">
            <text:p>18:45:23</text:p>
          </table:table-cell>
          <table:table-cell office:value-type="float" office:value="207" calcext:value-type="float">
            <text:p>207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46M23S" calcext:value-type="time">
            <text:p>18:46:23</text:p>
          </table:table-cell>
          <table:table-cell office:value-type="float" office:value="276" calcext:value-type="float">
            <text:p>276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47M23S" calcext:value-type="time">
            <text:p>18:47:23</text:p>
          </table:table-cell>
          <table:table-cell office:value-type="float" office:value="183" calcext:value-type="float">
            <text:p>183</text:p>
          </table:table-cell>
          <table:table-cell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48M24S" calcext:value-type="time">
            <text:p>18:48:24</text:p>
          </table:table-cell>
          <table:table-cell office:value-type="float" office:value="161" calcext:value-type="float">
            <text:p>161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49M24S" calcext:value-type="time">
            <text:p>18:49:24</text:p>
          </table:table-cell>
          <table:table-cell office:value-type="float" office:value="222" calcext:value-type="float">
            <text:p>222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50M25S" calcext:value-type="time">
            <text:p>18:50:25</text:p>
          </table:table-cell>
          <table:table-cell office:value-type="float" office:value="179" calcext:value-type="float">
            <text:p>179</text:p>
          </table:table-cell>
          <table:table-cell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51M25S" calcext:value-type="time">
            <text:p>18:51:25</text:p>
          </table:table-cell>
          <table:table-cell office:value-type="float" office:value="176" calcext:value-type="float">
            <text:p>176</text:p>
          </table:table-cell>
          <table:table-cell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52M25S" calcext:value-type="time">
            <text:p>18:52:25</text:p>
          </table:table-cell>
          <table:table-cell office:value-type="float" office:value="212" calcext:value-type="float">
            <text:p>212</text:p>
          </table:table-cell>
          <table:table-cell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53M26S" calcext:value-type="time">
            <text:p>18:53:26</text:p>
          </table:table-cell>
          <table:table-cell office:value-type="float" office:value="178" calcext:value-type="float">
            <text:p>178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54M26S" calcext:value-type="time">
            <text:p>18:54:26</text:p>
          </table:table-cell>
          <table:table-cell office:value-type="float" office:value="258" calcext:value-type="float">
            <text:p>258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55M27S" calcext:value-type="time">
            <text:p>18:55:27</text:p>
          </table:table-cell>
          <table:table-cell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56M27S" calcext:value-type="time">
            <text:p>18:56:27</text:p>
          </table:table-cell>
          <table:table-cell office:value-type="float" office:value="197" calcext:value-type="float">
            <text:p>197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57M28S" calcext:value-type="time">
            <text:p>18:57:28</text:p>
          </table:table-cell>
          <table:table-cell office:value-type="float" office:value="200" calcext:value-type="float">
            <text:p>200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58M28S" calcext:value-type="time">
            <text:p>18:58:28</text:p>
          </table:table-cell>
          <table:table-cell office:value-type="float" office:value="224" calcext:value-type="float">
            <text:p>224</text:p>
          </table:table-cell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8H59M28S" calcext:value-type="time">
            <text:p>18:59:28</text:p>
          </table:table-cell>
          <table:table-cell office:value-type="float" office:value="230" calcext:value-type="float">
            <text:p>230</text:p>
          </table:table-cell>
          <table:table-cell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00M29S" calcext:value-type="time">
            <text:p>19:00:29</text:p>
          </table:table-cell>
          <table:table-cell office:value-type="float" office:value="186" calcext:value-type="float">
            <text:p>186</text:p>
          </table:table-cell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01M29S" calcext:value-type="time">
            <text:p>19:01:29</text:p>
          </table:table-cell>
          <table:table-cell office:value-type="float" office:value="185" calcext:value-type="float">
            <text:p>185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02M30S" calcext:value-type="time">
            <text:p>19:02:30</text:p>
          </table:table-cell>
          <table:table-cell office:value-type="float" office:value="254" calcext:value-type="float">
            <text:p>254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03M30S" calcext:value-type="time">
            <text:p>19:03:30</text:p>
          </table:table-cell>
          <table:table-cell office:value-type="float" office:value="217" calcext:value-type="float">
            <text:p>217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04M31S" calcext:value-type="time">
            <text:p>19:04:31</text:p>
          </table:table-cell>
          <table:table-cell office:value-type="float" office:value="238" calcext:value-type="float">
            <text:p>238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05M31S" calcext:value-type="time">
            <text:p>19:05:31</text:p>
          </table:table-cell>
          <table:table-cell office:value-type="float" office:value="206" calcext:value-type="float">
            <text:p>206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06M31S" calcext:value-type="time">
            <text:p>19:06:31</text:p>
          </table:table-cell>
          <table:table-cell office:value-type="float" office:value="216" calcext:value-type="float">
            <text:p>216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07M32S" calcext:value-type="time">
            <text:p>19:07:32</text:p>
          </table:table-cell>
          <table:table-cell office:value-type="float" office:value="191" calcext:value-type="float">
            <text:p>191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08M32S" calcext:value-type="time">
            <text:p>19:08:32</text:p>
          </table:table-cell>
          <table:table-cell office:value-type="float" office:value="227" calcext:value-type="float">
            <text:p>227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09M33S" calcext:value-type="time">
            <text:p>19:09:33</text:p>
          </table:table-cell>
          <table:table-cell office:value-type="float" office:value="242" calcext:value-type="float">
            <text:p>242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10M33S" calcext:value-type="time">
            <text:p>19:10:33</text:p>
          </table:table-cell>
          <table:table-cell office:value-type="float" office:value="207" calcext:value-type="float">
            <text:p>207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11M34S" calcext:value-type="time">
            <text:p>19:11:34</text:p>
          </table:table-cell>
          <table:table-cell office:value-type="float" office:value="260" calcext:value-type="float">
            <text:p>260</text:p>
          </table:table-cell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12M34S" calcext:value-type="time">
            <text:p>19:12:34</text:p>
          </table:table-cell>
          <table:table-cell office:value-type="float" office:value="253" calcext:value-type="float">
            <text:p>253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13M35S" calcext:value-type="time">
            <text:p>19:13:35</text:p>
          </table:table-cell>
          <table:table-cell office:value-type="float" office:value="222" calcext:value-type="float">
            <text:p>222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14M35S" calcext:value-type="time">
            <text:p>19:14:35</text:p>
          </table:table-cell>
          <table:table-cell office:value-type="float" office:value="223" calcext:value-type="float">
            <text:p>223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15M36S" calcext:value-type="time">
            <text:p>19:15:36</text:p>
          </table:table-cell>
          <table:table-cell office:value-type="float" office:value="246" calcext:value-type="float">
            <text:p>246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16M36S" calcext:value-type="time">
            <text:p>19:16:36</text:p>
          </table:table-cell>
          <table:table-cell office:value-type="float" office:value="211" calcext:value-type="float">
            <text:p>211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17M36S" calcext:value-type="time">
            <text:p>19:17:36</text:p>
          </table:table-cell>
          <table:table-cell office:value-type="float" office:value="205" calcext:value-type="float">
            <text:p>205</text:p>
          </table:table-cell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18M37S" calcext:value-type="time">
            <text:p>19:18:37</text:p>
          </table:table-cell>
          <table:table-cell office:value-type="float" office:value="179" calcext:value-type="float">
            <text:p>179</text:p>
          </table:table-cell>
          <table:table-cell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19M37S" calcext:value-type="time">
            <text:p>19:19:37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20M38S" calcext:value-type="time">
            <text:p>19:20:38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21M38S" calcext:value-type="time">
            <text:p>19:21:38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22M39S" calcext:value-type="time">
            <text:p>19:22:39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23M39S" calcext:value-type="time">
            <text:p>19:23:39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24M40S" calcext:value-type="time">
            <text:p>19:24:40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25M40S" calcext:value-type="time">
            <text:p>19:25:4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26M41S" calcext:value-type="time">
            <text:p>19:26:41</text:p>
          </table:table-cell>
          <table:table-cell office:value-type="float" office:value="154" calcext:value-type="float">
            <text:p>154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27M41S" calcext:value-type="time">
            <text:p>19:27:41</text:p>
          </table:table-cell>
          <table:table-cell office:value-type="float" office:value="154" calcext:value-type="float">
            <text:p>154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28M42S" calcext:value-type="time">
            <text:p>19:28:42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29M42S" calcext:value-type="time">
            <text:p>19:29:42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30M43S" calcext:value-type="time">
            <text:p>19:30:43</text:p>
          </table:table-cell>
          <table:table-cell office:value-type="float" office:value="186" calcext:value-type="float">
            <text:p>186</text:p>
          </table:table-cell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31M43S" calcext:value-type="time">
            <text:p>19:31:43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32M44S" calcext:value-type="time">
            <text:p>19:32:44</text:p>
          </table:table-cell>
          <table:table-cell office:value-type="float" office:value="143" calcext:value-type="float">
            <text:p>143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33M44S" calcext:value-type="time">
            <text:p>19:33:44</text:p>
          </table:table-cell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34M45S" calcext:value-type="time">
            <text:p>19:34:45</text:p>
          </table:table-cell>
          <table:table-cell office:value-type="float" office:value="169" calcext:value-type="float">
            <text:p>169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35M45S" calcext:value-type="time">
            <text:p>19:35:45</text:p>
          </table:table-cell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36M46S" calcext:value-type="time">
            <text:p>19:36:46</text:p>
          </table:table-cell>
          <table:table-cell office:value-type="float" office:value="245" calcext:value-type="float">
            <text:p>245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37M46S" calcext:value-type="time">
            <text:p>19:37:46</text:p>
          </table:table-cell>
          <table:table-cell office:value-type="float" office:value="247" calcext:value-type="float">
            <text:p>247</text:p>
          </table:table-cell>
          <table:table-cell office:value-type="float" office:value="143" calcext:value-type="float">
            <text:p>14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38M47S" calcext:value-type="time">
            <text:p>19:38:47</text:p>
          </table:table-cell>
          <table:table-cell office:value-type="float" office:value="185" calcext:value-type="float">
            <text:p>185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39M47S" calcext:value-type="time">
            <text:p>19:39:47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40M48S" calcext:value-type="time">
            <text:p>19:40:48</text:p>
          </table:table-cell>
          <table:table-cell office:value-type="float" office:value="171" calcext:value-type="float">
            <text:p>171</text:p>
          </table:table-cell>
          <table:table-cell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41M48S" calcext:value-type="time">
            <text:p>19:41:48</text:p>
          </table:table-cell>
          <table:table-cell office:value-type="float" office:value="242" calcext:value-type="float">
            <text:p>242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42M49S" calcext:value-type="time">
            <text:p>19:42:49</text:p>
          </table:table-cell>
          <table:table-cell office:value-type="float" office:value="229" calcext:value-type="float">
            <text:p>229</text:p>
          </table:table-cell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43M49S" calcext:value-type="time">
            <text:p>19:43:49</text:p>
          </table:table-cell>
          <table:table-cell office:value-type="float" office:value="178" calcext:value-type="float">
            <text:p>178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44M50S" calcext:value-type="time">
            <text:p>19:44:50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45M50S" calcext:value-type="time">
            <text:p>19:45:50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46M51S" calcext:value-type="time">
            <text:p>19:46:51</text:p>
          </table:table-cell>
          <table:table-cell office:value-type="float" office:value="245" calcext:value-type="float">
            <text:p>245</text:p>
          </table:table-cell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47M51S" calcext:value-type="time">
            <text:p>19:47:51</text:p>
          </table:table-cell>
          <table:table-cell office:value-type="float" office:value="237" calcext:value-type="float">
            <text:p>237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48M52S" calcext:value-type="time">
            <text:p>19:48:52</text:p>
          </table:table-cell>
          <table:table-cell office:value-type="float" office:value="213" calcext:value-type="float">
            <text:p>213</text:p>
          </table:table-cell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49M52S" calcext:value-type="time">
            <text:p>19:49:52</text:p>
          </table:table-cell>
          <table:table-cell office:value-type="float" office:value="212" calcext:value-type="float">
            <text:p>212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50M53S" calcext:value-type="time">
            <text:p>19:50:53</text:p>
          </table:table-cell>
          <table:table-cell office:value-type="float" office:value="269" calcext:value-type="float">
            <text:p>269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51M53S" calcext:value-type="time">
            <text:p>19:51:53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52M54S" calcext:value-type="time">
            <text:p>19:52:54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53M54S" calcext:value-type="time">
            <text:p>19:53:54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54M55S" calcext:value-type="time">
            <text:p>19:54:55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55M55S" calcext:value-type="time">
            <text:p>19:55:55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56M56S" calcext:value-type="time">
            <text:p>19:56:56</text:p>
          </table:table-cell>
          <table:table-cell office:value-type="float" office:value="139" calcext:value-type="float">
            <text:p>139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57M57S" calcext:value-type="time">
            <text:p>19:57:57</text:p>
          </table:table-cell>
          <table:table-cell office:value-type="float" office:value="154" calcext:value-type="float">
            <text:p>154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58M57S" calcext:value-type="time">
            <text:p>19:58:57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19H59M58S" calcext:value-type="time">
            <text:p>19:59:58</text:p>
          </table:table-cell>
          <table:table-cell office:value-type="float" office:value="186" calcext:value-type="float">
            <text:p>186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00M58S" calcext:value-type="time">
            <text:p>20:00:58</text:p>
          </table:table-cell>
          <table:table-cell office:value-type="float" office:value="193" calcext:value-type="float">
            <text:p>193</text:p>
          </table:table-cell>
          <table:table-cell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01M59S" calcext:value-type="time">
            <text:p>20:01:59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02M59S" calcext:value-type="time">
            <text:p>20:02:59</text:p>
          </table:table-cell>
          <table:table-cell office:value-type="float" office:value="195" calcext:value-type="float">
            <text:p>195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04M00S" calcext:value-type="time">
            <text:p>20:04:00</text:p>
          </table:table-cell>
          <table:table-cell office:value-type="float" office:value="190" calcext:value-type="float">
            <text:p>190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05M00S" calcext:value-type="time">
            <text:p>20:05:0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06M01S" calcext:value-type="time">
            <text:p>20:06:01</text:p>
          </table:table-cell>
          <table:table-cell office:value-type="float" office:value="208" calcext:value-type="float">
            <text:p>208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07M02S" calcext:value-type="time">
            <text:p>20:07:02</text:p>
          </table:table-cell>
          <table:table-cell office:value-type="float" office:value="202" calcext:value-type="float">
            <text:p>202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08M02S" calcext:value-type="time">
            <text:p>20:08:02</text:p>
          </table:table-cell>
          <table:table-cell office:value-type="float" office:value="215" calcext:value-type="float">
            <text:p>215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09M03S" calcext:value-type="time">
            <text:p>20:09:03</text:p>
          </table:table-cell>
          <table:table-cell office:value-type="float" office:value="267" calcext:value-type="float">
            <text:p>267</text:p>
          </table:table-cell>
          <table:table-cell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10M03S" calcext:value-type="time">
            <text:p>20:10:03</text:p>
          </table:table-cell>
          <table:table-cell office:value-type="float" office:value="246" calcext:value-type="float">
            <text:p>246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11M04S" calcext:value-type="time">
            <text:p>20:11:04</text:p>
          </table:table-cell>
          <table:table-cell office:value-type="float" office:value="233" calcext:value-type="float">
            <text:p>233</text:p>
          </table:table-cell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12M04S" calcext:value-type="time">
            <text:p>20:12:04</text:p>
          </table:table-cell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13M05S" calcext:value-type="time">
            <text:p>20:13:05</text:p>
          </table:table-cell>
          <table:table-cell office:value-type="float" office:value="216" calcext:value-type="float">
            <text:p>216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14M05S" calcext:value-type="time">
            <text:p>20:14:05</text:p>
          </table:table-cell>
          <table:table-cell office:value-type="float" office:value="231" calcext:value-type="float">
            <text:p>231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15M06S" calcext:value-type="time">
            <text:p>20:15:06</text:p>
          </table:table-cell>
          <table:table-cell office:value-type="float" office:value="270" calcext:value-type="float">
            <text:p>270</text:p>
          </table:table-cell>
          <table:table-cell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16M07S" calcext:value-type="time">
            <text:p>20:16:07</text:p>
          </table:table-cell>
          <table:table-cell office:value-type="float" office:value="281" calcext:value-type="float">
            <text:p>281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17M07S" calcext:value-type="time">
            <text:p>20:17:07</text:p>
          </table:table-cell>
          <table:table-cell office:value-type="float" office:value="266" calcext:value-type="float">
            <text:p>266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18M08S" calcext:value-type="time">
            <text:p>20:18:08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19M08S" calcext:value-type="time">
            <text:p>20:19:08</text:p>
          </table:table-cell>
          <table:table-cell office:value-type="float" office:value="253" calcext:value-type="float">
            <text:p>253</text:p>
          </table:table-cell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20M09S" calcext:value-type="time">
            <text:p>20:20:09</text:p>
          </table:table-cell>
          <table:table-cell office:value-type="float" office:value="252" calcext:value-type="float">
            <text:p>252</text:p>
          </table:table-cell>
          <table:table-cell office:value-type="float" office:value="127" calcext:value-type="float">
            <text:p>12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21M10S" calcext:value-type="time">
            <text:p>20:21:10</text:p>
          </table:table-cell>
          <table:table-cell office:value-type="float" office:value="304" calcext:value-type="float">
            <text:p>304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22M10S" calcext:value-type="time">
            <text:p>20:22:10</text:p>
          </table:table-cell>
          <table:table-cell office:value-type="float" office:value="258" calcext:value-type="float">
            <text:p>258</text:p>
          </table:table-cell>
          <table:table-cell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23M11S" calcext:value-type="time">
            <text:p>20:23:11</text:p>
          </table:table-cell>
          <table:table-cell office:value-type="float" office:value="283" calcext:value-type="float">
            <text:p>283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24M11S" calcext:value-type="time">
            <text:p>20:24:11</text:p>
          </table:table-cell>
          <table:table-cell office:value-type="float" office:value="235" calcext:value-type="float">
            <text:p>235</text:p>
          </table:table-cell>
          <table:table-cell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25M12S" calcext:value-type="time">
            <text:p>20:25:12</text:p>
          </table:table-cell>
          <table:table-cell office:value-type="float" office:value="284" calcext:value-type="float">
            <text:p>284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26M13S" calcext:value-type="time">
            <text:p>20:26:13</text:p>
          </table:table-cell>
          <table:table-cell office:value-type="float" office:value="278" calcext:value-type="float">
            <text:p>278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27M13S" calcext:value-type="time">
            <text:p>20:27:13</text:p>
          </table:table-cell>
          <table:table-cell office:value-type="float" office:value="241" calcext:value-type="float">
            <text:p>241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28M14S" calcext:value-type="time">
            <text:p>20:28:14</text:p>
          </table:table-cell>
          <table:table-cell office:value-type="float" office:value="278" calcext:value-type="float">
            <text:p>278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29M14S" calcext:value-type="time">
            <text:p>20:29:14</text:p>
          </table:table-cell>
          <table:table-cell office:value-type="float" office:value="241" calcext:value-type="float">
            <text:p>241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30M15S" calcext:value-type="time">
            <text:p>20:30:15</text:p>
          </table:table-cell>
          <table:table-cell office:value-type="float" office:value="261" calcext:value-type="float">
            <text:p>261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31M16S" calcext:value-type="time">
            <text:p>20:31:16</text:p>
          </table:table-cell>
          <table:table-cell office:value-type="float" office:value="252" calcext:value-type="float">
            <text:p>252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32M16S" calcext:value-type="time">
            <text:p>20:32:16</text:p>
          </table:table-cell>
          <table:table-cell office:value-type="float" office:value="300" calcext:value-type="float">
            <text:p>300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33M17S" calcext:value-type="time">
            <text:p>20:33:17</text:p>
          </table:table-cell>
          <table:table-cell office:value-type="float" office:value="296" calcext:value-type="float">
            <text:p>296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34M17S" calcext:value-type="time">
            <text:p>20:34:17</text:p>
          </table:table-cell>
          <table:table-cell office:value-type="float" office:value="340" calcext:value-type="float">
            <text:p>340</text:p>
          </table:table-cell>
          <table:table-cell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35M18S" calcext:value-type="time">
            <text:p>20:35:18</text:p>
          </table:table-cell>
          <table:table-cell office:value-type="float" office:value="289" calcext:value-type="float">
            <text:p>289</text:p>
          </table:table-cell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36M19S" calcext:value-type="time">
            <text:p>20:36:19</text:p>
          </table:table-cell>
          <table:table-cell office:value-type="float" office:value="265" calcext:value-type="float">
            <text:p>265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37M19S" calcext:value-type="time">
            <text:p>20:37:19</text:p>
          </table:table-cell>
          <table:table-cell office:value-type="float" office:value="312" calcext:value-type="float">
            <text:p>312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38M20S" calcext:value-type="time">
            <text:p>20:38:20</text:p>
          </table:table-cell>
          <table:table-cell office:value-type="float" office:value="313" calcext:value-type="float">
            <text:p>313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39M20S" calcext:value-type="time">
            <text:p>20:39:20</text:p>
          </table:table-cell>
          <table:table-cell office:value-type="float" office:value="314" calcext:value-type="float">
            <text:p>314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40M21S" calcext:value-type="time">
            <text:p>20:40:21</text:p>
          </table:table-cell>
          <table:table-cell office:value-type="float" office:value="337" calcext:value-type="float">
            <text:p>337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41M22S" calcext:value-type="time">
            <text:p>20:41:22</text:p>
          </table:table-cell>
          <table:table-cell office:value-type="float" office:value="285" calcext:value-type="float">
            <text:p>285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42M22S" calcext:value-type="time">
            <text:p>20:42:22</text:p>
          </table:table-cell>
          <table:table-cell office:value-type="float" office:value="340" calcext:value-type="float">
            <text:p>340</text:p>
          </table:table-cell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43M23S" calcext:value-type="time">
            <text:p>20:43:23</text:p>
          </table:table-cell>
          <table:table-cell office:value-type="float" office:value="293" calcext:value-type="float">
            <text:p>293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44M24S" calcext:value-type="time">
            <text:p>20:44:24</text:p>
          </table:table-cell>
          <table:table-cell office:value-type="float" office:value="306" calcext:value-type="float">
            <text:p>306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45M24S" calcext:value-type="time">
            <text:p>20:45:24</text:p>
          </table:table-cell>
          <table:table-cell office:value-type="float" office:value="301" calcext:value-type="float">
            <text:p>301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46M25S" calcext:value-type="time">
            <text:p>20:46:25</text:p>
          </table:table-cell>
          <table:table-cell office:value-type="float" office:value="307" calcext:value-type="float">
            <text:p>307</text:p>
          </table:table-cell>
          <table:table-cell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47M26S" calcext:value-type="time">
            <text:p>20:47:26</text:p>
          </table:table-cell>
          <table:table-cell office:value-type="float" office:value="300" calcext:value-type="float">
            <text:p>300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48M26S" calcext:value-type="time">
            <text:p>20:48:26</text:p>
          </table:table-cell>
          <table:table-cell office:value-type="float" office:value="339" calcext:value-type="float">
            <text:p>339</text:p>
          </table:table-cell>
          <table:table-cell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49M27S" calcext:value-type="time">
            <text:p>20:49:27</text:p>
          </table:table-cell>
          <table:table-cell office:value-type="float" office:value="294" calcext:value-type="float">
            <text:p>294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50M27S" calcext:value-type="time">
            <text:p>20:50:27</text:p>
          </table:table-cell>
          <table:table-cell office:value-type="float" office:value="278" calcext:value-type="float">
            <text:p>278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51M28S" calcext:value-type="time">
            <text:p>20:51:28</text:p>
          </table:table-cell>
          <table:table-cell office:value-type="float" office:value="321" calcext:value-type="float">
            <text:p>321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52M29S" calcext:value-type="time">
            <text:p>20:52:29</text:p>
          </table:table-cell>
          <table:table-cell office:value-type="float" office:value="326" calcext:value-type="float">
            <text:p>326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53M29S" calcext:value-type="time">
            <text:p>20:53:29</text:p>
          </table:table-cell>
          <table:table-cell office:value-type="float" office:value="324" calcext:value-type="float">
            <text:p>324</text:p>
          </table:table-cell>
          <table:table-cell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54M30S" calcext:value-type="time">
            <text:p>20:54:30</text:p>
          </table:table-cell>
          <table:table-cell office:value-type="float" office:value="337" calcext:value-type="float">
            <text:p>337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55M31S" calcext:value-type="time">
            <text:p>20:55:31</text:p>
          </table:table-cell>
          <table:table-cell office:value-type="float" office:value="322" calcext:value-type="float">
            <text:p>322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56M31S" calcext:value-type="time">
            <text:p>20:56:31</text:p>
          </table:table-cell>
          <table:table-cell office:value-type="float" office:value="316" calcext:value-type="float">
            <text:p>316</text:p>
          </table:table-cell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57M32S" calcext:value-type="time">
            <text:p>20:57:32</text:p>
          </table:table-cell>
          <table:table-cell office:value-type="float" office:value="323" calcext:value-type="float">
            <text:p>323</text:p>
          </table:table-cell>
          <table:table-cell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58M33S" calcext:value-type="time">
            <text:p>20:58:33</text:p>
          </table:table-cell>
          <table:table-cell office:value-type="float" office:value="364" calcext:value-type="float">
            <text:p>364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0H59M33S" calcext:value-type="time">
            <text:p>20:59:33</text:p>
          </table:table-cell>
          <table:table-cell office:value-type="float" office:value="345" calcext:value-type="float">
            <text:p>345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00M34S" calcext:value-type="time">
            <text:p>21:00:34</text:p>
          </table:table-cell>
          <table:table-cell office:value-type="float" office:value="329" calcext:value-type="float">
            <text:p>329</text:p>
          </table:table-cell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01M35S" calcext:value-type="time">
            <text:p>21:01:35</text:p>
          </table:table-cell>
          <table:table-cell office:value-type="float" office:value="334" calcext:value-type="float">
            <text:p>334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02M35S" calcext:value-type="time">
            <text:p>21:02:35</text:p>
          </table:table-cell>
          <table:table-cell office:value-type="float" office:value="350" calcext:value-type="float">
            <text:p>350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03M36S" calcext:value-type="time">
            <text:p>21:03:36</text:p>
          </table:table-cell>
          <table:table-cell office:value-type="float" office:value="359" calcext:value-type="float">
            <text:p>359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04M37S" calcext:value-type="time">
            <text:p>21:04:37</text:p>
          </table:table-cell>
          <table:table-cell office:value-type="float" office:value="313" calcext:value-type="float">
            <text:p>313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05M37S" calcext:value-type="time">
            <text:p>21:05:37</text:p>
          </table:table-cell>
          <table:table-cell office:value-type="float" office:value="353" calcext:value-type="float">
            <text:p>353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06M38S" calcext:value-type="time">
            <text:p>21:06:38</text:p>
          </table:table-cell>
          <table:table-cell office:value-type="float" office:value="334" calcext:value-type="float">
            <text:p>334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07M39S" calcext:value-type="time">
            <text:p>21:07:39</text:p>
          </table:table-cell>
          <table:table-cell office:value-type="float" office:value="311" calcext:value-type="float">
            <text:p>311</text:p>
          </table:table-cell>
          <table:table-cell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08M39S" calcext:value-type="time">
            <text:p>21:08:39</text:p>
          </table:table-cell>
          <table:table-cell office:value-type="float" office:value="337" calcext:value-type="float">
            <text:p>337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09M40S" calcext:value-type="time">
            <text:p>21:09:40</text:p>
          </table:table-cell>
          <table:table-cell office:value-type="float" office:value="294" calcext:value-type="float">
            <text:p>294</text:p>
          </table:table-cell>
          <table:table-cell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10M41S" calcext:value-type="time">
            <text:p>21:10:41</text:p>
          </table:table-cell>
          <table:table-cell office:value-type="float" office:value="309" calcext:value-type="float">
            <text:p>309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11M41S" calcext:value-type="time">
            <text:p>21:11:41</text:p>
          </table:table-cell>
          <table:table-cell office:value-type="float" office:value="401" calcext:value-type="float">
            <text:p>401</text:p>
          </table:table-cell>
          <table:table-cell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12M42S" calcext:value-type="time">
            <text:p>21:12:42</text:p>
          </table:table-cell>
          <table:table-cell office:value-type="float" office:value="265" calcext:value-type="float">
            <text:p>265</text:p>
          </table:table-cell>
          <table:table-cell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13M43S" calcext:value-type="time">
            <text:p>21:13:43</text:p>
          </table:table-cell>
          <table:table-cell office:value-type="float" office:value="322" calcext:value-type="float">
            <text:p>322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14M44S" calcext:value-type="time">
            <text:p>21:14:44</text:p>
          </table:table-cell>
          <table:table-cell office:value-type="float" office:value="328" calcext:value-type="float">
            <text:p>328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15M44S" calcext:value-type="time">
            <text:p>21:15:44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16M45S" calcext:value-type="time">
            <text:p>21:16:45</text:p>
          </table:table-cell>
          <table:table-cell office:value-type="float" office:value="280" calcext:value-type="float">
            <text:p>280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17M46S" calcext:value-type="time">
            <text:p>21:17:46</text:p>
          </table:table-cell>
          <table:table-cell office:value-type="float" office:value="364" calcext:value-type="float">
            <text:p>364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18M46S" calcext:value-type="time">
            <text:p>21:18:46</text:p>
          </table:table-cell>
          <table:table-cell office:value-type="float" office:value="340" calcext:value-type="float">
            <text:p>340</text:p>
          </table:table-cell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19M47S" calcext:value-type="time">
            <text:p>21:19:47</text:p>
          </table:table-cell>
          <table:table-cell office:value-type="float" office:value="330" calcext:value-type="float">
            <text:p>330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20M48S" calcext:value-type="time">
            <text:p>21:20:48</text:p>
          </table:table-cell>
          <table:table-cell office:value-type="float" office:value="401" calcext:value-type="float">
            <text:p>401</text:p>
          </table:table-cell>
          <table:table-cell office:value-type="float" office:value="136" calcext:value-type="float">
            <text:p>13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21M48S" calcext:value-type="time">
            <text:p>21:21:48</text:p>
          </table:table-cell>
          <table:table-cell office:value-type="float" office:value="380" calcext:value-type="float">
            <text:p>380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22M49S" calcext:value-type="time">
            <text:p>21:22:49</text:p>
          </table:table-cell>
          <table:table-cell office:value-type="float" office:value="346" calcext:value-type="float">
            <text:p>346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23M50S" calcext:value-type="time">
            <text:p>21:23:50</text:p>
          </table:table-cell>
          <table:table-cell office:value-type="float" office:value="299" calcext:value-type="float">
            <text:p>299</text:p>
          </table:table-cell>
          <table:table-cell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24M51S" calcext:value-type="time">
            <text:p>21:24:51</text:p>
          </table:table-cell>
          <table:table-cell office:value-type="float" office:value="284" calcext:value-type="float">
            <text:p>284</text:p>
          </table:table-cell>
          <table:table-cell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25M51S" calcext:value-type="time">
            <text:p>21:25:51</text:p>
          </table:table-cell>
          <table:table-cell office:value-type="float" office:value="391" calcext:value-type="float">
            <text:p>391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26M52S" calcext:value-type="time">
            <text:p>21:26:52</text:p>
          </table:table-cell>
          <table:table-cell office:value-type="float" office:value="299" calcext:value-type="float">
            <text:p>299</text:p>
          </table:table-cell>
          <table:table-cell office:value-type="float" office:value="152" calcext:value-type="float">
            <text:p>15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27M53S" calcext:value-type="time">
            <text:p>21:27:53</text:p>
          </table:table-cell>
          <table:table-cell office:value-type="float" office:value="294" calcext:value-type="float">
            <text:p>294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28M53S" calcext:value-type="time">
            <text:p>21:28:53</text:p>
          </table:table-cell>
          <table:table-cell office:value-type="float" office:value="297" calcext:value-type="float">
            <text:p>297</text:p>
          </table:table-cell>
          <table:table-cell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29M54S" calcext:value-type="time">
            <text:p>21:29:54</text:p>
          </table:table-cell>
          <table:table-cell office:value-type="float" office:value="319" calcext:value-type="float">
            <text:p>319</text:p>
          </table:table-cell>
          <table:table-cell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30M55S" calcext:value-type="time">
            <text:p>21:30:55</text:p>
          </table:table-cell>
          <table:table-cell office:value-type="float" office:value="378" calcext:value-type="float">
            <text:p>378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31M56S" calcext:value-type="time">
            <text:p>21:31:56</text:p>
          </table:table-cell>
          <table:table-cell office:value-type="float" office:value="347" calcext:value-type="float">
            <text:p>347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32M56S" calcext:value-type="time">
            <text:p>21:32:56</text:p>
          </table:table-cell>
          <table:table-cell office:value-type="float" office:value="339" calcext:value-type="float">
            <text:p>339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33M57S" calcext:value-type="time">
            <text:p>21:33:57</text:p>
          </table:table-cell>
          <table:table-cell office:value-type="float" office:value="329" calcext:value-type="float">
            <text:p>329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34M58S" calcext:value-type="time">
            <text:p>21:34:58</text:p>
          </table:table-cell>
          <table:table-cell office:value-type="float" office:value="288" calcext:value-type="float">
            <text:p>288</text:p>
          </table:table-cell>
          <table:table-cell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35M58S" calcext:value-type="time">
            <text:p>21:35:58</text:p>
          </table:table-cell>
          <table:table-cell office:value-type="float" office:value="341" calcext:value-type="float">
            <text:p>341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36M59S" calcext:value-type="time">
            <text:p>21:36:59</text:p>
          </table:table-cell>
          <table:table-cell office:value-type="float" office:value="402" calcext:value-type="float">
            <text:p>402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38M00S" calcext:value-type="time">
            <text:p>21:38:00</text:p>
          </table:table-cell>
          <table:table-cell office:value-type="float" office:value="387" calcext:value-type="float">
            <text:p>387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39M01S" calcext:value-type="time">
            <text:p>21:39:01</text:p>
          </table:table-cell>
          <table:table-cell office:value-type="float" office:value="409" calcext:value-type="float">
            <text:p>409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40M01S" calcext:value-type="time">
            <text:p>21:40:01</text:p>
          </table:table-cell>
          <table:table-cell office:value-type="float" office:value="403" calcext:value-type="float">
            <text:p>403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41M02S" calcext:value-type="time">
            <text:p>21:41:02</text:p>
          </table:table-cell>
          <table:table-cell office:value-type="float" office:value="317" calcext:value-type="float">
            <text:p>317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42M03S" calcext:value-type="time">
            <text:p>21:42:03</text:p>
          </table:table-cell>
          <table:table-cell office:value-type="float" office:value="332" calcext:value-type="float">
            <text:p>332</text:p>
          </table:table-cell>
          <table:table-cell office:value-type="float" office:value="119" calcext:value-type="float">
            <text:p>11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time" office:time-value="PT21H43M04S" calcext:value-type="time">
            <text:p>21:43:04</text:p>
          </table:table-cell>
          <table:table-cell office:value-type="float" office:value="387" calcext:value-type="float">
            <text:p>387</text:p>
          </table:table-cell>
          <table:table-cell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44M04S" calcext:value-type="time">
            <text:p>21:44:04</text:p>
          </table:table-cell>
          <table:table-cell office:value-type="float" office:value="415" calcext:value-type="float">
            <text:p>415</text:p>
          </table:table-cell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45M05S" calcext:value-type="time">
            <text:p>21:45:05</text:p>
          </table:table-cell>
          <table:table-cell office:value-type="float" office:value="385" calcext:value-type="float">
            <text:p>385</text:p>
          </table:table-cell>
          <table:table-cell office:value-type="float" office:value="128" calcext:value-type="float">
            <text:p>12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time" office:time-value="PT21H46M06S" calcext:value-type="time">
            <text:p>21:46:06</text:p>
          </table:table-cell>
          <table:table-cell office:value-type="float" office:value="326" calcext:value-type="float">
            <text:p>326</text:p>
          </table:table-cell>
          <table:table-cell office:value-type="float" office:value="131" calcext:value-type="float">
            <text:p>13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time" office:time-value="PT21H47M07S" calcext:value-type="time">
            <text:p>21:47:07</text:p>
          </table:table-cell>
          <table:table-cell office:value-type="float" office:value="316" calcext:value-type="float">
            <text:p>316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48M07S" calcext:value-type="time">
            <text:p>21:48:07</text:p>
          </table:table-cell>
          <table:table-cell office:value-type="float" office:value="370" calcext:value-type="float">
            <text:p>37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49M08S" calcext:value-type="time">
            <text:p>21:49:08</text:p>
          </table:table-cell>
          <table:table-cell office:value-type="float" office:value="372" calcext:value-type="float">
            <text:p>372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50M09S" calcext:value-type="time">
            <text:p>21:50:09</text:p>
          </table:table-cell>
          <table:table-cell office:value-type="float" office:value="358" calcext:value-type="float">
            <text:p>358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51M10S" calcext:value-type="time">
            <text:p>21:51:10</text:p>
          </table:table-cell>
          <table:table-cell office:value-type="float" office:value="414" calcext:value-type="float">
            <text:p>414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52M10S" calcext:value-type="time">
            <text:p>21:52:10</text:p>
          </table:table-cell>
          <table:table-cell office:value-type="float" office:value="409" calcext:value-type="float">
            <text:p>409</text:p>
          </table:table-cell>
          <table:table-cell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53M11S" calcext:value-type="time">
            <text:p>21:53:11</text:p>
          </table:table-cell>
          <table:table-cell office:value-type="float" office:value="335" calcext:value-type="float">
            <text:p>335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54M12S" calcext:value-type="time">
            <text:p>21:54:12</text:p>
          </table:table-cell>
          <table:table-cell office:value-type="float" office:value="331" calcext:value-type="float">
            <text:p>331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55M13S" calcext:value-type="time">
            <text:p>21:55:13</text:p>
          </table:table-cell>
          <table:table-cell office:value-type="float" office:value="395" calcext:value-type="float">
            <text:p>395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56M14S" calcext:value-type="time">
            <text:p>21:56:14</text:p>
          </table:table-cell>
          <table:table-cell office:value-type="float" office:value="356" calcext:value-type="float">
            <text:p>356</text:p>
          </table:table-cell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57M14S" calcext:value-type="time">
            <text:p>21:57:14</text:p>
          </table:table-cell>
          <table:table-cell office:value-type="float" office:value="390" calcext:value-type="float">
            <text:p>390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58M15S" calcext:value-type="time">
            <text:p>21:58:15</text:p>
          </table:table-cell>
          <table:table-cell office:value-type="float" office:value="332" calcext:value-type="float">
            <text:p>332</text:p>
          </table:table-cell>
          <table:table-cell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1H59M16S" calcext:value-type="time">
            <text:p>21:59:16</text:p>
          </table:table-cell>
          <table:table-cell office:value-type="float" office:value="363" calcext:value-type="float">
            <text:p>363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00M17S" calcext:value-type="time">
            <text:p>22:00:17</text:p>
          </table:table-cell>
          <table:table-cell office:value-type="float" office:value="359" calcext:value-type="float">
            <text:p>359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01M17S" calcext:value-type="time">
            <text:p>22:01:17</text:p>
          </table:table-cell>
          <table:table-cell office:value-type="float" office:value="376" calcext:value-type="float">
            <text:p>376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02M18S" calcext:value-type="time">
            <text:p>22:02:18</text:p>
          </table:table-cell>
          <table:table-cell office:value-type="float" office:value="381" calcext:value-type="float">
            <text:p>381</text:p>
          </table:table-cell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03M19S" calcext:value-type="time">
            <text:p>22:03:19</text:p>
          </table:table-cell>
          <table:table-cell office:value-type="float" office:value="319" calcext:value-type="float">
            <text:p>319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04M20S" calcext:value-type="time">
            <text:p>22:04:20</text:p>
          </table:table-cell>
          <table:table-cell office:value-type="float" office:value="360" calcext:value-type="float">
            <text:p>360</text:p>
          </table:table-cell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05M21S" calcext:value-type="time">
            <text:p>22:05:21</text:p>
          </table:table-cell>
          <table:table-cell office:value-type="float" office:value="415" calcext:value-type="float">
            <text:p>415</text:p>
          </table:table-cell>
          <table:table-cell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06M21S" calcext:value-type="time">
            <text:p>22:06:21</text:p>
          </table:table-cell>
          <table:table-cell office:value-type="float" office:value="335" calcext:value-type="float">
            <text:p>335</text:p>
          </table:table-cell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07M22S" calcext:value-type="time">
            <text:p>22:07:22</text:p>
          </table:table-cell>
          <table:table-cell office:value-type="float" office:value="372" calcext:value-type="float">
            <text:p>372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08M23S" calcext:value-type="time">
            <text:p>22:08:23</text:p>
          </table:table-cell>
          <table:table-cell office:value-type="float" office:value="390" calcext:value-type="float">
            <text:p>390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09M24S" calcext:value-type="time">
            <text:p>22:09:24</text:p>
          </table:table-cell>
          <table:table-cell office:value-type="float" office:value="394" calcext:value-type="float">
            <text:p>394</text:p>
          </table:table-cell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10M25S" calcext:value-type="time">
            <text:p>22:10:25</text:p>
          </table:table-cell>
          <table:table-cell office:value-type="float" office:value="381" calcext:value-type="float">
            <text:p>381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11M25S" calcext:value-type="time">
            <text:p>22:11:25</text:p>
          </table:table-cell>
          <table:table-cell office:value-type="float" office:value="371" calcext:value-type="float">
            <text:p>371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12M26S" calcext:value-type="time">
            <text:p>22:12:26</text:p>
          </table:table-cell>
          <table:table-cell office:value-type="float" office:value="404" calcext:value-type="float">
            <text:p>404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13M27S" calcext:value-type="time">
            <text:p>22:13:27</text:p>
          </table:table-cell>
          <table:table-cell office:value-type="float" office:value="354" calcext:value-type="float">
            <text:p>354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14M28S" calcext:value-type="time">
            <text:p>22:14:28</text:p>
          </table:table-cell>
          <table:table-cell office:value-type="float" office:value="372" calcext:value-type="float">
            <text:p>372</text:p>
          </table:table-cell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15M29S" calcext:value-type="time">
            <text:p>22:15:29</text:p>
          </table:table-cell>
          <table:table-cell office:value-type="float" office:value="374" calcext:value-type="float">
            <text:p>374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16M29S" calcext:value-type="time">
            <text:p>22:16:29</text:p>
          </table:table-cell>
          <table:table-cell office:value-type="float" office:value="415" calcext:value-type="float">
            <text:p>415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17M30S" calcext:value-type="time">
            <text:p>22:17:30</text:p>
          </table:table-cell>
          <table:table-cell office:value-type="float" office:value="373" calcext:value-type="float">
            <text:p>373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18M31S" calcext:value-type="time">
            <text:p>22:18:31</text:p>
          </table:table-cell>
          <table:table-cell office:value-type="float" office:value="392" calcext:value-type="float">
            <text:p>392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19M32S" calcext:value-type="time">
            <text:p>22:19:32</text:p>
          </table:table-cell>
          <table:table-cell office:value-type="float" office:value="346" calcext:value-type="float">
            <text:p>346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20M33S" calcext:value-type="time">
            <text:p>22:20:33</text:p>
          </table:table-cell>
          <table:table-cell office:value-type="float" office:value="420" calcext:value-type="float">
            <text:p>420</text:p>
          </table:table-cell>
          <table:table-cell office:value-type="float" office:value="138" calcext:value-type="float">
            <text:p>13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21M34S" calcext:value-type="time">
            <text:p>22:21:34</text:p>
          </table:table-cell>
          <table:table-cell office:value-type="float" office:value="338" calcext:value-type="float">
            <text:p>338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22M34S" calcext:value-type="time">
            <text:p>22:22:34</text:p>
          </table:table-cell>
          <table:table-cell office:value-type="float" office:value="373" calcext:value-type="float">
            <text:p>373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23M35S" calcext:value-type="time">
            <text:p>22:23:35</text:p>
          </table:table-cell>
          <table:table-cell office:value-type="float" office:value="403" calcext:value-type="float">
            <text:p>403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24M36S" calcext:value-type="time">
            <text:p>22:24:36</text:p>
          </table:table-cell>
          <table:table-cell office:value-type="float" office:value="385" calcext:value-type="float">
            <text:p>385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25M37S" calcext:value-type="time">
            <text:p>22:25:37</text:p>
          </table:table-cell>
          <table:table-cell office:value-type="float" office:value="375" calcext:value-type="float">
            <text:p>375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26M38S" calcext:value-type="time">
            <text:p>22:26:38</text:p>
          </table:table-cell>
          <table:table-cell office:value-type="float" office:value="466" calcext:value-type="float">
            <text:p>466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27M38S" calcext:value-type="time">
            <text:p>22:27:38</text:p>
          </table:table-cell>
          <table:table-cell office:value-type="float" office:value="447" calcext:value-type="float">
            <text:p>447</text:p>
          </table:table-cell>
          <table:table-cell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28M39S" calcext:value-type="time">
            <text:p>22:28:39</text:p>
          </table:table-cell>
          <table:table-cell office:value-type="float" office:value="440" calcext:value-type="float">
            <text:p>440</text:p>
          </table:table-cell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29M40S" calcext:value-type="time">
            <text:p>22:29:40</text:p>
          </table:table-cell>
          <table:table-cell office:value-type="float" office:value="396" calcext:value-type="float">
            <text:p>396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30M41S" calcext:value-type="time">
            <text:p>22:30:41</text:p>
          </table:table-cell>
          <table:table-cell office:value-type="float" office:value="384" calcext:value-type="float">
            <text:p>384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31M42S" calcext:value-type="time">
            <text:p>22:31:42</text:p>
          </table:table-cell>
          <table:table-cell office:value-type="float" office:value="437" calcext:value-type="float">
            <text:p>437</text:p>
          </table:table-cell>
          <table:table-cell office:value-type="float" office:value="127" calcext:value-type="float">
            <text:p>12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32M43S" calcext:value-type="time">
            <text:p>22:32:43</text:p>
          </table:table-cell>
          <table:table-cell office:value-type="float" office:value="376" calcext:value-type="float">
            <text:p>376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33M44S" calcext:value-type="time">
            <text:p>22:33:44</text:p>
          </table:table-cell>
          <table:table-cell office:value-type="float" office:value="473" calcext:value-type="float">
            <text:p>473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34M44S" calcext:value-type="time">
            <text:p>22:34:44</text:p>
          </table:table-cell>
          <table:table-cell office:value-type="float" office:value="409" calcext:value-type="float">
            <text:p>409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35M45S" calcext:value-type="time">
            <text:p>22:35:45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36M46S" calcext:value-type="time">
            <text:p>22:36:46</text:p>
          </table:table-cell>
          <table:table-cell office:value-type="float" office:value="415" calcext:value-type="float">
            <text:p>415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37M47S" calcext:value-type="time">
            <text:p>22:37:47</text:p>
          </table:table-cell>
          <table:table-cell office:value-type="float" office:value="425" calcext:value-type="float">
            <text:p>425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38M48S" calcext:value-type="time">
            <text:p>22:38:48</text:p>
          </table:table-cell>
          <table:table-cell office:value-type="float" office:value="412" calcext:value-type="float">
            <text:p>412</text:p>
          </table:table-cell>
          <table:table-cell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39M49S" calcext:value-type="time">
            <text:p>22:39:49</text:p>
          </table:table-cell>
          <table:table-cell office:value-type="float" office:value="503" calcext:value-type="float">
            <text:p>503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40M49S" calcext:value-type="time">
            <text:p>22:40:49</text:p>
          </table:table-cell>
          <table:table-cell office:value-type="float" office:value="451" calcext:value-type="float">
            <text:p>451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41M50S" calcext:value-type="time">
            <text:p>22:41:50</text:p>
          </table:table-cell>
          <table:table-cell office:value-type="float" office:value="437" calcext:value-type="float">
            <text:p>437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42M51S" calcext:value-type="time">
            <text:p>22:42:51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43M52S" calcext:value-type="time">
            <text:p>22:43:52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44M53S" calcext:value-type="time">
            <text:p>22:44:53</text:p>
          </table:table-cell>
          <table:table-cell office:value-type="float" office:value="218" calcext:value-type="float">
            <text:p>218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style-name="ce5" office:value-type="time" office:time-value="PT22H45M54S" calcext:value-type="time">
            <text:p>22:45:54</text:p>
          </table:table-cell>
          <table:table-cell office:value-type="float" office:value="233" calcext:value-type="float">
            <text:p>233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0:31:27.928048442</meta:creation-date>
    <dc:date>2022-11-04T15:23:54.913181785</dc:date>
    <meta:editing-duration>PT3H7M45S</meta:editing-duration>
    <meta:editing-cycles>3</meta:editing-cycles>
    <meta:generator>LibreOffice/7.3.6.2$Linux_X86_64 LibreOffice_project/30$Build-2</meta:generator>
    <meta:document-statistic meta:table-count="2" meta:cell-count="3581" meta:object-count="0"/>
  </office:meta>
</office:document-meta>
</file>