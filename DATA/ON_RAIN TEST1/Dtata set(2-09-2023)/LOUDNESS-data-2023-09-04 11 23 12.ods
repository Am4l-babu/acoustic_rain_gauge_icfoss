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OUDNESS-data-2023-09-04 11 23 12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_frmpayload_data_loudness</text:p>
          </table:table-cell>
        </table:table-row>
        <table:table-row table:style-name="ro1">
          <table:table-cell office:value-type="string" calcext:value-type="string">
            <text:p>2023-09-02 16:39: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6:39: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6:39: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6:40: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6:40: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6:40: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6:40:4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16:42: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6:43: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6:43: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6:43: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6:43: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6:44: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6:44: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6:44: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6:44: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6:44: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6:45: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16:45: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45: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6:45:4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6:45:5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6:46: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47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6:47: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6:47: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6:47: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6:48: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6:48: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6:48: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6:48:5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6:49: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6:49: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49: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6:49: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6:49: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6:50: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6:50: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6:50: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50: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6:51: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6:51: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6:52: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6:52: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6:52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6:53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53: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6:53: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6:53: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6:54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6:54: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6:54: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6:54: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6:54: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16:55: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6:55: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6:55: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6:55: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6:56: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6:56: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6:56:2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16:56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6:57: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6:57: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6:58: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6:58:2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2 16:58: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2 16:58:4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6:58: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2 16:59: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6:59: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6:59: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6:59: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00: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7:00: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7:00: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7:00: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7:01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7:01: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7:01: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17:01: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7:02: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02: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03: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7:03: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2 17:03: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7:03: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04: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7:04: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7:04: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7:04: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04: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7:05: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05: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05: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7:05:5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7:06: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06: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06: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7:06: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07: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07: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08: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08: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7:08: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7:08: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17:09: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7:09: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7:09: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10: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7:10: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7:10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7:10: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17:10: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11: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7:11: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11: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7:11: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12: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12: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7:12: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7:13: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13: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14: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7:14: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14:2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7:14: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14: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15: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15: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7:15: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16: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7:16: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7:16: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7:16:3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16: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7:17: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7:17: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7:18: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7:18: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7:18: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17:19: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19: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19: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17:19: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7:19: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17:20: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7:20:2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17:20:4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17:20: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7:21: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7:21: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7:21: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21: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17:22: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7:22: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22: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17:23: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7:23: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7:23: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24: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7:24: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24: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7:25: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7:25: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7:25: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25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7:26: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7:26:1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17:26: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7:26: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26: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27: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27: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27: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27: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2 17:28: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28: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7:29: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29: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7:29: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7:29: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30: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30: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7:30: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30: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7:31: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31:2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17:31: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31: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7:32: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17:32: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17:32:3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32: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7:33: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7:33: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34: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7:34: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7:34: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34: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17:35: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35: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35: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2 17:35: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36: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36: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7:36: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17:36: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37: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17:37: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7:37: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7:37: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7:37: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38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38: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39: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39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39: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39:5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7:40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40: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7:40: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40: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7:41: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7:41: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7:41: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41: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1: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7:42: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7:42: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17:42: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2: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43: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7:43: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7:43: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44: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44:4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2 17:44: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45: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2 17:45: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45: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7:45: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7:46: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46: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7:46: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46: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7: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47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7: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7:4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47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7:48: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48: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7:49: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7:49: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7:50: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7:50: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7:50: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50: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7:51: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7:51: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7:51: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51: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7:51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7:52: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7:52: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7:52: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7:52: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2 17:53:0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7:53: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7:53: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7:53: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2 17:54:2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2 17:54: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2 17:55: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7:55: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55: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17:55: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7:56: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56: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7:56: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7:56: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17:57: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57: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7:57: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7:57:5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17:58: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7:58: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7:58: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17:58: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7:58: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17:59: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8:00: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00: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00: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18:00: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8:01: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18:01: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8:01: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8:01: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8:02: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8:02: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8:02: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8:02: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8:02: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03: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8:03: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8:03: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03: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8:04: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8:04: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8:04: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8:05: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05: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06: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06: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8:06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06: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07: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07: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8:07: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8:07: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8:07: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8:08: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8:08: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8:08: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18:08: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8:09: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8:09: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18:09: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8:09: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10: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8:10: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10: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11: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8:11: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8:11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8:12: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12: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8:12: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8:12: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18:12: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8:13: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8:13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13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13: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14: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8:14: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14: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8:14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15: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8:15:4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8:15: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8:16: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8:16:4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8:16:5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2 18:17: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18:17: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17: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18:17: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18: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8:18: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18: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18:18: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19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18:19: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19: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19: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20: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20: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20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8:20: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8:21: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8:21: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8:21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8:22: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22: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22: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8:22: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23: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8:23: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18:23: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8:23: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18:23: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24: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18:24: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24:4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24: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25: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8:25:4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8:25: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8:26: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8:26: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27: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8:27: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18:27: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8:27:4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18:27: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8:28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28: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28: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8:28: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28: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8:29: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8:29: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29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30: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30: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30: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8:31: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8:31: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31: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32: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8:32: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32: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8:32: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33: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18:33: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8:33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8:33: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8:33: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8:34:0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2 18:34: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34: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8:34: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18:35: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35: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8:35: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8:36: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8:36: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8:37: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8:37: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37: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18:37:5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8:38: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8:38: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38: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8:38: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8:38: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8:39: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18:39:1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18:39: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39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40: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40: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8:40: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18:40: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18:41: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8:41:3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8:42:2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18:42: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8:42: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42: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2 18:43: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8:43: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43: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8:43: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18:43: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18:44: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18:44: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2 18:44: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8:45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8:45: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8:45: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45: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8:45: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8:46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8:46:4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8:46: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8:47: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8:47:5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18:48: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18:48: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8:48: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8:48: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8:49: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8:49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49: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2 18:49:4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18:49: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8:50: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8:50: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50: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50: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8:51: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2 18:51: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8:51:5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8:52: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8:52: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8:53: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18:53: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8:53:3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2 18:53: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54: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18:54: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54: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8:54: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18:55: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18:55: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2 18:55: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8:55: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2 18:55: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18:56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8:56: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8:56:2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8:57: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8:57: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57: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58: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58: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8:58: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58:5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8:59: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8:59: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8:59: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18:59: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9:00: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19:00: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00: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00: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9:00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01: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9:01: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01: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01:4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02: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02: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02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03: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9:03:4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04: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04: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19:04: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04: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04:5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05: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05: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05: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05: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9:05: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06: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06: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06:4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06: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07: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07: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07: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08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08: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9:09: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09: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09: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09: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10: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9:10: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10: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10:4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10: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11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11: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11: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11: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12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12: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12: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13: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13: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13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14: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14: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14: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15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15: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15: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15: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15: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16: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16: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16: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16: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17: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9:17: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17: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17:4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18: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18: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19:18:5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19:19: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19:4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19:19: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19:20: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20: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20: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21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21: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21: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21: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22: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9:22: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22: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9:22: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23: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23: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23: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24: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24: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24: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25: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25: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25: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26: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9:26: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9:26: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26: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9:27: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27: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19:27: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27: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19:28: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28: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28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9:28: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29: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29: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30: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30: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31: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9:31: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31: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32: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32: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32: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32: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9:32: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33: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9:33: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33: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9:33: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34: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34: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19:34: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34: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35: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9:35: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35: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19:35: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9:36: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9:36: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36: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37: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9:37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9:37: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38: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38: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38: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9:38: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38: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39: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9:39: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39: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19:39: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40: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40: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40: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19:40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9:40: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41: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9:41: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19:41: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19:42: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43: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43: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9:43: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43: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44: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44: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9:44: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44:3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19:45: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19:45: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9:45: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45: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9:45: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46: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46: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19:46: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47: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9:47: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19:47: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48: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48: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48: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9:49: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49: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49: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19:49: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49: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50: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9:50: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50: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9:50: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9:51: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51: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51: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51: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52: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52: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52: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53:3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19:53: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53:5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9:54: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54: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54: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9:55: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19:55: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55: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19:55: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9:56: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19:56: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57: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57: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9:58: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19:58: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19:58: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19:58: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19:59: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19:59: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59: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2 20:00: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00: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00: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00: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00: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01: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0:01: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01: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01: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01: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0:02: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02: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02: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02:4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2 20:02: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03: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03:2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2 20:03:4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2 20:03:5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0:04: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04: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04: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05: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05: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05: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06: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06: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0:06: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06: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07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07: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07: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07: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08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08: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08: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08: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08: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09: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09: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09: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09: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0:09: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10: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10: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10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10: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0:10: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11: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11: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0:11: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11: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0:11: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12: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12: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0:12: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0:12: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12: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13: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13: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13: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13: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13: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14: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14: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14: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14: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14: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0:15: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15: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15: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15: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15: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16: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0:16: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16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16: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17: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17: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17: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17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17: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18: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18: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0:18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18: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18: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19: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19:5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0:19: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0:20: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20:5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21: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21: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21: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21: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22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22: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22: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22: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23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23: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0:23: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0:23: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23: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24: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24: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24: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24: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25: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25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25:2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25: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25: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26: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26: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26: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26: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26: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27: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27: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27: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27: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27: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28: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28: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28: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28: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28: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29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29: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0:29: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29: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29: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30: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30: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30: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30: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30: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0:31: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31: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0:31: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0:31: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31: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32: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32: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0:32: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0:32: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32: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33: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33:2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0:33: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0:33: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33:5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34: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34: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34: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34:4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34: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35: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35: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35: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0:35: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35: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36: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0:36: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36: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0:36: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36: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37: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37: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37: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38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38: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38: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0:38: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38: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39: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39: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0:39: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39: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4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40: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40: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41: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41: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41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42: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42: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42: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42: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0:42:5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43: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43: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43: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43:5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44: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44: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44: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44: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44: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0:45: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45: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46: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46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46:4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47: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47: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47: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0:47: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47: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48: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0:48: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48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0:49: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0:49: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49: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0:49: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0:49: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0:50:0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0:50: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50: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50: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51: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0:51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52: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52: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52: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52: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52: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53: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53: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53: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53: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53: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54: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54: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54: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54: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54: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55: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0:55: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0:55: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55:5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56: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56: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57: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57: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58: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0:58: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0:58: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58: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58: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59: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0:59: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59: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59: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00: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00: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00: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00: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00: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01: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01: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1:01: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02: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02: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1:02: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1:03: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03: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04: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1:04: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04: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04: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04: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05: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05: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1:05: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05: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06: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06: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1:06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06: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1:07: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1:07: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07: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08: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08: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08: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1:09: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09: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09: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09: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09: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10: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10: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10: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10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10: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1:11: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11: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11: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11: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12: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12: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13: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13: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13: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14: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14: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14: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14: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14: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15: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15: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15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15: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15: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16: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16: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1:16: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16: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17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17: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17: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1:17: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18: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18: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18: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19: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19: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19: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19: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20: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20: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20: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20: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20: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21: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21: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21: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21: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21: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22: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22: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22: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22: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22: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23: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23: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23: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23: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23: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24: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24: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24: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24: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24: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25: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25: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25: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1:25:4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25: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1:26: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26: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1:26: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26: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27: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27: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28: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28: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28: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29: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29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29:2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2 21:29: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29: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30: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30: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30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30: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30:5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1:31: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31: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31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31: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31:5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32: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1:32:1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32: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32: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32: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1:33: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33: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33: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33: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33: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34: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34: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1:34: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34: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34: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35: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1:35: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35: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35:4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35: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36: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36: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36: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36:4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1:36: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1:37:0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37: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37: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37: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37: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38: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38: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38: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38: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38:5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1:39: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39: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39: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2 21:39: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39: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40: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40: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40: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40: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40:5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41: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1:41: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41: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41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41: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42: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42: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42: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43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43: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43: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43: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43:4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44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44: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44: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44: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44:4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45: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1:45: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45: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45: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1:45: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46: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46: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46: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46: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46: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1:47: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47: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47: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47: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47: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48: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48: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48: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1:48: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1:48: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49: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49: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49: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49: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50: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50: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50: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1:50: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50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51: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51: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1:51: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51: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51: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52: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52: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52: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52:4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52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53: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53: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53: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53: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53:5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54: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1:54: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1:54: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54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54: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55: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55: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55: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55: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55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56: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56: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1:56: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56: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1:56: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57: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57: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57: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57: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57: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58: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1:58: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1:58: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58: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1:58: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59: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59: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59: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59: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59: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00: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00: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00: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2:00: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22:00: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01: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01: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22:01: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01: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01: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02: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02: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02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02: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02: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03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03: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03: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2:03: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03: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04: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04: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04: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04: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2:04: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2:05: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05: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05: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2:05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2:05: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06: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06: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06: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2:06: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06: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07: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07: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07: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07: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08: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2 22:08: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22:08:2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2:08: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08: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2:09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2:09: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09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09: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09: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10: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10: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10: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10: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10: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11: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2:11: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11: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11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1: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12: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12: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2: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12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2: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13: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2:13: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13:2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2:13: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3: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14: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14: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4: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14: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14: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15: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15: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15: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5: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2:16: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16:5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6: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7: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2:17: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18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2:18: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18: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8: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18: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19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2:19: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19: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19: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20: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20: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20: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20:4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20: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21: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21: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21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22: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2:22:5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23: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23: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2:23: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23: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23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2:24: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24: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2:24: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25: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25: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25: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25: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2:25:5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26: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26: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2:26: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26: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27: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2:27: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28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28: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28: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2:28: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28: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29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2:29: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29: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2:29: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29: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30: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30: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30: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30: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30:4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31: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31: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31: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31: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31:4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32: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32: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32: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32: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32: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33: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33: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33: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33: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33: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34: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34: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2:34:2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2:34: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34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35:0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2:35: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35: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2:35: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35: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36: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2:36: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36: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36: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36: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2:37: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37: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2:37: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37: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2:38:0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2:38: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38: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38: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2:38: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2:39: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39: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39: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40: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40: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2:40: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41: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2:41: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41: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41: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41: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2:42: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42: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42: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2:42: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2:43: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2:43: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43: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43: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44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2:44: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44: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44: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2:44: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45: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45: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2:45: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45: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45: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46: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2:46: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2:46: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46: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46: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2:47: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47: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47: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47: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47: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48: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48: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48: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2:48: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2:48: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49: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49: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2:49:2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2:49: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49: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50: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2:50: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50: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50: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50: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51: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51: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51: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51: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51: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52: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52: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52: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52: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2:52: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53:0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53: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2:53: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53: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53: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54: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54: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54:2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54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54:5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2:55: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2:55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55: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55: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55: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2:56: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56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56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56:5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57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57: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57: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57: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57: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58: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58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2:58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2:58: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58: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59: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59: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59: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59:4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2:59:5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00: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3:00: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00: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3:00: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00: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3:01: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3:01: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01: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23:01: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01: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02:0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2 23:02: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02: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3:02: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3:02: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3:03: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03: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03: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3:03: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3:03: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3:04: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04: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04: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3:04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04: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05: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05: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3:05: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3:05: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3:06: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3:06: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06: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3:06:4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06: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3:07: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07: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07: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07: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3:08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08: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08: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08: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08: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09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09: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09: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09: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3:09: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10: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10: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2 23:10: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3:10:4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3:11: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3:11: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3:11: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3:11: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3:11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12: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12: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3:12: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2 23:12: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12: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3:13: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3:13: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3:13: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3:14: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3:14: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14: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3:15: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15: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15: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15: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16: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16: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16: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16: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16: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17:0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3:17: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17:4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2 23:17:5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18: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18: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18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19:2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3:19: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19: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3:20: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3:20: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20: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20: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3:20: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21: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3:21: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3:21: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21: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21: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3:22: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22: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22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23: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23: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23: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24: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3:24: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3:24: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24: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25: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25: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25: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3:25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25: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26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26: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26: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3:26: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26: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27: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27: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27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27: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3:28: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3:28: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28: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28: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29: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29: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3:29: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29: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3:29: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3:3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30: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3:30: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3:30: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30: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31: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31: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3:31: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3:31: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31: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3:32: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3:32: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3:32: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32: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3:32: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33: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3:33: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3:33: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3:33: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3:33: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34: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34: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34: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34: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3:34: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3:35: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35: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35: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35: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35: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3:36: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36: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3:36: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3:36: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36: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3:37: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37: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37: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37: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3:37: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3:38: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3:38: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38: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38: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3:39: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39: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23:39: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3:39: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3:39:5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3:40: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3:40: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2 23:40: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40:4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40: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3:41: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41:1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3:41: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41: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3:41: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3:42: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42: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42: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3:42: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42: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3:43: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3:43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43: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43:4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44: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3:44: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44: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3:44:4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3:44: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3:45: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3:45: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3:45: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3:45: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46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46: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47: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47: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47: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3:47: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3:48: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48: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2 23:48:2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3:48: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49: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3:49: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49: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3:49: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3:49: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3:50: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50: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50: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3:50: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3:50:5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51: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51: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51: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3:51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51: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3:52: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3:52: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3:52: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3:52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52: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3:53: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3:53: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53: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53: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53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3:54: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54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54: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54: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54: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55: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3:55: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55:2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3:55: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55: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56: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3:56: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3:56: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56: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57: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57:5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57:5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3:58: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58: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59: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3:59: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3:59:3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59: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0:00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0:00: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00: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0:00: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0:01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01: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0:01: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0:01: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0:01: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02: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0:02: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0:02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0:02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0:03: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0:03: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03: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0:04:0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04:1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0:04: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0:04: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0:04: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0:05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05: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0:05: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0:05:4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0:05: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0:06: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0:06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0:06: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0:06: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0:07: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0:07: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0:07: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07: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0:07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08: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08: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08: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08: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08:5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0:09: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0:09: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0:09: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0:09: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0:10: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10: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11: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0:11:2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0:11: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11: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0:12: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12: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0:12: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0:12: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0:12: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13: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0:13: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0:13: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0:13: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0:13: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14: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14: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14:2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0:14: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14: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15: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0:15: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15: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15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15: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16: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0:16: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0:16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0:16: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0:17: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17: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0:17: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17: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17:5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0:18: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0:18: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18: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0:18: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0:18: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0:19: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19:1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0:19: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19: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19: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20: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0:20: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20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20: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0:20: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0:21: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21: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0:21: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21: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0:21: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22: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22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0:22: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0:22: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0:22:5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0:23:0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23: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0:23: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23: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23: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24: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24: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24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24: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24: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25: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0:25: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25: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25:4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0:25:5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0:26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26: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0:26: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26: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0:26: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0:27: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0:27: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27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0:27:5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0:28: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0:28: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28: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28:4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0:28:5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0:29: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0:29:2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0:29: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29: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3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30: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30: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0:30: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0:30: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31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31: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0:31: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0:31: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0:31: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32: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0:32: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0:32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32:3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32:4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0:33: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0:33: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0:33: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0:33: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33:4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34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34: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0:34: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0:34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0:34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35: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35: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35: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0:35: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35:5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0:36: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0:36: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36: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0:36: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36: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37: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0:37: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37: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37: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0:37:5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0:38: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38: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0:38: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0:38: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0:38: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0:39: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0:39: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0:39: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39:5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40: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40: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40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0:40: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0:40: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41:0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41: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41: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41: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0:41:5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0:42: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0:42: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42: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0:42: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42:5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43: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43: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0:43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43: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43: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0:44: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44: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44: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44: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44:5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0:45: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0:45: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0:45: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0:45:4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0:45: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46: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0:46: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46: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0:46: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46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47: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0:47: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0:47: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0:47: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47: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0:48: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0:48: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48: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48: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0:48: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0:49: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49: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0:49: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49: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0:49:5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0:50: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0:50: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50: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0:50: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0:50: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0:51: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0:51: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51: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51: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0:51: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0:52: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0:52:2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0:52: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52: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0:52: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0:53: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0:53: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0:53: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0:53: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53:5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54: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0:54: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0:54: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0:54:4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0:55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0:55: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0:55: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0:55: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0:55: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56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0:56: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0:56: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0:56:3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0:56: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0:57: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0:57: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0:57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0:57: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0:57: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0:58: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0:58: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58: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0:58: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0:58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0:59: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0:59: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0:59: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0:59:3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0:59: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00: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00: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1:00: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00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1:00: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01: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1:01: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1:01:2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1:01: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1:01:5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02: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02: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02: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02: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1:02: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03: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1:03: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03: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1:03: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1:03: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1:04: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1:04: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04: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1:04: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04: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05: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1:05: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05:2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1:05: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05: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06: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06: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06: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06: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1:06: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1:07: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07: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07: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1:07: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07: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1:08: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08: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1:08: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1:08: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1:08: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1:09: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1:09: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1:09: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09: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09: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1:10: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1:10: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1:10: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1:10: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1:10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11: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11: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1:11: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1:11:4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1:11: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1:12: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1:12: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1:12: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12: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1:12: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1:13:0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1:13: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1:13:3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1:13:4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13: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1:14: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1:14: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1:14: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14: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1:14:5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1:15: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1:15: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1:15: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1:15: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15: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1:16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1:16: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16: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16: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1:16: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17: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17:2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1:17: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17: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1:17:5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18: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18: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1:18: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1:18:4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1:18: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19: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19: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1:19: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1:19: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20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1:20: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1:20: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1:20: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1:20:4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1:21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1:21: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1:21: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21: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1:21: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1:22: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22: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22: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1:22: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1:22: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1:23: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1:23: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1:23: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1:23: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23: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1:24: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1:24: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1:24: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1:24: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1:24: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25: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1:25: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25:2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1:25: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1:25: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26: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26: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1:26: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26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1:26:5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27: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1:27: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27: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27:4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1:27: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28: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1:28: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28: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28: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1:28: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29: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1:29: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1:29: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29: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29:5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30: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30: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30: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1:30: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1:30: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1:31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31: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1:31: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1:31: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32: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32:1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1:32: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1:32: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1:32: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1:33: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1:33: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33: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34: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1:34:4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35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35: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1:35: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1:35: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35: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1:36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36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36: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36: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1:36: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37: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37: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37: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1:37: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1:37: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1:38: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1:38: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1:38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38: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1:38: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1:39: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1:39: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1:39: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39: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39: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40: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40: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1:40: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40: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40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1:41: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41: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3 01:41: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1:41: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1:41: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1:42: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3 01:42: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42: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42: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42: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43: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1:43: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1:43: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1:43: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1:43: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1:44: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44:1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1:44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44: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44: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45: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1:45: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1:45: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45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45: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1:46: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46: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1:46: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46: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1:46: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47: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1:47: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1:47: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47: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47:5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1:48: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1:48: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1:48: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1:48: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48: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1:49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49: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1:49: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49: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1:50:0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1:50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50: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1:50: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1:50:5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1:51: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51: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1:51: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51: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51: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1:52: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52: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1:52: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1:52: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1:52: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53: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1:53: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53: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53: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1:53:5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1:54: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54: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54: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1:54: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1:54: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1:55: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55: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55: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55: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1:55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56: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56: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56: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56: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1:56: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1:57: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1:57: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1:57: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57: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1:57: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1:58: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1:58: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58: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1:58: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1:58:5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1:59: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1:59: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1:59: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1:59: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00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00: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00: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00: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00: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01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2:01: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01: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01: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2:01: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02: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2:02: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2:02: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02: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02: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2:03: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03: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03: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2:03: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03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2:04: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04: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04: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04: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04: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05: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05: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05: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05: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2:05: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06: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06: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06: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06: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06: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07: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07: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07: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07: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07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08: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08: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2:08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08: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08: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2:09: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2:09: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09: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2:09: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09: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10: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10: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10: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2:10: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10: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11: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11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11: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11: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2:11: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12: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2:12: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12: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12: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13: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13: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13: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13: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2:13: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14: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14: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14: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14: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14: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15: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15: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15: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15: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15: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16: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16: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16: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16: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2:16: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2:17: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3 02:17: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17: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2:17: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2:17: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18: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18: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18: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18: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18:5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2:19: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19: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19: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19: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2:19: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20: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20: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20: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2:20: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20: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21: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21: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21: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21: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21: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2:22: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22: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22: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22: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2:23: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23: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2:23: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23: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23: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2:24: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24: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24: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24: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25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25: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25: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25: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25: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26: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26: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26: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26: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26: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27: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27: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27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27: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27:4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28: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28: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28: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2:28: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2:28: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2:29: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29: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29: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29: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29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30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30: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30: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30: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31: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1: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31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31: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1: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32: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32: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32: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32: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32:5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2:33: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3: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2:33: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33: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3 02:33: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4: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2:34: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34: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4: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34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35: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5: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35: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35: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36: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2:36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36: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2:36:4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3 02:36: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37: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37: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37: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37: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38: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8: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39: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39: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39: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39: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2:39: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40: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40: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40: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40: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2:41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41: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41: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2:41: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2:41: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42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42: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42: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42: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2:42: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43: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2:43: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43: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2:43: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43: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44: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2:44: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44: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44: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44:4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2:45: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2:45: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45: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45: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45: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2:46: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2:46: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46: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46:3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46: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47: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47: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2:47: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47: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47: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2:48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2:48: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2:48: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48: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48: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49: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2:49: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49: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49: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2:49: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50: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50: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2:50: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3 02:50: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50: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51: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2:51: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51: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2:51: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2:51: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52: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2:52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52: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52: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2:52: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2:53: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53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53: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2:53: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2:53: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54: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54: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54: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54: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54: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2:55: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2:55: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2:55: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2:55: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55: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2:56: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2:56: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2:56: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56: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2:57: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2:57: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57: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2:57: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2:57: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58: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2:58: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2:58: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58: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58: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59: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2:59: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2:59: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2:59: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2:59: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00: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00: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00: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00: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00: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01: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01: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01: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3 03:01: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01: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02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02: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02:4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3:02: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03: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03: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03: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03: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03: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04: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04: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04: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3:04: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04: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3:05: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3:05: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05: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05: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05: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06: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06: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06: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06: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07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07: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07: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07: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3:07: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08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08: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08: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3:08: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08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09: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09: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09: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09: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09: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10: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10: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10: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10: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10: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11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11: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11: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11: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11: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12: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12: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3:12:2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3:12: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12: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13: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3:13: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13: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13: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13: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14: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14: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3:14: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14: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14: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15: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15: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3:15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15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3:15: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16: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16: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16: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16: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16: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17: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17: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17: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3:17: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3:18: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3:18: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18: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18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18: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19: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19: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19: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19: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19: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3:20: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3:20: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3:20: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20: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20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21: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3:21: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21: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21: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3:21: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22: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22: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22: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22: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23: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23: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23: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23: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23: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24: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24: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24: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24: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24: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25: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25: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25: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25: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25: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26: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26: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26: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26: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26: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27: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27: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3:27: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27: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27: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28: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28: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28: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28: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3:28: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29: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29: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29: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29: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29: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30: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30: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30: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30: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30:5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31: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31: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31: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31: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31: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32: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32: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32: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32: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33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33: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3:33: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3:33: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33: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34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34: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3:34: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34: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34: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3:35: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35: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35: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35: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3:35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36: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36: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36: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36: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36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37: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3 03:37: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3:37: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37: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37: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38: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3:38: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38: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38: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3:38: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39: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39: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39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39: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39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40: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40: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40: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40: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40:5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41: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41: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41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41: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41: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42: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3:42: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42: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42: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3:43: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43: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3:43: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43: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43: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44: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44: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44: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44: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3:44: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45: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45: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3:45: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45: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45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46: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46: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46:3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46: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46: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3:47: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47: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47: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3:47: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3:47: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48: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48: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48: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48: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48: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49: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3:49: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49: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3:49: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49: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3:50: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50: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3:50: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3:50: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50: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3:51: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3:51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3:51: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51: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51: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3:52: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52: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3:52: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52: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3:52: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53: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3:53: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53: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53: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53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54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3:54: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3:54: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3:54: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3:54: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55: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3:55: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3:55: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55: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3:55: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3:56: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3:56: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3:56: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3:56: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56: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57: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3:57: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3:57: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3:58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3:58: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3:58: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58: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3:58: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3:59: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3:59: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3:59: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3:59:3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3:59: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4:00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00: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00: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4:00: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0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01: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1: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01: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01: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4:01:4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4:02: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2: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4:02: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02: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02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03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03: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3: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03: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03: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04: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04: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04: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04: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04:5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05: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05: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05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05: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4:05: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4:06: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06: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06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06: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6: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07: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07: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07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07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07: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08: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08: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08: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3 04:08: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08: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09: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09: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09: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09: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09: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4:10: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4:10: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10: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4:10: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10: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4:11: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11: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11: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11: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4:11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12: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12: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12: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12: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13: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13: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13: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13: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13: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14: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14: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14: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4:14: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14: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15: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15: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15: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15: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4:15: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4:16: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16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4:16: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16: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16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4:17: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17: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17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17: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17: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18: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18: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18: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18: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18: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4:19: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19: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19: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19: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19: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20: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20: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20: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20: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20: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21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21: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4:21: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21: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21: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22: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22: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22: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22: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22: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23: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23: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23: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23: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4:24: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24: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24: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24: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24: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25: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25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25:2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25: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25: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26: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26: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26: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26: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26: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27: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27: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27: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27: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27: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28: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28: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28: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28: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4:28: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29: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29: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29: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29: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29: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4:30: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30: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30: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30: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31: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31: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31: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31:3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31: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32: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32: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32: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32: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33: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4:33: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33: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34: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34: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34: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34: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35: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35: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35: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35: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35: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36: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36: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36: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36: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36: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37: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37: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4:37: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37: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38: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4:38: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38: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38: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38: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39: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39: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4:39: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39: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39: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4:40: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4:40: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40: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40: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41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4:41: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41: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41: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41: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42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42: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42: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42: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42: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4:43: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43: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43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4:43: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43: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44: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4:44: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44: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44: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44: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5: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45: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5: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4:45: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45: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6: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4:46: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4:46: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6: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6: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47: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47: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4:47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47:3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47: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48: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4:48: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48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48: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48: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49: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49: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49: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4:49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49: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50: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50: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50: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50: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50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4:51: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51: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51: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51: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51: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52: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4:52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52: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4:52: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4:53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4:53: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4:54: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4:54: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4:54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55: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55: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4:55: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55: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55: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56: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4:56: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56: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4:56: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4:56: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57: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4:57: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4:57: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4:57: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57: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58: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4:58: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4:58: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4:58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4:58: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4:59: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4:59: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4:59: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4:59: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00: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00: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00: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01: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01: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5:01: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02: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02: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02: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02: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03: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03: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5:03: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03: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03: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04: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04: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5:04: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04: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05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05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05: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05: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05: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5:06: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06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06: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06: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06: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07: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07: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5:07: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07: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07:4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08: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08: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08: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08: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08: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09: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5:09: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5:09: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09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5:09: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10: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10: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10: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10: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10: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11: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5:11: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11: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11: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11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12: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12: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12: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12: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12: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13: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13: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13: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5:13: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14: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14: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14: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14: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14: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15: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15: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15: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15: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15: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16: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16: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16: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16: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16: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17: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17: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17: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17:4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17: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18: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18: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18: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18: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18: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19: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19: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19: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5:19: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20: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20: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20: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20: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20: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21: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21: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21: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21: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21: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5:22: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22: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22: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22: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22: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23: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23: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23: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23: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23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24: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24: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24: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24: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24: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25: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5:25: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25: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25: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26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26: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26: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5:26: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26: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27: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27: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27: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27: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27: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28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28: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28: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28: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28: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29: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29: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29: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29: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29: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30: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5:30: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30: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30: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31: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5:31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31: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3 05:31: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31: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5:32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5:32: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32: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32: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5:32: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33: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33: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33: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33: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33: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34: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34: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34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5:34: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34: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35: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35: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35: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35: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35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36: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5:36: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36: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36: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36: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37: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5:37: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37:3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37: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38: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38: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38: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38: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38:5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39: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5:39: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39: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5:39: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39: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5:40: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5:40: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40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5:40: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40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41: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41: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41: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41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41: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5:42: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5:42: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42: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42: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43: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43: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5:43:5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05:44: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5:44: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5:44:5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45: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45: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45: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5:45: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45: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46: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46: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5:46: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46: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47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47: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47: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47: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47: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48: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5:48: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48: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5:48: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48: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49: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49: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49: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49: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49: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50: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50: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50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50: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50: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51: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51: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51: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5:51: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51: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5:52: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52: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5:52: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52: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5:52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53: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53: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5:53: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5:53:3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5:53: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5:54: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54: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5:54: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54: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5:54:5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5:55: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55: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5:55: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55: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5:55: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56: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56: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56: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5:56: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5:56: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57: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57: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5:57: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57:5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5:58: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5:58: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5:58: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5:58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5:58:5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5:59: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59: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5:59: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5:59: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5:59: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6:00: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00: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6:00: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6:00: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6:00: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01: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6:01: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6:01: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01: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01: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02: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6:02: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02: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02: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02: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03: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6:03: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03: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03: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03: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04: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04: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04: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04: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04: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6:05: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05: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05: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05: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05: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06: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06: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06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06: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06: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07: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07: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6:07: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6:07: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07: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6:08: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6:08: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6:08: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08: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6:08: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09: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09: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09: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09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09: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10: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10: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10: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6:10: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10: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6:11: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11: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11: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11: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11: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12: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12: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6:12: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12: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13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6:13: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13: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6:13: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13: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14: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14: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6:14: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14: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15: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15: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15: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06:15: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15: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16:0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16: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6:16: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16: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16: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17: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17: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17: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17: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17: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18: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6:18: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18: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18: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6:18: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19: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19: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19: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19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19: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20: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20: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20: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6:20: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20: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21: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6:21: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21: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21: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21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22: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22: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6:22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22: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22: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23: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6:23: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23: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24: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6:24: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6:25: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25: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25: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25: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25: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6:26: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26: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26: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26: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26: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27: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27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27: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27: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27: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28: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28: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28: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6:29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29: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29: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29: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29: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6:3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30: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6:30: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31: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6:31: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31: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32: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32: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32: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32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33: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33: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33: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33: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34: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6:34: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34: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34: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35: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6:35: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35: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35: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35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6:36: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36: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37: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37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38: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38: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38: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38: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39: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39: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39: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39: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6:39: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6:40: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40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40:4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40: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41: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41: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6:41: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41: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42: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06:42: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43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43: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43: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6:43: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43: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44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44: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44: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44: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45: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45: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3 06:45: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45: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45:4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46: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46: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46: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6:46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46: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47: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47: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47: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47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47: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6:48: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48: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48: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49: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49: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49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49: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49: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50: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50: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50: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50: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51: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51: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51: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6:51: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6:52: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6:52: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52: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6:52: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52:5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53: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53: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6:53: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54: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6:54: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54: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55: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6:55: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55: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55: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55:5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6:56: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6:56: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56: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56: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6:57: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57: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6:57: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6:57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6:58: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58: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6:58: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58: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59: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6:59: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00: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00: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00: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00: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01: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01: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7:01: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01: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02: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02:3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02: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7:03: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03: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03: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03: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04: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04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04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05: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05:3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7:05: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7:06: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06: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06: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7:06: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06: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07: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7:07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07: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08: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08: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7:08: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7:08: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7:09: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7:09:4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09: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10: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10: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7:10: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11: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7:11: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11: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7:11: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12: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12: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7:12:5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7:13: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13: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13: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13: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14: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7:14: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7:15: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7:15: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15: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16:3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7:17: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17: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17: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17:3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17: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7:18: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18: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18: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18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19: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19: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19: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7:20: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20: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20: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7:21: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07:21:4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21:4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22: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23: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23: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7:23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24: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24: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24: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25: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07:25: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25:5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7:26: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26: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7:26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26: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27: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27: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7:28: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7:28: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29: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29: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29: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30: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30: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7:30: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31: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7:31: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32: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32: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32: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32: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7:32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33: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34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34: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34: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7:34: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35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35: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35: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35: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36: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36: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37: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37:4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38: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38: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38: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39: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39: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39: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7:40: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40: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40: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7:40: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7:41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41: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7:41: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42: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42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42: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43: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7:43: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44: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44: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7:44: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44: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7:45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45: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7:45: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45: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7:46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46: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7:46: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46: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46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47: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47: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7:47: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48: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48: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48: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49: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49: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49: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49: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7:50: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50: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50: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51: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51: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51: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51: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52: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52: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52: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7:52: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7:53: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53: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53: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54: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54: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7:54: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7:55: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55: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55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55: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7:55: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07:56: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56: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7:56: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56: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7:56: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57: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57: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7:57: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57: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7:58: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7:58: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58: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7:58: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58: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7:59: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7:59: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59: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59: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8:00: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8:00: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8:00:5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01: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8:01: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8:02: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02: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2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2: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3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8:03: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03: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03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8:04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04: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4: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05: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05: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8:05:2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06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6: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6:4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06:5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07: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8:07: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07:4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07: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08: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8:08: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08: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08: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08: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9: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09: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09: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09: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8:09: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0: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10: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10: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10: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11: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1: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2: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12: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12: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12: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13: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13: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13: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13: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3: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4: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8:14: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14: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15: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15: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8:15: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15: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15: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16: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16: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17: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7: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17: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8:17: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18: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18: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8: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8: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18:5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19: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9: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19: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19: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20: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8:20: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20: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20: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21: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21: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22: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22: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22:4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8:22:5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8:23: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23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23:5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24: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24: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24: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24: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24: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25: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25: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25: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25: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25: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26: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26:3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27: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8:27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27: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28: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28: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28: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8:28: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28:5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29: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29: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29: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29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29: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30: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30: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30: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30: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30: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31: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31: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31: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31: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31: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32: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8:32: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32: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32: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33: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33: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33: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33: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33: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34: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34: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34:3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34: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35: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35: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36: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6: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36: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36:5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37: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37: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8:37: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37: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37: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38: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8:38: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8:38: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8:38: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39: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39: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39: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39: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39: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8:40: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0: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40: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41: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41: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41: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42: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2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42:3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42: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42: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3: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8:43: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43: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43: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44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44: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4: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8:44: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44:4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45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8:45: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45: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8:45: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45: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8:46: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46: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46: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46: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6: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47: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47: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47:3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8:47: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8:48: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48: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8: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48: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8:48: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49:0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8:49: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49: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50: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50: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50: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51: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51: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51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8:51: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51: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52: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52: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52: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52:5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53: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53: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53: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8:53: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53:5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54: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54: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55: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55: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55:5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56: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56: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56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57:0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8:57: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57: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57:5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58: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8:58: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58: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58: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58: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8:59: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59: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59: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8:59: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00: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00: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01: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9:01: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9:01: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01: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02: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02: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02: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02: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9:03: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3: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9:03: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9:03: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04: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04: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4: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04: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04: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05:2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05: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06: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06: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6: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06: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9:06: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07: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9:07: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9:07: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07: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9:08: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08: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08: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08: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9:08: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09: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09: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09: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09:4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09: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10: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10: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10: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10: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11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9:11: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11: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11: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11: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2: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12: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12: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12: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9:12:4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13: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13: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9:13: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13: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13: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9:14: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14: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14: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14: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4: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15: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15: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15: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9:15: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15: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9:16: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16: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9:16: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16: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16: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17: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7: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17: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9:17: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17: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18: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18: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18: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18: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18: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9:19: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19: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19: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19: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20: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20: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20: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20: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20: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1: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21: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21: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21: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9:21: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9:22: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22: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23: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23: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23: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9:24: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9:24: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24: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24: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4: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25: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25: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9:25: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5: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25: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26: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26: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26: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9:26: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26:5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27: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9:27: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27:2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27: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27: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28: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9:28: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28: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28: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8:5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9:29: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29: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29: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29: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29: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9:30: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30: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9:30: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9:30: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9:30: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9:31: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9:31: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31: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31: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9:31: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9:32: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9:32: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9:32: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32:4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32: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33: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9:33: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33: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33: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9:33: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34: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9:34: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34: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34:4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34: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35: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35: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9:35: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35:4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9:35:5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36: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36: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36: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36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9:37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37: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37: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9:37: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37: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9:38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38: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9:38: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38: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9:38: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39: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39: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39: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39: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9:39: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40: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40: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9:40: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40: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9:40: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41:0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41: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41: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9:41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41: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42: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42: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42: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9:42: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42:5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43: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9:43: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43:4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43: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44: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44: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44: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44:4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44: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45: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45: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45: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45: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9:45: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46: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46: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46: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46: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46: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47: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47: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47: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47: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9:47: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9:48: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48: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9:48:3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9:48: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48:5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9:49: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9:49: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9:49: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49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9:49:5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50: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50: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50: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50: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51: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9:51: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9:51: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9:51:4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51: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09:52: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9:52: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52: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52: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9:53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53: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9:53: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53: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53: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54: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54: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9:54: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54: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54: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55: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55: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55: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55: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9:56: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9:56: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9:56:2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56: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9:56: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57: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57: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57: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57: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57: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9:58: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58: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58: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9:58: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9:58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9:59: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9:59:5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59:5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00: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10:00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00: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01: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10:01:2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01: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01: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01: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02: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10:02:2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10:02: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02: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10:03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0:03: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03: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10:03: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03: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10:04: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0:04: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04: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10:04: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04: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10:05: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05: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10:05: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05:3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10:05: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06: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10:06:1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10:06:2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10:06: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06: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0:07:0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10:07: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10:07: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07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07: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0:08: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0:08: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0:08: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0:08:4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08: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09: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0:09: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10:09: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09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0:09: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10: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10: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10: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0:10: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0:11: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10:11:1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11: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0:11:4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10:11: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12: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10:12: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10:12: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12: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12:5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13: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13: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14: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14: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10:14: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10:15: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15: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10:15: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15: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15: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10:16: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0:16: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16: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16: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16: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10:17: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10:17: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0:17: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10:17: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17: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0:18: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18: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10:18: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18:4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0:18: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19: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19: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10:19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19: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10:20:0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0:20: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10:20: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10:20: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20: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10:21: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21: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0:21: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10:21: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10:21: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10:22: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0:22:4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23: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23: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24:0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10:24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10:24: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0:24: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24: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0:25:0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10:25: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0:25: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0:25: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26:0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10:26: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26:2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10:26: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26: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0:27: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27: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3 10:27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10:27: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27: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28: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28: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10:28: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28: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10:28: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29: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29: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3 10:29: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10:29: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29: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0:30: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30:1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0:30: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10:30: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30: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0:31: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0:31: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31:3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31: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10:31: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0:32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0:32: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10:32: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3 10:32: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10:33: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10:33: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0:33: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10:33: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10:33:5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10:34: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10:34: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34: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0:34: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0:34: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35: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0:35: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35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35: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3 10:35: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10:36: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10:36: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10:36: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36: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10:36: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37: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10:37: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37: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37: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37: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38: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0:38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10:38: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38: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38: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39: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0:39:2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0:39: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39: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10:4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40: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0:40: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40: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40: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41: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41: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41: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0:41: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0:41: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42: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10:42: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42:3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10:43: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43: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43: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44: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10:44: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10:44: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45: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0:45: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45: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0:46: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46: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10:46: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0:46: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47: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0:47: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48: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48: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0:48: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49: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0:49: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10:49:3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10:49: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10:50: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50: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50: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0:51: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51: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10:51: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51: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52: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0:52:5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0:53: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0:53: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0:53: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10:53:4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53: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10:54: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54: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54:4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10:54: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0:55: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55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55: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56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0:56:4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56: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10:57: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57: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0:57: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10:57: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0:57: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0:58: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10:58: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10:58: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3 10:58: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10:58: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59: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59: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0:59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59: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1:00: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11:00: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11:00: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11:00: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1:00: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11:01: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01:3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02: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11:02: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02: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03: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11:03: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1:03: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11:03: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11:04: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3 11:04: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1:04: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11:04: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1:04:5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1:05: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1:05: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1:05: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11:05: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3 11:06: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1:06:1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11:06: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11:06: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1:06:5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1:07: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1:07:1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07: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11:07: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1:07:5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11:08: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11:08: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1:08: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3 11:08:4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1:09: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11:09: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09: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10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11:10: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1:10: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11:10: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1:10: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11: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1:11: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11:11: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1:11: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1:11: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1:12: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1:12: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1:12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11:12: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13: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11:13: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1:13: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1:13: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1:14: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11:14: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1:15: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1:15: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11:16: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1:16: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1:16: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11:17: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1:17: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1:18: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18: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1:18:4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11:18: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1:19: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19: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19: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11:19: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20: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1:20: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1:20: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11:20: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1:21: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1:21: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1:21:56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638" meta:object-count="0"/>
    <meta:generator>LibreOffice/7.3.7.2$Linux_X86_64 LibreOffice_project/30$Build-2</meta:generator>
  </office:meta>
</office:document-meta>
</file>