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infall-data-2023-09-04 14 52 36" table:style-name="ta1">
        <table:shapes>
          <draw:frame draw:z-index="0" draw:style-name="gr1" draw:text-style-name="P1" svg:width="6.2988in" svg:height="3.5429in" svg:x="3.8772in" svg:y="38.3945in">
            <draw:object draw:notify-on-update-of-ranges="'Rainfall-data-2023-09-04 14 52 36'.A218:'Rainfall-data-2023-09-04 14 52 36'.A228 'Rainfall-data-2023-09-04 14 52 36'.B218:'Rainfall-data-2023-09-04 14 52 36'.B2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_frmpayload_data_rainfall</text:p>
          </table:table-cell>
        </table:table-row>
        <table:table-row table:style-name="ro1">
          <table:table-cell office:value-type="string" calcext:value-type="string">
            <text:p>2023-09-02 14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4:5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2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4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5:5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2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4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6:5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5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2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4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5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5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5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0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0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1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2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2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4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4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4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5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9:55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19:56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19:57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19:58:0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3-09-02 20:01: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2 20:03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20:05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20:06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20:08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20:09: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2 20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2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4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4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4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0:5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1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1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1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0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0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1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3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2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4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23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1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0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2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29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40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4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4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4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49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5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55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1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5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0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07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10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16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19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02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5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5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5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5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7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7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8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6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10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1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2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3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4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5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6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7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7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7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7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8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9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28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0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4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0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46:0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023-09-03 20:47:0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3-09-03 20:4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0:49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0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0:51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0:52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0:53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0:5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0:55:0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23-09-03 20:57:0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23-09-03 20:58:0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23-09-03 20:59:0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23-09-03 21:00:0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23-09-03 21:01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1:02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1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10: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21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18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1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22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1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2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1:25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3 21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0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1:31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1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1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1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1:59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2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37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41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45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4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1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2:58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2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01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3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06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3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43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3 23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23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30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4 00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2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4 00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0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32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4 01:33: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3-09-04 01:35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4 01:38: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3-09-04 01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1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24: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3-09-04 02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2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3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4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5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6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7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8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09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0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5:0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23-09-04 11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1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2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3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0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1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2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3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4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5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5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4 14:52: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4T18:49:02.124668835</dc:date>
    <meta:editing-duration>PT3H26M33S</meta:editing-duration>
    <meta:editing-cycles>1</meta:editing-cycles>
    <meta:document-statistic meta:table-count="1" meta:cell-count="34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Mechanical rain fall</text:p>
        </chart:title>
        <chart:subtitle svg:x="4.305cm" svg:y="1.275cm" chart:style-name="ch3">
          <text:p>Rainfall measurement using tipping bucket</text:p>
        </chart:subtitle>
        <chart:legend chart:legend-position="end" svg:x="13.148cm" svg:y="4.201cm" style:legend-expansion="high" chart:style-name="ch4"/>
        <chart:plot-area chart:style-name="ch5" table:cell-range-address="'Rainfall-data-2023-09-04 14 52 36'.A218:'Rainfall-data-2023-09-04 14 52 36'.B228" chart:data-source-has-labels="column" svg:x="1.331cm" svg:y="2.138cm" svg:width="11.497cm" svg:height="5.701cm">
          <chart:coordinate-region svg:x="3.681cm" svg:y="2.138cm" svg:width="9.007cm" svg:height="2.963cm"/>
          <chart:axis chart:dimension="x" chart:name="primary-x" chart:style-name="ch6" chartooo:axis-type="auto">
            <chartooo:date-scale/>
            <chart:title svg:x="6.665cm" svg:y="8.019cm" chart:style-name="ch7">
              <text:p>Time</text:p>
            </chart:title>
            <chart:categories table:cell-range-address="'Rainfall-data-2023-09-04 14 52 36'.A218:'Rainfall-data-2023-09-04 14 52 36'.A228"/>
          </chart:axis>
          <chart:axis chart:dimension="y" chart:name="primary-y" chart:style-name="ch6">
            <chart:title svg:x="0.451cm" svg:y="6.302cm" chart:style-name="ch8">
              <text:p>Amount of rainfall</text:p>
            </chart:title>
            <chart:grid chart:style-name="ch9" chart:class="major"/>
          </chart:axis>
          <chart:series chart:style-name="ch10" chart:values-cell-range-address="'Rainfall-data-2023-09-04 14 52 36'.B218:'Rainfall-data-2023-09-04 14 52 36'.B22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23-09-02 19:53:06</text:p>
                <draw:g>
                  <svg:desc>'Rainfall-data-2023-09-04 14 52 36'.A218:'Rainfall-data-2023-09-04 14 52 36'.A228</svg:desc>
                </draw:g>
              </table:table-cell>
              <table:table-cell office:value-type="float" office:value="0">
                <text:p>0</text:p>
                <draw:g>
                  <svg:desc>'Rainfall-data-2023-09-04 14 52 36'.B218:'Rainfall-data-2023-09-04 14 52 36'.B228</svg:desc>
                </draw:g>
              </table:table-cell>
            </table:table-row>
            <table:table-row>
              <table:table-cell office:value-type="string">
                <text:p>2023-09-02 19:55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6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8: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1: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06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