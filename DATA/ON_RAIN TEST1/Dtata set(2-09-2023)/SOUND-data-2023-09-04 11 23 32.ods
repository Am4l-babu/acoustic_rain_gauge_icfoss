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ND-data-2023-09-04 11 23 32" table:style-name="ta1">
        <table:shapes>
          <draw:frame draw:z-index="0" draw:style-name="gr1" draw:text-style-name="P1" svg:width="6.2988in" svg:height="3.5429in" svg:x="4.0283in" svg:y="127.074in">
            <draw:object draw:notify-on-update-of-ranges="'SOUND-data-2023-09-04 11 23 32'.A716:'SOUND-data-2023-09-04 11 23 32'.A778 'SOUND-data-2023-09-04 11 23 32'.B716:'SOUND-data-2023-09-04 11 23 32'.B7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evice_frmpayload_data_sound</text:p>
          </table:table-cell>
        </table:table-row>
        <table:table-row table:style-name="ro1">
          <table:table-cell office:value-type="string" calcext:value-type="string">
            <text:p>2023-09-02 16:39: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6:39: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2 16:39: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6:40:0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2 16:40:1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6:40:3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6:40: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6:42: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16:43: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6:43: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2 16:43: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16:43:4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6:44: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2 16:44: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6:44: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16:44: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2 16:44:5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6:45: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16:45:2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6:45: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6:45: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6:45:5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6:46: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6:47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16:47: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16:47:4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2 16:47: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16:48: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6:48: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2 16:48: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6:48: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2 16:49: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6:49:1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6:49:2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2 16:49:4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2 16:49: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6:50: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16:50: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6:50:3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2 16:50:5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6:51: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6:51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6:52:0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6:52: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6:52: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6:53: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2 16:53: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16:53: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16:53: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6:54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6:54: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2 16:54:2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2 16:54: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2 16:54: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6:55: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16:55: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6:55: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16:55:4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6:56: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6:56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2 16:56: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6:56: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6:57: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6:57: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6:58: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6:58: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16:58: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6:58: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2 16:58: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6:59: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2 16:59: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6:59: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16:59: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17:00:1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2 17:00: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7:00: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17:00: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2 17:01: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7:01: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2 17:01: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01: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7:02: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7:02: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7:03:0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7:03: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7:03: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17:03: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17:04: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2 17:04: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7:04: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7:04: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7:04: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7:05: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17:05: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7:05:4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05: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17:06: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7:06: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17:06: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7:06: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17:07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7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08: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2 17:08:3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2 17:08: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17:08: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09:0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2 17:09: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7:09: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2 17:10:0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2 17:10:1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7:10: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7:10: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17:10:5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2 17:11: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7:11: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17:11: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7:11:5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2 17:12: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2 17:12:4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7:12: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7:13: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17:13: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7:14: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2 17:14: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7:14:2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7:14: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17:14: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7:15: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7:15:2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7:15: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7:16: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7:16: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7:16: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7:16: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17:16: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7:17: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7:17: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18: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7:18: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7:18: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7:19: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7:19: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2 17:19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19: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7:19: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7:20: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7:20:2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2 17:20: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7:20:5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2 17:21: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7:21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1: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7:21: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17:22: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2 17:22:2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2 17:22: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7:23:1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7:23:1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7:23: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7:24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24: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7:24: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2 17:25:0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25:1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2 17:25:2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7:25: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2 17:26:0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26: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2 17:26: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7:26: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7:26: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17:27: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7:27: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7:27:4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23-09-02 17:27: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17:28: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7:28: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7:29: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29: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7:29: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17:29:4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30: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17:30: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7:30: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7:30: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7:31: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17:31:2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2 17:31: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7:31:4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2 17:32:0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7:32: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7:32: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7:32: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7:33: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17:33: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7:34:0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7:34: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7:34: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7:34:5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2 17:35:0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35: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7:35: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35: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2 17:36:0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2 17:36:2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2 17:36:4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2 17:36:5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2 17:37: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2 17:37: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17:37: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17:37: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37:5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2 17:38: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2 17:38:2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2 17:39: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17:39: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17:39: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17:39: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7:40:0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7:40:1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40: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7:40: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7:41: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17:41:2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7:41:3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2 17:41: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7:41: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7:42:0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7:42: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2 17:42:4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2 17:42: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17:43: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17:43: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17:43: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44: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44: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7:44: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7:45:0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2 17:45: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7:45:4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2 17:45: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2 17:46: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2 17:46: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17:46:4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2 17:46: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7:47: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7:47: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7:47:3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2 17:47: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7:47: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7:48: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2 17:48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7:49: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2 17:49: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2 17:50:0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7:50:1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7:50: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7:50: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7:51: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2 17:51: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2 17:51: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2 17:51: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17:51: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2 17:52:0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2 17:52: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7:52: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2 17:52: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17:53: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7:53: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17:53: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2 17:53:5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7:54: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7:54: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7:55:0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7:55: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17:55: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7:55:5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2 17:56:0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2 17:56: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7:56: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2 17:56: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7:5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2 17:57: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7:57: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2 17:57: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2 17:58: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7:58: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7:58: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2 17:58:4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2 17:58: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2 17:59:3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2 18:00: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18:00: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18:00:4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8:00: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8:01: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18:01:3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2 18:01: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8:01: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02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2 18:02: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8:02:3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2 18:02: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2 18:02: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8:03: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2 18:03: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03: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8:03: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8:04: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2 18:04: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18:04: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8:05:2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2 18:05:2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2 18:06: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8:06:1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8:06: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8:06: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8:07:0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2 18:07: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8:07: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07: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2 18:07:5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8:08: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08: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2 18:08: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2 18:08:4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2 18:09: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2 18:09: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18:09: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09: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8:10:1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2 18:10: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8:10: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8:11: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11: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2 18:11:5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8:12:0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2 18:12: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18:12:2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2 18:12:4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23-09-02 18:12: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8:13: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8:13: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13: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2 18:13: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8:14:0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2 18:14: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2 18:14: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8:14: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2 18:15: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15:4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2 18:15:4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2 18:16: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18:16: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2 18:16: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18:17: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18:17: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17: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2 18:17:5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2 18:18: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2 18:18:2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8:18: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18:18: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18:19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2 18:19: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8:19: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2 18:19: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18:2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8:20: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18:20: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18:20: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18:21: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18:21: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2 18:21: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8:22: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8:22: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8:22: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2 18:22: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8:23: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8:23:2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2 18:23: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18:23: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23:5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2 18:24: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18:24: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24: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2 18:24: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8:25: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8:25: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8:25: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8:26:3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2 18:26: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27: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8:27: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18:27: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2 18:27: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27: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8:28: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18:28: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8:28: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8:28: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8:28: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18:29: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8:29:4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18:29: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8:30: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8:30: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18:30: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8:31: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8:31: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8:31: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32: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18:32: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32: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8:32: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18:33:0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2 18:33: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8:33: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8:33: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8:33: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18:34: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34: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8:34: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8:34: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35: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35: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8:35: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8:36: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8:36: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2 18:37: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37: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18:37: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2 18:37: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2 18:38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18:38: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18:38: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8:38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18:38: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18:39: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2 18:39: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18:39: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8:39: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40: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8:40: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2 18:40: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40: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2 18:41: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8:41: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8:42: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8:42: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18:42: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8:42: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8:43: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18:43: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18:43: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8:43: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18:43: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18:44: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8:44: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2 18:44: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8:4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8:45: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8:45: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18:45: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2 18:45: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8:46: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8:46: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8:46: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18:47: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18:47: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8:48: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18:48: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18:48: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18:48: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18:49: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8:49: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49: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2 18:49: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18:49: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8:50: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18:50: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2 18:50: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50: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18:51: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18:51: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18:51: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52: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52: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18:53: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18:53: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18:53: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18:5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18:54: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18:54: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8:54:3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18:54: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2 18:55: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18:55: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8:55: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18:55: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8:55: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2 18:56: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18:56: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18:56: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18:57: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18:57: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2 18:57: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2 18:58: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8:58: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8:58: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18:58: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18:59: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8:59: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18:59: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8:59: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9:00: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19:00: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19:00: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19:00: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9:00: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19:01: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01: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01: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01: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19:02: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9:02: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19:02: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19:03: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19:03: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19:04: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9:04: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9:04: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9:04:4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19:04: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9:05: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19:05: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9:05: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19:05: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9:05: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19:06: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19:06: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19:06: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2 19:06: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19:07: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19:07: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19:07: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19:08: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19:08: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09: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9:09: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19:09: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09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19:10: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10: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9:10: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10: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19:10: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19:11: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11: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2 19:11: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19:11: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9:12: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19:12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19:12: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9:13: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13: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13: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14: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9:14: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19:14: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9:15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9:15: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19:15: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19:15: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2 19:15: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19:16: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9:16: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19:16: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16: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19:17: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19:17: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19:17: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19:17: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19:18: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18: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9:18:5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9:19: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19:19: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19:19: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20: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19:20: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2 19:20: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19:21: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19:21: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19:21: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19:21: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19:22: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19:22:3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19:22: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19:22: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9:23: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2 19:23: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9:23: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19:24: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9:24: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19:24: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19:25: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19:25: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19:25: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19:26: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26: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26: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19:26: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19:27: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19:27: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9:27: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27: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9:28: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19:28: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19:28: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28: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19:29: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19:29: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19:30:0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19:30: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31: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9:31: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9:31: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9:32: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19:32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19:32: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9:32: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19:32:5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9:33: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19:33: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19:33: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9:33: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19:34: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19:34: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19:34: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9:34: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9:35: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35: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9:35: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35: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19:36: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19:36: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9:36: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19:37: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19:37: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19:37: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19:38: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38: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38: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19:38: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9:38: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39: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19:39: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19:39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9:39: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19:40: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40: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40:2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19:40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19:40: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9:41: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9:41: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19:41: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19:42: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19:43: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19:43: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19:43: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19:43: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9:44: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44: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19:44: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44: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19:45: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9:45: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9:45: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19:45: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9:45: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19:46: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19:46: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19:46: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19:47: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19:47: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19:47: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48: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19:48: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48: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9:49: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19:49: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2 19:49: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2 19:49: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19:49: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19:50: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19:50: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19:50: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19:50: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9:51: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19:51: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19:51: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19:51: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19:52: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19:52: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9:52: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19:53: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19:53: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19:53: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19:54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19:54: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19:54: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19:55: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19:55: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19:55: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19:55:5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19:56: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19:56: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9:57: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19:57: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19:58: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19:58: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19:58: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2 19:58: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19:59: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19:59: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2 19:59: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0:00: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00: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00: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00: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0:00: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2 20:01: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01: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0:01:2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0:01: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0:01: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0:02: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0:02: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0:02: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0:02: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20:02: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0:03: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20:03:2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2 20:03: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03: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0:04: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0:04: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04: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05: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05: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0:05: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06: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0:06: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06: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06: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07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0:07: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07: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07: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08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0:08: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0:08: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0:08: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0:08: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09: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09: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0:09: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0:09: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0:09:4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19:55: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10: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0:10: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10: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10: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11: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0:11: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11: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11:3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0:11: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0:12: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12: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12: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2 20:12: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12: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13: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0:13: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2 20:13: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0:13:3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2 20:13: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0:14:0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2 20:14: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14: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20:14: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0:14: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0:15: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15: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2 20:15:2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0:15: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2 20:15: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16: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16: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16: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0:16: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0:17: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0:17: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2 20:17: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0:17: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17: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0:18: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0:18: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18: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0:18: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2 20:18: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20:19: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19: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0:19: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0:20: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0:20: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0:21: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21:2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0:21: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0:21: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0:22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0:22: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0:22:3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20:22: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23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20:23: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23: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23:3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23: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24: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0:24: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0:24: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24: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25: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25: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2 20:25:2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2 20:25:4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25:5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2 20:26: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0:26: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2 20:26: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2 20:26: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2 20:26:5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20:27: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0:27: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27: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27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0:27: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0:28: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28: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2 20:28: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28: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0:28: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29: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29: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0:29: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29: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29: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0:30: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30: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0:30: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0:30: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30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0:31: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0:31: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20:31: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2 20:31: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31:5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0:32: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2 20:32:2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0:32: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0:32: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2 20:32: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0:33: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0:33: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0:33: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33: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20:33: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34: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2 20:34: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0:34: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34:4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0:34: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0:35: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35: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0:35:3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0:35:4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0:35: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0:36: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36: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36:3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0:36: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0:36: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0:37: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0:37: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37:4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0:38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0:38: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2 20:38: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0:38: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38: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0:39: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20:39: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39: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0:39: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0:40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2 20:40: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0:40: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0:41: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0:41: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0:41:5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0:42: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0:42: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42: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0:42:4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0:42: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43: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2 20:43: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0:43:4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2 20:43:5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0:44: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0:44: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2 20:44: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2 20:44: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0:44:5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45: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0:45: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0:46: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46: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0:46:4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0:47: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0:47: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0:47: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0:47: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0:47: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0:48: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0:48:2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0:48: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0:49: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2 20:49: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0:49: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0:49:3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2 20:49: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2 20:50: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0:50: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2 20:50: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50: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51: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0:51: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0:52: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2 20:52: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0:52: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20:52:4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0:52: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53:0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2 20:53: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2 20:53:3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20:53: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0:53: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0:54:0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54:2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0:54: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0:54:4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0:54:5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0:55: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0:55: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0:55:4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0:55: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0:56: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20:56: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0:57: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0:57: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2 20:58:0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2 20:58: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0:58: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0:58: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0:58:5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0:59: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0:59: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20:59: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0:59: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1:00: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2 21:00: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2 21:00: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00: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21:00: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01: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2 21:01: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1:01: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1:02: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2 21:02: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1:02: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1:03: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2 21:03: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04: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04: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2 21:04: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1:04: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04: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21:05: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05: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1:05: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05:5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1:06: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2 21:06: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06: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06: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1:07: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07: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07:5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2 21:08: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2 21:08: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08: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09: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09: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1:09: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09: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1:09: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1:10: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1:10: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1:10: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10:3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2 21:10: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1:11: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11: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11: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11: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12: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12: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1:13: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13: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13: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2 21:14: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14: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14: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1:14: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14: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21:15: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1:15: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15: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1:15: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15: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16: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1:16: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16: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16: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1:17:0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2 21:17:1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1:17: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17: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1:18: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1:18: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18: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19: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19: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2 21:19: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19: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20: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1:20: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20: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20:4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1:20: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1:21: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21:2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1:21: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2 21:21: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1:21: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1:22: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1:22: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22: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1:22: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1:22: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1:23: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1:23: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1:23: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23: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23:5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24: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2 21:24: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2 21:24:3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2 21:24: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24:5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1:25: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25: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25: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1:25: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1:25: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1:26: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26: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1:26: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1:26: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27: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27: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1:28: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1:28: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1:28:5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1:29:0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1:29: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1:29: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2 21:29: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1:29:5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1:30: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1:30: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30: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30:4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1:30: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1:31:0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2 21:31: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1:31:3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1:31: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31: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32: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32: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1:32: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1:32: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1:32: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1:33: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1:33: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33: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1:33: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33: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1:34: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1:34: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1:34: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34: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1:34: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1:35: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35: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35: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35: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1:35:5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36: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1:36: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36: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36: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2 21:36: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37: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1:37: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37: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37: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1:37: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38: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38:2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1:38: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38:4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2 21:38: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2 21:39: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1:39: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39: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1:39: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1:39:5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2 21:40: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1:40: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1:40: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1:40: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1:40: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41: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1:41: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1:41: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1:41:4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41: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1:42: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42: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1:42: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1:43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2 21:43: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1:43: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1:43: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1:43: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44: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2 21:44: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44: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44: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1:44: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1:45: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45: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2 21:45: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45: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2 21:45: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2 21:46: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1:46: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46: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1:46: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46: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47: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47: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2 21:47: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47: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1:47: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1:48: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48: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1:48: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48: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1:48: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1:49: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1:49: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49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1:49: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21:50: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1:50: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2 21:50: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1:50: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1:50:5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1:51: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51: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1:51: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2 21:51: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1:51: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1:52: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52: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1:52: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52: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1:52: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1:53:0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2 21:53: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2 21:53: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1:53:4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1:53: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21:54: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1:54: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21:54: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1:54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1:54: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1:55: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2 21:55: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1:55: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1:55:4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2 21:55:5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2 21:56:0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56:1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2 21:56: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1:56: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1:56: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1:57: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57: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2 21:57: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57: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1:57: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1:58: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58: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1:58: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1:58:4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1:58: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2 21:59: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1:59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21:59:3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1:59: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1:59: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00: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22:00: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2:00: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00:4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00: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01: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01:2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2:01: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01: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2:01: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02: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2:02: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2:02:3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02: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02: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2:03: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2:03: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03: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03: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2:03: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04: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04: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04: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2 22:04: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2:04: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05: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05: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2:05: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2:05: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22:05: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06:1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2:06: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22:06:3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2 22:06: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22:06: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2:07: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07: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2 22:07: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2:07: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2 22:08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08: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2:08: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2:08: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08: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09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09: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2:09: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2:09: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09: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2:10: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22:10: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2:10: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2:10: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2:10: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2:11: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11: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22:11: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2:11: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11: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2:12: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12: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2:12: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2:12: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12: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13: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2:13: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22:13: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2:13: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2 22:13: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2:14: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2:14: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2:14: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2:14: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2:14:5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2 22:15: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2:15: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2:15: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15: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16: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2:16: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16:5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2:17: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2 22:17:5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18: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2:18: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2:18: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2:18: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2:18: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2:19: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2:19:3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2:19: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2:19: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2:20: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2:20: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22:20: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2:20: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2:20: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2:21: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21: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2:21: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2:22:2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2:22: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22:23: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23: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23: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22:23: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2 22:23: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24: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24: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24: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22:25: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22:25: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25:3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25:4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2:25: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2:26: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2 22:26: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2:26: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26: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2:27: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22:27:4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2:28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2 22:28: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28: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2:28: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2:28: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22:29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2:29: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22:29: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2 22:29: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2:29: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30: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30: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30: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2 22:30: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30: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31: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22:31: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2:31: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31: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31: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32: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2:32: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2:32: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2:32: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22:32: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2:33: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22:33: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33: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2:33: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2:33: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2:34: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34: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2:34:2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2:34: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2:34: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35: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35: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2:35: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2 22:35: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2:35: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2:36: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36: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36:2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2 22:36: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2:36: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2:37: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2:37: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2:37: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2:37: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2:38: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38: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38: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22:38: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2:38: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22:39: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22:39: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2:39:5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2:40: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22:40: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2:40: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41:1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2 22:41: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2:41: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22:41: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22:41:5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42: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22:42: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22:42: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2:42: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2:43: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43: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43: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2:43: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2:44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44: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2 22:44: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2:44: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22:44: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2:45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45: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45: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2 22:45: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2:45: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2:46: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46: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2:46: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22:46: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22:46: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2:47: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2:47: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2:47:2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22:47: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22:47: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48: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2:48: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2:48: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22:48:3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2:48: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22:49: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2:49: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49: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2 22:49: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49: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50: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2:50: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22:50: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2:50: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50: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2:51: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2:51: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2:51: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2 22:51: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22:51: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2 22:52: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52: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22:52: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22:52: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22:52: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2:53: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2:53: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22:53: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2:53: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2:53: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54: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2:54: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2 22:54: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2:54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2:54: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2:55: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2 22:55: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2:55: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22:55: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2:55: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22:56: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56: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2:56: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2:56: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22:57: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22:57: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2:57: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22:57: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2:57: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2 22:58: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22:58: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22:58: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2 22:58: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2:58: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2:59: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22:59: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22:59: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2:59: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2:59:5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00: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3:00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23:00: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3:00: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2 23:00: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2 23:01: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2 23:01: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3:01: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2 23:01: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23:01:5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2 23:02: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3:02: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2 23:02: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23:02: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2 23:02: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23:03: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23:03: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2 23:03: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3:03: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23:03: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23:04: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2 23:04: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2 23:04: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2 23:04:4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2 23:04: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05: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05: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3:05: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2 23:05:4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3:06: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23:06: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23:06: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06: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2 23:06:5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2 23:07: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07: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3:07: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3:07: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08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3:08: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2 23:08: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23:08: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23:08: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2 23:09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3:09: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09: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09: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2 23:09:4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10: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23:10: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2 23:10: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10: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2 23:11: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3:11: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11: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2 23:11: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2 23:11: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23:12: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3:12: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3:12: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3:12: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23:12: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2 23:13: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13: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23:13: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23:14: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23:14: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14: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15: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3:15: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3:15: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15: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16: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3:16: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2 23:16: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16: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3-09-02 23:16: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23:17: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2 23:17: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23:17: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23:17: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23:18: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23:18: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3:18: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3:19: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23:19: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23:19: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2 23:20: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3:20: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20:2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23:20:3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2 23:20: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3:21: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2 23:21: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2 23:21: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21: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2 23:21: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2 23:22: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3:22: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23:22: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3:23: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2 23:23: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23:23: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23:24: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3:24: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23:24: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2 23:24: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2 23:25: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23:25: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3:25: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3:25: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25: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23:26: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3:26: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26: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23:26: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3:26: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23:27: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23:27: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27: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27: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3:28: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2 23:28: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3-09-02 23:28: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2 23:28: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2 23:2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23:29: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23:29: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23:29: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2 23:29: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3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2 23:30: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2 23:30: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3:30: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23:30: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3-09-02 23:31: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2 23:31: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2 23:31: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3:31: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23:31: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2 23:32: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3:32: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23:32: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23:32: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23:32: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2 23:33: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2 23:33: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2 23:33: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3:33: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2 23:33: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2 23:34: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3:34: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2 23:34: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2 23:34: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3:34: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3:35: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23:35: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23:35: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35:3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23:35: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2 23:36: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2 23:36: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3:36: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2 23:36: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2 23:36:5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37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3:37: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2 23:37: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3:37: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2 23:37: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3:38: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23:38: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23:38: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38:5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2 23:39:0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2 23:39: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2 23:39: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3:39: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3:39: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2 23:40: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2 23:40: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23:40:2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23:40: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3:40: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41: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2 23:41: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23:41: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2 23:41: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3:41: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3-09-02 23:42: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23:42: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3:42: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2 23:42: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42: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3-09-02 23:43: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3:43: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2 23:43: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23:43: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3-09-02 23:44: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3:44: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23:44: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2 23:44: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3-09-02 23:44:5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3:45: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2 23:45: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23:45: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2 23:45: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2 23:46: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23:46: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2 23:47: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23:47: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2 23:47: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2 23:47:4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2 23:48: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2 23:48: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2 23:48: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2 23:48: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3:49: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3:49: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2 23:49: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2 23:49: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49: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2 23:50: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50: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2 23:50: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2 23:50: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2 23:50: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2 23:51: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2 23:51: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2 23:51: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2 23:51: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2 23:51: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2 23:52: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2 23:52: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3:52: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3:52: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2 23:52: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2 23:53: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3:53: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3-09-02 23:53: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2 23:53: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23:53: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2 23:54: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2 23:54: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23:54: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2 23:54: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2 23:54: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55: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3:55: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2 23:55: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3:55: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2 23:55: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2 23:56: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2 23:56: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2 23:56: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2 23:56: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2 23:57: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2 23:57: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3:57: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2 23:58: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2 23:58: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2 23:59: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2 23:59: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2 23:59: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2 23:59: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0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0:00: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0:00: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00: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3 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0:01: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0:01: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3 00:01: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0:01: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0:02: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3 00:02: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3 00:02: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02: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03: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3 00:03: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3-09-03 00:03: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00:04: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3 00:04: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3 00:04: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0:04: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3 00:04: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3 00:05: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0:05: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0:05: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0:05: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3 00:05: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0:06:0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0:06: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3 00:06: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0:06: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3 00:07: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0:07: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3 00:07: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3 00:07: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0:07: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3 00:08: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0:08: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0:08:3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0:08: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00:08: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3 00:09: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0:09: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0:09: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3 00:09: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3 00:10: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10: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11:1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0:11: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3 00:11: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00:11:5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0:12: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0:12: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0:12: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12: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12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13: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0:13: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3 00:13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0:13: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0:13: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0:14: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00:14: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0:14: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0:14: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00:14: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0:15: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0:15: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3 00:15: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0:15: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00:15: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0:16: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0:16: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3 00:16: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16: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3 00:17: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0:17: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0:17: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3 00:17: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3 00:17: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0:18: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0:18: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0:18: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3 00:18: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0:18: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3 00:19: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3 00:19: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0:19: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0:19: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00:19: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0:20: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3 00:20: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0:20: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3 00:20: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3 00:20: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3 00:21: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0:21: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0:21: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00:21:4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3 00:21: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0:22: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0:22: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3 00:22: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3-09-03 00:22: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0:22: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3 00:23: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0:23: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3 00:23:3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0:23: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0:23: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3 00:24: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24: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0:24: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0:24:4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0:24: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0:25: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0:25: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0:25: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00:25: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0:25: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0:26: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3 00:26: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0:26: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00:26: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0:26: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00:27: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3 00:27: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00:27: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0:27: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3 00:28: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3-09-03 00:28: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28: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3 00:28: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3 00:28:5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0:29: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0:29: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0:29: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0:29: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3 00:3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0:30: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3-09-03 00:30: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0:30:3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0:30: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0:31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0:31: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0:31: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3 00:31:3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0:31:4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0:32:0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0:32: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3 00:32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2:3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0:32: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3 00:33: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3 00:33: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3 00:33: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0:33:3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0:33: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0:34: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0:34: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0:34: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3 00:34: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3 00:34: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0:35: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00:35:1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0:35: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3 00:35: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3 00:35: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3-09-03 00:36: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0:36: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3 00:36: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3 00:36: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36: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3 00:37: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3 00:37: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0:37:2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0:37: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3 00:37: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00:38:0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0:38: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3 00:38: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0:38: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3-09-03 00:38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0:39: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0:39: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0:39: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3 00:39: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3 00:40: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0:40: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40: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3-09-03 00:40: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3-09-03 00:40: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0:41: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0:41: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3 00:41: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3-09-03 00:41: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00:41: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0:42: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0:42: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3-09-03 00:42:3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0:42: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3-09-03 00:42: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0:43:0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0:43: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3 00:43: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3 00:43: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0:43: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3 00:44: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0:44: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0:44: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0:44: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0:44: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3-09-03 00:45: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3 00:45: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0:45: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3 00:45: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3 00:45: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3 00:46: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0:46: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3-09-03 00:46: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3 00:46: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0:46: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3-09-03 00:47:0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0:47: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0:47: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3 00:47: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0:47:5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0:48: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3-09-03 00:48: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0:48: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0:48: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3 00:48: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0:49:0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0:49: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0:49: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3-09-03 00:49: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0:49: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3 00:50: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0:50: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3-09-03 00:50: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3 00:50: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00:50: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0:51: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0:51: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3-09-03 00:51: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0:51: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3-09-03 00:51: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3-09-03 00:52: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3 00:52: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0:52: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0:52: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0:52: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0:53: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0:53: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3 00:53: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3 00:53: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0:53: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0:54: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3 00:54: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0:54: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00:54: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0:55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3 00:55: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3-09-03 00:55: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0:55:3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0:55: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3-09-03 00:56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0:56: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3-09-03 00:56: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00:56: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3 00:56: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0:57: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00:57: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0:57: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0:57: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3 00:57: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3-09-03 00:58: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3-09-03 00:58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0:58: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3-09-03 00:58: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3 00:58: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0:59:0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0:59: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0:59: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0:59: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00:59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00: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3 01:00: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01:00: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00: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3-09-03 01:00: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1:01: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01: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3 01:01: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1:01: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3 01:01: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1:02:0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3 01:02: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1:02:2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02: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02:5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1:03: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1:03: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1:03: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3 01:03: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1:03: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04: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3-09-03 01:04: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3 01:04: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04:4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1:04:5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1:05: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05: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3 01:05: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1:05: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05: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1:06: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06: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3 01:06: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1:06: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1:06:5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1:07: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1:07:1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1:07: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1:07: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1:07: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3 01:08:0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1:08: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1:08: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1:08: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3 01:08:5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1:09: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3-09-03 01:09: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3-09-03 01:09: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09: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3 01:09:5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1:10: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-09-03 01:10: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3 01:10: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1:10: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3-09-03 01:10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11:0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1:11: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3 01:11:3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1:11: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3-09-03 01:11: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3 01:12: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3-09-03 01:12: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3 01:12: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3-09-03 01:12: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12: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3 01:13:0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1:13: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1:13: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1:13: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3 01:13: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1:14:0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1:14: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1:14: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1:14:4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1:14: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1:15:1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1:15: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1:15: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1:15: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3-09-03 01:15: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3-09-03 01:16: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1:16: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16:3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1:16:4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1:16:5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17: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3-09-03 01:17:2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1:17: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3-09-03 01:17: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3-09-03 01:17:5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1:18: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01:18: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1:18: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18: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1:18: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19: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1:19: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3 01:19: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1:19: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1:20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3-09-03 01:20: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1:20: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3 01:20:3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1:20: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1:21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1:21: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3 01:21: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1:21: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1:21: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3 01:22: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22: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3-09-03 01:22: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22: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22: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1:23: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3 01:23: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23: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1:23: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3 01:23: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3-09-03 01:24: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1:24: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3-09-03 01:24:2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24: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01:24: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1:25: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1:25:1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25:2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25: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1:25: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1:26: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26:1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1:26: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3 01:26:3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1:26: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1:27: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3-09-03 01:27: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3 01:27: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3-09-03 01:27: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01:27: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3-09-03 01:28: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1:28: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01:28: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01:28: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1:28: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29: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3-09-03 01:29: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3-09-03 01:29:2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29: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1:29: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1:30:0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1:30: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1:30: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1:30: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1:30:5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1:31: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3-09-03 01:31:2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31: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1:31: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32:0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32: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32: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1:32: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1:32: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1:33:1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1:33: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33: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34: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1:34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1:35:0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35:1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1:35:2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35:3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1:35:4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1:36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1:36: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3-09-03 01:36:2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1:36:3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1:36:4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1:37: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1:37:1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1:37:2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1:37:3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1:37: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3-09-03 01:38: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3 01:38:1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1:38:2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3 01:38: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1:38:4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1:39: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1:39: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-09-03 01:39:2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39:3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1:3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40: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1:40:1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1:40: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1:40:3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1:40: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41:0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1:41: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1:41: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1:41: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41:5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42:0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1:42: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1:42: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1:42: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1:42: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1:43: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01:43: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1:43:2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1:4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1:43:5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1:44: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44: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01:44: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3 01:44: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3-09-03 01:44: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1:45: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3 01:45: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45: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1:45:4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1:45: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1:46:0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1:46:1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1:46:2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1:46: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1:46: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01:47: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1:47: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1:47: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1:47: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47:5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3 01:48: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1:48: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48:3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1:48: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1:48:5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1:49: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01:49:3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1:49: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1:49:5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1:50:0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1:50:1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1:50: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1:50: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1:50: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3-09-03 01:51:0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1:51:1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1:51:3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1:51: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3 01:51: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1:52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1:52: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1:52:3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1:52: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1:52:5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1:53: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53:2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1:53: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1:53:4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1:53: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1:54:0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1:54: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1:54:3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1:54: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54:5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1:55: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1:55:2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1:55:3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1:55: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-09-03 01:55:5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1:56: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1:56: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1:56: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1:56: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1:56:5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1:57: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1:57:2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1:57:3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1:57: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1:57: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01:58: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1:58:2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1:58: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1:58: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1:58:5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1:59:1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1:59:2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1:59:3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3 01:59:4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2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2:00: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2:00:2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2:00:3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00: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2:01: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01: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-09-03 02:01: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-09-03 02:01: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2:01:4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2:02: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02:1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02: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02:02: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02:02: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2:03: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2:03:1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2:03:2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2:03:3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3 02:03: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2:04:0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2:04: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2:04:2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2:04: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23-09-03 02:04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2:05: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2:05:1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05: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-09-03 02:05:3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2:05:5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3 02:06:0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2:06: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02:06: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06:3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2:06:5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2:07: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-09-03 02:07:1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07:2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2:07:3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2:07: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-09-03 02:08: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2:08: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2:08: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2:08: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08: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2:09: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09: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2:09:2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09:4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09:5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10:0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2:10:1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2:10:2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2:10: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2:10:5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2:11:0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2:11:1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2:11:2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2:11: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2:11:5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2:12:0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12: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2:12: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12:5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2:13: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2:13:1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13: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2:13: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13:5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14:0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2:14:1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14: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2:14:4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2:14:5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2:15: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2:15: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2:15: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2:15: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2:15:5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2:16: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2:16:1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16:3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2:16:4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2:16:5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2:17: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-09-03 02:17: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2:17: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-09-03 02:17:4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3 02:17:5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02:18:0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2:18: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2:18:3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2:18: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2:18:5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2:19: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2:19:2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2:19:3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2:19:4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2:19: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2:20: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2:20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2:20:3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20: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2:20: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2:21: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2:21:2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2:21:3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3-09-03 02:21:4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2:21:5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2:22:1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22:3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22: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2:22:5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3-09-03 02:23: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2:23:2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2:23: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2:23: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2:23:5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3 02:24:1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2:24:2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24: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24: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25: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2:25: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2:25:2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3-09-03 02:25:3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25:4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2:26: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2:26:1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2:26: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2:26:3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2:26: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2:27: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02:27:1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27:2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27:3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2:27:4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2:28: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2:28: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2:28: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2:28:3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2:28: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29: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2:29: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2:29: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2:29:3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2:29: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30: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2:30:1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2:30: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2:30:3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2:31:0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2:31: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31:2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2:31:3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3 02:31:5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3 02:32:0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2:32:1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2:32:2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3 02:32:3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2:32:5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2:33: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2:33: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2:33:2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2:33: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2:33: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2:34: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2:34: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2:34:2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2:34: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34: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2:35: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2:35: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2:35: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35:5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2:36:0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2:36: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2:36:2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2:36: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2:36:5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37: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2:37: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2:37:2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2:37:5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2:38:3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2:38:3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2:39: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2:39:2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39:3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2:39:4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2:39:5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2:40: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2:40:2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40:3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2:40: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2:41: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2:41: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41:2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41: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2:41:4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42: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2:42: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2:42:2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2:42:3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2:42:4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3 02:43:0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43:1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2:43:2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3 02:43:3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2:43:4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2:44: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2:44: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2:44:2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2:44: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2:44:4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2:45:0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2:45:1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45:2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2:45: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2:45:5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2:46:0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2:46: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2:46:2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2:46:3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2:46: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2:47:0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2:47: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2:47:2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2:47:3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47: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2:48: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48: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2:48:2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2:48:3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2:48:5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2:49: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2:49: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2:49: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2:49: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2:49: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2:50:0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2:50: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2:50: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50: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02:50:5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2:51:0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2:51: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2:51:2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2:51: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2:51:5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2:52: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2:52: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2:52:2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2:52: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2:52: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2:53:0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2:53:1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2:53:2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2:53: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2:53: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2:54: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54:1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2:54:3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2:54:4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2:54: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2:55: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2:55:1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2:55:3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2:55:4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2:55: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2:56: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56:3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2:56: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2:56: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2:57:0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2:57: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2:57: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2:57:4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2:57:5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2:58:0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2:58: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2:58: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2:58: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2:58:5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2:59:0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2:59: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2:59: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2:59: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2:59: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3:00: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3:00: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3:00:3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00: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3:00:5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3:01:0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3:01:2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3:01:3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3:01: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3:01:5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3:02: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3:02:3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3:02:4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3:02:5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3:03: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3:03: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03:03: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3:03:4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3:03:5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3:04: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3:04: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04:3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04: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3:04:5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3:05: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3:05: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3:05: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3:05: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3:05:5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06:1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3:06: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3:06: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3:06:4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3:07: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3:07: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3:07: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3:07:3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3:07: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3:08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3:08: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3:08: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3:08:3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3:08:4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09: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3:09: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3:09:2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3:09: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3:09:4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3:10: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3:10:1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3:10: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3:10: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03:10:5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3:11:0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3:11:1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3:11: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3:11:3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3:11: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3:12: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12: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3:12: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3:12:3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3:12:5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3:13:0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3:13: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3:13:2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3:13:3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3:13:5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3:14:0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3:14:1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14:2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3:14: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3:14: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3:15: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3:15: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3:15:2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3:15: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3:15: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3:16:0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3:16: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3:16:2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3:16:4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3:16:5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3:17:0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17:1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3:17:2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3:17:5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3:18: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3:18:1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3:18: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3:18:4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3:18:5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3:19:0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3:19:1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3:19:3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3:19:4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3:19: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3:20: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3:20:1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3:20: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3:20:4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3:20:5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3:21:0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3:21: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3:21: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3:21:4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3:21:5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3:22: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3:22: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3:22: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3:22: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23: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3:23: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3:23: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3:23:4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3:23:5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03:24:0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3:24: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3:24: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3:24:4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3:24:5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3:25: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3:25: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3:25: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3:25:4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3:25: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3:26: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3:26: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3:26:3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26: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3:26:5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3:27:0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3:27: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3:27: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3:27:4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3:27:5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3:28: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3:28: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3:28: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3:28:4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3:28: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3:29: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3:29: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3:29:3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3:29: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29: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3:30: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3:30: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3:30: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3:30:4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3:30:5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3:31: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3:31:2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31:3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3:31: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3:31:5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3:32: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32: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3:32: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3:32: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3:33: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3:33: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33:2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3:33:3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3:33:4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3:34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3:34: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3:34: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3:34: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3:34: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3:35: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35: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3:35: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35:3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3:35:4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3:36:0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3:36: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3:36:2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3:36: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3:36: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3:37:0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3:37: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3:37: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3:37:3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3:37:5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3:38: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3:38:1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3:38:2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3:38:3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3:38:5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3:39: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3:39: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3:39: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39:3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3:39: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3:40:0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3:40:1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3:40: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3:40:3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3:40: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3:41:0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3:41: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3:41: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3:41: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3:41:5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3:42: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3:42:1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42:2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3:42: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3:43: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3:43: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3:43:2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3:43:4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3:43: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3:44: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3:44: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3:44:2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3:44: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3:44: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3:45: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3:45:1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3:45:3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3:45: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3:45:5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3:46:0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3:46: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3:46:3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3:46: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3:46:5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3:47:0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3:47:1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3:47: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3:47: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3:47:5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3:48: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3:48:1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48:3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3:48:4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3:48: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3:49:0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3:49: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3:49:3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3:49: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3:49: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3:50: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3:50: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3:50: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3:50: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3:50: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3:51:0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3:51:2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3:51:3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3:51: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3:51:5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3:52: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3:52:2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3:52:3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3:52:4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3:52:5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3:53:0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3:53:2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3:53:3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3:53: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3:53:5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3:54: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3:54:2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3:54: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3:54:4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3:54:5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3:55: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3:55: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3:55: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3:55:4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3:55: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3:56: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3:56:2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3:56:3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3:56:4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3:56: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3:57: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3:57: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3:57:4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3:58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3:58: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3:58: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3:58:3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3:58:4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3:59: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3:59: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3:59:2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3:59: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3:59:4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00: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4:00: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4:00:2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4:00: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4:00:4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4:01: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4:01: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4:01:2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4:01:3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4:01:4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4:02:0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4:02: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4:02: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4:02:3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02: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4:03:0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4:03: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4:03:2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4:03:3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4:03: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4:04: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4:04: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04: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4:04: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4:04: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05: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4:05: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4:05: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4:05:3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4:05: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4:06: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4:06: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4:06: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06: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06:5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4:07: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4:07: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4:07: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4:07:4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4:07:5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4:08:0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4:08: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4:08: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08: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4:08: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4:09: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4:09: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09: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4:09:4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09:5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4:10: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4:10:1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4:10:2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4:10: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4:10: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4:11: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4:11: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4:11: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4:11: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4:11:5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4:12: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4:12: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4:12: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4:12: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4:13:0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4:13: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4:13: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4:13: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4:13: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4:14: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4:14: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4:14: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4:14:4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4:14: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4:15: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4:15: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4:15:3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4:15:4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4:15: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4:16:0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16: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4:16:3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4:16:4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16:5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4:17: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4:17:2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4:17: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4:17:4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17:5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18:0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4:18: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18: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4:18: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4:18:5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4:19:0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4:19:2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4:19: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4:19: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4:19:5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4:20: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4:20:2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4:20:3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4:20:4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4:20: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21: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4:21:2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4:21: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4:21: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4:21:5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4:22:1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4:22: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22: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4:22:4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4:22:5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4:23: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23: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4:23: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4:23: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4:24: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4:24: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4:24: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4:24: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4:24:4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4:25: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4:25: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4:25: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4:25: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25: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4:26: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4:26: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26: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26: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4:26:4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4:27: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4:27:1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4:27: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4:27: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4:27: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4:28: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4:28:1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4:28: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28:3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28: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4:29: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4:29:1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4:29: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29: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4:29: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30: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4:30:1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4:30: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4:30: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31: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31: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4:31:2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4:31: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4:31: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4:32:0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4:32: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4:32: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4:32: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4:33: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4:33: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4:33: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4:34: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4:34:3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4:34:4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4:34: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4:35: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4:35:2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4:35:3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4:35: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4:35:5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4:36: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4:36:2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4:36:3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4:36: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4:36: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4:37: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4:37: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4:37:4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37: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4:38: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38: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4:38:3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4:38: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4:38:5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39: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4:39: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4:39: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4:39:4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39: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4:40: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4:40:2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4:40: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4:40: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41: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41: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41: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4:41: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4:41: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4:42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4:42: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4:42:2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4:42: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42: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43: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4:43: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4:43: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4:43:3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4:43:4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4:44:0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4:44:1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4:44:2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4:44: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4:44: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45: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4:45: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45: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4:45: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4:45: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4:46: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4:46: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46: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46:3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4:46: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4:47: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4:47: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4:47: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47: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4:47: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4:48: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4:48: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4:48: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4:48:3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4:48: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4:49: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4:49:1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4:49: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49: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4:49:5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4:50: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4:50: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4:50:2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4:50: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4:50: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51: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4:51:1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4:51:2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4:51: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4:51: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4:52: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4:52: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4:52:4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4:52: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4:53: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4:53:4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4:54: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4:54: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4:54:5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4:55:0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4:55: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4:55: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4:55: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4:55:5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4:56: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4:56: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4:56: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4:56:3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4:56:5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4:57: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4:57: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4:57: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4:57: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4:57: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4:58:0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4:58: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4:58: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4:58: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4:58:5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4:59: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4:59:2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4:59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4:59: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5:00: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5:00: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5:00:5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5:01: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5:01:4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5:01:5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5:02: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5:02: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5:02: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02:5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5:03: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5:03: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5:03: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03: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5:03: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5:04: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5:04: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5:04:3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5:04: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5:05: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5:05: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5:05:2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05: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5:05:4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5:06: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5:06: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06: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5:06:3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5:06: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07: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5:07: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5:07: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07: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07: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5:08:0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5:08: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5:08: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5:08: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5:08: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5:09:0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5:09:1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09: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5:09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5:09: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10:0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5:10:1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5:10:2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5:10: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10:5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5:11: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5:11: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5:11:2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5:11: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5:11: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5:12: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5:12: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12:2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5:12:3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5:12:5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5:13: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13: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5:13: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5:13:5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5:14: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5:14: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5:14: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14: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5:14: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15: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15: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15:2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5:15: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5:15: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5:16: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16: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16: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5:16: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5:16: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5:17: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5:17: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17:3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5:17: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5:17:5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5:18: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5:18: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5:18:3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5:18:4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5:18:5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19: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5:19: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5:19: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5:19: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5:20:0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5:20:1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5:20: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5:20: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5:20: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21: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5:21: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21: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5:21: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5:21:5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5:22: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5:22: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5:22: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5:22:4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5:22:5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5:23: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5:23: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5:23:3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5:23: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5:23: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24: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5:24: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5:24: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5:24: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5:24: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5:25: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5:25:2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5:25: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5:25: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26: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5:26: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5:26: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5:26: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5:26:5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5:27:1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5:27: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5:27: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5:27: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5:27:5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5:28: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5:28: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5:28:3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5:28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28:5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29: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29: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5:29: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5:29: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5:29: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30: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5:30: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5:30:3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5:30:4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5:31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5:31: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5:31:2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5:31:3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5:31: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5:32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5:32: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5:32: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5:32: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5:32:4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5:33: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5:33: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33: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5:33: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5:33: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5:34: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5:34:1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5:34: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34:3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5:34: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5:35: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5:35: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5:35: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5:35: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5:35: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5:36: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36: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5:36:2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5:36: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5:36: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5:37: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37: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5:37:3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5:37:5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5:38: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5:38: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5:38: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5:38:3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5:38: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5:39: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39: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39: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5:39: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5:39: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5:40: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40: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5:40: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5:40:4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5:40:5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5:41: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5:41: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5:41: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41: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5:41: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5:42: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5:42: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5:42:4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5:42:5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5:43: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5:43:5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5:43: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5:44: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5:44:4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5:44:5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5:45: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45:2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5:45: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5:45:4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5:45: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5:46: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5:46: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46: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5:46: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5:47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5:47: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5:47:2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47: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5:47: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5:48: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5:48: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5:48:2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5:48:3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5:48: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5:49: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5:49: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5:49: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5:49: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5:49:4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5:50: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5:50: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5:50: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5:50: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5:50: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5:51: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5:51: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5:51: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51:3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51: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5:52:0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5:52: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5:52:2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5:52: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5:52: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5:53: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5:53: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5:53:2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5:53:3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5:53: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54:0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5:54:1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5:54: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5:54: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5:54: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5:55: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5:55: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5:55: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5:55: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5:55: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5:56: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56: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5:56:2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5:56: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5:56:5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5:57:0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5:57: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5:57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5:57: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5:58: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5:58: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5:58:2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5:58: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5:58: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5:59: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5:59: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5:59: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5:59: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5:59:5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6:00: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6:00: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00:3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6:00: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00: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01: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6:01: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6:01:3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6:01: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01: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6:02:0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6:02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02: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6:02: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6:02:5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6:03:0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6:03:1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6:03: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6:03: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6:03: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04: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6:04: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6:04: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04:4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6:04: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6:05:0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05: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6:05: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05: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6:05:5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6:06: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06: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06: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6:06: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6:06:5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6:07:0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07: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07:3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6:07: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6:07:5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6:08: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08:2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6:08:3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6:08: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6:08:5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6:09: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6:09: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6:09: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6:09:4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6:09: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6:10: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10:2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6:10:3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6:10: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6:10:5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11: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6:11: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11: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11: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6:11: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6:12: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6:12: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6:12: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6:12: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6:13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6:13: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6:13: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13:3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6:13:4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6:14: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6:14:2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6:14: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14: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6:15:0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6:15: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6:15: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6:15: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6:15:4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6:16: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6:16: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6:16:2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6:16:3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6:16: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6:17:0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6:17:1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17:2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6:17: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6:17:5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18: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18:1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6:18: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6:18:3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18: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19: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6:19: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6:19:2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6:19: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6:19: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20: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6:20: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6:20:2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20: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6:20: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6:21:0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6:21:1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21: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21: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6:21: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6:22: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22: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6:22: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22:4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6:22:5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6:23: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23: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23: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24:2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6:24: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6:25: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06:25: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6:25: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6:25:4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6:25:5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6:26: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6:26: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26: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6:26: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6:26: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6:27: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06:27:2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6:27: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6:27: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27:5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6:28:2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6:28: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6:28: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6:29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6:29: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6:29: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6:29: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6:29: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6:30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6:30: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6:30:3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6:31: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6:31:3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31: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32: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32:3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6:32: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32: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33: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6:33: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33:4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6:33: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6:34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6:34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34: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6:34: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35: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6:35: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6:35: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35: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6:35: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6:36:3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36:3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37:0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6:37:4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6:38: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6:38:2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6:38: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6:38:5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6:39: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39: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6:39: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6:39:4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6:39: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06:40: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6:40:3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6:40: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6:40:5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6:41: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6:41:1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6:41: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6:41: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6:42: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6:42: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6:43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06:43: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6:43: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6:43: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6:43: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44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6:44: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6:44:2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6:44: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6:45: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6:45: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45: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6:45: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6:45: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46:0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6:46: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6:46: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6:46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6:46: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6:47: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6:47: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6:47:2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6:47:3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6:47:5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48: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6:48: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6:48: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6:49: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6:49: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6:49:3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6:49:4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6:49: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6:50: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6:50:3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50: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6:50: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6:51: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6:51: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6:51:4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6:51:5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6:52: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6:52: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6:52: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6:52: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6:52:5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6:53: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6:53:2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6:53: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6:54: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6:54: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6:54: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6:55: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55: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6:55: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6:55:3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6:55: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6:56: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6:56:1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6:56:2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6:56: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6:57:0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6:57: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6:57: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06:57:5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6:58: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06:58: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6:58:5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6:58:5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6:59: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6:59: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7:00: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7:00: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7:00: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00: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01: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7:01: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01: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7:01: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02: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7:02: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3-09-03 07:02: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7:03: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03: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7:03: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7:03: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7:04: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7:04: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7:04: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05: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7:05: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7:05:5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7:06: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7:06: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06: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06:4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7:06:5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7:07: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7:07:3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7:07: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07:08: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08: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7:08:3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7:08: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7:09: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09:4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09: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7:10: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7:10:3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7:10: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7:11:0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7:11: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7:11: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7:11:5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7:12: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12: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7:12: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7:13: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7:13: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7:13: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7:13: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14: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14: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7:15:1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7:15:4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7:15:5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7:16: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7:17:0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7:17: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7:17: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7:17:3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7:17: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7:18:0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7:18: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7:18: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7:18: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7:19: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7:19:2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7:19: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7:20: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7:20:4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7:20: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7:21:1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7:21: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7:21:4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7:22: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7:23:0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7:23: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7:23:5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7:24: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7:24:3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7:24: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7:25:0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7:25: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7:25: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7:26: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7:26: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7:26:4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7:26:5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7:27: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7:27: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7:28:1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7:28: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7:29:0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7:29:0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7:29:3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7:30: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30: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7:30:5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7:31: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31: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7:32:1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7:32:2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07:32:3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7:32: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7:32: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7:33: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7:34: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7:34: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7:34:3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34: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7:35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7:35: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07:35: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7:35:5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7:36: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7:36: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7:37:2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7:37: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07:38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7:38: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7:38: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07:39: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7:39: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7:39:3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7:40: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7:40: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7:40: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7:40: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7:41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7:41: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7:41: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7:42: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7:42: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7:42: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7:43:4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7:43: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7:44: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7:44: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7:44:4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7:44: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7:45: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7:45: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07:45: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7:45:4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7:46: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7:46: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7:46:3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7:46: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7:46:5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7:47: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7:47: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7:47:4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7:48: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7:48: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7:48: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7:49: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49: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7:49: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7:49: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7:50: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7:50:4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7:50: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7:51: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7:51: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7:51: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51: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7:52: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7:52:1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7:52: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7:52:5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7:53: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7:53: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53: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7:54: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7:54: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7:54:4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7:55: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7:55: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7:55: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7:55: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7:55: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7:56: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7:56: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7:56:2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7:56:3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7:56: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7:57: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7:57:2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7:57: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7:57: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7:58: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7:58: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7:58:2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7:58: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7:58:5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7:59: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7:59: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7:59:2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7:59: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8:00: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00: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00:5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8:01:4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01: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02: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02: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8:02:4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8:02: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8:03: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03:2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8:03:3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8:03:4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04: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04: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04: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0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8:05: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05: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06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06:0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3-09-03 08:06:4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8:06: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08:07: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8:07: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8:07: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8:07:5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8:08: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8:08:1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8:08:3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8:08: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8:08: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8:09: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09: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8:09: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09: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09: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8:10: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8:10: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10: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8:10:5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11: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8:11:3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8:12: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12:2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8:12:3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12: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8:13: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8:13: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13: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13: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13: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14: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8:14: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8:14: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15: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15: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8:15:2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8:15: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8:15: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08:16:2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8:16:3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8:17: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17: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17: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08:17:5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8:18: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8:18: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8:18:3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8:18:4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3-09-03 08:18: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8:19: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8:19:3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19: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8:19:5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8:20: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08:20: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8:20: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20:5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21: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8:21: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8:22: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8:22: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08:22:4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8:22:5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8:23: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8:23: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8:23: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8:24: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08:24: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8:24: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08:24: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24:5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08:25: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08:25: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25: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8:25:4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25: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26:3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8:26: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8:27:1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8:27: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27:5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28: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28: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28: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8:28: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28:5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29: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8:29: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8:29: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8:29: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8:29:5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30:0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8:30: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8:30: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8:30: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08:30:5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8:31: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8:31:1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8:31: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31:4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8:31: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8:32:0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8:32: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8:32: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32:4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8:33: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8:33: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8:33: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33: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8:33:5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8:34: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34: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34: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34: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35: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35:3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36: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8:36:2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36: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8:36: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37: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37:1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8:37:2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8:37:3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8:37: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8:38: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8:38: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8:38: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8:38:5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08:39: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8:39: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8:39: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8:39: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39: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40: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40:5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8:40:5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8:41:3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8:41:4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8:41: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42: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42: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42: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8:42:4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8:42: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43: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8:43: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43: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08:43: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44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4: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4: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4: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08:44: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8:45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8:45: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8:45: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45: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8:45: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08:46:0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8:46:1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8:46: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08:46: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46: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8:47: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47: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8:47:3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8:47:5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8:48:0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8:48:1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8:48:2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8:48: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08:48: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8:49: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08:49: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8:49: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08:50: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50: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50:5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8:51: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8:51: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8:51: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51: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8:51: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52: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08:52: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8:52: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8:52: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08:53: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8:53: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8:53: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8:53: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8:53: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8:54: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8:54: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08:55: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8:55: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8:55:5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8:56:2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8:56:4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8:56: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8:57: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8:57: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08:57: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08:57:5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08:58: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58:1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8:58: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8:58: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8:58:5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8:59: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08:59: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8:59: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23-09-03 08:59:5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09:00: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00: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09:01: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9:01: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09:01:3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9:01:4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02: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9:02: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02: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23-09-03 09:02: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3-09-03 09:03:0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9:03:1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09:03: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9:03: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04:0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9:04: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9:04: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04: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9:04: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09:05:2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9:05: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9:06: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06: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9:06:3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9:06: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3-09-03 09:06: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3-09-03 09:07:0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07: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07: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9:07:5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9:08: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9:08: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9:08:3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9:08:4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3-09-03 09:08:5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9:09: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9:09: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09:3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9:09:4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09:09:5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9:10: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10: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9:10: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9:10: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09:11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09:11: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9:11: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11: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9:11: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9:12: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12: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12:2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9:12: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09:12: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09:13:0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9:13: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9:13:2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9:13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13:5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9:14:0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9:14: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9:14: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09:14: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14: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9:15: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9:15: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9:15:2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15:3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09:15:5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9:16: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16:1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9:16: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16:4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9:16: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9:17: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17: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09:17:2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9:17: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9:17:5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18:0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18:1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9:18:2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9:18: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09:18:5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9:19:1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9:19:3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09:19: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19:5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9:20: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09:20:1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9:20:3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9:20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20:5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09:21:0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9:21: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9:21:3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9:21: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9:21: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3-09-03 09:22:0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09:22: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3: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3: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09:23:5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09:24: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24: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24: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9:24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09:24: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09:25:0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9:25: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9:25: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9:25: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3-09-03 09:25:5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9:26:0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3-09-03 09:26:1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9:26:2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9:26: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9:26: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9:27: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09:27: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9:27:2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9:27: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09:27:5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09:28: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3-09-03 09:28:2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28: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9:28:5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3-09-03 09:29:0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09:29:1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9:29: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3-09-03 09:29: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9:29: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9:30: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09:30:1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09:30:3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09:30:4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9:30: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9:31:0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09:31: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9:31:3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3-09-03 09:31: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3-09-03 09:31:5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09:32: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23-09-03 09:32: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09:32: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9:32:4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09:32:5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9:33:0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09:33:2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9:33:3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9:33: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9:33:5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9:34:0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9:34:2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3-09-03 09:34:3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9:34:4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9:34: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9:35:1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9:35: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9:35:3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9:35: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9:35:5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3-09-03 09:36: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9:36: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09:36:3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09:36:4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9:37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09:37: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09:37:2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9:37:3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09:37:4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3-09-03 09:38: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09:38: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9:38:2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9:38:3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9:38:4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9:39: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9:39: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09:39: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9:39:3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9:39: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9:40:0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09:40: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9:40:2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9:40:3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3-09-03 09:40:5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9:41:0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9:41: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9:41: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09:41: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9:41:5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9:42: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09:42: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-09-03 09:42: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09:42: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09:42: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9:43: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9:43: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3-09-03 09:43: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9:43:5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09:44: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9:44:1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9:44:2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9:44: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9:44:5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3-09-03 09:45:0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09:45:1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09:45: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09:45: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9:45: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-09-03 09:46: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09:46:1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9:46: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9:46: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-09-03 09:46:5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9:47: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09:47:2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9:47:3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09:47:4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09:47: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09:48: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09:48: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09:48: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3-09-03 09:48: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9:48:5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9:49: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09:49:2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9:49: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09:49: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23-09-03 09:49:5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9:50: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09:50: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9:50: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09:50: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09:51:1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3-09-03 09:51: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09:51: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09:51: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09:51: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09:52:1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09:52: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9:52:3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3-09-03 09:52: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09:53: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9:53: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9:53: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09:53: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9:53:4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09:54:0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09:54: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09:54: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3-09-03 09:54: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09:54:5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09:55:0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09:55: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09:55: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09:55: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3-09-03 09:56:0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09:56: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-09-03 09:56:2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23-09-03 09:56:3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3-09-03 09:56:5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09:57:0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09:57: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09:57: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09:57: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09:57:5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09:58:0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23-09-03 09:58: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-09-03 09:58: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09:58:4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09:58: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09:59: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-09-03 09:59:5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09:59:5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10:00:3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10:00:4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10:00:5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10:01: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3-09-03 10:01:2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10:01: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3-09-03 10:01: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10:01: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10:02: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10:02: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10:02:3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10:02:4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10:03: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10:03: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10:03: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10:03:3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10:03: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04: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10:04: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10:04: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-09-03 10:04: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10:04:5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3-09-03 10:05:0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10:05: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3 10:05: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10:05: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10:05: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10:06: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10:06:1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10:06:2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10:06: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3-09-03 10:06: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10:07: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10:07: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10:07:2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10:07: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10:07: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3-09-03 10:08:0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08:1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3-09-03 10:08:2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10:08:4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10:08:5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10:09: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10:09: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3-09-03 10:09: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23-09-03 10:09: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10:09:5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10:10:1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10:10:3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3-09-03 10:10:4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10:10: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3-09-03 10:1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9-03 10:11: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10:11:3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10:11: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10:11: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-09-03 10:12:0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12:1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10:12:3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3-09-03 10:12: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10:12:5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10:13: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10:13:5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14:0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14: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3-09-03 10:14:5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23-09-03 10:15: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10:15: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10:15:2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3-09-03 10:15: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-09-03 10:15: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10:16:0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10:16: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23-09-03 10:16: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10:16: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10:16:5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10:17: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23-09-03 10:17:1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10:17: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10:17: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-09-03 10:17:5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10:18: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3-09-03 10:18: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10:18: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0:18:4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10:18:5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10:19:1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10:19: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10:19:4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3-09-03 10:19: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10:20:0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20: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10:20: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-09-03 10:20:4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10:20:5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23-09-03 10:21: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10:21: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10:21:3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10:21:4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3-09-03 10:21: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10:22: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10:22: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10:23: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10:23: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10:24: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10:24: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-09-03 10:24: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-09-03 10:24: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10:24: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10:25:0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10:25: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10:25: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23-09-03 10:25: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3-09-03 10:26: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26:1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10:26: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10:26: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3-09-03 10:26: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0:27: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10:27:1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23-09-03 10:27: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3-09-03 10:27:4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3-09-03 10:27: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-09-03 10:28:0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10:28: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3-09-03 10:28: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3-09-03 10:28: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10:28:5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10:29: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10:29: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3-09-03 10:29:2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3-09-03 10:29:4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10:29: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10:30:0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10:30: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23-09-03 10:30:3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10:30:4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10:30:5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10:31: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3-09-03 10:31:1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10:31: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10:31: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31:5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10:32: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9-03 10:32: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23-09-03 10:32:4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10:32:5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23-09-03 10:33:0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3-09-03 10:33: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10:33:3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3-09-03 10:33: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10:33: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10:34:0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10:34:2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10:34: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10:34: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23-09-03 10:34: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23-09-03 10:35:0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0:35: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10:35:3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3-09-03 10:35:4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10:35: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10:36: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10:36:2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3-09-03 10:36: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10:36:4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3-09-03 10:36: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10:37: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3-09-03 10:37: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10:37: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10:37:4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10:37: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3-09-03 10:38:1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23-09-03 10:38:2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3-09-03 10:38:3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3-09-03 10:38:4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3-09-03 10:38:5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9-03 10:39: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0:39: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-09-03 10:39: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10:39: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23-09-03 10:40: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3-09-03 10:40: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10:40: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3-09-03 10:40: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40: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10:41:0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10:41:1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3-09-03 10:41:2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3-09-03 10:41: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10:41:4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10:42:0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3-09-03 10:42: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10:42:3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3-09-03 10:43: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10:43:1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3-09-03 10:43: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3-09-03 10:44: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10:44: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10:44:4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3-09-03 10:45: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45:4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3-09-03 10:45:5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3-09-03 10:46: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3-09-03 10:46:3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-09-03 10:46: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10:46: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10:47: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10:47:4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3-09-03 10:48: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23-09-03 10:48: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10:48: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3-09-03 10:49: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3-09-03 10:49:2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3-09-03 10:49: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3-09-03 10:49:4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0:50: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10:50: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3-09-03 10:50:5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0:51: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3-09-03 10:51: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10:51:4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0:51:5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3-09-03 10:52: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10:52: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23-09-03 10:53:0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3-09-03 10:53: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3-09-03 10:53:3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10:53: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3-09-03 10:53:5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54: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3-09-03 10:54:3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3-09-03 10:54:4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3-09-03 10:54:5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3-09-03 10:55:1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23-09-03 10:55:4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0:55: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0:56:3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3-09-03 10:56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56: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3-09-03 10:57: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3-09-03 10:57: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57: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3-09-03 10:57: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0:57: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23-09-03 10:58:0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3-09-03 10:58: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3-09-03 10:58: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3-09-03 10:58: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10:58: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0:59:0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3-09-03 10:59: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0:59: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10:59:5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3-09-03 11:00:0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3-09-03 11:00: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1:00:3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23-09-03 11:00: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3-09-03 11:00: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1:01: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3-09-03 11:01: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11:02: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3-09-03 11:02: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1:02: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3-09-03 11:03: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3-09-03 11:03:2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3-09-03 11:03:4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23-09-03 11:03: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3-09-03 11:04: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11:04: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9-03 11:04:2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1:04:4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3-09-03 11:04: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1:05:1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3-09-03 11:05: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3-09-03 11:05:4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1:05:5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11:06: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06: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3-09-03 11:06: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06: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3-09-03 11:06: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3-09-03 11:07: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11:07: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1:07: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3-09-03 11:07: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3-09-03 11:07: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3-09-03 11:08: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3-09-03 11:08: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3-09-03 11:08:3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1:08: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3-09-03 11:09: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-09-03 11:09: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11:09: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3-09-03 11:10: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0: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3-09-03 11:10: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0: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0: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1: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11:11: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11:11: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3-09-03 11:11: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11: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3-09-03 11:12: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3-09-03 11:12: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11:12: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2: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3-09-03 11:13: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11:13: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11:13: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3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3-09-03 11:14: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11:14: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3-09-03 11:15: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3-09-03 11:15: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3-09-03 11:16: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11:16: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3-09-03 11:16: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11:17: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11:17: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8: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1:18: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1:18: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1:18: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-09-03 11:19: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11:19: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3-09-03 11:19: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3-09-03 11:19: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3-09-03 11:20: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1:20: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1:20: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1:20: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1:21: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3-09-03 11:21: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3-09-03 11:21:56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4T18:49:05.476881375</dc:date>
    <meta:editing-duration>PT3H26M36S</meta:editing-duration>
    <meta:editing-cycles>1</meta:editing-cycles>
    <meta:document-statistic meta:table-count="1" meta:cell-count="96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95cm" svg:y="0.316cm" chart:style-name="ch2">
          <text:p>Sound</text:p>
        </chart:title>
        <chart:subtitle svg:x="6.197cm" svg:y="1.275cm" chart:style-name="ch3">
          <text:p>Rainfall using sound</text:p>
        </chart:subtitle>
        <chart:legend chart:legend-position="end" svg:x="13.148cm" svg:y="4.201cm" style:legend-expansion="high" chart:style-name="ch4"/>
        <chart:plot-area chart:style-name="ch5" table:cell-range-address="'SOUND-data-2023-09-04 11 23 32'.A716:'SOUND-data-2023-09-04 11 23 32'.B778" chart:data-source-has-labels="column" svg:x="1.331cm" svg:y="2.138cm" svg:width="11.497cm" svg:height="5.701cm">
          <chart:coordinate-region svg:x="3.681cm" svg:y="2.337cm" svg:width="9.147cm" svg:height="2.764cm"/>
          <chart:axis chart:dimension="x" chart:name="primary-x" chart:style-name="ch6" chartooo:axis-type="auto">
            <chartooo:date-scale/>
            <chart:title svg:x="6.665cm" svg:y="8.019cm" chart:style-name="ch7">
              <text:p>Time</text:p>
            </chart:title>
            <chart:categories table:cell-range-address="'SOUND-data-2023-09-04 11 23 32'.A716:'SOUND-data-2023-09-04 11 23 32'.A778"/>
          </chart:axis>
          <chart:axis chart:dimension="y" chart:name="primary-y" chart:style-name="ch6">
            <chart:title svg:x="0.451cm" svg:y="5.522cm" chart:style-name="ch8">
              <text:p>Sound</text:p>
            </chart:title>
            <chart:grid chart:style-name="ch9" chart:class="major"/>
          </chart:axis>
          <chart:series chart:style-name="ch10" chart:values-cell-range-address="'SOUND-data-2023-09-04 11 23 32'.B716:'SOUND-data-2023-09-04 11 23 32'.B778" chart:class="chart:line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23-09-02 19:55:09</text:p>
                <draw:g>
                  <svg:desc>'SOUND-data-2023-09-04 11 23 32'.A716:'SOUND-data-2023-09-04 11 23 32'.A778</svg:desc>
                </draw:g>
              </table:table-cell>
              <table:table-cell office:value-type="float" office:value="131">
                <text:p>131</text:p>
                <draw:g>
                  <svg:desc>'SOUND-data-2023-09-04 11 23 32'.B716:'SOUND-data-2023-09-04 11 23 32'.B778</svg:desc>
                </draw:g>
              </table:table-cell>
            </table:table-row>
            <table:table-row>
              <table:table-cell office:value-type="string">
                <text:p>2023-09-02 19:55: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3-09-02 19:55: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23-09-02 19:55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19:56: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6: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3-09-02 19:57: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19:57: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23-09-02 19:58: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3-09-02 19:58: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3-09-02 19:58: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3-09-02 19:58: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9: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3-09-02 19:59: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23-09-02 19:59: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3-09-02 20:00: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3-09-02 20:00: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3-09-02 20:00: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23-09-02 20:00: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3-09-02 20:00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3-09-02 20:01: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3-09-02 20:01: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3-09-02 20:01: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3-09-02 20:01: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3-09-02 20:01: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3-09-02 20:02: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2: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3-09-02 20:02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3-09-02 20:02: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3-09-02 20:02: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3-09-02 20:03: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23-09-02 20:03: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23-09-02 20:03: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3-09-02 20:03: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23-09-02 20:04: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3-09-02 20:04: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20:04: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3-09-02 20:05: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5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5: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3-09-02 20:06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3-09-02 20:06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3-09-02 20:06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3-09-02 20:06: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23-09-02 20:07: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3-09-02 20:07: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3-09-02 20:07: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7: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23-09-02 20:08: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23-09-02 20:08: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23-09-02 20:08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3-09-02 20:08: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23-09-02 20:08: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09: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3-09-02 20:09: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23-09-02 20:09: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3-09-02 20:09: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3-09-02 20:09:4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3-09-02 19:55: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23-09-02 20:10: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23-09-02 20:10: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9-02 20:10: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3-09-02 20:10:49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