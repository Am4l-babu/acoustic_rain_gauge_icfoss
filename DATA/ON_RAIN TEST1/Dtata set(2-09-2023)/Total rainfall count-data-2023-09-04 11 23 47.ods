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7.30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otal rainfall count-data-2023-09-04 11 23 47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evice_frmpayload_data_total_rainfall_count</text:p>
          </table:table-cell>
        </table:table-row>
        <table:table-row table:style-name="ro1">
          <table:table-cell office:value-type="string" calcext:value-type="string">
            <text:p>2023-09-02 11:25:0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3-09-02 11:27:0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3-09-02 11:28:0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3-09-02 11:30:0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3-09-02 11:3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1:3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1:3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1:3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1:3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1:3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1:4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1:4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1:4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1:5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1:5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1:5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1:5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1:5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1:5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1:5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1:5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1:5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0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0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0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0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0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0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0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0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1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1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1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1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1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1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1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2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2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2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2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2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2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3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3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3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3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3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3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3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4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4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4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4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4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4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4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4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5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5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5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5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5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5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2:5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0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0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1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2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2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2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2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3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3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3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3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3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3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3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4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4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4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4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4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4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4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4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4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5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5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5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5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5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5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5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5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5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3:5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0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0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0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0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0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0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0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0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0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1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1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1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1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1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1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1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1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1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2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2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2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2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2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2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2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2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2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2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3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3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3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3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3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3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3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3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4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4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4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4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4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4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4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4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4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5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5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5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5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5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5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5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5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5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4:5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0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0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0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0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0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0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0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1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1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1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1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1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1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1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2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2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2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2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2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2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2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3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3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3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3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3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3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3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3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4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4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4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4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4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4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5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5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5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5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5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5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5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5:5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0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0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0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0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0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0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0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0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1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1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1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1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1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1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1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2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2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2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2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2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2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2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2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3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3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3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3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3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3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3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3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3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3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4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4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4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4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4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4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4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4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4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5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5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5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5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5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5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5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6:5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0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0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0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0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0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0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1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1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1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1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1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1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1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1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1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1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2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2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2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2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2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2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2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2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2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3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3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3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3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3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3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3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3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3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4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4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4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4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4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4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4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4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4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5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5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5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5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5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5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5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5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7:5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0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0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0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0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0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0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0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0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0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1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1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1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1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1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1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1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1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1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1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2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2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2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2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2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2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3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3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3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3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3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3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3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3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3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4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4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4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4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4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4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4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4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5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5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5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8:5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9:0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9:0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9:0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9:04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9:1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9:1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9:1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9:27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9:2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9:29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9:3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9:35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9:36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9:3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9:40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9:4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9:48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9:52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9:53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19:55:0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23-09-02 19:56: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3-09-02 19:57:0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023-09-02 19:58: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3-09-02 20:01:06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2023-09-02 20:03: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-09-02 20:05:0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2023-09-02 20:06:06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2023-09-02 20:08:06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2023-09-02 20:09: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10: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12: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13: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14: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15: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16: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17: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18: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19: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20: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21: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22: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23: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24: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25: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27: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28:05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29: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30: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31: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33: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34: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35: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36:05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3-09-02 20:38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0:39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0:41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0:42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0:44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0:45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0:56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08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09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10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16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19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24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25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27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31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32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34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35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36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39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40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41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48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49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50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51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52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53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54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56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57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58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1:59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00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05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09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12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15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16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19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21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24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25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27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28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29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30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32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34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35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36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37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38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39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40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41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42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43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44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45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47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48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49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50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51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52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53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54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55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56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57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58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2:59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3:00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3:01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3:02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3:05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3:07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3:08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3:09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3:10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3:11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3:12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3:17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3:18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3:22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3:23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3:25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3:32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3:33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3:34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3:35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3:36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3:37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3:45: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2 23:52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3 00:02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3 00:07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3 00:14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3 00:20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3 00:21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3 00:22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3 00:23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3 00:24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3 00:25: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9-03 00:31:0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2023-09-03 00:32:0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2023-09-03 00:33:0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2023-09-03 00:34:0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2023-09-03 00:38:0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2023-09-03 00:39:0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2023-09-03 00:41:0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2023-09-03 00:43:0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2023-09-03 00:44:0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2023-09-03 00:45:0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2023-09-03 00:47:0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2023-09-03 00:48:0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2023-09-03 00:49:0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2023-09-03 00:57:0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2023-09-03 00:58:0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2023-09-03 01:00:0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2023-09-03 01:01:0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2023-09-03 01:02:0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2023-09-03 01:03: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3-09-03 01:04: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3-09-03 01:05: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3-09-03 01:07: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3-09-03 01:08: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3-09-03 01:09: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3-09-03 01:11: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3-09-03 01:12:05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2023-09-03 01:13:05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2023-09-03 01:14:05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2023-09-03 01:16:05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2023-09-03 01:17:05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2023-09-03 01:20:05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2023-09-03 01:22:05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2023-09-03 01:23:05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2023-09-03 01:24:05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2023-09-03 01:25:05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2023-09-03 01:27:05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2023-09-03 01:28:05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2023-09-03 01:29:05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2023-09-03 01:30:05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2023-09-03 01:31:05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2023-09-03 01:32:05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2023-09-03 01:33:05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2023-09-03 01:34:0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2023-09-03 01:35:0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2023-09-03 01:36:0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2023-09-03 01:37:0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2023-09-03 01:38: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3-09-03 01:39: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3-09-03 01:40:05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2023-09-03 01:41:05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2023-09-03 01:42:06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2023-09-03 01:43:05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2023-09-03 01:44:05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2023-09-03 01:45:05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2023-09-03 01:47:05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2023-09-03 01:49:05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2023-09-03 01:50:05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2023-09-03 01:53:05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2023-09-03 01:54:05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2023-09-03 01:55:05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2023-09-03 01:57:05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2023-09-03 01:58: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3-09-03 02:01: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3-09-03 02:03:05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2023-09-03 02:04:05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2023-09-03 02:05:05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2023-09-03 02:06:05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2023-09-03 02:07:05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2023-09-03 02:08:05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2023-09-03 02:09:05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2023-09-03 02:10:05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2023-09-03 02:12:05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2023-09-03 02:14:05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2023-09-03 02:15:05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2023-09-03 02:16: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3-09-03 02:18: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3-09-03 02:19:0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2023-09-03 02:20:0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2023-09-03 02:21:0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2023-09-03 02:23:0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2023-09-03 02:24:0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2023-09-03 02:27:0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2023-09-03 02:28:0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2023-09-03 02:29:0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2023-09-03 02:30:0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2023-09-03 02:31:0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2023-09-03 02:32:0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2023-09-03 02:33:0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2023-09-03 02:42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2:49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2:50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2:52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5:09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5:21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5:24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5:26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7:43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7:59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00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01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02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04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06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07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08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09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13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15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18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20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21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22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23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24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25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26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27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31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33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37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39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40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42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43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44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45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46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47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48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49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50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51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52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54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55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56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57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58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8:59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00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01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02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03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04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05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06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07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08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09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10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11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12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13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14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15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16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17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19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20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21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22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23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24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25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26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27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28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29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30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31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32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33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34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35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36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37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38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39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40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41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42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43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44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45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46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47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48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49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50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51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52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53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54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55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56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57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58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09:59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00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01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02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03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04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05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06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07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08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09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10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11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12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13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14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15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16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17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18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19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20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21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23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24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25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28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30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32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33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34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35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37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38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39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41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42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43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45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46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47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48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49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50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51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53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55:0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9-03 10:56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0:57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0:5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0:59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01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02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03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0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0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06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07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0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1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11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13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1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1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16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17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1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19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2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21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22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23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2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27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2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29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3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31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32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33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3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3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36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37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3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39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4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41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42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43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4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4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46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47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4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49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5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51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5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56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57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5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1:59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0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01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02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03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0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0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06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07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0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09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1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11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12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13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1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1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16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17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1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19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21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22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23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2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2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26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27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29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3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31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3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37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3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39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4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41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43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4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46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47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4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49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52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2:5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3:0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3:02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3:03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3:06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3:12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3:1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3:23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3:2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3:26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3:27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3:2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3:29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3:3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3:33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3:36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3:3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3:39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3:4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3:4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3:4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3:53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3:5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3:5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3:5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4:03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4:0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4:0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4:1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4:11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4:12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4:1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4:1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4:16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4:1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4:22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4:2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4:2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4:29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4:3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4:31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4:32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4:3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4:4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4:43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4:47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4:49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4:5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4:56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5:0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5:06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5:09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5:11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5:12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5:13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5:21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5:22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5:2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5:33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5:4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5:41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5:4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5:47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5:5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5:51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5:53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5:5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5:5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5:57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5:5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6:0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6:03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6:0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6:0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6:07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6:09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6:1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6:13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6:1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6:1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6:19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6:2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6:22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6:2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6:2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6:3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6:4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6:46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7:02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7:0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7:13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7:1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8:3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8:36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8:4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8:4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8:46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8:47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8:4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8:52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8:5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8:5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9:02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9:0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9:09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9:19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9:27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9:2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9:29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9:32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9:3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9:38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9:39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9:4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9:42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9:43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9:4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9:49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9:5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9:5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19:5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20:01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20:03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20:0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20:0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20:06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20:07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20:09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20:10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20:1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20:15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20:17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20:21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20:22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20:24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20:26: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9-03 20:28:05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2023-09-03 20:29:05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2023-09-03 20:31:05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2023-09-03 20:32:05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2023-09-03 20:33:05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2023-09-03 20:34:05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2023-09-03 20:35:05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2023-09-03 20:37:05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2023-09-03 20:38:05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2023-09-03 20:39:05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2023-09-03 20:40:05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2023-09-03 20:41:05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2023-09-03 20:42:05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2023-09-03 20:43:05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2023-09-03 20:44:05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2023-09-03 20:46:05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2023-09-03 20:47:05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string" calcext:value-type="string">
            <text:p>2023-09-03 20:48: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3-09-03 20:49:05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2023-09-03 20:50:05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2023-09-03 20:51:05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string" calcext:value-type="string">
            <text:p>2023-09-03 20:52:05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string" calcext:value-type="string">
            <text:p>2023-09-03 20:53:05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2023-09-03 20:54:05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2023-09-03 20:55:05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2023-09-03 20:57:05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string" calcext:value-type="string">
            <text:p>2023-09-03 20:58: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3-09-03 20:59:05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2023-09-03 21:00:05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2023-09-03 21:01:05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string" calcext:value-type="string">
            <text:p>2023-09-03 21:02:05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string" calcext:value-type="string">
            <text:p>2023-09-03 21:07: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3-09-03 21:10:05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string" calcext:value-type="string">
            <text:p>2023-09-03 21:14:05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string" calcext:value-type="string">
            <text:p>2023-09-03 21:18:05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string" calcext:value-type="string">
            <text:p>2023-09-03 21:20: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3-09-03 21:22:05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2023-09-03 21:23:05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2023-09-03 21:24:05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string" calcext:value-type="string">
            <text:p>2023-09-03 21:25: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3-09-03 21:26: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3-09-03 21:27: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3-09-03 21:28: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3-09-03 21:30:05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2023-09-03 21:31:05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string" calcext:value-type="string">
            <text:p>2023-09-03 21:32:05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string" calcext:value-type="string">
            <text:p>2023-09-03 21:33:05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string" calcext:value-type="string">
            <text:p>2023-09-03 21:34:05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2023-09-03 21:35:05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2023-09-03 21:36:05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2023-09-03 21:37:05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2023-09-03 21:38:05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2023-09-03 21:39:05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2023-09-03 21:40:05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2023-09-03 21:43:05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string" calcext:value-type="string">
            <text:p>2023-09-03 21:44:05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string" calcext:value-type="string">
            <text:p>2023-09-03 21:45:05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string" calcext:value-type="string">
            <text:p>2023-09-03 21:46:05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string" calcext:value-type="string">
            <text:p>2023-09-03 21:47:05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string" calcext:value-type="string">
            <text:p>2023-09-03 21:48:05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string" calcext:value-type="string">
            <text:p>2023-09-03 21:49:05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string" calcext:value-type="string">
            <text:p>2023-09-03 21:50:05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string" calcext:value-type="string">
            <text:p>2023-09-03 21:51:05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string" calcext:value-type="string">
            <text:p>2023-09-03 21:52:05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string" calcext:value-type="string">
            <text:p>2023-09-03 21:53:05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string" calcext:value-type="string">
            <text:p>2023-09-03 21:54:05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string" calcext:value-type="string">
            <text:p>2023-09-03 21:56:05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string" calcext:value-type="string">
            <text:p>2023-09-03 21:57:05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string" calcext:value-type="string">
            <text:p>2023-09-03 21:58:05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string" calcext:value-type="string">
            <text:p>2023-09-03 21:59: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3-09-03 22:00: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3-09-03 22:01: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3-09-03 22:03: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3-09-03 22:04: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3-09-03 22:05: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3-09-03 22:15: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3-09-03 22:17: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3-09-03 22:18: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3-09-03 22:22:05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2023-09-03 22:24:05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2023-09-03 22:25:05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2023-09-03 22:28:05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string" calcext:value-type="string">
            <text:p>2023-09-03 22:30:05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string" calcext:value-type="string">
            <text:p>2023-09-03 22:32:05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string" calcext:value-type="string">
            <text:p>2023-09-03 22:33:05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string" calcext:value-type="string">
            <text:p>2023-09-03 22:34:05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string" calcext:value-type="string">
            <text:p>2023-09-03 22:35:05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string" calcext:value-type="string">
            <text:p>2023-09-03 22:36:05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string" calcext:value-type="string">
            <text:p>2023-09-03 22:37:05</text:p>
          </table:table-cell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string" calcext:value-type="string">
            <text:p>2023-09-03 22:38:05</text:p>
          </table:table-cell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string" calcext:value-type="string">
            <text:p>2023-09-03 22:40:05</text:p>
          </table:table-cell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string" calcext:value-type="string">
            <text:p>2023-09-03 22:41:0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2023-09-03 22:42:0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2023-09-03 22:44:0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2023-09-03 22:45: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3-09-03 22:47: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3-09-03 22:48:05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string" calcext:value-type="string">
            <text:p>2023-09-03 22:49:05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string" calcext:value-type="string">
            <text:p>2023-09-03 22:50:05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string" calcext:value-type="string">
            <text:p>2023-09-03 22:51:05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string" calcext:value-type="string">
            <text:p>2023-09-03 22:52:05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string" calcext:value-type="string">
            <text:p>2023-09-03 22:54:05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2023-09-03 22:55:05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2023-09-03 22:56:05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2023-09-03 22:57:05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2023-09-03 22:58:05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2023-09-03 22:59:05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2023-09-03 23:00:05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2023-09-03 23:01: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3-09-03 23:03: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3-09-03 23:04: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3-09-03 23:06:05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string" calcext:value-type="string">
            <text:p>2023-09-03 23:07:05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string" calcext:value-type="string">
            <text:p>2023-09-03 23:09:05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string" calcext:value-type="string">
            <text:p>2023-09-03 23:11:05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string" calcext:value-type="string">
            <text:p>2023-09-03 23:13:05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string" calcext:value-type="string">
            <text:p>2023-09-03 23:15:05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2023-09-03 23:18:05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2023-09-03 23:20:05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2023-09-03 23:21:05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2023-09-03 23:22:05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2023-09-03 23:23:05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2023-09-03 23:24:05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2023-09-03 23:27:05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2023-09-03 23:29:05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2023-09-03 23:31:05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2023-09-03 23:33:05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2023-09-03 23:34:05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2023-09-03 23:35:05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2023-09-03 23:39:05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2023-09-03 23:41:05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2023-09-03 23:43:0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2023-09-03 23:44:0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2023-09-03 23:45:0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2023-09-03 23:46:0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2023-09-03 23:48:0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2023-09-03 23:50:0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2023-09-03 23:51:0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2023-09-03 23:52:0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2023-09-03 23:54:0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2023-09-03 23:55:0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2023-09-03 23:57:0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2023-09-03 23:58:0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2023-09-03 23:59:0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2023-09-04 00:01:0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2023-09-04 00:03:0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2023-09-04 00:07:0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2023-09-04 00:10: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4 00:11: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4 00:12: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4 00:13: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4 00:14: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4 00:15: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4 00:16: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4 00:18: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4 00:19: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4 00:23: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4 00:24: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4 00:25: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4 00:26: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4 00:27: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4 00:28: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4 00:29: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4 00:30:05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2023-09-04 00:31:05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2023-09-04 00:32:05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2023-09-04 00:33:05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2023-09-04 00:34:05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2023-09-04 00:38:05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2023-09-04 00:41:05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2023-09-04 00:43:05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2023-09-04 00:44:05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2023-09-04 00:45:05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2023-09-04 00:46:05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2023-09-04 00:47:05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2023-09-04 00:48:05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2023-09-04 00:50:05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2023-09-04 00:51:05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2023-09-04 00:52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0:54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0:55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0:56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0:57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0:58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0:59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1:00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1:02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1:04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1:05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1:06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1:07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1:08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1:09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1:10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1:12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1:13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1:14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1:15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1:16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1:19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1:24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1:27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1:28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1:29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1:30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1:31:0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23-09-04 01:32:05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2023-09-04 01:33:05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string" calcext:value-type="string">
            <text:p>2023-09-04 01:35:05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2023-09-04 01:38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1:39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1:40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1:41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1:43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1:45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1:47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1:48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1:49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1:50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1:51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1:52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1:54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1:59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2:02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2:03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2:04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2:05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2:08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2:09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2:10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2:11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2:13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2:14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2:15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2:16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2:18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2:19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2:21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2:22:0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3-09-04 02:2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2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2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3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3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3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3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3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4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4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4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4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4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4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4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4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4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5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5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5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5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5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5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5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5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5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2:5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0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0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0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0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0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0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0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1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1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1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1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1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1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1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1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2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2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2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2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2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3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3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3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3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3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3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3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4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4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4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4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4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4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4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4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4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5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5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5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5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5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5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5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3:5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0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0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0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0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0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0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1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1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1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1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1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1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1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1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2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2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2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2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3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3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3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3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3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3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3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3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3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4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4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4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4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5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5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5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5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5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5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5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4:5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0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0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0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0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0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0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0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0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0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1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1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1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1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1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1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1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1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2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2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2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2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2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2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2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2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2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2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3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3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3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3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3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3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3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4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4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4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4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4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4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4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4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4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4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5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5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5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5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5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5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5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5:5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0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0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0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0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0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0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0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0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0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1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1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1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1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1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1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1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1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1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1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2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2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2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2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2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2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2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2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2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2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3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3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3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3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3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3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3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3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3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3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4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4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4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4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4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4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4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4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4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4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5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5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5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5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5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5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5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5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6:5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0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0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0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0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0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0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0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0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0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0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1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1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1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1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1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1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1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1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2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2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2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2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2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2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2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2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2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2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3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3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3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3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3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3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3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3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3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3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4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4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4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4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4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4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4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4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5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5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5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5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5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5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7:5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0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0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0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0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0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0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0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1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1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1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1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1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1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1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1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1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2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2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2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2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2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2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3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3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3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3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3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3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3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3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4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4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4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4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4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4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4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4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5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5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5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5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5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5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8:5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0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0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0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0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0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0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0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0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1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1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1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1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1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1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1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2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2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2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2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2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2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2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2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3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3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3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3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3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3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3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3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3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3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4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4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4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5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5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5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5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5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5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5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5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09:5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0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0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0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0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0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0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0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0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0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0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1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1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1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1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1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1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1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2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2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2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2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2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2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2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2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2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3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3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3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3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3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3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3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3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3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3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4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4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4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4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4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4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4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4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4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5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5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5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5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5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5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5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5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5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0:5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1:0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1:0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1:0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1:0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1:0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1:0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1:0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1:0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1:0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1:1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1:1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1:12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1:13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1:14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1:15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1:16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1:17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1:18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1:19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1:20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1:21:0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2023-09-04 11:22:05</text:p>
          </table:table-cell>
          <table:table-cell office:value-type="float" office:value="43.6" calcext:value-type="float">
            <text:p>43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324" meta:object-count="0"/>
    <meta:generator>LibreOffice/7.3.7.2$Linux_X86_64 LibreOffice_project/30$Build-2</meta:generator>
  </office:meta>
</office:document-meta>
</file>