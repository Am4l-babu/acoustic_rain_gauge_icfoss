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Object1" text:anchor-type="char" svg:width="6.8717in" svg:height="3.8654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char" svg:x="0.0098in" svg:y="4.4689in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5:49:01.149444492</meta:creation-date>
    <dc:date>2023-09-04T18:48:57.050618273</dc:date>
    <meta:editing-duration>PT1H3M17S</meta:editing-duration>
    <meta:editing-cycles>1</meta:editing-cycles>
    <meta:document-statistic meta:table-count="0" meta:image-count="0" meta:object-count="2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53cm" svg:height="9.817cm" xlink:href="." xlink:type="simple" chart:class="chart:line" chart:style-name="ch1">
        <chart:title svg:x="7.201cm" svg:y="0.332cm" chart:style-name="ch2">
          <text:p>SOUND DATA</text:p>
        </chart:title>
        <chart:subtitle svg:x="6.38cm" svg:y="1.307cm" chart:style-name="ch3">
          <text:p>sound using measurement</text:p>
        </chart:subtitle>
        <chart:legend chart:legend-position="end" svg:x="15.13cm" svg:y="4.609cm" style:legend-expansion="high" chart:style-name="ch4"/>
        <chart:plot-area chart:style-name="ch5" chart:data-source-has-labels="both" svg:x="1.36cm" svg:y="2.186cm" svg:width="13.421cm" svg:height="6.454cm">
          <chart:coordinate-region svg:x="3.71cm" svg:y="2.385cm" svg:width="11.071cm" svg:height="3.517cm"/>
          <chart:axis chart:dimension="x" chart:name="primary-x" chart:style-name="ch6" chartooo:axis-type="auto">
            <chartooo:date-scale/>
            <chart:title svg:x="7.642cm" svg:y="8.836cm" chart:style-name="ch7">
              <text:p>TIME</text:p>
            </chart:title>
            <chart:categories table:cell-range-address="local-table.$A$2:.$A$60"/>
          </chart:axis>
          <chart:axis chart:dimension="y" chart:name="primary-y" chart:style-name="ch6">
            <chart:title svg:x="0.451cm" svg:y="6.158cm" chart:style-name="ch8">
              <text:p>AMOUNT</text:p>
            </chart:title>
            <chart:grid chart:style-name="ch9" chart:class="major"/>
          </chart:axis>
          <chart:series chart:style-name="ch10" chart:values-cell-range-address="local-table.$B$2:.$B$60" chart:label-cell-address="local-table.$B$1" chart:class="chart:line"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nd</text:p>
              </table:table-cell>
            </table:table-row>
          </table:table-header-rows>
          <table:table-rows>
            <table:table-row>
              <table:table-cell office:value-type="string">
                <text:p>2023-09-02 19:55:0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23-09-02 19:55:2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23-09-02 19:55: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23-09-02 19:55: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3-09-02 19:56:3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3-09-02 19:56: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23-09-02 19:57: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23-09-02 19:57: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23-09-02 19:58: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23-09-02 19:58: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23-09-02 19:58:3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23-09-02 19:58: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3-09-02 19:59:0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3-09-02 19:59:3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023-09-02 19:59:5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23-09-02 20:00: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23-09-02 20:00:1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23-09-02 20:00:2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23-09-02 20:00: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23-09-02 20:00: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23-09-02 20:01:0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23-09-02 20:01: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23-09-02 20:01:2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3-09-02 20:01: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23-09-02 20:01: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23-09-02 20:02:0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3-09-02 20:02: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23-09-02 20:02: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23-09-02 20:02: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3-09-02 20:02: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23-09-02 20:03: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23-09-02 20:03:2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023-09-02 20:03:4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23-09-02 20:03:5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23-09-02 20:04: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23-09-02 20:04: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23-09-02 20:04: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23-09-02 20:05:3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23-09-02 20:05: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3-09-02 20:05: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23-09-02 20:06: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3-09-02 20:06: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23-09-02 20:06: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23-09-02 20:06:4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23-09-02 20:07: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23-09-02 20:07:1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23-09-02 20:07: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23-09-02 20:07:4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23-09-02 20:08: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23-09-02 20:08: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23-09-02 20:08: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23-09-02 20:08:3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23-09-02 20:08: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23-09-02 20:09:0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23-09-02 20:09:1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23-09-02 20:09: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23-09-02 20:09:3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23-09-02 20:09:4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23-09-02 19:55:10</text:p>
              </table:table-cell>
              <table:table-cell office:value-type="float" office:value="132">
                <text:p>1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474cm" svg:y="0.315cm" chart:style-name="ch2">
          <text:p>MECHANICAL</text:p>
        </chart:title>
        <chart:subtitle svg:x="5.772cm" svg:y="1.273cm" chart:style-name="ch3">
          <text:p>Tipping bucket raingauge</text:p>
        </chart:subtitle>
        <chart:legend chart:legend-position="end" svg:x="12.406cm" svg:y="4.2cm" style:legend-expansion="high" chart:style-name="ch4"/>
        <chart:plot-area chart:style-name="ch5" chart:data-source-has-labels="both" svg:x="1.33cm" svg:y="2.135cm" svg:width="10.757cm" svg:height="5.704cm">
          <chart:coordinate-region svg:x="3.68cm" svg:y="2.135cm" svg:width="8.407cm" svg:height="2.966cm"/>
          <chart:axis chart:dimension="x" chart:name="primary-x" chart:style-name="ch6" chartooo:axis-type="auto">
            <chartooo:date-scale/>
            <chart:title svg:x="6.294cm" svg:y="8.018cm" chart:style-name="ch7">
              <text:p>Time</text:p>
            </chart:title>
            <chart:categories table:cell-range-address="local-table.$A$2:.$A$60"/>
          </chart:axis>
          <chart:axis chart:dimension="y" chart:name="primary-y" chart:style-name="ch6">
            <chart:title svg:x="0.451cm" svg:y="5.6cm" chart:style-name="ch8">
              <text:p>Amount</text:p>
            </chart:title>
            <chart:grid chart:style-name="ch9" chart:class="major"/>
          </chart:axis>
          <chart:series chart:style-name="ch10" chart:values-cell-range-address="local-table.$B$2:.$B$60" chart:label-cell-address="local-table.$B$1" chart:class="chart:line"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CHANICAL</text:p>
              </table:table-cell>
            </table:table-row>
          </table:table-header-rows>
          <table:table-rows>
            <table:table-row>
              <table:table-cell office:value-type="string">
                <text:p>2023-09-02 19:55: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19:55: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19:55: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19:55:5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19:56: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19:56:4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19:57: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19:57:5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19:58:1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19:58:2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19:58:3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19:58:5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19:59:0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19:59:3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19:59:5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20:00:0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20:00: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20:00:2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20:00:4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20:00:5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20:01:0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1:1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1:2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1: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1:5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2:0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2:1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2:2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2:4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2:5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3:1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3:2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3:4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3:5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4: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4: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4:5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5: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5: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5:5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6: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6: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6: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6: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7: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7: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7: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7: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8: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8: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8: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8: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8: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9: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9: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9: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9:3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9:4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19:55:1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