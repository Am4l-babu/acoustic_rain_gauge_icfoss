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udness&amp;sound2" table:style-name="ta1">
        <table:shapes>
          <draw:frame draw:z-index="0" draw:style-name="gr1" draw:text-style-name="P1" svg:width="6.3016in" svg:height="3.5449in" svg:x="4.2224in" svg:y="1.2445in">
            <draw:object draw:notify-on-update-of-ranges="'loudness&amp;sound2'.A1:'loudness&amp;sound2'.A1 'loudness&amp;sound2'.A2:'loudness&amp;sound2'.A22 'loudness&amp;sound2'.B1:'loudness&amp;sound2'.B1 'loudness&amp;sound2'.B2:'loudness&amp;sound2'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Data collection time 2:25PM-2:4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2023-08-23 14:25:00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2023-08-23 14:25: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8-23 14:27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8-23 14:28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8-23 14:29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8-23 14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8-23 14:31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8-23 14:3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8-23 14:33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8-23 14:34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8-23 14:3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8-23 14:36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8-23 14:37:00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2023-08-23 14:38: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3-08-23 14:39:00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23-08-23 14:40:00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8-23 14:41:00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23-08-23 14:42:00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string" calcext:value-type="string">
            <text:p>2023-08-23 14:43:00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string" calcext:value-type="string">
            <text:p>2023-08-23 14:44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3-08-23 14:45:00</text:p>
          </table:table-cell>
          <table:table-cell office:value-type="float" office:value="10.8" calcext:value-type="float">
            <text:p>10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24T11:00:32.249575861</dc:date>
    <meta:editing-duration>PT3M33S</meta:editing-duration>
    <meta:editing-cycles>1</meta:editing-cycles>
    <meta:generator>LibreOffice/7.3.7.2$Linux_X86_64 LibreOffice_project/30$Build-2</meta:generator>
    <meta:document-statistic meta:table-count="1" meta:cell-count="4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 draw:opacity-name="ChartTransparencyGradient_20_1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line" chart:style-name="ch1">
        <chart:title svg:x="4.44cm" svg:y="0.316cm" chart:style-name="ch2">
          <text:p>Mechanical raingauge 2:25-2:45PM</text:p>
        </chart:title>
        <chart:subtitle svg:x="6.345cm" svg:y="1.275cm" chart:style-name="ch3">
          <text:p>Rain fall 1 data set</text:p>
        </chart:subtitle>
        <chart:legend chart:legend-position="end" svg:x="13.949cm" svg:y="4.203cm" style:legend-expansion="high" chart:style-name="ch4"/>
        <chart:plot-area chart:style-name="ch5" table:cell-range-address="'loudness&amp;sound2'.A1:'loudness&amp;sound2'.B22" chart:data-source-has-labels="both" svg:x="1.304cm" svg:y="2.046cm" svg:width="12.293cm" svg:height="5.9cm">
          <chart:coordinate-region svg:x="3.654cm" svg:y="2.246cm" svg:width="9.803cm" svg:height="2.962cm"/>
          <chart:axis chart:dimension="x" chart:name="primary-x" chart:style-name="ch6" chartooo:axis-type="auto">
            <chartooo:date-scale/>
            <chart:title svg:x="7.022cm" svg:y="8.126cm" chart:style-name="ch7">
              <text:p>TIME</text:p>
            </chart:title>
            <chart:categories table:cell-range-address="'loudness&amp;sound2'.A2:'loudness&amp;sound2'.A22"/>
          </chart:axis>
          <chart:axis chart:dimension="y" chart:name="primary-y" chart:style-name="ch6">
            <chart:title svg:x="0.424cm" svg:y="5.807cm" chart:style-name="ch8">
              <text:p>RAIN(mm)</text:p>
            </chart:title>
            <chart:grid chart:style-name="ch9" chart:class="major"/>
          </chart:axis>
          <chart:series chart:style-name="ch10" chart:values-cell-range-address="'loudness&amp;sound2'.B2:'loudness&amp;sound2'.B22" chart:label-cell-address="'loudness&amp;sound2'.B1:'loudness&amp;sound2'.B1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</text:p>
                <draw:g>
                  <svg:desc>'loudness&amp;sound2'.B1:'loudness&amp;sound2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3-08-23 14:25:00</text:p>
                <draw:g>
                  <svg:desc>'loudness&amp;sound2'.A2:'loudness&amp;sound2'.A22</svg:desc>
                </draw:g>
              </table:table-cell>
              <table:table-cell office:value-type="float" office:value="6.6">
                <text:p>6.6</text:p>
                <draw:g>
                  <svg:desc>'loudness&amp;sound2'.B2:'loudness&amp;sound2'.B22</svg:desc>
                </draw:g>
              </table:table-cell>
            </table:table-row>
            <table:table-row>
              <table:table-cell office:value-type="string">
                <text:p>2023-08-23 14:25: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8-23 14:27: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8-23 14:28: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8-23 14:29: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8-23 14:30: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8-23 14:31: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8-23 14:32: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8-23 14:33: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8-23 14:34: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8-23 14:35: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8-23 14:36: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8-23 14:37:0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023-08-23 14:38: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3-08-23 14:39:00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2023-08-23 14:40:00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2023-08-23 14:41:00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2023-08-23 14:42:00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2023-08-23 14:43:00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2023-08-23 14:44: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23-08-23 14:45:00</text:p>
              </table:table-cell>
              <table:table-cell office:value-type="float" office:value="10.8">
                <text:p>10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opacity draw:name="ChartTransparencyGradient_20_1" draw:display-name="ChartTransparencyGradient 1" draw:style="linear" draw:start="100%" draw:end="100%" draw:angle="0deg" draw:border="0%"/>
  </office:styles>
</office:document-styles>
</file>