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23D151BEF6C97B2690A.png" manifest:media-type="image/png"/>
  <manifest:file-entry manifest:full-path="Pictures/1000000100000180000002096CC7B5FEBE6AAAA6.png" manifest:media-type="image/png"/>
  <manifest:file-entry manifest:full-path="Pictures/10000001000001800000020967322C3F39099D71.png" manifest:media-type="image/png"/>
  <manifest:file-entry manifest:full-path="Pictures/100000010000018E0000020A5D64A48E9E643D4B.png" manifest:media-type="image/png"/>
  <manifest:file-entry manifest:full-path="Pictures/1000000100000184000001BD4F563AEC17D90C52.png" manifest:media-type="image/png"/>
  <manifest:file-entry manifest:full-path="Pictures/100000010000019600000258CCBFFE2ED7F00444.png" manifest:media-type="image/png"/>
  <manifest:file-entry manifest:full-path="Pictures/10000001000001560000021D0202685B149FF045.png" manifest:media-type="image/png"/>
  <manifest:file-entry manifest:full-path="Pictures/10000001000001F400000235768EDBC6FC622450.png" manifest:media-type="image/png"/>
  <manifest:file-entry manifest:full-path="Pictures/100000010000018B00000237D73C263BB24B49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3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width="10.451cm" svg:height="15.002cm" draw:z-index="1"><draw:image xlink:href="Pictures/100000010000018B00000237D73C263BB24B49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84cm" svg:y="-0.684cm" svg:width="13.229cm" svg:height="14.949cm" draw:z-index="0"><draw:image xlink:href="Pictures/10000001000001F400000235768EDBC6FC622450.png" xlink:type="simple" xlink:show="embed" xlink:actuate="onLoad" draw:mime-type="image/png"/></draw:frame><text:s text:c="18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4.152cm" svg:y="0.12cm" svg:width="9.049cm" svg:height="14.314cm" draw:z-index="2"><draw:image xlink:href="Pictures/10000001000001560000021D0202685B149FF0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4" text:anchor-type="char" svg:width="10.266cm" svg:height="11.774cm" draw:z-index="3"><draw:image xlink:href="Pictures/1000000100000184000001BD4F563AEC17D90C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5" text:anchor-type="char" svg:width="10.742cm" svg:height="15.875cm" draw:z-index="4"><draw:image xlink:href="Pictures/100000010000019600000258CCBFFE2ED7F004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6" text:anchor-type="char" svg:width="10.53cm" svg:height="13.811cm" draw:z-index="5"><draw:image xlink:href="Pictures/100000010000018E0000020A5D64A48E9E643D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7" text:anchor-type="char" svg:width="10.16cm" svg:height="13.785cm" draw:z-index="6"><draw:image xlink:href="Pictures/10000001000001800000020967322C3F39099D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char" svg:x="-2cm" svg:y="0.36cm" svg:width="10.16cm" svg:height="13.785cm" draw:z-index="7"><draw:image xlink:href="Pictures/1000000100000180000002096CC7B5FEBE6AAAA6.png" xlink:type="simple" xlink:show="embed" xlink:actuate="onLoad" draw:mime-type="image/png"/></draw:frame></text:p>
      <text:p text:style-name="P1"><text:s text:c="5"/></text:p>
      <text:p text:style-name="P1"><text:s text:c="21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1.194cm" svg:y="3.057cm" svg:width="10.98cm" svg:height="15.161cm" draw:z-index="8"><draw:image xlink:href="Pictures/100000010000019F0000023D151BEF6C97B269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3:29:21.791810934</meta:creation-date>
    <dc:date>2024-02-23T23:46:11.839080819</dc:date>
    <meta:editing-duration>PT5S</meta:editing-duration>
    <meta:editing-cycles>1</meta:editing-cycles>
    <meta:document-statistic meta:table-count="0" meta:image-count="9" meta:object-count="0" meta:page-count="8" meta:paragraph-count="4" meta:word-count="0" meta:character-count="451" meta:non-whitespace-character-count="0"/>
    <meta:generator>LibreOffice/7.3.7.2$Linux_X86_64 LibreOffice_project/30$Build-2</meta:generator>
  </office:meta>
</office:document-meta>
</file>