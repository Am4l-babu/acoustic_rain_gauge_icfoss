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d85" officeooo:paragraph-rsid="00047d85"/>
    </style:style>
    <style:style style:name="P2" style:family="paragraph" style:parent-style-name="Standard">
      <style:text-properties officeooo:rsid="0004a706" officeooo:paragraph-rsid="0004a706"/>
    </style:style>
    <style:style style:name="P3" style:family="paragraph" style:parent-style-name="Standard">
      <style:text-properties officeooo:rsid="00058afe" officeooo:paragraph-rsid="00058afe"/>
    </style:style>
    <style:style style:name="T1" style:family="text">
      <style:text-properties officeooo:rsid="0004a706"/>
    </style:style>
    <style:style style:name="T2" style:family="text">
      <style:text-properties officeooo:rsid="00058a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Smart wether station</text:p>
      <text:p text:style-name="P1"/>
      <text:p text:style-name="P1">Aim : Non mechanical ,Nonmoving part Wether statation </text:p>
      <text:p text:style-name="P1"/>
      <text:p text:style-name="P1">Estimation: </text:p>
      <text:p text:style-name="P1"/>
      <text:p text:style-name="P1">1)An aquastic based distrometer / rain gauge for Rain detection </text:p>
      <text:p text:style-name="P1"/>
      <text:p text:style-name="P1">2)An Ultrasonic Sound based Anemometer which calculate the speed and direction of wind.</text:p>
      <text:p text:style-name="P1"/>
      <text:p text:style-name="P1">3)Both model must be need for ML support for this project,so we decided to move on Edge analytics.</text:p>
      <text:p text:style-name="P1"/>
      <text:p text:style-name="P1"/>
      <text:p text:style-name="P1">Project Planing and milestone</text:p>
      <text:p text:style-name="P1"/>
      <text:p text:style-name="P1">Non Mechanical Rain gauge</text:p>
      <text:p text:style-name="P1"/>
      <text:p text:style-name="P1"/>
      <text:p text:style-name="P1">The Raspberri pi using with a mic module is the first setup using for the rain detection model</text:p>
      <text:p text:style-name="P1"/>
      <text:p text:style-name="P1">The stain less steel container is using for the Sound generator of rain drop.</text:p>
      <text:p text:style-name="P1"/>
      <text:p text:style-name="P2">We made a data collection code with python,also record 10s duration small audio samples</text:p>
      <text:p text:style-name="P2"/>
      <text:p text:style-name="P2">Collect data from this setup,On the basis of this data ,further modification is proceeds.</text:p>
      <text:p text:style-name="P2"/>
      <text:p text:style-name="P2">Again add a distigushing code for seperating rain noise and other noise. </text:p>
      <text:p text:style-name="P1"/>
      <text:p text:style-name="P1">Collecting data with the help of memory cards</text:p>
      <text:p text:style-name="P1"/>
      <text:p text:style-name="P1">Compairing with a stantered Davis Machanical rain gauge and compaire collecting data</text:p>
      <text:p text:style-name="P1"/>
      <text:p text:style-name="P1">For <text:s/>time frame matching we go through an network enable system for collecting data</text:p>
      <text:p text:style-name="P1"/>
      <text:p text:style-name="P1">Due to power noise going for a battery pack model of power system with the support of solar panels</text:p>
      <text:p text:style-name="P1"/>
      <text:p text:style-name="P1">Currently <text:span text:style-name="T1">We develop an LSTM model algorithum for collecting Data</text:span></text:p>
      <text:p text:style-name="P1"/>
      <text:p text:style-name="P2">For getting better time frame, Intagrate the mechanical and sound recording system at a common Raspberry pi</text:p>
      <text:p text:style-name="P2"/>
      <text:p text:style-name="P2">Result</text:p>
      <text:p text:style-name="P2"/>
      <text:p text:style-name="P2">At the final stage we achive a 80% of prediction with our current Model</text:p>
      <text:p text:style-name="P2"/>
      <text:p text:style-name="P2">The Tiny ML part with BLE33 is currently going on</text:p>
      <text:p text:style-name="P2"/>
      <text:p text:style-name="P2"><text:soft-page-break/></text:p>
      <text:p text:style-name="P2">Non Mechanical Animometer</text:p>
      <text:p text:style-name="P2"/>
      <text:p text:style-name="P2">Aim:</text:p>
      <text:p text:style-name="P2"/>
      <text:p text:style-name="P2">Ultrasonic wave using mesuring wind speed and direction </text:p>
      <text:p text:style-name="P2"/>
      <text:p text:style-name="P2"><text:s text:c="2"/></text:p>
      <text:p text:style-name="P2"/>
      <text:p text:style-name="P2">ML proceeding with <text:s/>Tensorflow library and HSCR04 Sensors</text:p>
      <text:p text:style-name="P2"/>
      <text:p text:style-name="P2">Trial Module completed with it</text:p>
      <text:p text:style-name="P2"/>
      <text:p text:style-name="P2">ML model is develop with this setup</text:p>
      <text:p text:style-name="P2"/>
      <text:p text:style-name="P2">Data Collecte with this model</text:p>
      <text:p text:style-name="P2"/>
      <text:p text:style-name="P2">The Model deploy on Nano BLE33</text:p>
      <text:p text:style-name="P2"/>
      <text:p text:style-name="P2">R2 98% perfection is get by this model</text:p>
      <text:p text:style-name="P2"/>
      <text:p text:style-name="P2">Nano BLE model deploy and test</text:p>
      <text:p text:style-name="P2"/>
      <text:p text:style-name="P2">Zero velocity condetion it show 8m/s</text:p>
      <text:p text:style-name="P2"/>
      <text:p text:style-name="P2">Suddenly a challenge iniaated from this stage</text:p>
      <text:p text:style-name="P2"/>
      <text:p text:style-name="P2">Made futher liturature review</text:p>
      <text:p text:style-name="P2"/>
      <text:p text:style-name="P2">ML less Hardware Model is decided <text:span text:style-name="T2">to execute</text:span></text:p>
      <text:p text:style-name="P2"/>
      <text:p text:style-name="P3">Hardware development model is Design</text:p>
      <text:p text:style-name="P3"/>
      <text:p text:style-name="P3">It having 4 phases</text:p>
      <text:p text:style-name="P3">1 signal transmission reception unit</text:p>
      <text:p text:style-name="P3">2 Role switching unit</text:p>
      <text:p text:style-name="P3">3 Signal conditioning unit</text:p>
      <text:p text:style-name="P3">4 Time masuring unit</text:p>
      <text:p text:style-name="P3"/>
      <text:p text:style-name="P3">Result</text:p>
      <text:p text:style-name="P3"/>
      <text:p text:style-name="P3">Three phase are over now ,currently working on 4 phase</text:p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8:40:50.342745788</meta:creation-date>
    <dc:date>2024-02-02T19:27:15.963149849</dc:date>
    <meta:editing-duration>PT1M5S</meta:editing-duration>
    <meta:editing-cycles>1</meta:editing-cycles>
    <meta:document-statistic meta:table-count="0" meta:image-count="0" meta:object-count="0" meta:page-count="3" meta:paragraph-count="45" meta:word-count="357" meta:character-count="2124" meta:non-whitespace-character-count="1802"/>
    <meta:generator>LibreOffice/7.3.7.2$Linux_X86_64 LibreOffice_project/30$Build-2</meta:generator>
  </office:meta>
</office:document-meta>
</file>